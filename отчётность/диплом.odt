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5" manifest:media-type="application/x-openoffice-gdimetafile;windows_formatname=&quot;GDIMetaFile&quot;"/>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0" manifest:media-type=""/>
  <manifest:file-entry manifest:full-path="ObjectReplacements/Object 121" manifest:media-type=""/>
  <manifest:file-entry manifest:full-path="ObjectReplacements/Object 122" manifest:media-type=""/>
  <manifest:file-entry manifest:full-path="ObjectReplacements/Object 124" manifest:media-type="application/x-openoffice-gdimetafile;windows_formatname=&quot;GDIMetaFile&quot;"/>
  <manifest:file-entry manifest:full-path="ObjectReplacements/Object 125" manifest:media-type=""/>
  <manifest:file-entry manifest:full-path="ObjectReplacements/Object 126" manifest:media-type=""/>
  <manifest:file-entry manifest:full-path="ObjectReplacements/Object 127" manifest:media-type=""/>
  <manifest:file-entry manifest:full-path="ObjectReplacements/Object 128" manifest:media-type=""/>
  <manifest:file-entry manifest:full-path="ObjectReplacements/Object 129" manifest:media-type=""/>
  <manifest:file-entry manifest:full-path="ObjectReplacements/Object 130" manifest:media-type=""/>
  <manifest:file-entry manifest:full-path="ObjectReplacements/Object 131" manifest:media-type=""/>
  <manifest:file-entry manifest:full-path="ObjectReplacements/Object 132" manifest:media-type=""/>
  <manifest:file-entry manifest:full-path="ObjectReplacements/Object 133" manifest:media-type=""/>
  <manifest:file-entry manifest:full-path="ObjectReplacements/Object 134" manifest:media-type=""/>
  <manifest:file-entry manifest:full-path="ObjectReplacements/Object 135" manifest:media-type=""/>
  <manifest:file-entry manifest:full-path="ObjectReplacements/Object 13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4" manifest:media-type=""/>
  <manifest:file-entry manifest:full-path="ObjectReplacements/Object 145" manifest:media-type=""/>
  <manifest:file-entry manifest:full-path="ObjectReplacements/Object 146" manifest:media-type=""/>
  <manifest:file-entry manifest:full-path="ObjectReplacements/Object 147" manifest:media-type=""/>
  <manifest:file-entry manifest:full-path="ObjectReplacements/Object 148" manifest:media-type=""/>
  <manifest:file-entry manifest:full-path="ObjectReplacements/Object 149"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53" manifest:media-type=""/>
  <manifest:file-entry manifest:full-path="ObjectReplacements/Object 154" manifest:media-type=""/>
  <manifest:file-entry manifest:full-path="ObjectReplacements/Object 155" manifest:media-type=""/>
  <manifest:file-entry manifest:full-path="ObjectReplacements/Object 156" manifest:media-type=""/>
  <manifest:file-entry manifest:full-path="ObjectReplacements/Object 157" manifest:media-type=""/>
  <manifest:file-entry manifest:full-path="ObjectReplacements/Object 158" manifest:media-type=""/>
  <manifest:file-entry manifest:full-path="ObjectReplacements/Object 159" manifest:media-type=""/>
  <manifest:file-entry manifest:full-path="ObjectReplacements/Object 160" manifest:media-type=""/>
  <manifest:file-entry manifest:full-path="ObjectReplacements/Object 161" manifest:media-type=""/>
  <manifest:file-entry manifest:full-path="ObjectReplacements/Object 162" manifest:media-type=""/>
  <manifest:file-entry manifest:full-path="ObjectReplacements/Object 163" manifest:media-type=""/>
  <manifest:file-entry manifest:full-path="ObjectReplacements/Object 164" manifest:media-type=""/>
  <manifest:file-entry manifest:full-path="ObjectReplacements/Object 165" manifest:media-type=""/>
  <manifest:file-entry manifest:full-path="ObjectReplacements/Object 16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
  <manifest:file-entry manifest:full-path="ObjectReplacements/Object 173" manifest:media-type=""/>
  <manifest:file-entry manifest:full-path="ObjectReplacements/Object 17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
  <manifest:file-entry manifest:full-path="ObjectReplacements/Object 179" manifest:media-type="application/x-openoffice-gdimetafile;windows_formatname=&quot;GDIMetaFile&quot;"/>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15/meta.xml" manifest:media-type="text/xml"/>
  <manifest:file-entry manifest:full-path="Object 115/styles.xml" manifest:media-type="text/xml"/>
  <manifest:file-entry manifest:full-path="Object 115/content.xml" manifest:media-type="text/xml"/>
  <manifest:file-entry manifest:full-path="Object 115/" manifest:media-type="application/vnd.oasis.opendocument.chart"/>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24/meta.xml" manifest:media-type="text/xml"/>
  <manifest:file-entry manifest:full-path="Object 124/styles.xml" manifest:media-type="text/xml"/>
  <manifest:file-entry manifest:full-path="Object 124/content.xml" manifest:media-type="text/xml"/>
  <manifest:file-entry manifest:full-path="Object 124/" manifest:media-type="application/vnd.oasis.opendocument.chart"/>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137/meta.xml" manifest:media-type="text/xml"/>
  <manifest:file-entry manifest:full-path="Object 137/styles.xml" manifest:media-type="text/xml"/>
  <manifest:file-entry manifest:full-path="Object 137/content.xml" manifest:media-type="text/xml"/>
  <manifest:file-entry manifest:full-path="Object 137/" manifest:media-type="application/vnd.oasis.opendocument.chart"/>
  <manifest:file-entry manifest:full-path="Object 139/meta.xml" manifest:media-type="text/xml"/>
  <manifest:file-entry manifest:full-path="Object 139/styles.xml" manifest:media-type="text/xml"/>
  <manifest:file-entry manifest:full-path="Object 139/content.xml" manifest:media-type="text/xml"/>
  <manifest:file-entry manifest:full-path="Object 139/" manifest:media-type="application/vnd.oasis.opendocument.chart"/>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44/content.xml" manifest:media-type="text/xml"/>
  <manifest:file-entry manifest:full-path="Object 144/settings.xml" manifest:media-type="text/xml"/>
  <manifest:file-entry manifest:full-path="Object 144/" manifest:version="1.4" manifest:media-type="application/vnd.oasis.opendocument.formula"/>
  <manifest:file-entry manifest:full-path="Object 145/content.xml" manifest:media-type="text/xml"/>
  <manifest:file-entry manifest:full-path="Object 145/settings.xml" manifest:media-type="text/xml"/>
  <manifest:file-entry manifest:full-path="Object 145/"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147/content.xml" manifest:media-type="text/xml"/>
  <manifest:file-entry manifest:full-path="Object 147/settings.xml" manifest:media-type="text/xml"/>
  <manifest:file-entry manifest:full-path="Object 147/"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167/meta.xml" manifest:media-type="text/xml"/>
  <manifest:file-entry manifest:full-path="Object 167/styles.xml" manifest:media-type="text/xml"/>
  <manifest:file-entry manifest:full-path="Object 167/content.xml" manifest:media-type="text/xml"/>
  <manifest:file-entry manifest:full-path="Object 167/" manifest:media-type="application/vnd.oasis.opendocument.chart"/>
  <manifest:file-entry manifest:full-path="Object 169/meta.xml" manifest:media-type="text/xml"/>
  <manifest:file-entry manifest:full-path="Object 169/styles.xml" manifest:media-type="text/xml"/>
  <manifest:file-entry manifest:full-path="Object 169/content.xml" manifest:media-type="text/xml"/>
  <manifest:file-entry manifest:full-path="Object 169/" manifest:media-type="application/vnd.oasis.opendocument.chart"/>
  <manifest:file-entry manifest:full-path="Object 171/meta.xml" manifest:media-type="text/xml"/>
  <manifest:file-entry manifest:full-path="Object 171/styles.xml" manifest:media-type="text/xml"/>
  <manifest:file-entry manifest:full-path="Object 171/content.xml" manifest:media-type="text/xml"/>
  <manifest:file-entry manifest:full-path="Object 171/" manifest:media-type="application/vnd.oasis.opendocument.chart"/>
  <manifest:file-entry manifest:full-path="Object 172/content.xml" manifest:media-type="text/xml"/>
  <manifest:file-entry manifest:full-path="Object 172/settings.xml" manifest:media-type="text/xml"/>
  <manifest:file-entry manifest:full-path="Object 172/" manifest:version="1.4" manifest:media-type="application/vnd.oasis.opendocument.formula"/>
  <manifest:file-entry manifest:full-path="Object 173/content.xml" manifest:media-type="text/xml"/>
  <manifest:file-entry manifest:full-path="Object 173/settings.xml" manifest:media-type="text/xml"/>
  <manifest:file-entry manifest:full-path="Object 173/" manifest:version="1.4" manifest:media-type="application/vnd.oasis.opendocument.formula"/>
  <manifest:file-entry manifest:full-path="Object 175/meta.xml" manifest:media-type="text/xml"/>
  <manifest:file-entry manifest:full-path="Object 175/styles.xml" manifest:media-type="text/xml"/>
  <manifest:file-entry manifest:full-path="Object 175/content.xml" manifest:media-type="text/xml"/>
  <manifest:file-entry manifest:full-path="Object 175/" manifest:media-type="application/vnd.oasis.opendocument.chart"/>
  <manifest:file-entry manifest:full-path="Object 177/meta.xml" manifest:media-type="text/xml"/>
  <manifest:file-entry manifest:full-path="Object 177/styles.xml" manifest:media-type="text/xml"/>
  <manifest:file-entry manifest:full-path="Object 177/content.xml" manifest:media-type="text/xml"/>
  <manifest:file-entry manifest:full-path="Object 177/" manifest:media-type="application/vnd.oasis.opendocument.chart"/>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179/meta.xml" manifest:media-type="text/xml"/>
  <manifest:file-entry manifest:full-path="Object 179/styles.xml" manifest:media-type="text/xml"/>
  <manifest:file-entry manifest:full-path="Object 179/content.xml" manifest:media-type="text/xml"/>
  <manifest:file-entry manifest:full-path="Object 179/"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050000013480FC8B93.png" manifest:media-type="image/png"/>
  <manifest:file-entry manifest:full-path="Pictures/1000000100000218000000F300C9021D.png" manifest:media-type="image/png"/>
  <manifest:file-entry manifest:full-path="Pictures/10000001000001FE0000010C07221E24.png" manifest:media-type="image/png"/>
  <manifest:file-entry manifest:full-path="Pictures/100000010000055D0000019116E31829.png" manifest:media-type="image/png"/>
  <manifest:file-entry manifest:full-path="Pictures/10000001000001B1000000F8592D5D6C.png" manifest:media-type="image/png"/>
  <manifest:file-entry manifest:full-path="Pictures/10000001000001C8000000F7EEF8A8B7.png" manifest:media-type="image/png"/>
  <manifest:file-entry manifest:full-path="Pictures/100000010000052400000175F392F201.png" manifest:media-type="image/png"/>
  <manifest:file-entry manifest:full-path="Pictures/1000000100000207000000F57036D5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scadia Mono" svg:font-family="'Cascadia Mono'" style:font-family-generic="swiss"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swiss"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mily-generic="roman" style:font-pitch="variable"/>
    <style:font-face style:name="Wingdings" svg:font-family="Wingdings" style:font-family-generic="system" style:font-pitch="variable"/>
  </office:font-face-decls>
  <office:automatic-styles>
    <style:style style:name="Таблица1" style:family="table">
      <style:table-properties style:width="16.986cm" fo:margin-left="0.009cm" fo:margin-top="0cm" fo:margin-bottom="0cm" table:align="left" style:writing-mode="page"/>
    </style:style>
    <style:style style:name="Таблица1.A" style:family="table-column">
      <style:table-column-properties style:column-width="3.397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left="0.5pt solid #000000" fo:border-right="none" fo:border-top="0.5pt solid #000000" fo:border-bottom="0.5pt solid #000000"/>
    </style:style>
    <style:style style:name="Таблица1.C1" style:family="table-cell">
      <style:table-cell-properties fo:padding-left="0.191cm" fo:padding-right="0.191cm" fo:padding-top="0cm" fo:padding-bottom="0cm" fo:border="0.5pt solid #000000"/>
    </style:style>
    <style:style style:name="Таблица1.A2" style:family="table-cell">
      <style:table-cell-properties fo:padding-left="0.191cm" fo:padding-right="0.191cm" fo:padding-top="0cm" fo:padding-bottom="0cm" fo:border-left="0.5pt solid #000000" fo:border-right="none" fo:border-top="none" fo:border-bottom="0.5pt solid #000000"/>
    </style:style>
    <style:style style:name="Таблица1.E2" style:family="table-cell">
      <style:table-cell-properties fo:padding-left="0.191cm" fo:padding-right="0.191cm" fo:padding-top="0cm" fo:padding-bottom="0cm" fo:border-left="0.5pt solid #000000" fo:border-right="0.5pt solid #000000" fo:border-top="none" fo:border-bottom="0.5pt solid #000000"/>
    </style:style>
    <style:style style:name="Таблица2" style:family="table">
      <style:table-properties style:width="16.986cm" fo:margin-left="0.009cm" fo:margin-top="0cm" fo:margin-bottom="0cm" table:align="left" style:writing-mode="page"/>
    </style:style>
    <style:style style:name="Таблица2.A" style:family="table-column">
      <style:table-column-properties style:column-width="3.397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0.5pt solid #000000" fo:border-right="none" fo:border-top="0.5pt solid #000000" fo:border-bottom="0.5pt solid #000000"/>
    </style:style>
    <style:style style:name="Таблица2.C1" style:family="table-cell">
      <style:table-cell-properties fo:padding-left="0.191cm" fo:padding-right="0.191cm" fo:padding-top="0cm" fo:padding-bottom="0cm" fo:border="0.5pt solid #000000"/>
    </style:style>
    <style:style style:name="Таблица2.A2" style:family="table-cell">
      <style:table-cell-properties fo:padding-left="0.191cm" fo:padding-right="0.191cm" fo:padding-top="0cm" fo:padding-bottom="0cm" fo:border-left="0.5pt solid #000000" fo:border-right="none" fo:border-top="none" fo:border-bottom="0.5pt solid #000000"/>
    </style:style>
    <style:style style:name="Таблица2.E2" style:family="table-cell">
      <style:table-cell-properties fo:padding-left="0.191cm" fo:padding-right="0.191cm" fo:padding-top="0cm" fo:padding-bottom="0cm" fo:border-left="0.5pt solid #000000" fo:border-right="0.5pt solid #000000" fo:border-top="none" fo:border-bottom="0.5pt solid #000000"/>
    </style:style>
    <style:style style:name="Таблица3" style:family="table">
      <style:table-properties style:width="17.022cm" fo:margin-left="0.009cm" fo:margin-top="0cm" fo:margin-bottom="0cm" table:align="left" style:writing-mode="page"/>
    </style:style>
    <style:style style:name="Таблица3.A" style:family="table-column">
      <style:table-column-properties style:column-width="3.397cm"/>
    </style:style>
    <style:style style:name="Таблица3.D" style:family="table-column">
      <style:table-column-properties style:column-width="3.385cm"/>
    </style:style>
    <style:style style:name="Таблица3.E" style:family="table-column">
      <style:table-column-properties style:column-width="3.445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left="0.5pt solid #000000" fo:border-right="none" fo:border-top="0.5pt solid #000000" fo:border-bottom="0.5pt solid #000000"/>
    </style:style>
    <style:style style:name="Таблица3.C1" style:family="table-cell">
      <style:table-cell-properties fo:padding-left="0.191cm" fo:padding-right="0.191cm" fo:padding-top="0cm" fo:padding-bottom="0cm" fo:border="0.5pt solid #000000"/>
    </style:style>
    <style:style style:name="Таблица3.A2" style:family="table-cell">
      <style:table-cell-properties fo:padding-left="0.191cm" fo:padding-right="0.191cm" fo:padding-top="0cm" fo:padding-bottom="0cm" fo:border-left="0.5pt solid #000000" fo:border-right="none" fo:border-top="none" fo:border-bottom="0.5pt solid #000000"/>
    </style:style>
    <style:style style:name="Таблица3.E2" style:family="table-cell">
      <style:table-cell-properties fo:padding-left="0.191cm" fo:padding-right="0.191cm" fo:padding-top="0cm" fo:padding-bottom="0cm" fo:border-left="0.5pt solid #000000" fo:border-right="0.5pt solid #000000" fo:border-top="none" fo:border-bottom="0.5pt solid #000000"/>
    </style:style>
    <style:style style:name="Таблица4" style:family="table">
      <style:table-properties style:width="17.004cm" fo:margin-left="-0.176cm" fo:margin-top="0cm" fo:margin-bottom="0cm" table:align="left" style:writing-mode="page"/>
    </style:style>
    <style:style style:name="Таблица4.A" style:family="table-column">
      <style:table-column-properties style:column-width="3.401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0.5pt solid #000000"/>
    </style:style>
    <style:style style:name="Таблица4.C1" style:family="table-cell">
      <style:table-cell-properties fo:padding-left="0.191cm" fo:padding-right="0.191cm" fo:padding-top="0cm" fo:padding-bottom="0cm" fo:border-left="0.5pt solid #000000" fo:border-right="none" fo:border-top="0.5pt solid #000000" fo:border-bottom="0.5pt solid #000000"/>
    </style:style>
    <style:style style:name="Таблица4.A2" style:family="table-cell">
      <style:table-cell-properties fo:padding-left="0.191cm" fo:padding-right="0.191cm" fo:padding-top="0cm" fo:padding-bottom="0cm" fo:border-left="0.5pt solid #000000" fo:border-right="0.5pt solid #000000" fo:border-top="none" fo:border-bottom="0.5pt solid #000000"/>
    </style:style>
    <style:style style:name="Таблица4.C2" style:family="table-cell">
      <style:table-cell-properties fo:padding-left="0.191cm" fo:padding-right="0.191cm" fo:padding-top="0cm" fo:padding-bottom="0cm" fo:border-left="0.5pt solid #000000" fo:border-right="none" fo:border-top="none" fo:border-bottom="0.5pt solid #000000"/>
    </style:style>
    <style:style style:name="Таблица5" style:family="table">
      <style:table-properties style:width="17.022cm" fo:margin-left="0.009cm" fo:margin-top="0cm" fo:margin-bottom="0cm" table:align="left" style:writing-mode="page"/>
    </style:style>
    <style:style style:name="Таблица5.A" style:family="table-column">
      <style:table-column-properties style:column-width="3.397cm"/>
    </style:style>
    <style:style style:name="Таблица5.D" style:family="table-column">
      <style:table-column-properties style:column-width="3.385cm"/>
    </style:style>
    <style:style style:name="Таблица5.E" style:family="table-column">
      <style:table-column-properties style:column-width="3.445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left="0.5pt solid #000000" fo:border-right="none" fo:border-top="0.5pt solid #000000" fo:border-bottom="0.5pt solid #000000"/>
    </style:style>
    <style:style style:name="Таблица5.C1" style:family="table-cell">
      <style:table-cell-properties fo:padding-left="0.191cm" fo:padding-right="0.191cm" fo:padding-top="0cm" fo:padding-bottom="0cm" fo:border="0.5pt solid #000000"/>
    </style:style>
    <style:style style:name="Таблица5.A2" style:family="table-cell">
      <style:table-cell-properties fo:padding-left="0.191cm" fo:padding-right="0.191cm" fo:padding-top="0cm" fo:padding-bottom="0cm" fo:border-left="0.5pt solid #000000" fo:border-right="none" fo:border-top="none" fo:border-bottom="0.5pt solid #000000"/>
    </style:style>
    <style:style style:name="Таблица5.E2" style:family="table-cell">
      <style:table-cell-properties fo:padding-left="0.191cm" fo:padding-right="0.191cm" fo:padding-top="0cm" fo:padding-bottom="0cm" fo:border-left="0.5pt solid #000000" fo:border-right="0.5pt solid #000000" fo:border-top="none" fo:border-bottom="0.5pt solid #000000"/>
    </style:style>
    <style:style style:name="Таблица5.15" style:family="table-row">
      <style:table-row-properties style:min-row-height="1.058cm" fo:keep-together="auto"/>
    </style:style>
    <style:style style:name="Таблица6" style:family="table">
      <style:table-properties style:width="17.022cm" fo:margin-left="0.009cm" fo:margin-top="0cm" fo:margin-bottom="0cm" table:align="left" style:writing-mode="page"/>
    </style:style>
    <style:style style:name="Таблица6.A" style:family="table-column">
      <style:table-column-properties style:column-width="3.397cm"/>
    </style:style>
    <style:style style:name="Таблица6.D" style:family="table-column">
      <style:table-column-properties style:column-width="3.385cm"/>
    </style:style>
    <style:style style:name="Таблица6.E" style:family="table-column">
      <style:table-column-properties style:column-width="3.445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left="0.5pt solid #000000" fo:border-right="none" fo:border-top="0.5pt solid #000000" fo:border-bottom="0.5pt solid #000000"/>
    </style:style>
    <style:style style:name="Таблица6.C1" style:family="table-cell">
      <style:table-cell-properties fo:padding-left="0.191cm" fo:padding-right="0.191cm" fo:padding-top="0cm" fo:padding-bottom="0cm" fo:border="0.5pt solid #000000"/>
    </style:style>
    <style:style style:name="Таблица6.A2" style:family="table-cell">
      <style:table-cell-properties fo:padding-left="0.191cm" fo:padding-right="0.191cm" fo:padding-top="0cm" fo:padding-bottom="0cm" fo:border-left="0.5pt solid #000000" fo:border-right="none" fo:border-top="none" fo:border-bottom="0.5pt solid #000000"/>
    </style:style>
    <style:style style:name="Таблица6.E2" style:family="table-cell">
      <style:table-cell-properties fo:padding-left="0.191cm" fo:padding-right="0.191cm" fo:padding-top="0cm" fo:padding-bottom="0cm" fo:border-left="0.5pt solid #000000" fo:border-right="0.5pt solid #000000" fo:border-top="none" fo:border-bottom="0.5pt solid #000000"/>
    </style:style>
    <style:style style:name="Таблица6.15" style:family="table-row">
      <style:table-row-properties style:min-row-height="1.161cm" fo:keep-together="auto"/>
    </style:style>
    <style:style style:name="Таблица7" style:family="table">
      <style:table-properties style:width="17.022cm" fo:margin-left="0.009cm" fo:margin-top="0cm" fo:margin-bottom="0cm" table:align="left" style:writing-mode="page"/>
    </style:style>
    <style:style style:name="Таблица7.A" style:family="table-column">
      <style:table-column-properties style:column-width="3.397cm"/>
    </style:style>
    <style:style style:name="Таблица7.D" style:family="table-column">
      <style:table-column-properties style:column-width="3.385cm"/>
    </style:style>
    <style:style style:name="Таблица7.E" style:family="table-column">
      <style:table-column-properties style:column-width="3.445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left="0.5pt solid #000000" fo:border-right="none" fo:border-top="0.5pt solid #000000" fo:border-bottom="0.5pt solid #000000"/>
    </style:style>
    <style:style style:name="Таблица7.C1" style:family="table-cell">
      <style:table-cell-properties fo:padding-left="0.191cm" fo:padding-right="0.191cm" fo:padding-top="0cm" fo:padding-bottom="0cm" fo:border="0.5pt solid #000000"/>
    </style:style>
    <style:style style:name="Таблица7.A2" style:family="table-cell">
      <style:table-cell-properties fo:padding-left="0.191cm" fo:padding-right="0.191cm" fo:padding-top="0cm" fo:padding-bottom="0cm" fo:border-left="0.5pt solid #000000" fo:border-right="none" fo:border-top="none" fo:border-bottom="0.5pt solid #000000"/>
    </style:style>
    <style:style style:name="Таблица7.E2" style:family="table-cell">
      <style:table-cell-properties fo:padding-left="0.191cm" fo:padding-right="0.191cm" fo:padding-top="0cm" fo:padding-bottom="0cm" fo:border-left="0.5pt solid #000000" fo:border-right="0.5pt solid #000000" fo:border-top="none" fo:border-bottom="0.5pt solid #000000"/>
    </style:style>
    <style:style style:name="Таблица8" style:family="table">
      <style:table-properties style:width="17.175cm" fo:margin-left="-0.176cm" fo:margin-top="0cm" fo:margin-bottom="0cm" table:align="left" style:writing-mode="page"/>
    </style:style>
    <style:style style:name="Таблица8.A" style:family="table-column">
      <style:table-column-properties style:column-width="3.438cm"/>
    </style:style>
    <style:style style:name="Таблица8.B" style:family="table-column">
      <style:table-column-properties style:column-width="3.431cm"/>
    </style:style>
    <style:style style:name="Таблица8.D" style:family="table-column">
      <style:table-column-properties style:column-width="3.433cm"/>
    </style:style>
    <style:style style:name="Таблица8.E" style:family="table-column">
      <style:table-column-properties style:column-width="3.436cm"/>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0.5pt solid #000000"/>
    </style:style>
    <style:style style:name="Таблица8.D1" style:family="table-cell">
      <style:table-cell-properties fo:padding-left="0.191cm" fo:padding-right="0.191cm" fo:padding-top="0cm" fo:padding-bottom="0cm" fo:border-left="0.5pt solid #000000" fo:border-right="none" fo:border-top="0.5pt solid #000000" fo:border-bottom="0.5pt solid #000000"/>
    </style:style>
    <style:style style:name="Таблица8.A2" style:family="table-cell">
      <style:table-cell-properties fo:padding-left="0.191cm" fo:padding-right="0.191cm" fo:padding-top="0cm" fo:padding-bottom="0cm" fo:border-left="0.5pt solid #000000" fo:border-right="0.5pt solid #000000" fo:border-top="none" fo:border-bottom="0.5pt solid #000000"/>
    </style:style>
    <style:style style:name="Таблица8.D2" style:family="table-cell">
      <style:table-cell-properties fo:padding-left="0.191cm" fo:padding-right="0.191cm" fo:padding-top="0cm" fo:padding-bottom="0cm" fo:border-left="0.5pt solid #000000" fo:border-right="none" fo:border-top="none" fo:border-bottom="0.5pt solid #000000"/>
    </style:style>
    <style:style style:name="Таблица9" style:family="table">
      <style:table-properties style:width="17.175cm" fo:margin-left="-0.176cm" fo:margin-top="0cm" fo:margin-bottom="0cm" table:align="left" style:writing-mode="page"/>
    </style:style>
    <style:style style:name="Таблица9.A" style:family="table-column">
      <style:table-column-properties style:column-width="4.295cm"/>
    </style:style>
    <style:style style:name="Таблица9.B" style:family="table-column">
      <style:table-column-properties style:column-width="4.293cm"/>
    </style:style>
    <style:style style:name="Таблица9.C" style:family="table-column">
      <style:table-column-properties style:column-width="4.292cm"/>
    </style:style>
    <style:style style:name="Таблица9.1" style:family="table-row">
      <style:table-row-properties fo:keep-together="auto"/>
    </style:style>
    <style:style style:name="Таблица9.A1" style:family="table-cell">
      <style:table-cell-properties fo:padding-left="0.191cm" fo:padding-right="0.191cm" fo:padding-top="0cm" fo:padding-bottom="0cm" fo:border="0.5pt solid #000000"/>
    </style:style>
    <style:style style:name="Таблица9.A2" style:family="table-cell">
      <style:table-cell-properties fo:padding-left="0.191cm" fo:padding-right="0.191cm" fo:padding-top="0cm" fo:padding-bottom="0cm" fo:border-left="0.5pt solid #000000" fo:border-right="0.5pt solid #000000" fo:border-top="none" fo:border-bottom="0.5pt solid #000000"/>
    </style:style>
    <style:style style:name="Таблица10" style:family="table">
      <style:table-properties style:width="17.175cm" fo:margin-left="-0.176cm" fo:margin-top="0cm" fo:margin-bottom="0cm" table:align="left" style:writing-mode="page"/>
    </style:style>
    <style:style style:name="Таблица10.A" style:family="table-column">
      <style:table-column-properties style:column-width="4.295cm"/>
    </style:style>
    <style:style style:name="Таблица10.B" style:family="table-column">
      <style:table-column-properties style:column-width="4.293cm"/>
    </style:style>
    <style:style style:name="Таблица10.C" style:family="table-column">
      <style:table-column-properties style:column-width="4.292cm"/>
    </style:style>
    <style:style style:name="Таблица10.1" style:family="table-row">
      <style:table-row-properties fo:keep-together="auto"/>
    </style:style>
    <style:style style:name="Таблица10.A1" style:family="table-cell">
      <style:table-cell-properties fo:padding-left="0.191cm" fo:padding-right="0.191cm" fo:padding-top="0cm" fo:padding-bottom="0cm" fo:border="0.5pt solid #000000"/>
    </style:style>
    <style:style style:name="Таблица10.A2"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00%" fo:text-align="center" style:justify-single-word="false" fo:orphans="0" fo:widows="0"/>
      <style:text-properties fo:font-size="16pt" style:font-size-asian="16pt" style:font-size-complex="16pt"/>
    </style:style>
    <style:style style:name="P2" style:family="paragraph" style:parent-style-name="Standard">
      <style:paragraph-properties fo:margin-top="0cm" fo:margin-bottom="0cm" style:contextual-spacing="false" fo:line-height="100%" fo:text-align="center" style:justify-single-word="false" fo:orphans="0" fo:widows="0"/>
      <style:text-properties style:font-name="Times New Roman" style:letter-kerning="false" style:font-name-asian="Times New Roman1"/>
    </style:style>
    <style:style style:name="P3" style:family="paragraph" style:parent-style-name="Standard">
      <style:paragraph-properties fo:margin-top="0cm" fo:margin-bottom="0cm" style:contextual-spacing="false" fo:line-height="100%" fo:orphans="0" fo:widows="0"/>
      <style:text-properties style:font-name="Times New Roman" fo:font-weight="bold" style:letter-kerning="false" style:font-name-asian="Times New Roman1" style:font-weight-asian="bold"/>
    </style:style>
    <style:style style:name="P4" style:family="paragraph" style:parent-style-name="Standard">
      <style:paragraph-properties fo:margin-top="0cm" fo:margin-bottom="0cm" style:contextual-spacing="false" fo:line-height="100%" fo:orphans="0" fo:widows="0"/>
      <style:text-properties style:font-name="Times New Roman" fo:font-size="14pt" style:letter-kerning="false" style:font-name-asian="Times New Roman1" style:font-size-asian="14pt" style:font-size-complex="14pt"/>
    </style:style>
    <style:style style:name="P5" style:family="paragraph" style:parent-style-name="Standard">
      <style:paragraph-properties fo:margin-top="0cm" fo:margin-bottom="0cm" style:contextual-spacing="false" fo:line-height="100%" fo:text-align="center" style:justify-single-word="false" fo:orphans="0" fo:widows="0"/>
    </style:style>
    <style:style style:name="P6" style:family="paragraph" style:parent-style-name="Standard">
      <style:paragraph-properties fo:margin-top="0cm" fo:margin-bottom="0cm" style:contextual-spacing="false" fo:line-height="100%" fo:orphans="0" fo:widows="0"/>
      <style:text-properties style:font-name="Times New Roman" fo:font-size="14pt" fo:font-weight="bold" style:letter-kerning="false" style:font-name-asian="Times New Roman1" style:font-size-asian="14pt" style:font-weight-asian="bold" style:font-size-complex="14pt"/>
    </style:style>
    <style:style style:name="P7" style:family="paragraph" style:parent-style-name="Standard">
      <style:paragraph-properties fo:margin-top="0cm" fo:margin-bottom="0cm" style:contextual-spacing="false" fo:line-height="150%" fo:text-align="center" style:justify-single-word="false" fo:orphans="0" fo:widows="0"/>
      <style:text-properties fo:font-size="14pt" style:font-size-asian="14pt" style:font-size-complex="14pt"/>
    </style:style>
    <style:style style:name="P8" style:family="paragraph" style:parent-style-name="Standard">
      <style:paragraph-properties fo:margin-right="0cm" fo:margin-top="0cm" fo:margin-bottom="0cm" style:contextual-spacing="false" fo:line-height="150%" fo:orphans="0" fo:widows="0" fo:text-indent="8.502cm" style:auto-text-indent="false"/>
      <style:text-properties style:font-name="Times New Roman" fo:font-size="12pt" fo:font-weight="bold" style:letter-kerning="false" style:font-name-asian="Times New Roman1" style:font-size-asian="12pt" style:font-weight-asian="bold" style:font-size-complex="12pt"/>
    </style:style>
    <style:style style:name="P9" style:family="paragraph" style:parent-style-name="Standard">
      <style:paragraph-properties fo:margin-right="0cm" fo:margin-top="0cm" fo:margin-bottom="0cm" style:contextual-spacing="false" fo:line-height="150%" fo:orphans="0" fo:widows="0" fo:text-indent="8.502cm" style:auto-text-indent="false"/>
      <style:text-properties fo:font-size="12pt" style:font-size-asian="12pt" style:font-size-complex="12pt"/>
    </style:style>
    <style:style style:name="P10" style:family="paragraph" style:parent-style-name="Standard">
      <style:paragraph-properties fo:margin-right="0cm" fo:margin-top="0cm" fo:margin-bottom="0cm" style:contextual-spacing="false" fo:line-height="100%" fo:orphans="0" fo:widows="0" fo:text-indent="8.502cm" style:auto-text-indent="false"/>
      <style:text-properties fo:font-size="12pt" style:font-size-asian="12pt" style:font-size-complex="12pt"/>
    </style:style>
    <style:style style:name="P11" style:family="paragraph" style:parent-style-name="Standard">
      <style:paragraph-properties fo:margin-right="0cm" fo:margin-top="0cm" fo:margin-bottom="0cm" style:contextual-spacing="false" fo:line-height="150%" fo:orphans="0" fo:widows="0" fo:text-indent="9.753cm" style:auto-text-indent="false"/>
      <style:text-properties fo:font-size="12pt" style:font-size-asian="12pt" style:font-size-complex="12pt"/>
    </style:style>
    <style:style style:name="P12" style:family="paragraph" style:parent-style-name="Text_20_body">
      <style:paragraph-properties fo:margin-left="0cm" fo:margin-right="0cm" fo:margin-top="0cm" fo:margin-bottom="0cm" style:contextual-spacing="false" fo:line-height="100%" fo:orphans="0" fo:widows="0" fo:text-indent="8.502cm" style:auto-text-indent="false"/>
      <style:text-properties fo:font-size="12pt" style:font-size-asian="12pt" style:font-size-complex="12pt"/>
    </style:style>
    <style:style style:name="P13" style:family="paragraph" style:parent-style-name="Standard">
      <style:paragraph-properties fo:margin-right="0cm" fo:margin-top="0cm" fo:margin-bottom="0cm" style:contextual-spacing="false" fo:line-height="150%" fo:orphans="0" fo:widows="0" fo:text-indent="8.502cm" style:auto-text-indent="false"/>
    </style:style>
    <style:style style:name="P14" style:family="paragraph" style:parent-style-name="Standard">
      <style:paragraph-properties fo:margin-right="0cm" fo:margin-top="0cm" fo:margin-bottom="0cm" style:contextual-spacing="false" fo:line-height="100%" fo:orphans="0" fo:widows="0" fo:text-indent="8.502cm" style:auto-text-indent="false"/>
      <style:text-properties fo:color="#ffffff" loext:opacity="100%" style:font-name="Times New Roman" style:letter-kerning="false" style:font-name-asian="Times New Roman1" style:font-weight-complex="bold"/>
    </style:style>
    <style:style style:name="P15" style:family="paragraph" style:parent-style-name="Standard">
      <style:paragraph-properties fo:margin-right="0cm" fo:margin-top="0cm" fo:margin-bottom="0cm" style:contextual-spacing="false" fo:line-height="100%" fo:orphans="0" fo:widows="0" fo:text-indent="8.502cm" style:auto-text-indent="false"/>
      <style:text-properties fo:color="#ffffff" loext:opacity="100%" style:font-name="Times New Roman" officeooo:paragraph-rsid="000321a7" style:letter-kerning="false" style:font-name-asian="Times New Roman1" style:font-weight-complex="bold"/>
    </style:style>
    <style:style style:name="P16" style:family="paragraph" style:parent-style-name="Standard">
      <style:paragraph-properties fo:margin-top="0cm" fo:margin-bottom="0.282cm" style:contextual-spacing="false" fo:line-height="150%" fo:text-align="center" style:justify-single-word="false" fo:orphans="0" fo:widows="0"/>
      <style:text-properties fo:font-size="12pt" style:font-size-asian="12pt" style:font-size-complex="12pt"/>
    </style:style>
    <style:style style:name="P17" style:family="paragraph" style:parent-style-name="Standard" style:master-page-name="Converted1">
      <style:paragraph-properties fo:margin-top="0.847cm" fo:margin-bottom="0.423cm" style:contextual-spacing="false" fo:line-height="100%" fo:text-align="center" style:justify-single-word="false" style:page-number="auto"/>
    </style:style>
    <style:style style:name="P18" style:family="paragraph" style:parent-style-name="Contents_20_1">
      <style:paragraph-properties>
        <style:tab-stops>
          <style:tab-stop style:position="16.997cm" style:type="right" style:leader-style="dotted" style:leader-text="."/>
        </style:tab-stops>
      </style:paragraph-properties>
    </style:style>
    <style:style style:name="P19" style:family="paragraph" style:parent-style-name="Contents_20_2">
      <style:paragraph-properties>
        <style:tab-stops>
          <style:tab-stop style:position="16.997cm" style:type="right" style:leader-style="dotted" style:leader-text="."/>
        </style:tab-stops>
      </style:paragraph-properties>
    </style:style>
    <style:style style:name="P20" style:family="paragraph" style:parent-style-name="Contents_20_3">
      <style:paragraph-properties>
        <style:tab-stops>
          <style:tab-stop style:position="16.997cm" style:type="right" style:leader-style="dotted" style:leader-text="."/>
        </style:tab-stops>
      </style:paragraph-properties>
    </style:style>
    <style:style style:name="P21" style:family="paragraph" style:parent-style-name="_30_1_5f_Заголовок_20_1_20_ИТММ">
      <style:paragraph-properties fo:margin-top="0.847cm" fo:margin-bottom="0.423cm" style:contextual-spacing="false" fo:text-align="center" style:justify-single-word="false" fo:orphans="2" fo:widows="2" fo:hyphenation-ladder-count="no-limit" fo:hyphenation-keep="auto" loext:hyphenation-keep-type="column" fo:break-before="page" fo:keep-with-next="always"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22" style:family="paragraph" style:parent-style-name="_30_3_5f_Текст_20_ИТММ">
      <style:paragraph-properties fo:text-align="justify" style:justify-single-word="false"/>
    </style:style>
    <style:style style:name="P23" style:family="paragraph" style:parent-style-name="_30_3_5f_Текст_20_ИТММ" style:list-style-name="WWNum4">
      <style:paragraph-properties fo:text-align="justify" style:justify-single-word="false"/>
    </style:style>
    <style:style style:name="P24" style:family="paragraph" style:parent-style-name="_30_2_5f_Заголовок_20_2_20_ИТММ">
      <style:paragraph-properties fo:margin-top="0cm" fo:margin-bottom="0.423cm" style:contextual-spacing="false" fo:break-before="page"/>
    </style:style>
    <style:style style:name="P25" style:family="paragraph" style:parent-style-name="_30_4_5f_Заголовок_20_3_20_уровня_20_ИИТММ">
      <style:paragraph-properties fo:margin-top="0.635cm" fo:margin-bottom="0.423cm" style:contextual-spacing="false" fo:text-align="center" style:justify-single-word="false" fo:keep-together="always" fo:orphans="2" fo:widows="2" fo:hyphenation-ladder-count="no-limit" fo:hyphenation-keep="auto" loext:hyphenation-keep-type="column" fo:break-before="auto" fo:break-after="auto"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26" style:family="paragraph" style:parent-style-name="_30_4_5f_Заголовок_20_3_20_уровня_20_ИИТММ">
      <style:paragraph-properties fo:margin-top="0cm" fo:margin-bottom="0.423cm" style:contextual-spacing="false" fo:break-before="page"/>
    </style:style>
    <style:style style:name="P27" style:family="paragraph" style:parent-style-name="_30_3_5f_Текст_20_ИТММ">
      <style:paragraph-properties fo:text-align="center" style:justify-single-word="false"/>
    </style:style>
    <style:style style:name="P28" style:family="paragraph" style:parent-style-name="_30_3_5f_Текст_20_ИТММ" style:list-style-name="WWNum12"/>
    <style:style style:name="P29" style:family="paragraph" style:parent-style-name="_30_3_5f_Текст_20_ИТММ">
      <style:paragraph-properties fo:margin-top="0cm" fo:margin-bottom="0cm" style:contextual-spacing="false"/>
    </style:style>
    <style:style style:name="P30" style:family="paragraph" style:parent-style-name="_30_3_5f_Текст_20_ИТММ" style:list-style-name="WWNum13"/>
    <style:style style:name="P31" style:family="paragraph" style:parent-style-name="_30_4_5f_Заголовок_20_3_20_уровня_20_ИИТММ">
      <style:paragraph-properties fo:margin-left="2.521cm" fo:text-indent="0cm" style:auto-text-indent="false"/>
    </style:style>
    <style:style style:name="P32" style:family="paragraph" style:parent-style-name="_30_4_5f_Заголовок_20_3_20_уровня_20_ИИТММ">
      <style:paragraph-properties fo:margin-left="2.521cm" fo:margin-top="0cm" fo:margin-bottom="0.423cm" style:contextual-spacing="false" fo:text-indent="0cm" style:auto-text-indent="false" fo:break-before="page"/>
    </style:style>
    <style:style style:name="P33" style:family="paragraph" style:parent-style-name="_30_3_5f_Текст_20_ИТММ">
      <style:paragraph-properties fo:text-align="start" style:justify-single-word="false"/>
    </style:style>
    <style:style style:name="P34" style:family="paragraph" style:parent-style-name="_30_3_5f_Текст_20_ИТММ">
      <style:text-properties style:use-window-font-color="true" loext:opacity="0%" fo:font-size="12pt" fo:language="ru" fo:country="RU" style:text-underline-style="none" style:font-size-asian="12pt" style:font-size-complex="12pt"/>
    </style:style>
    <style:style style:name="P35" style:family="paragraph" style:parent-style-name="_30_2_5f_Заголовок_20_2_20_ИТММ">
      <style:paragraph-properties fo:margin-top="0cm" fo:margin-bottom="0.423cm" style:contextual-spacing="false" fo:text-align="center" style:justify-single-word="false" fo:orphans="2" fo:widows="2" fo:hyphenation-ladder-count="no-limit" fo:hyphenation-keep="auto" loext:hyphenation-keep-type="column" fo:break-before="page" style:writing-mode="lr-tb"/>
      <style:text-properties fo:hyphenate="false" fo:hyphenation-remain-char-count="2" fo:hyphenation-push-char-count="2" loext:hyphenation-no-caps="false" loext:hyphenation-no-last-word="false" loext:hyphenation-word-char-count="5" loext:hyphenation-zone="no-limit"/>
    </style:style>
    <style:style style:name="P36" style:family="paragraph" style:parent-style-name="Text_20_body">
      <style:paragraph-properties fo:text-align="center" style:justify-single-word="false"/>
    </style:style>
    <style:style style:name="P37" style:family="paragraph" style:parent-style-name="Text_20_body">
      <style:paragraph-properties fo:margin-left="0cm" fo:margin-right="0cm" fo:text-align="center" style:justify-single-word="false" fo:text-indent="0cm" style:auto-text-indent="false"/>
    </style:style>
    <style:style style:name="P38" style:family="paragraph" style:parent-style-name="_30_3_5f_Текст_20_ИТММ">
      <style:paragraph-properties fo:text-align="center" style:justify-single-word="false"/>
      <style:text-properties fo:font-variant="normal" fo:text-transform="none" style:text-line-through-style="none" style:text-line-through-type="none" style:font-name="Times New Roman2" fo:font-style="normal" style:text-underline-style="none" fo:font-weight="normal" style:text-blinking="false" fo:background-color="transparent" style:font-style-asian="normal" style:font-weight-asian="normal"/>
    </style:style>
    <style:style style:name="P39" style:family="paragraph" style:parent-style-name="_30_3_5f_Текст_20_ИТММ">
      <style:paragraph-properties fo:margin-left="0cm" fo:text-align="center" style:justify-single-word="false" fo:text-indent="0cm" style:auto-text-indent="false"/>
    </style:style>
    <style:style style:name="P40" style:family="paragraph" style:parent-style-name="Standard">
      <style:paragraph-properties fo:text-align="start" style:justify-single-word="false"/>
    </style:style>
    <style:style style:name="P41" style:family="paragraph" style:parent-style-name="_30_3_5f_Текст_20_ИТММ" style:list-style-name="WWNum16">
      <style:paragraph-properties fo:text-align="justify" style:justify-single-word="false"/>
    </style:style>
    <style:style style:name="P42" style:family="paragraph" style:parent-style-name="_30_3_5f_Текст_20_ИТММ" style:list-style-name="WWNum15">
      <style:paragraph-properties fo:text-align="justify" style:justify-single-word="false"/>
    </style:style>
    <style:style style:name="P43" style:family="paragraph" style:parent-style-name="_30_3_5f_Текст_20_ИТММ" style:list-style-name="WWNum6"/>
    <style:style style:name="P44" style:family="paragraph" style:parent-style-name="_30_3_5f_Текст_20_ИТММ" style:list-style-name="WWNum14"/>
    <style:style style:name="P45" style:family="paragraph" style:parent-style-name="_30_3_5f_Текст_20_ИТММ" style:list-style-name="WWNum17"/>
    <style:style style:name="P46" style:family="paragraph" style:parent-style-name="_30_3_5f_Текст_20_ИТММ" style:list-style-name="WWNum18"/>
    <style:style style:name="P47" style:family="paragraph" style:parent-style-name="_30_3_5f_Текст_20_ИТММ" style:list-style-name="WWNum7">
      <style:paragraph-properties fo:text-align="start" style:justify-single-word="false"/>
    </style:style>
    <style:style style:name="P48" style:family="paragraph" style:parent-style-name="_30_3_5f_Текст_20_ИТММ" style:list-style-name="WWNum7"/>
    <style:style style:name="P49" style:family="paragraph" style:parent-style-name="_30_3_5f_Текст_20_ИТММ" style:list-style-name="WWNum5"/>
    <style:style style:name="P50" style:family="paragraph" style:parent-style-name="Standard">
      <style:paragraph-properties fo:margin-top="0cm" fo:margin-bottom="0cm" style:contextual-spacing="false" fo:line-height="100%" fo:text-align="start" style:justify-single-word="false"/>
    </style:style>
    <style:style style:name="P51" style:family="paragraph" style:parent-style-name="Standard">
      <style:paragraph-properties fo:margin-top="0cm" fo:margin-bottom="0cm" style:contextual-spacing="false" fo:line-height="100%" fo:text-align="start" style:justify-single-word="false"/>
      <style:text-properties fo:font-size="11pt" style:font-size-asian="11pt" style:font-size-complex="11pt"/>
    </style:style>
    <style:style style:name="P52" style:family="paragraph" style:parent-style-name="Standard">
      <style:paragraph-properties fo:margin-top="0cm" fo:margin-bottom="0cm" style:contextual-spacing="false" fo:line-height="100%" fo:text-align="start" style:justify-single-word="false"/>
      <style:text-properties style:use-window-font-color="true" loext:opacity="0%" style:font-name="Consolas" fo:font-size="11pt" fo:language="ru" fo:country="RU" style:text-underline-style="none" style:font-size-asian="11pt" style:font-size-complex="11pt"/>
    </style:style>
    <style:style style:name="P53" style:family="paragraph" style:parent-style-name="Standard">
      <style:paragraph-properties fo:line-height="100%" fo:text-align="start" style:justify-single-word="false"/>
    </style:style>
    <style:style style:name="P54" style:family="paragraph" style:parent-style-name="_30_3_5f_Текст_20_ИТММ">
      <style:text-properties fo:color="#000000" loext:opacity="100%" fo:font-size="12pt" style:text-underline-style="none" style:font-size-asian="12pt" style:font-size-complex="12pt"/>
    </style:style>
    <style:style style:name="P55" style:family="paragraph" style:parent-style-name="_30_3_5f_Текст_20_ИТММ">
      <style:paragraph-properties fo:margin-top="0cm" fo:margin-bottom="0cm" style:contextual-spacing="false" fo:break-before="page"/>
    </style:style>
    <style:style style:name="P56" style:family="paragraph" style:parent-style-name="_30_3_5f_Текст_20_ИТММ" style:list-style-name="WWNum19"/>
    <style:style style:name="P57" style:family="paragraph" style:parent-style-name="_30_3_5f_Текст_20_ИТММ">
      <style:paragraph-properties fo:margin-top="0.106cm" fo:margin-bottom="0.106cm" style:contextual-spacing="false" fo:line-height="100%" fo:text-align="center" style:justify-single-word="false" fo:text-indent="0cm" style:auto-text-indent="false"/>
    </style:style>
    <style:style style:name="P58" style:family="paragraph" style:parent-style-name="_30_3_5f_Текст_20_ИТММ">
      <style:paragraph-properties fo:line-height="200%" fo:text-align="start" style:justify-single-word="false" fo:text-indent="0cm" style:auto-text-indent="false"/>
    </style:style>
    <style:style style:name="P59" style:family="paragraph" style:parent-style-name="_30_3_5f_Текст_20_ИТММ">
      <style:paragraph-properties fo:margin-top="0.212cm" fo:margin-bottom="0.212cm" style:contextual-spacing="false" fo:line-height="100%" fo:text-align="center" style:justify-single-word="false" fo:text-indent="0cm" style:auto-text-indent="false"/>
    </style:style>
    <style:style style:name="P60" style:family="paragraph" style:parent-style-name="_30_3_5f_Текст_20_ИТММ">
      <style:paragraph-properties fo:line-height="100%" fo:text-align="start" style:justify-single-word="false" fo:text-indent="0cm" style:auto-text-indent="false"/>
    </style:style>
    <style:style style:name="P61" style:family="paragraph" style:parent-style-name="Standard">
      <style:paragraph-properties fo:margin-top="0cm" fo:margin-bottom="0cm" style:contextual-spacing="false" fo:line-height="100%" fo:text-align="start" style:justify-single-word="false" fo:break-before="page"/>
    </style:style>
    <style:style style:name="P62" style:family="paragraph" style:parent-style-name="Standard">
      <style:paragraph-properties fo:margin-top="0cm" fo:margin-bottom="0cm" style:contextual-spacing="false" fo:line-height="100%" fo:text-align="start" style:justify-single-word="false"/>
      <style:text-properties fo:font-size="11pt" fo:language="en" fo:country="US" style:font-size-asian="11pt" style:font-size-complex="11pt"/>
    </style:style>
    <style:style style:name="P63" style:family="paragraph" style:parent-style-name="Standard">
      <style:paragraph-properties fo:line-height="100%" fo:text-align="start" style:justify-single-word="false"/>
      <style:text-properties fo:color="#127622" loext:opacity="100%" style:font-name="Consolas" fo:font-size="11pt" style:text-underline-style="none" style:font-size-asian="11pt" style:font-size-complex="11pt"/>
    </style:style>
    <style:style style:name="P64" style:family="paragraph" style:parent-style-name="Standard">
      <style:paragraph-properties fo:line-height="100%" fo:text-align="start" style:justify-single-word="false"/>
      <style:text-properties fo:font-size="11pt" style:font-size-asian="11pt" style:font-size-complex="11pt"/>
    </style:style>
    <style:style style:name="P65" style:family="paragraph" style:parent-style-name="_30_3_5f_Текст_20_ИТММ">
      <style:text-properties fo:language="ru" fo:country="RU"/>
    </style:style>
    <style:style style:name="P66" style:family="paragraph" style:parent-style-name="_30_5_5f_Таблица_20_ИТММ">
      <style:paragraph-properties fo:break-before="page"/>
      <style:text-properties officeooo:paragraph-rsid="000321a7"/>
    </style:style>
    <style:style style:name="P67" style:family="paragraph" style:parent-style-name="_30_5_5f_Таблица_20_ИТММ">
      <style:text-properties officeooo:paragraph-rsid="000321a7"/>
    </style:style>
    <style:style style:name="P68" style:family="paragraph" style:parent-style-name="_30_3_5f_Текст_20_ИТММ">
      <style:paragraph-properties fo:margin-left="0cm" fo:margin-top="0cm" fo:margin-bottom="0cm" style:contextual-spacing="false" fo:text-indent="0cm" style:auto-text-indent="false"/>
    </style:style>
    <style:style style:name="P69" style:family="paragraph" style:parent-style-name="_30_3_5f_Текст_20_ИТММ">
      <style:paragraph-properties fo:margin-left="0cm" fo:margin-top="0cm" fo:margin-bottom="0cm" style:contextual-spacing="false" fo:text-indent="0cm" style:auto-text-indent="false" fo:break-before="page"/>
    </style:style>
    <style:style style:name="P70" style:family="paragraph" style:parent-style-name="Standard">
      <style:paragraph-properties fo:line-height="100%" fo:text-align="start" style:justify-single-word="false"/>
      <style:text-properties style:use-window-font-color="true" loext:opacity="0%" style:font-name="Consolas" fo:font-size="11pt" fo:language="ru" fo:country="RU"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P71" style:family="paragraph" style:parent-style-name="Standard">
      <style:paragraph-properties fo:line-height="100%" fo:text-align="start" style:justify-single-word="false"/>
      <style:text-properties style:font-name="Consolas" fo:font-size="11pt" fo:language="en" fo:country="US" style:text-underline-style="none" style:font-size-asian="11pt" style:font-size-complex="11pt"/>
    </style:style>
    <style:style style:name="P72" style:family="paragraph" style:parent-style-name="Standard">
      <style:paragraph-properties fo:line-height="100%" fo:text-align="start" style:justify-single-word="false"/>
      <style:text-properties style:use-window-font-color="true" loext:opacity="0%" style:font-name="Consolas" fo:font-size="11pt" fo:language="ru" fo:country="RU" style:text-underline-style="none" style:font-size-asian="11pt" style:font-size-complex="11pt"/>
    </style:style>
    <style:style style:name="P73" style:family="paragraph" style:parent-style-name="Standard">
      <style:paragraph-properties fo:line-height="100%" fo:text-align="start" style:justify-single-word="false"/>
      <style:text-properties style:font-name="Consolas" fo:font-size="11pt" style:text-underline-style="none" style:font-size-asian="11pt" style:font-size-complex="11pt"/>
    </style:style>
    <style:style style:name="P74" style:family="paragraph" style:parent-style-name="Standard">
      <style:paragraph-properties fo:line-height="100%" fo:text-align="start" style:justify-single-word="false"/>
      <style:text-properties style:font-name="Liberation Mono" fo:font-size="11pt" fo:language="en" fo:country="US"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P75" style:family="paragraph" style:parent-style-name="_30_3_5f_Текст_20_ИТММ" style:list-style-name="WWNum20"/>
    <style:style style:name="P76" style:family="paragraph" style:parent-style-name="_30_3_5f_Текст_20_ИТММ">
      <style:paragraph-properties fo:margin-left="0cm" fo:text-align="start" style:justify-single-word="false" fo:text-indent="0cm" style:auto-text-indent="false"/>
    </style:style>
    <style:style style:name="P77" style:family="paragraph" style:parent-style-name="_30_5_5f_Таблица_20_ИТММ">
      <style:paragraph-properties fo:margin-top="0cm" fo:margin-bottom="0.212cm" style:contextual-spacing="false" fo:break-before="page"/>
    </style:style>
    <style:style style:name="P78" style:family="paragraph" style:parent-style-name="_30_3_5f_Текст_20_ИТММ">
      <style:paragraph-properties fo:margin-top="0cm" fo:margin-bottom="0cm" style:contextual-spacing="false" fo:text-align="center" style:justify-single-word="false"/>
    </style:style>
    <style:style style:name="P79" style:family="paragraph" style:parent-style-name="_30_3_5f_Текст_20_ИТММ">
      <style:paragraph-properties fo:margin-top="0.106cm" fo:margin-bottom="0.106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80" style:family="paragraph" style:parent-style-name="_30_3_5f_Текст_20_ИТММ">
      <style:paragraph-properties fo:margin-top="0cm" fo:margin-bottom="0cm" style:contextual-spacing="false"/>
      <style:text-properties fo:language="ru" fo:country="RU"/>
    </style:style>
    <style:style style:name="P81" style:family="paragraph" style:parent-style-name="_30_3_5f_Текст_20_ИТММ" style:list-style-name="WWNum9"/>
    <style:style style:name="P82" style:family="paragraph" style:parent-style-name="_30_3_5f_Текст_20_ИТММ">
      <style:paragraph-properties fo:margin-left="0cm" fo:line-height="150%" fo:text-align="justify" style:justify-single-word="false" fo:orphans="2" fo:widows="2" fo:hyphenation-ladder-count="no-limit" fo:hyphenation-keep="auto" loext:hyphenation-keep-type="column" fo:text-indent="1.251cm" style:auto-text-indent="false"/>
      <style:text-properties style:text-position="0% 100%" fo:font-size="12pt" fo:language="ru" fo:country="RU" style:font-size-asian="12pt" fo:hyphenate="false" fo:hyphenation-remain-char-count="2" fo:hyphenation-push-char-count="2" loext:hyphenation-no-caps="false" loext:hyphenation-no-last-word="false" loext:hyphenation-word-char-count="5" loext:hyphenation-zone="no-limit"/>
    </style:style>
    <style:style style:name="P83" style:family="paragraph" style:parent-style-name="_30_3_5f_Текст_20_ИТММ" style:list-style-name="WWNum9">
      <style:paragraph-properties fo:margin-top="0cm" fo:margin-bottom="0cm" style:contextual-spacing="false" fo:break-before="page"/>
    </style:style>
    <style:style style:name="P84" style:family="paragraph" style:parent-style-name="_30_3_5f_Текст_20_ИТММ" style:list-style-name="WWNum10"/>
    <style:style style:name="P85" style:family="paragraph" style:parent-style-name="Standard">
      <style:paragraph-properties fo:margin-top="0cm" fo:margin-bottom="0.051cm" style:contextual-spacing="false" fo:line-height="100%" fo:text-align="start" style:justify-single-word="false" fo:hyphenation-ladder-count="no-limit" fo:hyphenation-keep="auto" loext:hyphenation-keep-type="column"/>
      <style:text-properties fo:color="#000000" loext:opacity="100%" style:font-name="Cascadia Mono" fo:font-size="9.5pt" fo:background-color="#ffffff" style:font-name-asian="NSimSun" style:font-size-asian="9.5pt" style:language-asian="zh" style:country-asian="CN" style:font-name-complex="Arial1" style:language-complex="hi" style:country-complex="IN"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top="0cm" fo:margin-bottom="0.051cm" style:contextual-spacing="false" fo:line-height="100%" fo:text-align="start" style:justify-single-word="false"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7" style:family="paragraph" style:parent-style-name="_30_3_5f_Текст_20_ИТММ">
      <style:text-properties style:use-window-font-color="true" loext:opacity="0%"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P88" style:family="paragraph" style:parent-style-name="_30_3_5f_Текст_20_ИТММ">
      <style:text-properties fo:language="ru" fo:country="RU" officeooo:rsid="000321a7" officeooo:paragraph-rsid="000321a7"/>
    </style:style>
    <style:style style:name="P89" style:family="paragraph" style:parent-style-name="_30_4_5f_Заголовок_20_3_20_уровня_20_ИИТММ">
      <style:paragraph-properties fo:margin-top="0cm" fo:margin-bottom="0.423cm" style:contextual-spacing="false" fo:text-align="center" style:justify-single-word="false" fo:orphans="2" fo:widows="2" fo:hyphenation-ladder-count="no-limit" fo:hyphenation-keep="auto" loext:hyphenation-keep-type="column" fo:break-before="page" style:writing-mode="lr-tb"/>
      <style:text-properties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top="0cm" fo:margin-bottom="0cm" style:contextual-spacing="false" fo:line-height="100%"/>
      <style:text-properties fo:font-variant="normal" fo:text-transform="none" fo:color="#000000" loext:opacity="100%" style:text-line-through-style="none" style:text-line-through-type="none" style:font-name="Cascadia Mono" fo:font-size="9.5pt" fo:font-style="normal" style:text-underline-style="none" fo:font-weight="normal" style:text-blinking="false" fo:background-color="#ffffff" style:font-size-asian="9.5pt" style:font-style-asian="normal" style:font-weight-asian="normal"/>
    </style:style>
    <style:style style:name="P91" style:family="paragraph" style:parent-style-name="_30_3_5f_Текст_20_ИТММ">
      <style:paragraph-properties fo:margin-left="0cm" fo:text-indent="0cm" style:auto-text-indent="false"/>
    </style:style>
    <style:style style:name="P92" style:family="paragraph" style:parent-style-name="_30_3_5f_Текст_20_ИТММ">
      <style:paragraph-properties fo:margin-left="0cm" fo:text-indent="0cm" style:auto-text-indent="false" fo:break-before="page"/>
    </style:style>
    <style:style style:name="P93" style:family="paragraph" style:parent-style-name="_30_3_5f_Текст_20_ИТММ" style:list-style-name="WWNum8"/>
    <style:style style:name="P94" style:family="paragraph" style:parent-style-name="Text_20_body">
      <style:paragraph-properties fo:margin-left="0cm" fo:margin-right="0cm" fo:text-align="start" style:justify-single-word="false" fo:orphans="2" fo:widows="2" fo:hyphenation-ladder-count="no-limit" fo:hyphenation-keep="auto"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_30_3_5f_Текст_20_ИТММ">
      <style:paragraph-properties fo:margin-top="0cm" fo:margin-bottom="0cm" style:contextual-spacing="false" fo:break-before="page"/>
      <style:text-properties officeooo:paragraph-rsid="000321a7"/>
    </style:style>
    <style:style style:name="P96" style:family="paragraph" style:parent-style-name="_30_3_5f_Текст_20_ИТММ" style:list-style-name="WWNum11"/>
    <style:style style:name="P97" style:family="paragraph" style:parent-style-name="_30_4_5f_Заголовок_20_3_20_уровня_20_ИИТММ">
      <style:paragraph-properties fo:margin-top="0.635cm" fo:margin-bottom="0.423cm" style:contextual-spacing="false" fo:text-align="center" style:justify-single-word="false" fo:keep-together="always" fo:orphans="2" fo:widows="2" fo:hyphenation-ladder-count="no-limit" fo:hyphenation-keep="auto" loext:hyphenation-keep-type="column" fo:break-before="auto" fo:break-after="auto" fo:keep-with-next="always" style:writing-mode="lr-tb"/>
      <style:text-properties style:use-window-font-color="true" loext:opacity="0%" style:font-name="Times New Roman" fo:language="ru" fo:country="RU" fo:font-weight="bold" style:letter-kerning="true" style:font-name-asian="Calibri2" style:language-asian="en" style:country-asian="US" style:font-weight-asian="bold"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8" style:family="paragraph" style:parent-style-name="_30_5_5f_Таблица_20_ИТММ">
      <style:paragraph-properties fo:break-before="page"/>
    </style:style>
    <style:style style:name="P99" style:family="paragraph" style:parent-style-name="_30_3_5f_Текст_20_ИТММ" style:list-style-name="WWNum21">
      <style:paragraph-properties fo:text-align="justify" style:justify-single-word="false"/>
    </style:style>
    <style:style style:name="P100" style:family="paragraph" style:parent-style-name="_30_3_5f_Текст_20_ИТММ" style:list-style-name="WWNum22">
      <style:paragraph-properties fo:text-align="justify" style:justify-single-word="false"/>
    </style:style>
    <style:style style:name="P101" style:family="paragraph" style:parent-style-name="_30_6_5f_список_20_литературы_20_ИТММ">
      <style:paragraph-properties fo:margin-left="0cm" fo:text-align="justify" style:justify-single-word="false" fo:text-indent="0cm" style:auto-text-indent="false"/>
    </style:style>
    <style:style style:name="P102" style:family="paragraph" style:parent-style-name="_30_6_5f_список_20_литературы_20_ИТММ">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line-height="100%" fo:text-align="start" style:justify-single-word="false"/>
      <style:text-properties fo:color="#000000" loext:opacity="100%" style:font-name="Cascadia Mono" fo:font-size="9.5pt" style:font-size-asian="9.5pt" fo:background-color="#ffffff"/>
    </style:style>
    <style:style style:name="P104" style:family="paragraph" style:parent-style-name="Standard">
      <style:paragraph-properties fo:line-height="100%"/>
    </style:style>
    <style:style style:name="P105" style:family="paragraph" style:parent-style-name="Standard">
      <style:paragraph-properties fo:line-height="100%" fo:text-align="start" style:justify-single-word="false"/>
      <style:text-properties fo:color="#008000" loext:opacity="100%" style:font-name="Cascadia Mono" fo:font-size="9.5pt" fo:language="en" fo:country="US" style:font-size-asian="9.5pt" fo:background-color="#ffffff"/>
    </style:style>
    <style:style style:name="P106" style:family="paragraph" style:parent-style-name="Standard">
      <style:paragraph-properties fo:line-height="100%" fo:text-align="start" style:justify-single-word="false"/>
      <style:text-properties fo:color="#0000ff" loext:opacity="100%" style:font-name="Cascadia Mono" fo:font-size="9.5pt" style:font-size-asian="9.5pt" fo:background-color="#ffffff"/>
    </style:style>
    <style:style style:name="P107" style:family="paragraph" style:parent-style-name="_30_1_5f_Заголовок_20_1_20_ИТММ">
      <style:paragraph-properties fo:margin-top="0cm" fo:margin-bottom="0.423cm" style:contextual-spacing="false" fo:line-height="100%" fo:break-before="page"/>
    </style:style>
    <style:style style:name="P108" style:family="paragraph" style:parent-style-name="Standard">
      <style:paragraph-properties fo:line-height="100%" fo:text-align="start" style:justify-single-word="false"/>
      <style:text-properties fo:color="#808080" loext:opacity="100%" style:font-name="Cascadia Mono" fo:font-size="9.5pt" fo:language="ru" fo:country="RU" style:font-size-asian="9.5pt" fo:background-color="#ffffff"/>
    </style:style>
    <style:style style:name="P109" style:family="paragraph" style:parent-style-name="Standard">
      <style:paragraph-properties fo:line-height="100%" fo:text-align="start" style:justify-single-word="false"/>
      <style:text-properties fo:color="#808080" loext:opacity="100%" style:font-name="Cascadia Mono" fo:font-size="9.5pt" style:font-size-asian="9.5pt" fo:background-color="#ffffff"/>
    </style:style>
    <style:style style:name="P110" style:family="paragraph" style:parent-style-name="Standard">
      <style:paragraph-properties fo:margin-top="0cm" fo:margin-bottom="0.423cm" style:contextual-spacing="false" fo:line-height="100%" fo:text-align="start" style:justify-single-word="false"/>
    </style:style>
    <style:style style:name="P111" style:family="paragraph" style:parent-style-name="Standard">
      <style:paragraph-properties fo:margin-top="0cm" fo:margin-bottom="0.423cm" style:contextual-spacing="false" fo:line-height="100%" fo:text-align="start" style:justify-single-word="false"/>
      <style:text-properties fo:language="ru" fo:country="RU"/>
    </style:style>
    <style:style style:name="T1" style:family="text">
      <style:text-properties style:font-name="Times New Roman" style:letter-kerning="false" style:font-name-asian="Times New Roman1"/>
    </style:style>
    <style:style style:name="T2" style:family="text">
      <style:text-properties fo:font-variant="small-caps" style:font-name="Times New Roman" style:letter-kerning="false" style:font-name-asian="Times New Roman1"/>
    </style:style>
    <style:style style:name="T3" style:family="text">
      <style:text-properties style:font-name="Times New Roman" fo:font-weight="bold" style:letter-kerning="false" style:font-name-asian="Times New Roman1" style:font-weight-asian="bold"/>
    </style:style>
    <style:style style:name="T4" style:family="text">
      <style:text-properties style:font-name="Times New Roman" fo:font-size="14pt" fo:font-weight="bold" style:letter-kerning="false" style:font-name-asian="Times New Roman1" style:font-size-asian="14pt" style:font-weight-asian="bold" style:font-size-complex="14pt"/>
    </style:style>
    <style:style style:name="T5" style:family="text">
      <style:text-properties style:font-name="Times New Roman" style:text-underline-style="none" fo:font-weight="bold" style:letter-kerning="false" style:font-name-asian="Times New Roman1" style:font-weight-asian="bold"/>
    </style:style>
    <style:style style:name="T6" style:family="text">
      <style:text-properties style:font-name="Times New Roman" style:letter-kerning="false" style:font-name-asian="Times New Roman1" style:font-weight-complex="bold"/>
    </style:style>
    <style:style style:name="T7" style:family="text">
      <style:text-properties style:font-name="Times New Roman" style:text-underline-style="solid" style:text-underline-width="auto" style:text-underline-color="font-color" style:letter-kerning="false" style:font-name-asian="Times New Roman1" style:font-weight-complex="bold"/>
    </style:style>
    <style:style style:name="T8" style:family="text">
      <style:text-properties style:letter-kerning="false" style:font-name-asian="Times New Roman1"/>
    </style:style>
    <style:style style:name="T9" style:family="text">
      <style:text-properties style:letter-kerning="false" style:font-name-asian="Times New Roman1" style:font-weight-complex="bold"/>
    </style:style>
    <style:style style:name="T10" style:family="text">
      <style:text-properties style:text-underline-style="solid" style:text-underline-width="auto" style:text-underline-color="font-color" style:letter-kerning="false" style:font-name-asian="Times New Roman1" style:font-weight-complex="bold"/>
    </style:style>
    <style:style style:name="T11" style:family="text">
      <style:text-properties fo:color="#ffffff" loext:opacity="100%"/>
    </style:style>
    <style:style style:name="T12" style:family="text">
      <style:text-properties fo:color="#ffffff" loext:opacity="100%" style:font-name="Times New Roman" fo:font-weight="bold" style:letter-kerning="false" style:font-name-asian="Times New Roman1" style:font-weight-asian="bold"/>
    </style:style>
    <style:style style:name="T13" style:family="text">
      <style:text-properties style:font-name="Times New Roman" fo:font-size="16pt" fo:font-weight="bold" style:font-size-asian="16pt" style:font-weight-asian="bold" style:font-size-complex="16pt" style:font-weight-complex="bold"/>
    </style:style>
    <style:style style:name="T14" style:family="text">
      <style:text-properties style:use-window-font-color="true" loext:opacity="0%" style:font-name="Times New Roman" fo:font-size="16pt" fo:language="ru" fo:country="RU" fo:font-weight="bold" style:letter-kerning="true" style:font-name-asian="Calibri2" style:font-size-asian="16pt" style:language-asian="en" style:country-asian="US" style:font-weight-asian="bold" style:font-name-complex="Times New Roman1" style:font-size-complex="12pt" style:language-complex="ar" style:country-complex="SA"/>
    </style:style>
    <style:style style:name="T15" style:family="text">
      <style:text-properties style:use-window-font-color="true" loext:opacity="0%" fo:font-size="16pt" fo:language="ru" fo:country="RU" fo:font-weight="bold" style:letter-kerning="true" style:font-name-asian="Calibri2" style:font-size-asian="16pt" style:language-asian="en" style:country-asian="US" style:font-weight-asian="bold" style:font-name-complex="Times New Roman1" style:font-size-complex="12pt" style:language-complex="ar" style:country-complex="SA"/>
    </style:style>
    <style:style style:name="T16" style:family="text">
      <style:text-properties style:text-position="super 58%"/>
    </style:style>
    <style:style style:name="T17" style:family="text">
      <style:text-properties fo:language="ru" fo:country="RU" style:language-asian="en" style:country-asian="US" style:language-complex="ar" style:country-complex="SA"/>
    </style:style>
    <style:style style:name="T18" style:family="text">
      <style:text-properties fo:language="en" fo:country="US"/>
    </style:style>
    <style:style style:name="T19" style:family="text">
      <style:text-properties fo:language="ru" fo:country="RU"/>
    </style:style>
    <style:style style:name="T20" style:family="text">
      <style:text-properties style:use-window-font-color="true" loext:opacity="0%" fo:language="ru" fo:country="RU" style:text-underline-style="none" fo:font-weight="bold" style:letter-kerning="true" style:font-name-asian="Calibri2" style:language-asian="en" style:country-asian="US" style:font-weight-asian="bold" style:font-name-complex="Times New Roman1" style:font-size-complex="12pt" style:language-complex="ar" style:country-complex="SA"/>
    </style:style>
    <style:style style:name="T21" style:family="text">
      <style:text-properties fo:color="#000000" loext:opacity="100%" style:text-line-through-style="none" style:text-line-through-type="none" fo:font-size="12pt" fo:language="ru" fo:country="RU" style:text-underline-style="none" fo:font-weight="normal" style:letter-kerning="true" style:text-blinking="false" style:font-name-asian="Calibri2" style:font-size-asian="12pt" style:language-asian="en" style:country-asian="US" style:font-weight-asian="normal" style:font-name-complex="Times New Roman1" style:font-size-complex="12pt" style:language-complex="ar" style:country-complex="SA" style:font-weight-complex="normal"/>
    </style:style>
    <style:style style:name="T22" style:family="text">
      <style:text-properties fo:color="#000000" loext:opacity="100%" style:text-line-through-style="none" style:text-line-through-type="none" fo:font-size="12pt" fo:language="en" fo:country="US" style:text-underline-style="none" fo:font-weight="normal" style:letter-kerning="true" style:text-blinking="false" style:font-name-asian="Calibri2" style:font-size-asian="12pt" style:language-asian="en" style:country-asian="US" style:font-weight-asian="normal" style:font-name-complex="Times New Roman1" style:font-size-complex="12pt" style:language-complex="ar" style:country-complex="SA" style:font-weight-complex="normal"/>
    </style:style>
    <style:style style:name="T23" style:family="text">
      <style:text-properties fo:color="#000000" loext:opacity="100%" style:text-line-through-style="none" style:text-line-through-type="none" style:text-underline-style="none" fo:font-weight="normal" style:text-blinking="false" style:font-weight-asian="normal" style:font-weight-complex="normal"/>
    </style:style>
    <style:style style:name="T24" style:family="text">
      <style:text-properties fo:color="#000000" loext:opacity="100%" style:text-line-through-style="none" style:text-line-through-type="none" fo:language="en" fo:country="US" style:text-underline-style="none" fo:font-weight="normal" style:text-blinking="false" style:font-weight-asian="normal" style:font-weight-complex="normal"/>
    </style:style>
    <style:style style:name="T25" style:family="text">
      <style:text-properties fo:color="#000000" loext:opacity="100%" style:text-line-through-style="none" style:text-line-through-type="none" fo:language="ru" fo:country="RU" style:text-underline-style="none" fo:font-weight="normal" style:text-blinking="false" style:font-weight-asian="normal" style:font-weight-complex="normal"/>
    </style:style>
    <style:style style:name="T26" style:family="text">
      <style:text-properties fo:color="#000000" loext:opacity="100%" style:text-line-through-style="none" style:text-line-through-type="none" fo:language="ru" fo:country="RU" style:text-underline-style="none" fo:font-weight="normal" style:text-blinking="false" style:language-asian="en" style:country-asian="US" style:font-weight-asian="normal" style:language-complex="ar" style:country-complex="SA" style:font-weight-complex="normal"/>
    </style:style>
    <style:style style:name="T27" style:family="text">
      <style:text-properties fo:color="#000000" loext:opacity="100%" style:text-line-through-style="none" style:text-line-through-type="none" fo:language="en" fo:country="US" style:text-underline-style="none" fo:font-weight="normal" style:text-blinking="false" style:language-asian="en" style:country-asian="US" style:font-weight-asian="normal" style:language-complex="ar" style:country-complex="SA" style:font-weight-complex="normal"/>
    </style:style>
    <style:style style:name="T28" style:family="text">
      <style:text-properties style:use-window-font-color="true" loext:opacity="0%" fo:font-size="12pt" style:text-underline-style="none" style:font-size-asian="12pt" style:font-size-complex="12pt"/>
    </style:style>
    <style:style style:name="T29" style:family="text">
      <style:text-properties style:use-window-font-color="true" loext:opacity="0%" fo:font-size="12pt" fo:language="en" fo:country="US" style:text-underline-style="none" style:font-size-asian="12pt" style:font-size-complex="12pt"/>
    </style:style>
    <style:style style:name="T30" style:family="text">
      <style:text-properties style:use-window-font-color="true" loext:opacity="0%" fo:font-size="12pt" fo:language="ru" fo:country="RU" style:text-underline-style="none" style:font-size-asian="12pt" style:font-size-complex="12pt"/>
    </style:style>
    <style:style style:name="T31" style:family="text">
      <style:text-properties fo:font-size="12pt" style:font-size-asian="12pt" style:font-size-complex="12pt"/>
    </style:style>
    <style:style style:name="T32" style:family="text">
      <style:text-properties style:use-window-font-color="true" loext:opacity="0%" style:text-position="sub 58%" fo:font-size="12pt" fo:language="en" fo:country="US" style:text-underline-style="none" style:font-size-asian="12pt" style:font-size-complex="12pt"/>
    </style:style>
    <style:style style:name="T33" style:family="text">
      <style:text-properties style:use-window-font-color="true" loext:opacity="0%" style:text-position="sub 58%" fo:font-size="12pt" style:text-underline-style="none" style:font-size-asian="12pt" style:font-size-complex="12pt"/>
    </style:style>
    <style:style style:name="T34" style:family="text">
      <style:text-properties style:text-position="sub 58%" fo:language="en" fo:country="US"/>
    </style:style>
    <style:style style:name="T35" style:family="text">
      <style:text-properties style:text-position="0% 100%" fo:font-size="12pt" fo:language="en" fo:country="US" style:font-size-asian="12pt"/>
    </style:style>
    <style:style style:name="T36" style:family="text">
      <style:text-properties style:text-position="0% 100%" fo:font-size="12pt" fo:language="ru" fo:country="RU" style:font-size-asian="12pt"/>
    </style:style>
    <style:style style:name="T37" style:family="text">
      <style:text-properties style:text-position="sub 58%" fo:language="ru" fo:country="RU"/>
    </style:style>
    <style:style style:name="T38" style:family="text">
      <style:text-properties fo:color="#000000" loext:opacity="100%" style:text-line-through-style="none" style:text-line-through-type="none" fo:font-size="12pt" style:text-underline-style="none" style:letter-kerning="true" style:text-blinking="false" style:font-name-asian="Calibri2" style:font-size-asian="12pt" style:font-size-complex="12pt"/>
    </style:style>
    <style:style style:name="T39" style:family="text">
      <style:text-properties fo:color="#000000" loext:opacity="100%" style:text-line-through-style="none" style:text-line-through-type="none" fo:font-size="12pt" fo:language="en" fo:country="US" style:text-underline-style="none" style:letter-kerning="true" style:text-blinking="false" style:font-name-asian="Calibri2" style:font-size-asian="12pt" style:font-size-complex="12pt"/>
    </style:style>
    <style:style style:name="T40" style:family="text">
      <style:text-properties fo:color="#000000" loext:opacity="100%" style:text-line-through-style="none" style:text-line-through-type="none" style:text-position="sub 58%" fo:font-size="12pt" fo:language="en" fo:country="US" style:text-underline-style="none" style:letter-kerning="true" style:text-blinking="false" style:font-name-asian="Calibri2" style:font-size-asian="12pt" style:font-size-complex="12pt"/>
    </style:style>
    <style:style style:name="T41" style:family="text">
      <style:text-properties fo:color="#000000" loext:opacity="100%" style:text-line-through-style="none" style:text-line-through-type="none" fo:font-size="12pt" fo:language="ru" fo:country="RU" style:text-underline-style="none" style:letter-kerning="true" style:text-blinking="false" style:font-name-asian="Calibri2" style:font-size-asian="12pt" style:font-size-complex="12pt"/>
    </style:style>
    <style:style style:name="T42" style:family="text">
      <style:text-properties fo:color="#000000" loext:opacity="100%" style:text-line-through-style="none" style:text-line-through-type="none" style:text-position="-8% 100%" fo:font-size="12pt" fo:language="en" fo:country="US" style:text-underline-style="none" style:letter-kerning="true" style:text-blinking="false" style:font-name-asian="Calibri2" style:font-size-asian="12pt" style:font-size-complex="12pt"/>
    </style:style>
    <style:style style:name="T43" style:family="text">
      <style:text-properties fo:language="en" fo:country="US" style:language-asian="en" style:country-asian="US" style:language-complex="ar" style:country-complex="SA"/>
    </style:style>
    <style:style style:name="T44" style:family="text">
      <style:text-properties style:text-position="sub 58%" fo:language="ru" fo:country="RU" style:language-asian="en" style:country-asian="US" style:language-complex="ar" style:country-complex="SA"/>
    </style:style>
    <style:style style:name="T45" style:family="text">
      <style:text-properties style:text-position="0% 100%" fo:font-size="12pt" fo:language="ru" fo:country="RU" style:font-size-asian="12pt" style:language-asian="en" style:country-asian="US" style:language-complex="ar" style:country-complex="SA"/>
    </style:style>
    <style:style style:name="T46" style:family="text">
      <style:text-properties style:text-position="0% 100%" fo:font-size="12pt" fo:language="en" fo:country="US" style:font-size-asian="12pt" style:language-asian="en" style:country-asian="US" style:language-complex="ar" style:country-complex="SA"/>
    </style:style>
    <style:style style:name="T47" style:family="text">
      <style:text-properties style:use-window-font-color="true" loext:opacity="0%" style:font-name="Times New Roman" fo:language="ru" fo:country="RU" fo:font-weight="bold" style:letter-kerning="true" style:font-name-asian="Calibri2" style:language-asian="en" style:country-asian="US" style:font-weight-asian="bold" style:font-name-complex="Times New Roman1" style:font-size-complex="12pt" style:language-complex="ar" style:country-complex="SA"/>
    </style:style>
    <style:style style:name="T48" style:family="text">
      <style:text-properties style:use-window-font-color="true" loext:opacity="0%" fo:language="ru" fo:country="RU" fo:font-weight="bold" style:letter-kerning="true" style:font-name-asian="Calibri2" style:language-asian="en" style:country-asian="US" style:font-weight-asian="bold" style:font-name-complex="Times New Roman1" style:font-size-complex="12pt" style:language-complex="ar" style:country-complex="SA"/>
    </style:style>
    <style:style style:name="T49" style:family="text">
      <style:text-properties style:use-window-font-color="true" loext:opacity="0%" fo:language="en" fo:country="US" fo:font-weight="bold" style:letter-kerning="true" style:font-name-asian="Calibri2" style:language-asian="en" style:country-asian="US" style:font-weight-asian="bold" style:font-name-complex="Times New Roman1" style:font-size-complex="12pt" style:language-complex="ar" style:country-complex="SA"/>
    </style:style>
    <style:style style:name="T50" style:family="text">
      <style:text-properties fo:font-variant="normal" fo:text-transform="none" style:text-line-through-style="none" style:text-line-through-type="none" fo:font-family="'Times New Roman', serif" style:font-family-generic="swiss" style:font-pitch="variable" fo:font-style="normal" style:text-underline-style="none" fo:font-weight="normal" style:text-blinking="false" fo:background-color="transparent" loext:char-shading-value="0" style:font-style-asian="normal" style:font-weight-asian="normal"/>
    </style:style>
    <style:style style:name="T51" style:family="text">
      <style:text-properties fo:font-variant="normal" fo:text-transform="none" style:text-line-through-style="none" style:text-line-through-type="none" style:font-name="Times New Roman2" fo:font-style="normal" style:text-underline-style="none" fo:font-weight="normal" style:text-blinking="false" fo:background-color="transparent" loext:char-shading-value="0" style:font-style-asian="normal" style:font-weight-asian="normal"/>
    </style:style>
    <style:style style:name="T52" style:family="text">
      <style:text-properties fo:font-variant="normal" fo:text-transform="none" style:text-line-through-style="none" style:text-line-through-type="none" fo:font-family="'Times New Roman', serif" style:font-family-generic="swiss" style:font-pitch="variable" fo:language="en" fo:country="US" fo:font-style="normal" style:text-underline-style="none" fo:font-weight="normal" style:text-blinking="false" fo:background-color="transparent" loext:char-shading-value="0" style:font-style-asian="normal" style:font-weight-asian="normal"/>
    </style:style>
    <style:style style:name="T53" style:family="text">
      <style:text-properties fo:font-variant="normal" fo:text-transform="none" style:text-line-through-style="none" style:text-line-through-type="none" fo:font-family="'Times New Roman', serif" style:font-family-generic="swiss" style:font-pitch="variable" fo:language="ru" fo:country="RU" fo:font-style="normal" style:text-underline-style="none" fo:font-weight="normal" style:text-blinking="false" fo:background-color="transparent" loext:char-shading-value="0" style:font-style-asian="normal" style:font-weight-asian="normal"/>
    </style:style>
    <style:style style:name="T54" style:family="text">
      <style:text-properties fo:font-variant="normal" fo:text-transform="none" style:text-line-through-style="none" style:text-line-through-type="none" style:text-position="sub 58%" fo:font-family="'Times New Roman', serif" style:font-family-generic="swiss" style:font-pitch="variable" fo:language="ru" fo:country="RU" fo:font-style="normal" style:text-underline-style="none" fo:font-weight="normal" style:text-blinking="false" fo:background-color="transparent" loext:char-shading-value="0" style:font-style-asian="normal" style:font-weight-asian="normal"/>
    </style:style>
    <style:style style:name="T55" style:family="text">
      <style:text-properties fo:font-variant="normal" fo:text-transform="none" style:text-line-through-style="none" style:text-line-through-type="none" style:text-position="0% 100%"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font-style-asian="normal" style:font-weight-asian="normal"/>
    </style:style>
    <style:style style:name="T56" style:family="text">
      <style:text-properties fo:font-variant="normal" fo:text-transform="none" fo:color="#333333" loext:opacity="100%" style:font-name="Times New Roman" fo:font-size="12pt" fo:letter-spacing="normal" fo:language="en" fo:country="US" fo:font-style="normal" fo:font-weight="normal" style:font-size-asian="12pt" style:font-style-asian="normal" style:font-weight-asian="normal" style:font-size-complex="12pt"/>
    </style:style>
    <style:style style:name="T57" style:family="text">
      <style:text-properties fo:font-variant="normal" fo:text-transform="none" style:text-line-through-style="none" style:text-line-through-type="none" style:text-position="sub 58%" fo:font-family="'Times New Roman', serif" style:font-family-generic="swiss" style:font-pitch="variable" fo:language="en" fo:country="US" fo:font-style="normal" style:text-underline-style="none" fo:font-weight="normal" style:text-blinking="false" fo:background-color="transparent" loext:char-shading-value="0" style:font-style-asian="normal" style:font-weight-asian="normal"/>
    </style:style>
    <style:style style:name="T58" style:family="text">
      <style:text-properties fo:color="#000000" loext:opacity="100%" style:font-name="Cascadia Mono" fo:font-size="9.5pt" fo:language="ru" fo:country="RU" style:text-underline-style="none" fo:background-color="#ffffff" loext:char-shading-value="0" style:font-size-asian="9.5pt" style:font-size-complex="12pt"/>
    </style:style>
    <style:style style:name="T59" style:family="text">
      <style:text-properties fo:color="#0000ff" loext:opacity="100%" style:font-name="Cascadia Mono" fo:font-size="9.5pt" fo:language="ru" fo:country="RU" style:text-underline-style="none" fo:background-color="#ffffff" loext:char-shading-value="0" style:font-size-asian="9.5pt" style:font-size-complex="12pt"/>
    </style:style>
    <style:style style:name="T60" style:family="text">
      <style:text-properties fo:color="#000000" loext:opacity="100%" style:font-name="Cascadia Mono" fo:font-size="9.5pt" fo:background-color="#ffffff" loext:char-shading-value="0" style:font-size-asian="9.5pt"/>
    </style:style>
    <style:style style:name="T61" style:family="text">
      <style:text-properties fo:color="#0000ff" loext:opacity="100%" style:font-name="Cascadia Mono" fo:font-size="9.5pt" fo:background-color="#ffffff" loext:char-shading-value="0" style:font-size-asian="9.5pt"/>
    </style:style>
    <style:style style:name="T62" style:family="text">
      <style:text-properties fo:color="#2b91af" loext:opacity="100%" style:font-name="Cascadia Mono" fo:font-size="9.5pt" fo:background-color="#ffffff" loext:char-shading-value="0" style:font-size-asian="9.5pt"/>
    </style:style>
    <style:style style:name="T63" style:family="text">
      <style:text-properties fo:color="#808080" loext:opacity="100%" style:font-name="Cascadia Mono" fo:font-size="9.5pt" fo:background-color="#ffffff" loext:char-shading-value="0" style:font-size-asian="9.5pt"/>
    </style:style>
    <style:style style:name="T64" style:family="text">
      <style:text-properties style:use-window-font-color="true" loext:opacity="0%" fo:font-size="12pt" fo:language="ru" fo:country="RU" style:text-underline-style="none" style:font-size-asian="12pt" style:language-asian="en" style:country-asian="US" style:font-size-complex="12pt" style:language-complex="ar" style:country-complex="SA"/>
    </style:style>
    <style:style style:name="T65" style:family="text">
      <style:text-properties fo:font-variant="normal" fo:text-transform="none" fo:color="#000000" loext:opacity="100%" style:text-line-through-style="none" style:text-line-through-type="none" fo:font-family="'Times New Roman', serif" style:font-family-generic="swiss" style:font-pitch="variable" fo:font-size="12pt" fo:font-style="normal" style:text-underline-style="none" fo:font-weight="normal" style:text-blinking="false" fo:background-color="transparent" loext:char-shading-value="0" style:font-size-asian="12pt" style:font-style-asian="normal" style:font-weight-asian="normal"/>
    </style:style>
    <style:style style:name="T66" style:family="text">
      <style:text-properties fo:font-variant="normal" fo:text-transform="none" fo:color="#000000" loext:opacity="100%" style:text-line-through-style="none" style:text-line-through-type="none" fo:font-family="'Times New Roman', serif" style:font-family-generic="swiss" style:font-pitch="variable" fo:font-size="12pt" fo:language="en" fo:country="US" fo:font-style="normal" style:text-underline-style="none" fo:font-weight="normal" style:text-blinking="false" fo:background-color="transparent" loext:char-shading-value="0" style:font-size-asian="12pt" style:font-style-asian="normal" style:font-weight-asian="normal"/>
    </style:style>
    <style:style style:name="T67"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font-style-asian="normal" style:font-weight-asian="normal"/>
    </style:style>
    <style:style style:name="T68" style:family="text">
      <style:text-properties fo:color="#000000" loext:opacity="100%" style:text-underline-style="none"/>
    </style:style>
    <style:style style:name="T69" style:family="text">
      <style:text-properties style:use-window-font-color="true" loext:opacity="0%" style:font-name="Consolas" fo:font-size="12pt" style:text-underline-style="none" style:font-size-asian="12pt" style:font-size-complex="12pt"/>
    </style:style>
    <style:style style:name="T70" style:family="text">
      <style:text-properties style:use-window-font-color="true" loext:opacity="0%" style:font-name="Consolas" fo:font-size="11pt" fo:language="en" fo:country="US" style:text-underline-style="none" style:font-size-asian="11pt" style:font-size-complex="11pt"/>
    </style:style>
    <style:style style:name="T71" style:family="text">
      <style:text-properties style:use-window-font-color="true" loext:opacity="0%" style:font-name="Consolas" fo:font-size="11pt" style:text-underline-style="none" style:font-size-asian="11pt" style:font-size-complex="11pt"/>
    </style:style>
    <style:style style:name="T72"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letter-kerning="true" style:text-blinking="false" fo:background-color="transparent" loext:char-shading-value="0" style:font-name-asian="NSimSun" style:font-size-asian="12pt" style:language-asian="zh" style:country-asian="CN" style:font-style-asian="normal" style:font-weight-asian="normal" style:font-name-complex="Arial1" style:font-size-complex="12pt" style:language-complex="hi" style:country-complex="IN"/>
    </style:style>
    <style:style style:name="T73" style:family="text">
      <style:text-properties fo:font-variant="normal" fo:text-transform="none" fo:color="#000000" loext:opacity="100%" style:text-line-through-style="none" style:text-line-through-type="none" fo:font-family="'Times New Roman', serif" style:font-family-generic="swiss" style:font-pitch="variable" fo:font-size="12pt" fo:language="en" fo:country="US" fo:font-style="normal" style:text-underline-style="none" fo:font-weight="normal" style:letter-kerning="true" style:text-blinking="false" fo:background-color="transparent" loext:char-shading-value="0" style:font-name-asian="NSimSun" style:font-size-asian="12pt" style:language-asian="zh" style:country-asian="CN" style:font-style-asian="normal" style:font-weight-asian="normal" style:font-name-complex="Arial1" style:font-size-complex="12pt" style:language-complex="hi" style:country-complex="IN"/>
    </style:style>
    <style:style style:name="T74" style:family="text">
      <style:text-properties fo:font-variant="normal" fo:text-transform="none" fo:color="#2b91af" loext:opacity="100%" style:text-line-through-style="none" style:text-line-through-type="none" style:font-name="Cascadia Mono" fo:font-size="9.5pt" fo:language="ru" fo:country="RU" fo:font-style="normal" style:text-underline-style="none" fo:font-weight="normal" style:letter-kerning="true" style:text-blinking="false" fo:background-color="#ffffff" loext:char-shading-value="0" style:font-name-asian="NSimSun" style:font-size-asian="9.5pt" style:language-asian="zh" style:country-asian="CN" style:font-style-asian="normal" style:font-weight-asian="normal" style:font-name-complex="Arial1" style:font-size-complex="12pt" style:language-complex="hi" style:country-complex="IN"/>
    </style:style>
    <style:style style:name="T75" style:family="text">
      <style:text-properties fo:font-variant="normal" fo:text-transform="none" fo:color="#000000" loext:opacity="100%" style:text-line-through-style="none" style:text-line-through-type="none" style:font-name="Cascadia Mono" fo:font-size="9.5pt" fo:language="ru" fo:country="RU" fo:font-style="normal" style:text-underline-style="none" fo:font-weight="normal" style:letter-kerning="true" style:text-blinking="false" fo:background-color="#ffffff" loext:char-shading-value="0" style:font-name-asian="NSimSun" style:font-size-asian="9.5pt" style:language-asian="zh" style:country-asian="CN" style:font-style-asian="normal" style:font-weight-asian="normal" style:font-name-complex="Arial1" style:font-size-complex="12pt" style:language-complex="hi" style:country-complex="IN"/>
    </style:style>
    <style:style style:name="T76"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style:text-blinking="false" fo:background-color="transparent" loext:char-shading-value="0" style:font-size-asian="12pt" style:font-style-asian="normal"/>
    </style:style>
    <style:style style:name="T77" style:family="text">
      <style:text-properties fo:font-variant="normal" fo:text-transform="none" fo:color="#000000" loext:opacity="100%" style:text-line-through-style="none" style:text-line-through-type="none" fo:font-family="'Times New Roman', serif" style:font-family-generic="swiss" style:font-pitch="variable" fo:font-size="12pt" fo:language="en" fo:country="US" fo:font-style="normal" style:text-underline-style="none" style:text-blinking="false" fo:background-color="transparent" loext:char-shading-value="0" style:font-size-asian="12pt" style:font-style-asian="normal"/>
    </style:style>
    <style:style style:name="T78" style:family="text">
      <style:text-properties fo:font-variant="normal" fo:text-transform="none" fo:color="#000000" loext:opacity="100%" style:text-line-through-style="none" style:text-line-through-type="none" style:text-position="sub 58%" fo:font-family="'Times New Roman', serif" style:font-family-generic="swiss" style:font-pitch="variable" fo:font-size="12pt" fo:language="en" fo:country="US" fo:font-style="normal" style:text-underline-style="none" style:text-blinking="false" fo:background-color="transparent" loext:char-shading-value="0" style:font-size-asian="12pt" style:font-style-asian="normal"/>
    </style:style>
    <style:style style:name="T79" style:family="text">
      <style:text-properties fo:font-variant="normal" fo:text-transform="none" fo:color="#000000" loext:opacity="100%" style:text-line-through-style="none" style:text-line-through-type="none" style:text-position="0% 100%" fo:font-family="'Times New Roman', serif" style:font-family-generic="swiss" style:font-pitch="variable" fo:font-size="12pt" fo:language="en" fo:country="US" fo:font-style="normal" style:text-underline-style="none" style:text-blinking="false" fo:background-color="transparent" loext:char-shading-value="0" style:font-size-asian="12pt" style:font-style-asian="normal"/>
    </style:style>
    <style:style style:name="T80" style:family="text">
      <style:text-properties fo:font-variant="normal" fo:text-transform="none" fo:color="#000000" loext:opacity="100%" style:text-line-through-style="none" style:text-line-through-type="none" style:text-position="0% 100%" fo:font-family="'Times New Roman', serif" style:font-family-generic="swiss" style:font-pitch="variable" fo:font-size="12pt" fo:language="ru" fo:country="RU" fo:font-style="normal" style:text-underline-style="none" style:text-blinking="false" fo:background-color="transparent" loext:char-shading-value="0" style:font-size-asian="12pt" style:font-style-asian="normal"/>
    </style:style>
    <style:style style:name="T81" style:family="text">
      <style:text-properties style:use-window-font-color="true" loext:opacity="0%" style:font-name="Consolas" fo:font-size="11pt" fo:language="ru" fo:country="RU" style:text-underline-style="none" style:font-size-asian="11pt" style:font-size-complex="11pt"/>
    </style:style>
    <style:style style:name="T82" style:family="text">
      <style:text-properties fo:color="#127622" loext:opacity="100%" style:font-name="Consolas" fo:font-size="11pt" fo:language="ru" fo:country="RU" style:text-underline-style="none" style:font-size-asian="11pt" style:font-size-complex="11pt"/>
    </style:style>
    <style:style style:name="T83" style:family="text">
      <style:text-properties fo:color="#127622" loext:opacity="100%" style:font-name="Consolas" fo:font-size="11pt" fo:language="en" fo:country="US" style:text-underline-style="none" style:font-size-asian="11pt" style:font-size-complex="11pt"/>
    </style:style>
    <style:style style:name="T84" style:family="text">
      <style:text-properties fo:font-size="11pt" fo:language="ru" fo:country="RU" style:font-size-asian="11pt" style:font-size-complex="11pt"/>
    </style:style>
    <style:style style:name="T85" style:family="text">
      <style:text-properties fo:color="#127622" loext:opacity="100%" style:font-name="Consolas" fo:font-size="11pt" fo:language="ru" fo:country="RU"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86" style:family="text">
      <style:text-properties fo:font-size="11pt" style:font-size-asian="11pt" style:font-size-complex="11pt"/>
    </style:style>
    <style:style style:name="T87" style:family="text">
      <style:text-properties fo:color="#127622" loext:opacity="100%" style:font-name="Consolas" fo:font-size="11pt" fo:language="en" fo:country="US"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88" style:family="text">
      <style:text-properties fo:font-size="11pt" fo:language="en" fo:country="US" style:font-size-asian="11pt" style:font-size-complex="11pt"/>
    </style:style>
    <style:style style:name="T89" style:family="text">
      <style:text-properties style:use-window-font-color="true" loext:opacity="0%" style:font-name="Consolas" fo:font-size="11pt" fo:language="ru" fo:country="RU"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90" style:family="text">
      <style:text-properties style:use-window-font-color="true" loext:opacity="0%" style:font-name="Consolas" fo:font-size="11pt" fo:language="en" fo:country="US"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91" style:family="text">
      <style:text-properties style:font-name="Consolas" fo:font-size="11pt" style:text-underline-style="none" style:font-size-asian="11pt" style:font-size-complex="11pt"/>
    </style:style>
    <style:style style:name="T92" style:family="text">
      <style:text-properties fo:color="#000000" loext:opacity="100%" fo:font-size="12pt" style:text-underline-style="none" style:font-size-asian="12pt" style:font-size-complex="12pt"/>
    </style:style>
    <style:style style:name="T93" style:family="text">
      <style:text-properties fo:color="#000000" loext:opacity="100%" fo:font-size="12pt" fo:language="en" fo:country="US" style:text-underline-style="none" style:font-size-asian="12pt" style:font-size-complex="12pt"/>
    </style:style>
    <style:style style:name="T94" style:family="text">
      <style:text-properties fo:color="#000000" loext:opacity="100%" fo:font-size="12pt" fo:language="ru" fo:country="RU" style:text-underline-style="none" style:letter-kerning="true" style:font-name-asian="Calibri2" style:font-size-asian="12pt" style:language-asian="en" style:country-asian="US" style:font-name-complex="Times New Roman1" style:font-size-complex="12pt" style:language-complex="ar" style:country-complex="SA"/>
    </style:style>
    <style:style style:name="T95" style:family="text">
      <style:text-properties fo:color="#000000" loext:opacity="100%" fo:font-size="12pt" fo:language="en" fo:country="US" style:text-underline-style="none" style:letter-kerning="true" style:font-name-asian="Calibri2" style:font-size-asian="12pt" style:language-asian="en" style:country-asian="US" style:font-name-complex="Times New Roman1" style:font-size-complex="12pt" style:language-complex="ar" style:country-complex="SA"/>
    </style:style>
    <style:style style:name="T96" style:family="text">
      <style:text-properties fo:color="#000000" loext:opacity="100%" style:font-name="Cascadia Mono" fo:font-size="12pt" fo:language="ru" fo:country="RU" style:text-underline-style="none" style:font-size-asian="12pt" style:font-size-complex="12pt" fo:background-color="#ffffff"/>
    </style:style>
    <style:style style:name="T97" style:family="text">
      <style:text-properties fo:color="#000000" loext:opacity="100%" style:font-name="Cascadia Mono" fo:font-size="10pt" fo:language="en" fo:country="US" style:text-underline-style="none" style:font-size-asian="10pt" style:font-size-complex="10pt" fo:background-color="#ffffff"/>
    </style:style>
    <style:style style:name="T98" style:family="text">
      <style:text-properties fo:color="#000000" loext:opacity="100%" style:font-name="Liberation Mono" fo:font-size="11pt" fo:language="ru" fo:country="RU"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2pt" style:language-complex="ar" style:country-complex="SA"/>
    </style:style>
    <style:style style:name="T99" style:family="text">
      <style:text-properties fo:color="#000000" loext:opacity="100%" style:font-name="Cascadia Mono" fo:font-size="9.5pt" fo:language="ru" fo:country="RU" style:text-underline-style="none" style:font-size-asian="9.5pt" style:font-size-complex="12pt" fo:background-color="#ffffff"/>
    </style:style>
    <style:style style:name="T100" style:family="text">
      <style:text-properties fo:color="#000000" loext:opacity="100%" style:font-name="Cascadia Mono" fo:font-size="9.5pt" fo:language="en" fo:country="US" style:text-underline-style="none" style:font-size-asian="9.5pt" style:font-size-complex="12pt" fo:background-color="#ffffff"/>
    </style:style>
    <style:style style:name="T101" style:family="text">
      <style:text-properties fo:color="#000000" loext:opacity="100%" fo:font-size="12pt" fo:language="ru" fo:country="RU" style:text-underline-style="none" style:font-size-asian="12pt" style:font-size-complex="12pt"/>
    </style:style>
    <style:style style:name="T102" style:family="text">
      <style:text-properties fo:font-size="10pt" fo:font-weight="bold" style:font-size-asian="10pt" style:font-weight-asian="bold" style:font-size-complex="10pt" style:font-weight-complex="bold"/>
    </style:style>
    <style:style style:name="T103" style:family="text">
      <style:text-properties fo:font-size="10pt" fo:language="en" fo:country="US" fo:font-weight="bold" style:font-size-asian="10pt" style:font-weight-asian="bold" style:font-size-complex="10pt" style:font-weight-complex="bold"/>
    </style:style>
    <style:style style:name="T104" style:family="text">
      <style:text-properties fo:color="#000000" loext:opacity="100%" fo:font-size="10pt" style:text-underline-style="none" fo:font-weight="normal" style:font-size-asian="10pt" style:font-weight-asian="normal" style:font-size-complex="10pt" style:font-weight-complex="normal"/>
    </style:style>
    <style:style style:name="T105" style:family="text">
      <style:text-properties fo:color="#000000" loext:opacity="100%" fo:font-size="10pt" style:text-underline-style="none" style:font-size-asian="10pt" style:font-size-complex="10pt"/>
    </style:style>
    <style:style style:name="T106" style:family="text">
      <style:text-properties fo:color="#000000" loext:opacity="100%" fo:font-size="10pt" fo:language="en" fo:country="US" style:text-underline-style="none" fo:font-weight="normal" style:font-size-asian="10pt" style:font-weight-asian="normal" style:font-size-complex="10pt" style:font-weight-complex="normal"/>
    </style:style>
    <style:style style:name="T107" style:family="text">
      <style:text-properties fo:font-size="9pt" fo:font-weight="bold" style:font-size-asian="9pt" style:font-weight-asian="bold" style:font-size-complex="9pt" style:font-weight-complex="bold"/>
    </style:style>
    <style:style style:name="T108" style:family="text">
      <style:text-properties fo:color="#000000" loext:opacity="100%" fo:font-size="10pt" style:text-underline-style="none" fo:font-weight="bold" style:font-size-asian="10pt" style:font-weight-asian="bold" style:font-size-complex="10pt" style:font-weight-complex="bold"/>
    </style:style>
    <style:style style:name="T109" style:family="text">
      <style:text-properties fo:color="#000000" loext:opacity="100%" fo:language="ru" fo:country="RU" style:text-underline-style="none"/>
    </style:style>
    <style:style style:name="T110" style:family="text">
      <style:text-properties fo:color="#000000" loext:opacity="100%" fo:language="en" fo:country="US" style:text-underline-style="none"/>
    </style:style>
    <style:style style:name="T111" style:family="text">
      <style:text-properties fo:color="#000000" loext:opacity="100%" style:text-position="0% 100%" fo:font-size="12pt" style:text-underline-style="none" style:font-size-asian="12pt"/>
    </style:style>
    <style:style style:name="T112" style:family="text">
      <style:text-properties fo:color="#000000" loext:opacity="100%" style:text-position="0% 100%" fo:font-size="12pt" fo:language="en" fo:country="US" style:text-underline-style="none" style:font-size-asian="12pt"/>
    </style:style>
    <style:style style:name="T113" style:family="text">
      <style:text-properties style:font-name="Consolas" fo:font-size="11pt" fo:language="ru" fo:country="RU" style:text-underline-style="none" style:font-size-asian="11pt" style:font-size-complex="11pt"/>
    </style:style>
    <style:style style:name="T114" style:family="text">
      <style:text-properties style:font-name="Consolas" fo:font-size="11pt" fo:language="en" fo:country="US" style:text-underline-style="none" style:font-size-asian="11pt" style:font-size-complex="11pt"/>
    </style:style>
    <style:style style:name="T115" style:family="text">
      <style:text-properties fo:color="#127622" loext:opacity="100%" style:font-name="Consolas" fo:font-size="11pt" style:text-underline-style="none" style:font-size-asian="11pt" style:font-size-complex="11pt"/>
    </style:style>
    <style:style style:name="T116" style:family="text">
      <style:text-properties style:use-window-font-color="true" loext:opacity="0%" style:font-name="Consolas" fo:font-size="11pt" fo:language="ru" fo:country="RU" style:text-underline-style="none" style:letter-kerning="true" style:font-name-asian="Calibri2" style:font-size-asian="11pt" style:language-asian="en" style:country-asian="US" style:font-name-complex="Times New Roman1" style:font-size-complex="11pt" style:language-complex="ar" style:country-complex="SA" fo:background-color="#ffffff"/>
    </style:style>
    <style:style style:name="T117" style:family="text">
      <style:text-properties style:font-name="Consolas" fo:font-size="11pt" style:font-size-asian="11pt"/>
    </style:style>
    <style:style style:name="T118" style:family="text">
      <style:text-properties style:use-window-font-color="true" loext:opacity="0%" style:font-name="Consolas" fo:font-size="11pt" fo:language="ru" fo:country="RU" style:font-size-asian="11pt"/>
    </style:style>
    <style:style style:name="T119" style:family="text">
      <style:text-properties style:font-name="Consolas" fo:font-size="11pt" fo:language="en" fo:country="US" style:font-size-asian="11pt"/>
    </style:style>
    <style:style style:name="T120" style:family="text">
      <style:text-properties style:font-name="Consolas" fo:font-size="11pt" fo:language="ru" fo:country="RU" style:font-size-asian="11pt"/>
    </style:style>
    <style:style style:name="T121" style:family="text">
      <style:text-properties fo:color="#008000" loext:opacity="100%" style:font-name="Cascadia Mono" fo:font-size="9.5pt" style:font-size-asian="9.5pt" fo:background-color="#ffffff"/>
    </style:style>
    <style:style style:name="T122" style:family="text">
      <style:text-properties fo:color="#127622" loext:opacity="100%" style:text-position="sub 58%" style:font-name="Consolas" fo:font-size="11pt" fo:language="en" fo:country="US" style:text-underline-style="none" style:font-size-asian="11pt" style:font-size-complex="11pt"/>
    </style:style>
    <style:style style:name="T123" style:family="text">
      <style:text-properties fo:color="#127622" loext:opacity="100%" style:text-position="sub 58%" style:font-name="Consolas" fo:font-size="11pt" style:text-underline-style="none" style:font-size-asian="11pt" style:font-size-complex="11pt"/>
    </style:style>
    <style:style style:name="T124" style:family="text">
      <style:text-properties style:use-window-font-color="true" loext:opacity="0%" style:font-name="Consolas" fo:font-size="11pt" fo:language="en" fo:country="US" style:text-underline-style="none" style:letter-kerning="true" style:font-name-asian="Calibri2" style:font-size-asian="11pt" style:language-asian="en" style:country-asian="US" style:font-name-complex="Times New Roman1" style:font-size-complex="11pt" style:language-complex="ar" style:country-complex="SA" fo:background-color="#ffffff"/>
    </style:style>
    <style:style style:name="T125" style:family="text">
      <style:text-properties style:use-window-font-color="true" loext:opacity="0%" style:text-position="0% 100%" style:font-name="Consolas" fo:font-size="11pt" fo:language="ru" fo:country="RU" style:text-underline-style="none" style:font-size-asian="11pt" style:font-size-complex="11pt"/>
    </style:style>
    <style:style style:name="T126" style:family="text">
      <style:text-properties fo:color="#000000" loext:opacity="100%" style:text-underline-style="none" officeooo:rsid="000321a7"/>
    </style:style>
    <style:style style:name="T127" style:family="text">
      <style:text-properties fo:color="#000000" loext:opacity="100%" fo:font-size="10pt" fo:language="ru" fo:country="RU" style:text-underline-style="none" fo:font-weight="normal" style:font-size-asian="10pt" style:font-weight-asian="normal" style:font-size-complex="10pt" style:font-weight-complex="normal"/>
    </style:style>
    <style:style style:name="T128" style:family="text">
      <style:text-properties fo:font-size="12pt" fo:language="ru" fo:country="RU" style:font-size-asian="12pt"/>
    </style:style>
    <style:style style:name="T129" style:family="text">
      <style:text-properties fo:font-variant="normal" fo:text-transform="none" style:use-window-font-color="true" loext:opacity="0%" style:text-outline="false" style:text-line-through-style="none" style:text-line-through-type="none" style:font-name="Consolas" fo:font-size="11pt" fo:language="ru" fo:country="RU" fo:font-style="normal" fo:text-shadow="none" style:text-underline-style="none" fo:font-weight="normal" style:letter-kerning="true" style:font-name-asian="Tahoma" style:font-size-asian="11pt" style:language-asian="ru" style:country-asian="RU" style:font-style-asian="normal" style:font-weight-asian="normal" style:font-name-complex="Calibri2" style:font-size-complex="11pt" style:language-complex="ar" style:country-complex="SA" style:text-emphasize="none"/>
    </style:style>
    <style:style style:name="T130" style:family="text">
      <style:text-properties style:use-window-font-color="true" loext:opacity="0%" style:font-name="Liberation Mono" fo:font-size="11pt" fo:language="en" fo:country="US" fo:font-style="normal" style:text-underline-style="none" fo:font-weight="normal" style:font-size-asian="11pt" style:font-style-asian="normal" style:font-weight-asian="normal" style:font-size-complex="11pt"/>
    </style:style>
    <style:style style:name="T131" style:family="text">
      <style:text-properties style:use-window-font-color="true" loext:opacity="0%" style:font-name="Consolas" fo:font-size="11pt" fo:language="en" fo:country="US" fo:font-style="normal" style:text-underline-style="none" fo:font-weight="normal" style:font-size-asian="11pt" style:font-style-asian="normal" style:font-weight-asian="normal" style:font-size-complex="11pt"/>
    </style:style>
    <style:style style:name="T132" style:family="text">
      <style:text-properties style:use-window-font-color="true" loext:opacity="0%" style:font-name="Liberation Mono" fo:font-size="11pt" fo:language="en" fo:country="US"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T133" style:family="text">
      <style:text-properties style:font-name="Consolas" fo:font-size="11pt"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134" style:family="text">
      <style:text-properties style:font-name="Liberation Mono" fo:font-size="11pt" fo:language="en" fo:country="US"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T135" style:family="text">
      <style:text-properties fo:font-variant="normal" fo:text-transform="none" fo:color="#000000" loext:opacity="100%" style:text-line-through-style="none" style:text-line-through-type="none" fo:font-family="'Liberation Mono', sans-serif" style:font-family-generic="swiss" style:font-pitch="variable" fo:font-size="11pt" fo:language="ru" fo:country="RU" fo:font-style="normal" style:text-underline-style="none" fo:font-weight="normal" style:letter-kerning="true" style:text-blinking="fals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T136" style:family="text">
      <style:text-properties fo:font-variant="normal" fo:text-transform="none" fo:color="#000000" loext:opacity="100%" style:text-line-through-style="none" style:text-line-through-type="none" style:font-name="Cascadia Mono" fo:font-size="9.5pt" fo:language="ru" fo:country="RU" fo:font-style="normal" style:text-underline-style="none" fo:font-weight="normal" style:letter-kerning="true" style:text-blinking="false" style:font-name-asian="Calibri2" style:font-size-asian="9.5pt" style:language-asian="en" style:country-asian="US" style:font-style-asian="normal" style:font-weight-asian="normal" style:font-name-complex="Times New Roman1" style:font-size-complex="12pt" style:language-complex="ar" style:country-complex="SA" fo:background-color="#ffffff"/>
    </style:style>
    <style:style style:name="T137" style:family="text">
      <style:text-properties fo:font-variant="normal" fo:text-transform="none" fo:color="#000000" loext:opacity="100%" style:text-line-through-style="none" style:text-line-through-type="none" style:font-name="Cascadia Mono" fo:font-size="9.5pt" fo:language="en" fo:country="US" fo:font-style="normal" style:text-underline-style="none" fo:font-weight="normal" style:letter-kerning="true" style:text-blinking="false" style:font-name-asian="Calibri2" style:font-size-asian="9.5pt" style:language-asian="en" style:country-asian="US" style:font-style-asian="normal" style:font-weight-asian="normal" style:font-name-complex="Times New Roman1" style:font-size-complex="12pt" style:language-complex="ar" style:country-complex="SA" fo:background-color="#ffffff"/>
    </style:style>
    <style:style style:name="T138" style:family="text">
      <style:text-properties fo:font-variant="normal" fo:text-transform="none" style:use-window-font-color="true" loext:opacity="0%" style:text-line-through-style="none" style:text-line-through-type="none" style:font-name="Consolas" fo:font-size="11pt" fo:language="ru" fo:country="RU" fo:font-style="normal" style:text-underline-style="none" fo:font-weight="normal" style:letter-kerning="true" style:text-blinking="false" style:font-name-asian="Calibri2" style:font-size-asian="11pt" style:language-asian="en" style:country-asian="US" style:font-style-asian="normal" style:font-weight-asian="normal" style:font-name-complex="Times New Roman1" style:font-size-complex="11pt" style:language-complex="ar" style:country-complex="SA" fo:background-color="#ffffff"/>
    </style:style>
    <style:style style:name="T139" style:family="text">
      <style:text-properties fo:color="#000000" loext:opacity="100%" fo:language="ru" fo:country="RU" style:text-underline-style="none" style:language-asian="en" style:country-asian="US" style:language-complex="ar" style:country-complex="SA"/>
    </style:style>
    <style:style style:name="T140" style:family="text">
      <style:text-properties fo:color="#000000" loext:opacity="100%" style:text-position="0% 100%" fo:font-size="12pt" fo:language="ru" fo:country="RU" style:text-underline-style="none" style:font-size-asian="12pt"/>
    </style:style>
    <style:style style:name="T141" style:family="text">
      <style:text-properties fo:font-size="10pt" fo:language="ru" fo:country="RU" fo:font-weight="bold" style:font-name-asian="Calibri2" style:font-size-asian="10pt" style:font-weight-asian="bold" style:font-name-complex="Times New Roman1" style:font-size-complex="10pt" style:language-complex="ar" style:country-complex="SA" style:font-weight-complex="bold"/>
    </style:style>
    <style:style style:name="T142" style:family="text">
      <style:text-properties fo:font-size="10pt" fo:language="ru" fo:country="RU" fo:font-weight="bold" style:font-size-asian="10pt" style:font-weight-asian="bold" style:font-size-complex="10pt" style:font-weight-complex="bold"/>
    </style:style>
    <style:style style:name="T143" style:family="text">
      <style:text-properties fo:font-size="10pt" style:font-size-asian="10pt" style:font-size-complex="10pt"/>
    </style:style>
    <style:style style:name="T144" style:family="text">
      <style:text-properties fo:language="ru" fo:country="RU" style:language-asian="zh" style:country-asian="CN" style:language-complex="hi" style:country-complex="IN"/>
    </style:style>
    <style:style style:name="T145" style:family="text">
      <style:text-properties style:use-window-font-color="true" loext:opacity="0%"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46" style:family="text">
      <style:text-properties style:use-window-font-color="true" loext:opacity="0%" fo:font-size="12pt" fo:language="en" fo:country="US" style:letter-kerning="true" style:font-name-asian="NSimSun" style:font-size-asian="12pt" style:language-asian="zh" style:country-asian="CN" style:font-name-complex="Arial1" style:font-size-complex="12pt" style:language-complex="hi" style:country-complex="IN"/>
    </style:style>
    <style:style style:name="T147" style:family="text">
      <style:text-properties fo:color="#000000" loext:opacity="100%" style:font-name="Cascadia Mono" fo:font-size="9.5pt" fo:background-color="#ffffff" loext:char-shading-value="0" style:font-name-asian="NSimSun" style:font-size-asian="9.5pt" style:language-asian="zh" style:country-asian="CN" style:font-name-complex="Arial1" style:language-complex="hi" style:country-complex="IN"/>
    </style:style>
    <style:style style:name="T148" style:family="text">
      <style:text-properties style:font-name="Liberation Mono" fo:font-size="11pt" fo:font-style="normal" fo:font-weight="normal" style:font-size-asian="11pt" style:font-style-asian="normal" style:font-weight-asian="normal"/>
    </style:style>
    <style:style style:name="T149" style:family="text">
      <style:text-properties style:use-window-font-color="true" loext:opacity="0%" style:font-name="Liberation Mono" fo:font-size="11pt" fo:language="ru" fo:country="RU" fo:font-style="normal" fo:font-weight="normal" style:letter-kerning="true" style:font-name-asian="NSimSun" style:font-size-asian="11pt" style:language-asian="zh" style:country-asian="CN" style:font-style-asian="normal" style:font-weight-asian="normal" style:font-name-complex="Arial1" style:font-size-complex="12pt" style:language-complex="hi" style:country-complex="IN"/>
    </style:style>
    <style:style style:name="T150" style:family="text">
      <style:text-properties style:use-window-font-color="true" loext:opacity="0%" fo:font-size="12pt" style:font-name-asian="Calibri2" style:font-size-asian="12pt" style:font-size-complex="12pt"/>
    </style:style>
    <style:style style:name="T151" style:family="text">
      <style:text-properties style:use-window-font-color="true" loext:opacity="0%" fo:font-size="12pt" fo:language="en" fo:country="US" style:font-name-asian="Calibri2" style:font-size-asian="12pt" style:font-size-complex="12pt"/>
    </style:style>
    <style:style style:name="T152" style:family="text">
      <style:text-properties style:use-window-font-color="true" loext:opacity="0%" fo:font-size="12pt" fo:language="ru" fo:country="RU" style:font-name-asian="Calibri2" style:font-size-asian="12pt" style:font-size-complex="12pt"/>
    </style:style>
    <style:style style:name="T153" style:family="text">
      <style:text-properties style:use-window-font-color="true" loext:opacity="0%" style:text-position="sub 58%"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54" style:family="text">
      <style:text-properties style:use-window-font-color="true" loext:opacity="0%" style:text-position="super 58%"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55" style:family="text">
      <style:text-properties fo:font-variant="normal" fo:text-transform="none" fo:color="#000000" loext:opacity="100%" style:text-line-through-style="none" style:text-line-through-type="none" style:font-name="Cascadia Mono" fo:font-size="9.5pt" fo:font-style="normal" style:text-underline-style="none" fo:font-weight="normal" style:text-blinking="false" fo:background-color="#ffffff" loext:char-shading-value="0" style:font-size-asian="9.5pt" style:font-style-asian="normal" style:font-weight-asian="normal"/>
    </style:style>
    <style:style style:name="T156" style:family="text">
      <style:text-properties fo:color="#000000" loext:opacity="100%" fo:font-size="10pt" fo:language="en" fo:country="US" style:text-underline-style="none" style:font-size-asian="10pt" style:font-size-complex="10pt"/>
    </style:style>
    <style:style style:name="T157" style:family="text">
      <style:text-properties style:text-position="0% 100%" fo:language="ru" fo:country="RU"/>
    </style:style>
    <style:style style:name="T158" style:family="text">
      <style:text-properties officeooo:rsid="000321a7"/>
    </style:style>
    <style:style style:name="T159" style:family="text">
      <style:text-properties fo:language="en" fo:country="US" officeooo:rsid="000321a7"/>
    </style:style>
    <style:style style:name="T160" style:family="text">
      <style:text-properties fo:language="ru" fo:country="RU" officeooo:rsid="000321a7"/>
    </style:style>
    <style:style style:name="T161" style:family="text">
      <style:text-properties style:text-position="0% 100%" fo:language="en" fo:country="US" officeooo:rsid="000321a7"/>
    </style:style>
    <style:style style:name="T162" style:family="text">
      <style:text-properties style:text-position="0% 100%" fo:language="ru" fo:country="RU" officeooo:rsid="000321a7"/>
    </style:style>
    <style:style style:name="T163" style:family="text">
      <style:text-properties fo:font-variant="normal" fo:text-transform="none" fo:color="#000000" loext:opacity="100%" style:text-line-through-style="none" style:text-line-through-type="none" fo:font-family="'Times New Roman', serif" style:font-family-generic="swiss" style:font-pitch="variable" fo:language="ru" fo:country="RU" fo:font-style="normal" style:text-underline-style="none" fo:font-weight="normal" style:text-blinking="false" fo:background-color="transparent" loext:char-shading-value="0" style:font-style-asian="normal" style:font-weight-asian="normal"/>
    </style:style>
    <style:style style:name="T164" style:family="text">
      <style:text-properties style:use-window-font-color="true" loext:opacity="0%" style:text-position="0% 100%" fo:font-size="12pt" fo:language="en" fo:country="US" style:letter-kerning="true" style:font-name-asian="NSimSun" style:font-size-asian="12pt" style:language-asian="zh" style:country-asian="CN" style:font-name-complex="Arial1" style:font-size-complex="12pt" style:language-complex="hi" style:country-complex="IN"/>
    </style:style>
    <style:style style:name="T165" style:family="text">
      <style:text-properties style:use-window-font-color="true" loext:opacity="0%" style:text-position="0% 100%"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66" style:family="text">
      <style:text-properties fo:font-variant="normal" fo:text-transform="none" fo:color="#000000" loext:opacity="100%" style:text-line-through-style="none" style:text-line-through-type="none" style:font-name="Times New Roman2" fo:language="ru" fo:country="RU" fo:font-style="normal" style:text-underline-style="none" fo:font-weight="normal" style:text-blinking="false" fo:background-color="transparent" loext:char-shading-value="0" style:language-asian="en" style:country-asian="US" style:font-style-asian="normal" style:font-weight-asian="normal" style:language-complex="ar" style:country-complex="SA"/>
    </style:style>
    <style:style style:name="T167" style:family="text">
      <style:text-properties fo:color="#000000" loext:opacity="100%" fo:language="ru" fo:country="RU" style:text-underline-style="none" officeooo:rsid="000321a7"/>
    </style:style>
    <style:style style:name="T168" style:family="text">
      <style:text-properties fo:color="#000000" loext:opacity="100%" fo:language="en" fo:country="US" style:text-underline-style="none" officeooo:rsid="000321a7"/>
    </style:style>
    <style:style style:name="T169" style:family="text">
      <style:text-properties fo:font-size="9pt" fo:language="ru" fo:country="RU" fo:font-weight="bold" style:font-size-asian="9pt" style:font-weight-asian="bold" style:font-size-complex="9pt" style:font-weight-complex="bold"/>
    </style:style>
    <style:style style:name="T170" style:family="text">
      <style:text-properties fo:font-size="10pt" officeooo:rsid="000321a7" style:font-size-asian="10pt" style:font-size-complex="10pt"/>
    </style:style>
    <style:style style:name="T171" style:family="text">
      <style:text-properties fo:font-variant="normal" fo:text-transform="none" style:text-line-through-style="none" style:text-line-through-type="none" fo:font-family="'Times New Roman', serif" style:font-family-generic="swiss" style:font-pitch="variable" fo:language="ru" fo:country="RU" fo:font-style="normal" style:text-underline-style="none" fo:font-weight="normal" style:text-blinking="false" fo:background-color="transparent" loext:char-shading-value="0" style:language-asian="zh" style:country-asian="CN" style:font-style-asian="normal" style:font-weight-asian="normal" style:language-complex="hi" style:country-complex="IN"/>
    </style:style>
    <style:style style:name="T172"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language-asian="zh" style:country-asian="CN" style:font-style-asian="normal" style:font-weight-asian="normal" style:language-complex="hi" style:country-complex="IN"/>
    </style:style>
    <style:style style:name="T173"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language-asian="en" style:country-asian="US" style:font-style-asian="normal" style:font-weight-asian="normal" style:language-complex="ar" style:country-complex="SA"/>
    </style:style>
    <style:style style:name="T174"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officeooo:rsid="000321a7" style:text-blinking="false" fo:background-color="transparent" loext:char-shading-value="0" style:font-size-asian="12pt" style:language-asian="en" style:country-asian="US" style:font-style-asian="normal" style:font-weight-asian="normal" style:language-complex="ar" style:country-complex="SA"/>
    </style:style>
    <style:style style:name="T175" style:family="text">
      <style:text-properties fo:font-variant="normal" fo:text-transform="none" style:text-line-through-style="none" style:text-line-through-type="none" fo:font-family="'Times New Roman', serif" style:font-family-generic="swiss" style:font-pitch="variable" fo:language="en" fo:country="US" fo:font-style="normal" style:text-underline-style="none" fo:font-weight="normal" style:text-blinking="false" fo:background-color="transparent" loext:char-shading-value="0" style:language-asian="zh" style:country-asian="CN" style:font-style-asian="normal" style:font-weight-asian="normal" style:language-complex="hi" style:country-complex="IN"/>
    </style:style>
    <style:style style:name="T176" style:family="text">
      <style:text-properties fo:language="en" fo:country="US" style:language-asian="zh" style:country-asian="CN" style:language-complex="hi" style:country-complex="IN"/>
    </style:style>
    <style:style style:name="T177" style:family="text">
      <style:text-properties style:use-window-font-color="true" loext:opacity="0%" fo:font-size="12pt" fo:language="ru" fo:country="RU" style:letter-kerning="true" style:font-name-asian="Calibri2" style:font-size-asian="12pt" style:language-asian="en" style:country-asian="US" style:font-name-complex="Times New Roman1" style:font-size-complex="12pt" style:language-complex="ar" style:country-complex="SA"/>
    </style:style>
    <style:style style:name="T178" style:family="text">
      <style:text-properties fo:color="#008000" loext:opacity="100%" style:font-name="Cascadia Mono" fo:font-size="9.5pt" fo:language="en" fo:country="US" style:font-size-asian="9.5pt" fo:background-color="#ffffff"/>
    </style:style>
    <style:style style:name="T179" style:family="text">
      <style:text-properties fo:color="#808080" loext:opacity="100%" style:font-name="Cascadia Mono" fo:font-size="9.5pt" style:font-size-asian="9.5pt" fo:background-color="#ffffff"/>
    </style:style>
    <style:style style:name="T180" style:family="text">
      <style:text-properties fo:color="#000000" loext:opacity="100%" style:font-name="Cascadia Mono" fo:font-size="9.5pt" style:font-size-asian="9.5pt" fo:background-color="#ffffff"/>
    </style:style>
    <style:style style:name="T181" style:family="text">
      <style:text-properties fo:color="#a31515" loext:opacity="100%" style:font-name="Cascadia Mono" fo:font-size="9.5pt" style:font-size-asian="9.5pt" fo:background-color="#ffffff"/>
    </style:style>
    <style:style style:name="T182" style:family="text">
      <style:text-properties fo:color="#0000ff" loext:opacity="100%" style:font-name="Cascadia Mono" fo:font-size="9.5pt" style:font-size-asian="9.5pt" fo:background-color="#ffffff"/>
    </style:style>
    <style:style style:name="T183" style:family="text">
      <style:text-properties fo:color="#2b91af" loext:opacity="100%" style:font-name="Cascadia Mono" fo:font-size="9.5pt" style:font-size-asian="9.5pt" fo:background-color="#ffffff"/>
    </style:style>
    <style:style style:name="T184" style:family="text">
      <style:text-properties fo:color="#008080" loext:opacity="100%" style:font-name="Cascadia Mono" fo:font-size="9.5pt" style:font-size-asian="9.5pt" fo:background-color="#ffffff"/>
    </style:style>
    <style:style style:name="T185" style:family="text">
      <style:text-properties fo:color="#008000" loext:opacity="100%" style:font-name="Cascadia Mono" fo:font-size="9.5pt" fo:language="ru" fo:country="RU" style:font-size-asian="9.5pt" fo:background-color="#ffffff"/>
    </style:style>
    <style:style style:name="T186" style:family="text">
      <style:text-properties fo:color="#6f008a" loext:opacity="100%" style:font-name="Cascadia Mono" fo:font-size="9.5pt" style:font-size-asian="9.5pt" fo:background-color="#ffffff"/>
    </style:style>
    <style:style style:name="T187" style:family="text">
      <style:text-properties fo:color="#808080" loext:opacity="100%" style:font-name="Cascadia Mono" fo:font-size="9.5pt" fo:language="ru" fo:country="RU" style:font-size-asian="9.5pt" fo:background-color="#ffffff"/>
    </style:style>
    <style:style style:name="fr1" style:family="graphic" style:parent-style-name="Formula">
      <style:graphic-properties fo:margin-left="0cm" fo:margin-right="0cm" fo:margin-top="0cm" fo:margin-bottom="0cm" style:vertical-pos="middle" style:vertical-rel="text" draw:ole-draw-aspect="1"/>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OLE">
      <style:graphic-properties style:wrap="dynamic" style:number-wrapped-paragraphs="no-limit" style:wrap-contour="false" style:vertical-pos="from-top" style:vertical-rel="paragraph" style:horizontal-pos="center" style:horizontal-rel="paragraph" style:flow-with-text="false" draw:ole-draw-aspect="1"/>
    </style:style>
    <style:style style:name="fr4" style:family="graphic" style:parent-style-name="OLE">
      <style:graphic-properties style:vertical-pos="top" style:vertical-rel="baseline" style:horizontal-pos="center" style:horizontal-rel="paragraph"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МИНИСТЕРСТВО </text:span><text:span text:style-name="T2">НАУКИ И ВЫСШЕГО ОБРАЗОВАНИЯ</text:span><text:span text:style-name="T1"> <text:line-break/>РОССИЙСКОЙ ФЕДЕРАЦИИ</text:span></text:p>
      <text:p text:style-name="P1"><text:span text:style-name="T1">Федеральное государственное автономное образовательное учреждение <text:line-break/>высшего образования </text:span><text:span text:style-name="T3">«Национальный исследовательский <text:line-break/>Нижегородский государственный университет им. Н. И. Лобачевского»</text:span></text:p>
      <text:p text:style-name="P1"><text:span text:style-name="T3">(ННГУ)</text:span></text:p>
      <text:p text:style-name="P2"/>
      <text:p text:style-name="P1"><text:span text:style-name="T3">Институт информационных технологий, математики и механики</text:span></text:p>
      <text:p text:style-name="P1"><text:span text:style-name="T3">Ка­фед­ра ма­те­ма­ти­че­ско­го обес­пе­че­ния и су­пер­ком­пью­тер­ных тех­но­ло­гий</text:span></text:p>
      <text:p text:style-name="P3"/>
      <text:p text:style-name="P1"><text:span text:style-name="T1">Направление подготовки: «Программная инженерия»</text:span></text:p>
      <text:p text:style-name="P4"/>
      <text:p text:style-name="P5"><text:span text:style-name="T4">Магистерская диссертация</text:span></text:p>
      <text:p text:style-name="P6"/>
      <text:p text:style-name="P7"><text:span text:style-name="T1">на тему:</text:span></text:p>
      <text:p text:style-name="P7"><text:span text:style-name="T3">«</text:span><text:span text:style-name="T5">ПАРАЛЛЕЛЬНАЯ РЕАЛИЗАЦИЯ </text:span></text:p>
      <text:p text:style-name="P7"><text:span text:style-name="T5">QR-РАЗЛОЖЕНИЯ»</text:span></text:p>
      <text:p text:style-name="P6" loext:marker-style-name="T4"/>
      <text:p text:style-name="P8"/>
      <text:p text:style-name="P8">Выполнил: </text:p>
      <text:p text:style-name="P9"><text:span text:style-name="T6">студент группы </text:span><text:span text:style-name="T7">Коробейникова А.Д.</text:span></text:p>
      <text:p text:style-name="P10"><text:span text:style-name="T6">__________________ ФИО</text:span></text:p>
      <text:p text:style-name="P11"><text:span text:style-name="T6">(Подпись)</text:span></text:p>
      <text:p text:style-name="P9"><text:span text:style-name="T3">Научный руководитель:</text:span></text:p>
      <text:p text:style-name="P12"><text:span text:style-name="T8">д.т.н., доцент <text:s text:c="5"/></text:span><text:span text:style-name="T9">___</text:span><text:span text:style-name="T10">Баркалов К.А.</text:span><text:span text:style-name="T9">__</text:span></text:p>
      <text:p text:style-name="P10"><text:span text:style-name="T6">__________________ ФИО</text:span></text:p>
      <text:p text:style-name="P11"><text:span text:style-name="T6">(Подпись)</text:span></text:p>
      <text:p text:style-name="P13" loext:marker-style-name="T11"><text:span text:style-name="T12">Рецензент:</text:span><text:span text:style-name="T12"/></text:p>
      <text:p text:style-name="P14" loext:marker-style-name="T11"/>
      <text:p text:style-name="P15" loext:marker-style-name="T11"><text:s text:c="28"/>___________</text:p>
      <text:p text:style-name="P16"><text:span text:style-name="T1">Нижний Новгород<text:line-break/>2026 г.</text:span></text:p>
      <text:p text:style-name="P17" loext:marker-style-name="T13"><text:span text:style-name="T13">Содержание (оглавление)</text:span><text:span text:style-name="T13"/></text:p>
      <text:table-of-content text:style-name="Sect1" text:protected="true" text:name="Оглавление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30_1_5f_Заголовок_20_1_20_ИТММ"/>
          </text:index-source-styles>
          <text:index-source-styles text:outline-level="2">
            <text:index-source-style text:style-name="_30_2_5f_Заголовок_20_2_20_ИТММ"/>
          </text:index-source-styles>
          <text:index-source-styles text:outline-level="3">
            <text:index-source-style text:style-name="_30_4_5f_Заголовок_20_3_20_уровня_20_ИИТММ"/>
          </text:index-source-styles>
        </text:table-of-content-source>
        <text:index-body>
          <text:p text:style-name="P18"><text:a xlink:type="simple" xlink:href="#__RefHeading___Toc2667_713544485" text:style-name="Index_20_Link" text:visited-style-name="Index_20_Link">Введение<text:tab/>4</text:a></text:p>
          <text:p text:style-name="P19"><text:a xlink:type="simple" xlink:href="#__RefHeading___Toc2677_713544485" text:style-name="Index_20_Link" text:visited-style-name="Index_20_Link">Постановка задачи<text:tab/>6</text:a></text:p>
          <text:p text:style-name="P18"><text:a xlink:type="simple" xlink:href="#__RefHeading___Toc2665_713544485" text:style-name="Index_20_Link" text:visited-style-name="Index_20_Link">1 Теоретическая часть<text:tab/>7</text:a></text:p>
          <text:p text:style-name="P19"><text:a xlink:type="simple" xlink:href="#__RefHeading___Toc2675_713544485" text:style-name="Index_20_Link" text:visited-style-name="Index_20_Link">1.1 QR-разложение: общие теоретические сведения<text:tab/>7</text:a></text:p>
          <text:p text:style-name="P19"><text:a xlink:type="simple" xlink:href="#__RefHeading___Toc2673_713544485" text:style-name="Index_20_Link" text:visited-style-name="Index_20_Link">1.2 Описание алгоритмов<text:tab/>8</text:a></text:p>
          <text:p text:style-name="P20"><text:a xlink:type="simple" xlink:href="#__RefHeading___Toc2679_713544485" text:style-name="Index_20_Link" text:visited-style-name="Index_20_Link">1.2.1 Описание входных и выходных данных<text:tab/>8</text:a></text:p>
          <text:p text:style-name="P20"><text:a xlink:type="simple" xlink:href="#__RefHeading___Toc2695_713544485" text:style-name="Index_20_Link" text:visited-style-name="Index_20_Link">1.2.3 Метод QR-разложения на основе отражений Хаусхолдера<text:tab/>9</text:a></text:p>
          <text:p text:style-name="P20"><text:a xlink:type="simple" xlink:href="#__RefHeading___Toc2693_713544485" text:style-name="Index_20_Link" text:visited-style-name="Index_20_Link">1.2.4 Метод QR-разложения на основе вращений Гивенса<text:tab/>13</text:a></text:p>
          <text:p text:style-name="P19"><text:a xlink:type="simple" xlink:href="#__RefHeading___Toc2675_713544485_%D0%9A%D0%BE%D0%BF%D0%B8%D1%8F_1" text:style-name="Index_20_Link" text:visited-style-name="Index_20_Link">1.3 QR разложение матрицы Хессенберга<text:tab/>16</text:a></text:p>
          <text:p text:style-name="P18"><text:a xlink:type="simple" xlink:href="#__RefHeading___Toc2663_713544485" text:style-name="Index_20_Link" text:visited-style-name="Index_20_Link">2 Практическая часть<text:tab/>19</text:a></text:p>
          <text:p text:style-name="P19"><text:a xlink:type="simple" xlink:href="#__RefHeading___Toc2671_713544485_%D0%9A%D0%BE%D0%BF%D0%B8%D1%8F_1" text:style-name="Index_20_Link" text:visited-style-name="Index_20_Link">2.1 Описание разработанной библиотеки QR-decomposition<text:tab/>19</text:a></text:p>
          <text:p text:style-name="P19"><text:a xlink:type="simple" xlink:href="#__RefHeading___Toc2671_713544485" text:style-name="Index_20_Link" text:visited-style-name="Index_20_Link">2.2 Реализация метода отражений Хаусхолдера<text:tab/>23</text:a></text:p>
          <text:p text:style-name="P20"><text:a xlink:type="simple" xlink:href="#__RefHeading___Toc2687_713544485" text:style-name="Index_20_Link" text:visited-style-name="Index_20_Link">2.1.2 Первая реализация<text:tab/>23</text:a></text:p>
          <text:p text:style-name="P20"><text:a xlink:type="simple" xlink:href="#__RefHeading___Toc2685_713544485" text:style-name="Index_20_Link" text:visited-style-name="Index_20_Link">2.1.2 Избавление от матричных умножений<text:tab/>27</text:a></text:p>
          <text:p text:style-name="P20"><text:a xlink:type="simple" xlink:href="#__RefHeading___Toc2683_713544485" text:style-name="Index_20_Link" text:visited-style-name="Index_20_Link">2.1.3 Работа с нормированными векторами Хаусхолдера<text:tab/>32</text:a></text:p>
          <text:p text:style-name="P19"><text:a xlink:type="simple" xlink:href="#__RefHeading___Toc2669_713544485" text:style-name="Index_20_Link" text:visited-style-name="Index_20_Link">2.2 Реализация метода вращений Гивенса<text:tab/>40</text:a></text:p>
          <text:p text:style-name="P20"><text:a xlink:type="simple" xlink:href="#__RefHeading___Toc2681_713544485" text:style-name="Index_20_Link" text:visited-style-name="Index_20_Link">2.2.1 Первая реализация<text:tab/>40</text:a></text:p>
          <text:p text:style-name="P20"><text:a xlink:type="simple" xlink:href="#__RefHeading___Toc9987_388816865" text:style-name="Index_20_Link" text:visited-style-name="Index_20_Link">2.2.2 Хранение матриц Q и R в одной структуре<text:tab/>46</text:a></text:p>
          <text:p text:style-name="P20"><text:a xlink:type="simple" xlink:href="#__RefHeading___Toc4777_3249338211" text:style-name="Index_20_Link" text:visited-style-name="Index_20_Link">2.2.3 Использование SIMD<text:tab/>49</text:a></text:p>
          <text:p text:style-name="P20"><text:a xlink:type="simple" xlink:href="#__RefHeading___Toc4779_3249338211" text:style-name="Index_20_Link" text:visited-style-name="Index_20_Link">2.2.4 QR-разложение Хессенберговой матрицы<text:tab/>56</text:a></text:p>
          <text:p text:style-name="P18"><text:a xlink:type="simple" xlink:href="#__RefHeading___Toc2661_713544485" text:style-name="Index_20_Link" text:visited-style-name="Index_20_Link">Заключение<text:tab/>60</text:a></text:p>
          <text:p text:style-name="P18"><text:a xlink:type="simple" xlink:href="#__RefHeading___Toc2659_713544485" text:style-name="Index_20_Link" text:visited-style-name="Index_20_Link">Список литературы<text:tab/>62</text:a></text:p>
          <text:p text:style-name="P18"><text:a xlink:type="simple" xlink:href="#__RefHeading___Toc2657_713544485" text:style-name="Index_20_Link" text:visited-style-name="Index_20_Link">Приложение 1. QR-разложение с использованием отражений Хаусхолдера, первая реализация<text:tab/>64</text:a></text:p>
          <text:p text:style-name="P18"><text:a xlink:type="simple" xlink:href="#__RefHeading___Toc2657_713544485_%D0%9A%D0%BE%D0%BF%D0%B8%D1%8F_1" text:style-name="Index_20_Link" text:visited-style-name="Index_20_Link">Приложение 2. QR-разложение с использованием отражений Хаусхолдера, реализация без матричных умножений<text:tab/>66</text:a></text:p>
          <text:p text:style-name="P18"><text:a xlink:type="simple" xlink:href="#__RefHeading___Toc2657_713544485_%D0%9A%D0%BE%D0%BF%D0%B8%D1%8F_2" text:style-name="Index_20_Link" text:visited-style-name="Index_20_Link">Приложение 3. QR-разложение с использованием отражений Хаусхолдера, реализация in-place алгоритма<text:tab/>69</text:a></text:p>
          <text:p text:style-name="P18"><text:a xlink:type="simple" xlink:href="#__RefHeading___Toc2657_713544485_%D0%9A%D0%BE%D0%BF%D0%B8%D1%8F_3" text:style-name="Index_20_Link" text:visited-style-name="Index_20_Link">Приложение 4. QR-разложение с использованием вращений Гивенса, первая реализация<text:tab/>72</text:a></text:p>
          <text:p text:style-name="P18"><text:a xlink:type="simple" xlink:href="#__RefHeading___Toc2657_713544485_%D0%9A%D0%BE%D0%BF%D0%B8%D1%8F_4" text:style-name="Index_20_Link" text:visited-style-name="Index_20_Link"><text:soft-page-break/>Приложение 5. QR-разложение с использованием вращений Гивенса, Q и R в одной структуре данных<text:tab/>74</text:a></text:p>
          <text:p text:style-name="P18"><text:a xlink:type="simple" xlink:href="#__RefHeading___Toc2657_713544485_%D0%9A%D0%BE%D0%BF%D0%B8%D1%8F_5" text:style-name="Index_20_Link" text:visited-style-name="Index_20_Link">Приложение 6. QR-разложение с использованием вращений Гивенса, векторизованные вычисления<text:tab/>76</text:a></text:p>
        </text:index-body>
      </text:table-of-content>
      <text:p text:style-name="P21" loext:marker-style-name="T14"><text:bookmark-start text:name="__RefHeading___Toc2667_713544485"/><text:bookmark-start text:name="_Toc194842666"/><text:span text:style-name="T15">Введение</text:span><text:bookmark-end text:name="__RefHeading___Toc2667_713544485"/><text:bookmark-end text:name="_Toc194842666"/><text:span text:style-name="T14"/></text:p>
      <text:p text:style-name="P22">Зачастую научно-технические расчёты требуют решения задач линейной алгебры. Моделирование многих физических процессов сводится к системам дифференциальных уравнений, которые в численном решении приводятся к виду систем линейных алгебраических уравнений. Поэтому проблема быстрой обработки таких больших объёмов данных очень актуальна. В этой работе рассматривается алгоритм QR-разложения для представления матрицы в более удобном для быстрых расчётов виде. Кроме того, QR-разложение также является основой одного из методов поиска собственных векторов и чисел матрицы — QR-алгоритма [1]. С помощью этого разложения можно также решить линейную задачу наименьших квадратов и систему линейных алгебраических уравнений.</text:p>
      <text:p text:style-name="P22">QR-разложение матрицы – представление матрицы A размера nxm, где N≥m в виде произведения унитарной (или ортогональной матрицы) Q (Q<text:span text:style-name="T16">T</text:span>Q=E) и верхнетреугольной матрицы R. При N=m матрица Q унитарная. Если при этом A невырождена, то QR-разложение единственно и матрица R может быть выбрана так, чтобы её диагональные элементы были положительными вещественными числами. В частном случае, когда матрица A состоит только из вещественных чисел, матрицы Q и R также могут быть выбраны вещественными, причём Q является ортогональной [1]. На сегодняшний день применяется несколько методов для вычисления QR-разложения матриц [2]. Для ряда методов существуют эффективные программные реализации [3 - 5]. </text:p>
      <text:p text:style-name="P22">QR-разложение может быть получено различными методами. Проще всего оно может быть вычислено в процессе ортогонализации Грама-Шмидта [6]. Другие методы QR-разложения основаны на отражениях Хаусхолдера и вращениях Гивенса [2, 7]. Все перечисленные методы имеют ряд ограничений для применения [8]:</text:p>
      <text:list text:style-name="WWNum4">
        <text:list-item>
          <text:p text:style-name="P23">Процесс ортогонализации Грама-Шмидта имеет сложность O(n<text:span text:style-name="T16">3</text:span>); практически не поддаётся распараллеливанию; требует явного хранения Q (n<text:span text:style-name="T16">2</text:span> элементов); численно неустойчив, в большинстве случаев приводит к нарушению ортогональности. Модифицированный алгоритм чуть лучше, но и он имеет этот недостаток.</text:p>
        </text:list-item>
        <text:list-item>
          <text:p text:style-name="P23">Отражения Хаусхолдера имеют сложность приблизительно O(n³); для достижения наибольшей эффективности требуется более сложная блочная реализация; вектора отражений можно хранить под диагональю матрицы R, экономя память; для построения явной Q все равно требуется O(n²) памяти и дополнительных вычислений; численно устойчив. Является основным методом для разложения плотных матриц <text:soft-page-break/>общего вида. Из-за действий над целыми столбцами неэффективен для разреженных матриц, так как не учитывает уже занулённые значения.</text:p>
        </text:list-item>
        <text:list-item>
          <text:p text:style-name="P23">Вращения Гивенса имеют сложность 2n<text:span text:style-name="T16">3</text:span>; вектора вращений можно хранить очень компактно или даже не хранить явно; численно устойчив; лучше всего подходит для разреженных и ленточных матриц, так как позволяет обнулять отдельные элементы, не затрагивая другие; в связи с этим медленнее работает для плотных матриц. Этот метод также используется для обновления уже готового разложения при добавлении новой строки или столбца.</text:p>
        </text:list-item>
      </text:list>
      <text:p text:style-name="P22">В этой работе приводятся параллельные реализации QR-разложения по методам Хаусхолдера и Гивенса с применением технологий параллелизма OpenMP.</text:p>
      <text:p text:style-name="_30_2_5f_Заголовок_20_2_20_ИТММ"/>
      <text:p text:style-name="P24"><text:bookmark-start text:name="__RefHeading___Toc2677_713544485"/>Постановка задачи<text:bookmark-end text:name="__RefHeading___Toc2677_713544485"/></text:p>
      <text:p text:style-name="P22">Необходимо реализовать эффективные программные алгоритмы QR-разложения квадратной матрицы A с помощью методов отражений Хаусхолдера и вращений Гивенса, используя различные аппаратные оптимизации, а также применяя, где это возможно, параллелизм. Разработать несколько версий, сравнить их работу друг с другом.</text:p>
      <text:p text:style-name="P22">Для разработки использовать язык Си++ и технологии OpenMP для обеспечения параллельного исполнения кода.</text:p>
      <text:p text:style-name="P22">Сгенерировать целочисленную матрицу A размером <text:span text:style-name="T17">NxN</text:span>. Протестировать работу алгоритма на разных размерностях матрицы N: от небольших размеров (100 элементов), до больших объёмов данных (N&gt;1000). Протестировать работу на различном количестве потоков. Сравнить работу алгоритма с известными реализациями в сторонних библиотеках.</text:p>
      <text:p text:style-name="P22">Посчитать абсолютную и относительную ошибки для разложения. Критерием правильности считать близость ошибок к какому-либо малому eps. Дополнительно проверить зависимость показателей точности и времени от типа данных для представления числа с плавающей точкой: текущий – float, одинарной точности, для сравнения — double, двойной точности.</text:p>
      <text:p text:style-name="P22">В качестве примера приложения <text:span text:style-name="T18">QR-</text:span><text:span text:style-name="T19">разложения на практике выполнить</text:span> решение задачи <text:span text:style-name="T18">QR-</text:span><text:span text:style-name="T19">разложения хессенберговых матриц, верхней и нижней. Для этого генерировать указанные матрицы и выполнять их разложение методом вращений Гивенса, как наиболее оптимальный способ разложения верхней хессенберговой матрицы (в виду её верхнетреугольной структуры), сравнивая это решение с разложением по методу отражений Хаусхолдера, как наиболее оптимальный способ разложения нижней хессенберговой матрицы (в виду её нижнетреугольной структуры).</text:span></text:p>
      <text:p text:style-name="P22"><text:span text:style-name="T19">Сравнить полученные результаты (время работы разработанной программы, величины абсолютной и относительной ошибок матриц </text:span><text:span text:style-name="T18">Q </text:span><text:span text:style-name="T19">и </text:span><text:span text:style-name="T18">R</text:span><text:span text:style-name="T19">) с аналогичными результатами, полученными после работы с какой-либо из существующих реализаций из известных библиотек на одних и тех же данных.</text:span></text:p>
      <text:p text:style-name="_30_1_5f_Заголовок_20_1_20_ИТММ"><text:bookmark-start text:name="__RefHeading___Toc2665_713544485"/><text:bookmark-start text:name="_Toc194842667"/>1 Теоретическая часть<text:bookmark-end text:name="__RefHeading___Toc2665_713544485"/><text:bookmark-end text:name="_Toc194842667"/></text:p>
      <text:p text:style-name="_30_2_5f_Заголовок_20_2_20_ИТММ"><text:bookmark-start text:name="__RefHeading___Toc2675_713544485"/><text:bookmark-start text:name="_Toc194842668"/>1.1 <text:bookmark-end text:name="_Toc194842668"/><text:span text:style-name="T18">QR-</text:span><text:span text:style-name="T19">разложение: общие теоретические сведения</text:span><text:bookmark-end text:name="__RefHeading___Toc2675_713544485"/></text:p>
      <text:p text:style-name="_30_3_5f_Текст_20_ИТММ">QR-разложение матрицы – представление матрицы в виде произведения унитарной (или ортогональной матрицы) Q (Q<text:span text:style-name="T16">T</text:span>Q=E) и верхнетреугольной матрицы R с положительными диагональными элементами. QR-разложение является основой одного из методов поиска собственных векторов и чисел матрицы — QR-алгоритма. С помощью разложения можно решить линейную задачу наименьших квадратов.</text:p>
      <text:p text:style-name="_30_3_5f_Текст_20_ИТММ">Также с помощью QR-разложения можно решать системы линейных алгебраических уравнений (СЛАУ). В матричном виде эта задача описывается как (A –матрица системы, x – столбец неизвестных, b – столбец свободных членов). Если известно QR-разложение матрицы, исходная система может быть записана как <draw:frame draw:style-name="fr1" draw:name="Объект1" text:anchor-type="as-char" svg:width="1.36cm" svg:height="0.471cm" draw:z-index="11"><draw:object xlink:href="./Object 1" xlink:type="simple" xlink:show="embed" xlink:actuate="onLoad"/><draw:image xlink:href="./ObjectReplacements/Object 1" xlink:type="simple" xlink:show="embed" xlink:actuate="onLoad"/></draw:frame>. Решением этой задачи является решение треугольной системы <draw:frame draw:style-name="fr1" draw:name="Объект2" text:anchor-type="as-char" svg:width="1.614cm" svg:height="0.531cm" draw:z-index="12"><draw:object xlink:href="./Object 2" xlink:type="simple" xlink:show="embed" xlink:actuate="onLoad"/><draw:image xlink:href="./ObjectReplacements/Object 2" xlink:type="simple" xlink:show="embed" xlink:actuate="onLoad"/></draw:frame>. Эта система может быть решена с помощью обратной подстановки, поскольку R – верхняя треугольная матрица.</text:p>
      <text:p text:style-name="_30_3_5f_Текст_20_ИТММ">В работе в качестве примера приложения <text:span text:style-name="T18">QR-</text:span><text:span text:style-name="T19">разложения на практике </text:span>рассматривается решение задачи <text:span text:style-name="T18">QR-</text:span><text:span text:style-name="T19">разложения хессенберговых матриц, верхней и нижней. Матрицы Хессенберга получаются как продукт методов подпространства Крылова в процессе построения ортогональных базисов, а также в задаче на нахождение собственных значений матрицы QR-методом.</text:span></text:p>
      <text:p text:style-name="_30_3_5f_Текст_20_ИТММ">QR-разложение может быть получено различными методами. Проще всего оно может быть вычислено в процессе ортогонализации Грама-Шмидта. Другие методы QR-разложения основаны на отражениях Хаусхолдера и вращениях Гивенса.</text:p>
      <text:p text:style-name="_30_2_5f_Заголовок_20_2_20_ИТММ"/>
      <text:p text:style-name="P24"><text:bookmark-start text:name="__RefHeading___Toc2673_713544485"/>1.2 Описание алгоритмов<text:bookmark-end text:name="__RefHeading___Toc2673_713544485"/></text:p>
      <text:p text:style-name="P25"><text:bookmark-start text:name="__RefHeading___Toc2679_713544485"/><text:span text:style-name="Internet_20_link"><text:span text:style-name="T20">1.2.1 Описание входных и выходных данных</text:span></text:span><text:bookmark-end text:name="__RefHeading___Toc2679_713544485"/></text:p>
      <text:p text:style-name="_30_3_5f_Текст_20_ИТММ"><text:span text:style-name="Internet_20_link"><text:span text:style-name="T21">Генерируется квадратная плотная матрица </text:span></text:span><text:span text:style-name="Internet_20_link"><text:span text:style-name="T22">A</text:span></text:span><text:span text:style-name="Internet_20_link"><text:span text:style-name="T21"> размером </text:span></text:span><text:span text:style-name="Internet_20_link"><text:span text:style-name="T22">NxN</text:span></text:span><text:span text:style-name="Internet_20_link"><text:span text:style-name="T21">. Значения для </text:span></text:span><text:span text:style-name="Internet_20_link"><text:span text:style-name="T22">A</text:span></text:span><text:span text:style-name="Internet_20_link"><text:span text:style-name="T21"> генерируются в интервале [-10;10].</text:span></text:span></text:p>
      <text:p text:style-name="_30_3_5f_Текст_20_ИТММ" loext:marker-style-name="T23"><text:span text:style-name="T23">Полученные в результате работы алгоритма </text:span><text:span text:style-name="T24">QR-</text:span><text:span text:style-name="T25">разложения </text:span><text:span text:style-name="T23">матрицы Q и R необходимо перемножить и сравнить результат с исходной матрицей A. </text:span></text:p>
      <text:p text:style-name="_30_3_5f_Текст_20_ИТММ" loext:marker-style-name="T23"><text:span text:style-name="T23">Подсчитаем абсолютную ошибку полученного </text:span><text:span text:style-name="T24">QR-</text:span><text:span text:style-name="T25">разложения </text:span><text:span text:style-name="T23">с помощью Нормы Фробениуса (также евклидова норма, соответствующая евклидову пространству матриц относительно фробениусова скалярного произведения, или сферическая норма) представляет собой частный случай p-нормы для p = 2:</text:span><draw:frame draw:style-name="fr1" draw:name="Объект3" text:anchor-type="as-char" svg:width="3.032cm" svg:height="1.235cm" draw:z-index="19"><draw:object xlink:href="./Object 3" xlink:type="simple" xlink:show="embed" xlink:actuate="onLoad"/><draw:image xlink:href="./ObjectReplacements/Object 3" xlink:type="simple" xlink:show="embed" xlink:actuate="onLoad"/></draw:frame><text:span text:style-name="T23">, где </text:span><text:span text:style-name="T24">n</text:span><text:span text:style-name="T23">, m – размеры матрицы А. Получим </text:span><draw:frame draw:style-name="fr1" draw:name="Объект4" text:anchor-type="as-char" svg:width="1.861cm" svg:height="0.547cm" draw:z-index="20"><draw:object xlink:href="./Object 4" xlink:type="simple" xlink:show="embed" xlink:actuate="onLoad"/><draw:image xlink:href="./ObjectReplacements/Object 4" xlink:type="simple" xlink:show="embed" xlink:actuate="onLoad"/></draw:frame><text:span text:style-name="T23"><text:s/>и </text:span><draw:frame draw:style-name="fr1" draw:name="Объект5" text:anchor-type="as-char" svg:width="1.903cm" svg:height="1.155cm" draw:z-index="21"><draw:object xlink:href="./Object 5" xlink:type="simple" xlink:show="embed" xlink:actuate="onLoad"/><draw:image xlink:href="./ObjectReplacements/Object 5" xlink:type="simple" xlink:show="embed" xlink:actuate="onLoad"/></draw:frame><text:span text:style-name="T23"><text:s/>для оценки ошибки.</text:span></text:p>
      <text:p text:style-name="_30_3_5f_Текст_20_ИТММ" loext:marker-style-name="T17"><text:span text:style-name="T26">Для сравнения результатов по итогам запуска разработанной программы была выбрана реализация QR-разложения из библиотеки Scilab. В Scilab QR-разложение реализуется с помощью функции qr. Она позволяет разложить матрицу</text:span><text:span text:style-name="T27"> X </text:span><text:span text:style-name="T26">на ортогональную, в вещественном случае, матрицу Q и верхнюю треугольную матрицу R, при этом выполняется равенство </text:span><text:span text:style-name="T27">X</text:span><text:span text:style-name="T26"> = QR. QR-разложение в Scilab основано на подпрограммах Lapack: DGEQRF, DGEQPF, DORGQR для вещественных матриц.</text:span></text:p>
      <text:p text:style-name="_30_4_5f_Заголовок_20_3_20_уровня_20_ИИТММ"/>
      <text:p text:style-name="P26"><text:bookmark-start text:name="__RefHeading___Toc2695_713544485"/>1.2.3 Метод <text:span text:style-name="T18">QR-</text:span><text:span text:style-name="T19">разложения на основе о</text:span>тражений Хаусхолдера<text:bookmark-end text:name="__RefHeading___Toc2695_713544485"/></text:p>
      <text:p text:style-name="_30_3_5f_Текст_20_ИТММ"><text:span text:style-name="Internet_20_link"><text:span text:style-name="T28">Одним из самых распространённых методов нахождения </text:span></text:span><text:span text:style-name="Internet_20_link"><text:span text:style-name="T29">QR</text:span></text:span><text:span text:style-name="Internet_20_link"><text:span text:style-name="T28">-разложения является метод отражений Хаусхолдера. Суть алгоритма QR-разложения, реализованного с помощью отражений Хаусхолдера – в последовательном домножении матрицы </text:span></text:span><text:span text:style-name="Internet_20_link"><text:span text:style-name="T29">A</text:span></text:span><text:span text:style-name="Internet_20_link"><text:span text:style-name="T28"> слева на отражения Хаусхолдера </text:span></text:span><text:span text:style-name="Internet_20_link"><text:span text:style-name="T29">H</text:span></text:span><text:span text:style-name="Internet_20_link"><text:span text:style-name="T28"> с целью получения </text:span></text:span><text:span text:style-name="Internet_20_link"><text:span text:style-name="T30">верхнетреугольной </text:span></text:span><text:span text:style-name="Internet_20_link"><text:span text:style-name="T28">матрицы </text:span></text:span><text:span text:style-name="Internet_20_link"><text:span text:style-name="T29">R</text:span></text:span><text:span text:style-name="Internet_20_link"><text:span text:style-name="T28"> как побочного продукта и </text:span></text:span><text:span text:style-name="Internet_20_link"><text:span text:style-name="T29">Q</text:span></text:span><text:span text:style-name="Internet_20_link"><text:span text:style-name="T28"> с помощью явных перемножений в простейшем случае. </text:span></text:span></text:p>
      <text:p text:style-name="_30_3_5f_Текст_20_ИТММ"><text:span text:style-name="Internet_20_link"><text:span text:style-name="T28">Пусть </text:span></text:span><draw:frame draw:style-name="fr1" draw:name="Объект6" text:anchor-type="as-char" svg:width="0.228cm" svg:height="0.471cm" draw:z-index="22"><draw:object xlink:href="./Object 6" xlink:type="simple" xlink:show="embed" xlink:actuate="onLoad"/><draw:image xlink:href="./ObjectReplacements/Object 6" xlink:type="simple" xlink:show="embed" xlink:actuate="onLoad"/></draw:frame><text:span text:style-name="Internet_20_link"><text:span text:style-name="T28"><text:s/>– N-мерный ненулевой вектор-столбец. Квадратная матрица </text:span></text:span><text:span text:style-name="Internet_20_link"><text:span text:style-name="T29">H</text:span></text:span><text:span text:style-name="Internet_20_link"><text:span text:style-name="T28"> порядка N вида:</text:span></text:span></text:p>
      <text:p text:style-name="P27"><draw:frame draw:style-name="fr1" draw:name="Объект7" text:anchor-type="as-char" svg:width="2.417cm" svg:height="1.124cm" draw:z-index="23"><draw:object xlink:href="./Object 7" xlink:type="simple" xlink:show="embed" xlink:actuate="onLoad"/><draw:image xlink:href="./ObjectReplacements/Object 7" xlink:type="simple" xlink:show="embed" xlink:actuate="onLoad"/></draw:frame></text:p>
      <text:p text:style-name="_30_3_5f_Текст_20_ИТММ"><text:span text:style-name="Internet_20_link"><text:span text:style-name="T28">называется отражением Хаусхолдера или просто отражением. Вектор </text:span></text:span><draw:frame draw:style-name="fr1" draw:name="Объект8" text:anchor-type="as-char" svg:width="0.228cm" svg:height="0.471cm" draw:z-index="24"><draw:object xlink:href="./Object 8" xlink:type="simple" xlink:show="embed" xlink:actuate="onLoad"/><draw:image xlink:href="./ObjectReplacements/Object 8" xlink:type="simple" xlink:show="embed" xlink:actuate="onLoad"/></draw:frame><text:span text:style-name="Internet_20_link"><text:span text:style-name="T28"><text:s/>называется вектором Хаусхолдера. Умножению матрицы </text:span></text:span><text:span text:style-name="Internet_20_link"><text:span text:style-name="T29">H</text:span></text:span><text:span text:style-name="Internet_20_link"><text:span text:style-name="T28"> на вектор x можно дать следующую геометрическую интерпретацию: вектор </text:span></text:span><draw:frame draw:style-name="fr1" draw:name="Объект9" text:anchor-type="as-char" svg:width="0.542cm" svg:height="0.471cm" draw:z-index="25"><draw:object xlink:href="./Object 9" xlink:type="simple" xlink:show="embed" xlink:actuate="onLoad"/><draw:image xlink:href="./ObjectReplacements/Object 9" xlink:type="simple" xlink:show="embed" xlink:actuate="onLoad"/></draw:frame><text:span text:style-name="Internet_20_link"><text:span text:style-name="T28"><text:s/>получается отражением вектора x относительно гиперплоскости, ортогональной вектору </text:span></text:span><draw:frame draw:style-name="fr1" draw:name="Объект10" text:anchor-type="as-char" svg:width="0.228cm" svg:height="0.471cm" draw:z-index="26"><draw:object xlink:href="./Object 10" xlink:type="simple" xlink:show="embed" xlink:actuate="onLoad"/><draw:image xlink:href="./ObjectReplacements/Object 10" xlink:type="simple" xlink:show="embed" xlink:actuate="onLoad"/></draw:frame><text:span text:style-name="Internet_20_link"><text:span text:style-name="T28">. Матрица Хаусхолдера будет симметрична и ортогональна.</text:span></text:span></text:p>
      <text:p text:style-name="_30_3_5f_Текст_20_ИТММ"><text:span text:style-name="Internet_20_link"><text:span text:style-name="T28">Пусть </text:span></text:span><draw:frame draw:style-name="fr1" draw:name="Объект11" text:anchor-type="as-char" svg:width="0.787cm" svg:height="0.471cm" draw:z-index="27"><draw:object xlink:href="./Object 11" xlink:type="simple" xlink:show="embed" xlink:actuate="onLoad"/><draw:image xlink:href="./ObjectReplacements/Object 11" xlink:type="simple" xlink:show="embed" xlink:actuate="onLoad"/></draw:frame><text:span text:style-name="Internet_20_link"><text:span text:style-name="T28">. Найдем отражение </text:span></text:span><text:span text:style-name="Internet_20_link"><text:span text:style-name="T29">H</text:span></text:span><text:span text:style-name="Internet_20_link"><text:span text:style-name="T28">, такое, что </text:span></text:span><draw:frame draw:style-name="fr1" draw:name="Объект12" text:anchor-type="as-char" svg:width="1.542cm" svg:height="0.534cm" draw:z-index="28"><draw:object xlink:href="./Object 12" xlink:type="simple" xlink:show="embed" xlink:actuate="onLoad"/><draw:image xlink:href="./ObjectReplacements/Object 12" xlink:type="simple" xlink:show="embed" xlink:actuate="onLoad"/></draw:frame><text:span text:style-name="Internet_20_link"><text:span text:style-name="T28"><text:s/>для какого-либо α. Имеем:</text:span></text:span></text:p>
      <text:p text:style-name="P27"><draw:frame draw:style-name="fr1" draw:name="Объект13" text:anchor-type="as-char" svg:width="8.001cm" svg:height="1.24cm" draw:z-index="29"><draw:object xlink:href="./Object 13" xlink:type="simple" xlink:show="embed" xlink:actuate="onLoad"/><draw:image xlink:href="./ObjectReplacements/Object 13" xlink:type="simple" xlink:show="embed" xlink:actuate="onLoad"/></draw:frame></text:p>
      <text:p text:style-name="_30_3_5f_Текст_20_ИТММ"><text:span text:style-name="Internet_20_link"><text:span text:style-name="T28">и поэтому </text:span></text:span><draw:frame draw:style-name="fr1" draw:name="Объект14" text:anchor-type="as-char" svg:width="0.228cm" svg:height="0.471cm" draw:z-index="30"><draw:object xlink:href="./Object 14" xlink:type="simple" xlink:show="embed" xlink:actuate="onLoad"/><draw:image xlink:href="./ObjectReplacements/Object 14" xlink:type="simple" xlink:show="embed" xlink:actuate="onLoad"/></draw:frame><text:span text:style-name="Internet_20_link"><text:span text:style-name="T28"><text:s/>коллинеарен </text:span></text:span><draw:frame draw:style-name="fr1" draw:name="Объект15" text:anchor-type="as-char" svg:width="2.752cm" svg:height="0.534cm" draw:z-index="31"><draw:object xlink:href="./Object 15" xlink:type="simple" xlink:show="embed" xlink:actuate="onLoad"/><draw:image xlink:href="./ObjectReplacements/Object 15" xlink:type="simple" xlink:show="embed" xlink:actuate="onLoad"/></draw:frame><text:span text:style-name="Internet_20_link"><text:span text:style-name="T28">. Так как </text:span></text:span><draw:frame draw:style-name="fr1" draw:name="Объект16" text:anchor-type="as-char" svg:width="0.228cm" svg:height="0.471cm" draw:z-index="32"><draw:object xlink:href="./Object 16" xlink:type="simple" xlink:show="embed" xlink:actuate="onLoad"/><draw:image xlink:href="./ObjectReplacements/Object 16" xlink:type="simple" xlink:show="embed" xlink:actuate="onLoad"/></draw:frame><text:span text:style-name="Internet_20_link"><text:span text:style-name="T28"><text:s/>определен с точностью до ненулевого множителя, то можно положить </text:span></text:span><draw:frame draw:style-name="fr1" draw:name="Объект17" text:anchor-type="as-char" svg:width="1.986cm" svg:height="0.534cm" draw:z-index="33"><draw:object xlink:href="./Object 17" xlink:type="simple" xlink:show="embed" xlink:actuate="onLoad"/><draw:image xlink:href="./ObjectReplacements/Object 17" xlink:type="simple" xlink:show="embed" xlink:actuate="onLoad"/></draw:frame><text:span text:style-name="Internet_20_link"><text:span text:style-name="T28"><text:s/>Ввиду</text:span></text:span><text:span text:style-name="T31"> </text:span><text:span text:style-name="Internet_20_link"><text:span text:style-name="T28">ортогональности матрицы </text:span></text:span><text:span text:style-name="Internet_20_link"><text:span text:style-name="T29">H</text:span></text:span><text:span text:style-name="Internet_20_link"><text:span text:style-name="T28"> имеем</text:span></text:span><draw:frame draw:style-name="fr1" draw:name="Объект18" text:anchor-type="as-char" svg:width="2.152cm" svg:height="0.577cm" draw:z-index="34"><draw:object xlink:href="./Object 18" xlink:type="simple" xlink:show="embed" xlink:actuate="onLoad"/><draw:image xlink:href="./ObjectReplacements/Object 18" xlink:type="simple" xlink:show="embed" xlink:actuate="onLoad"/></draw:frame><text:span text:style-name="Internet_20_link"><text:span text:style-name="T28">, откуда </text:span></text:span><draw:frame draw:style-name="fr1" draw:name="Объект19" text:anchor-type="as-char" svg:width="1.621cm" svg:height="0.577cm" draw:z-index="35"><draw:object xlink:href="./Object 19" xlink:type="simple" xlink:show="embed" xlink:actuate="onLoad"/><draw:image xlink:href="./ObjectReplacements/Object 19" xlink:type="simple" xlink:show="embed" xlink:actuate="onLoad"/></draw:frame><text:span text:style-name="Internet_20_link"><text:span text:style-name="T28">. Поэтому </text:span></text:span><draw:frame draw:style-name="fr1" draw:name="Объект20" text:anchor-type="as-char" svg:width="2.399cm" svg:height="0.584cm" draw:z-index="36"><draw:object xlink:href="./Object 20" xlink:type="simple" xlink:show="embed" xlink:actuate="onLoad"/><draw:image xlink:href="./ObjectReplacements/Object 20" xlink:type="simple" xlink:show="embed" xlink:actuate="onLoad"/></draw:frame></text:p>
      <text:p text:style-name="_30_3_5f_Текст_20_ИТММ"><text:span text:style-name="Internet_20_link"><text:span text:style-name="T28">Итак, в качестве вектора Хаусхолдера </text:span></text:span><draw:frame draw:style-name="fr1" draw:name="Объект21" text:anchor-type="as-char" svg:width="0.228cm" svg:height="0.471cm" draw:z-index="37"><draw:object xlink:href="./Object 21" xlink:type="simple" xlink:show="embed" xlink:actuate="onLoad"/><draw:image xlink:href="./ObjectReplacements/Object 21" xlink:type="simple" xlink:show="embed" xlink:actuate="onLoad"/></draw:frame><text:span text:style-name="Internet_20_link"><text:span text:style-name="T28"><text:s/>можно взять вектор, вычисляемый по формуле </text:span></text:span><draw:frame draw:style-name="fr1" draw:name="Объект22" text:anchor-type="as-char" svg:width="2.245cm" svg:height="0.584cm" draw:z-index="38"><draw:object xlink:href="./Object 22" xlink:type="simple" xlink:show="embed" xlink:actuate="onLoad"/><draw:image xlink:href="./ObjectReplacements/Object 22" xlink:type="simple" xlink:show="embed" xlink:actuate="onLoad"/></draw:frame><text:span text:style-name="Internet_20_link"><text:span text:style-name="T28">, или любой ненулевой, ему коллинеарный.</text:span></text:span></text:p>
      <text:p text:style-name="_30_3_5f_Текст_20_ИТММ"><text:span text:style-name="Internet_20_link"><text:span text:style-name="T28">С алгоритмом построения вектора Хаусхолдера связаны некоторые важные детали. Одна из них — выбор знака в формуле </text:span></text:span><draw:frame draw:style-name="fr1" draw:name="Объект23" text:anchor-type="as-char" svg:width="2.245cm" svg:height="0.584cm" draw:z-index="39"><draw:object xlink:href="./Object 23" xlink:type="simple" xlink:show="embed" xlink:actuate="onLoad"/><draw:image xlink:href="./ObjectReplacements/Object 23" xlink:type="simple" xlink:show="embed" xlink:actuate="onLoad"/></draw:frame><text:span text:style-name="Internet_20_link"><text:span text:style-name="T28">. Если x почти коллинеарен </text:span></text:span><draw:frame draw:style-name="fr1" draw:name="Объект24" text:anchor-type="as-char" svg:width="0.339cm" svg:height="0.534cm" draw:z-index="40"><draw:object xlink:href="./Object 24" xlink:type="simple" xlink:show="embed" xlink:actuate="onLoad"/><draw:image xlink:href="./ObjectReplacements/Object 24" xlink:type="simple" xlink:show="embed" xlink:actuate="onLoad"/></draw:frame><text:span text:style-name="Internet_20_link"><text:span text:style-name="T28">, то вектор </text:span></text:span><draw:frame draw:style-name="fr1" draw:name="Объект25" text:anchor-type="as-char" svg:width="3.808cm" svg:height="0.584cm" draw:z-index="41"><draw:object xlink:href="./Object 25" xlink:type="simple" xlink:show="embed" xlink:actuate="onLoad"/><draw:image xlink:href="./ObjectReplacements/Object 25" xlink:type="simple" xlink:show="embed" xlink:actuate="onLoad"/></draw:frame><text:s/><text:span text:style-name="Internet_20_link"><text:span text:style-name="T28">имеет малую норму. Вследствие этого возможно появление большой относительной ошибки при вычислении множителя 2/</text:span></text:span><draw:frame draw:style-name="fr1" draw:name="Объект26" text:anchor-type="as-char" svg:width="0.669cm" svg:height="0.531cm" draw:z-index="42"><draw:object xlink:href="./Object 26" xlink:type="simple" xlink:show="embed" xlink:actuate="onLoad"/><draw:image xlink:href="./ObjectReplacements/Object 26" xlink:type="simple" xlink:show="embed" xlink:actuate="onLoad"/></draw:frame><text:span text:style-name="Internet_20_link"><text:span text:style-name="T28">. Эту трудность можно обойти, взяв </text:span></text:span><draw:frame draw:style-name="fr1" draw:name="Объект27" text:anchor-type="as-char" svg:width="0.261cm" svg:height="0.471cm" draw:z-index="43"><draw:object xlink:href="./Object 27" xlink:type="simple" xlink:show="embed" xlink:actuate="onLoad"/><draw:image xlink:href="./ObjectReplacements/Object 27" xlink:type="simple" xlink:show="embed" xlink:actuate="onLoad"/></draw:frame><text:span text:style-name="Internet_20_link"><text:span text:style-name="T28"><text:s/>с тем же знаком, что и первая компонента вектора x: </text:span></text:span><draw:frame draw:style-name="fr1" draw:name="Объект28" text:anchor-type="as-char" svg:width="3.808cm" svg:height="0.584cm" draw:z-index="44"><draw:object xlink:href="./Object 28" xlink:type="simple" xlink:show="embed" xlink:actuate="onLoad"/><draw:image xlink:href="./ObjectReplacements/Object 28" xlink:type="simple" xlink:show="embed" xlink:actuate="onLoad"/></draw:frame><text:span text:style-name="Internet_20_link"><text:span text:style-name="T28">.</text:span></text:span></text:p>
      <text:p text:style-name="_30_3_5f_Текст_20_ИТММ"><text:span text:style-name="Internet_20_link"><text:span text:style-name="T28">Это обеспечивает выполнение неравенства </text:span></text:span><draw:frame draw:style-name="fr1" draw:name="Объект29" text:anchor-type="as-char" svg:width="1.808cm" svg:height="0.577cm" draw:z-index="45"><draw:object xlink:href="./Object 29" xlink:type="simple" xlink:show="embed" xlink:actuate="onLoad"/><draw:image xlink:href="./ObjectReplacements/Object 29" xlink:type="simple" xlink:show="embed" xlink:actuate="onLoad"/></draw:frame><text:span text:style-name="Internet_20_link"><text:span text:style-name="T28"><text:s/>и гарантирует почти точную ортогональность вычисленной матрицы </text:span></text:span><text:span text:style-name="Internet_20_link"><text:span text:style-name="T29">H</text:span></text:span><text:span text:style-name="Internet_20_link"><text:span text:style-name="T28">.</text:span></text:span></text:p>
      <text:p text:style-name="_30_3_5f_Текст_20_ИТММ"><text:span text:style-name="Internet_20_link"><text:span text:style-name="T28">Другая деталь связана с выбором множителя для вектора, вычисляемого по формуле </text:span></text:span><draw:frame draw:style-name="fr1" draw:name="Объект30" text:anchor-type="as-char" svg:width="3.808cm" svg:height="0.584cm" draw:z-index="46"><draw:object xlink:href="./Object 30" xlink:type="simple" xlink:show="embed" xlink:actuate="onLoad"/><draw:image xlink:href="./ObjectReplacements/Object 30" xlink:type="simple" xlink:show="embed" xlink:actuate="onLoad"/></draw:frame><text:span text:style-name="Internet_20_link"><text:span text:style-name="T28">. Можно использовать такой множитель, что </text:span></text:span><draw:frame draw:style-name="fr1" draw:name="Объект31" text:anchor-type="as-char" svg:width="0.924cm" svg:height="0.534cm" draw:z-index="47"><draw:object xlink:href="./Object 31" xlink:type="simple" xlink:show="embed" xlink:actuate="onLoad"/><draw:image xlink:href="./ObjectReplacements/Object 31" xlink:type="simple" xlink:show="embed" xlink:actuate="onLoad"/></draw:frame><text:span text:style-name="Internet_20_link"><text:span text:style-name="T28">. Это несколько </text:span></text:span><text:soft-page-break/><text:span text:style-name="Internet_20_link"><text:span text:style-name="T28">упрощает способ хранения ортогональных матриц, вычисленных по методу отражений Хаусхолдера.</text:span></text:span></text:p>
      <text:p text:style-name="_30_3_5f_Текст_20_ИТММ"><text:span text:style-name="Internet_20_link"><text:span text:style-name="T28">На каждом шаге алгоритма </text:span></text:span><text:span text:style-name="Internet_20_link"><text:span text:style-name="T29">k</text:span></text:span><text:span text:style-name="Internet_20_link"><text:span text:style-name="T28"> получаем </text:span></text:span><text:span text:style-name="Internet_20_link"><text:span text:style-name="T29">k</text:span></text:span><text:span text:style-name="Internet_20_link"><text:span text:style-name="T28">-ое отражение </text:span></text:span><text:span text:style-name="Internet_20_link"><text:span text:style-name="T29">H</text:span></text:span><text:span text:style-name="Internet_20_link"><text:span text:style-name="T32">k</text:span></text:span><text:span text:style-name="Internet_20_link"><text:span text:style-name="T28">, домножая на него матрицу </text:span></text:span><text:span text:style-name="Internet_20_link"><text:span text:style-name="T29">A</text:span></text:span><text:span text:style-name="Internet_20_link"><text:span text:style-name="T28"> слева получаем </text:span></text:span><draw:frame draw:style-name="fr1" draw:name="Объект32" text:anchor-type="as-char" svg:width="3.641cm" svg:height="0.575cm" draw:z-index="48"><draw:object xlink:href="./Object 32" xlink:type="simple" xlink:show="embed" xlink:actuate="onLoad"/><draw:image xlink:href="./ObjectReplacements/Object 32" xlink:type="simple" xlink:show="embed" xlink:actuate="onLoad"/></draw:frame><text:span text:style-name="Internet_20_link"><text:span text:style-name="T28">, в которой </text:span></text:span><text:span text:style-name="Internet_20_link"><text:span text:style-name="T29">k</text:span></text:span><text:span text:style-name="Internet_20_link"><text:span text:style-name="T28"> первых столбцов имеют нули под главной диагональю:</text:span></text:span></text:p>
      <text:p text:style-name="P27"><draw:frame draw:style-name="fr1" draw:name="Объект33" text:anchor-type="as-char" svg:width="3.646cm" svg:height="2.42cm" draw:z-index="49"><draw:object xlink:href="./Object 33" xlink:type="simple" xlink:show="embed" xlink:actuate="onLoad"/><draw:image xlink:href="./ObjectReplacements/Object 33" xlink:type="simple" xlink:show="embed" xlink:actuate="onLoad"/></draw:frame><text:span text:style-name="Internet_20_link"><text:span text:style-name="T28">, </text:span></text:span><draw:frame draw:style-name="fr1" draw:name="Объект34" text:anchor-type="as-char" svg:width="4.187cm" svg:height="2.42cm" draw:z-index="50"><draw:object xlink:href="./Object 34" xlink:type="simple" xlink:show="embed" xlink:actuate="onLoad"/><draw:image xlink:href="./ObjectReplacements/Object 34" xlink:type="simple" xlink:show="embed" xlink:actuate="onLoad"/></draw:frame><text:span text:style-name="Internet_20_link"><text:span text:style-name="T28">,</text:span></text:span><draw:frame draw:style-name="fr1" draw:name="Объект35" text:anchor-type="as-char" svg:width="4.733cm" svg:height="2.42cm" draw:z-index="51"><draw:object xlink:href="./Object 35" xlink:type="simple" xlink:show="embed" xlink:actuate="onLoad"/><draw:image xlink:href="./ObjectReplacements/Object 35" xlink:type="simple" xlink:show="embed" xlink:actuate="onLoad"/></draw:frame></text:p>
      <text:p text:style-name="_30_3_5f_Текст_20_ИТММ">На каждом шаге алгоритма получается вектор Хаусхолдера <text:span text:style-name="T18">v</text:span> и матрица отражения H:</text:p>
      <text:p text:style-name="P27"><draw:frame draw:style-name="fr1" draw:name="Объект36" text:anchor-type="as-char" svg:width="2.447cm" svg:height="1.124cm" draw:z-index="52"><draw:object xlink:href="./Object 36" xlink:type="simple" xlink:show="embed" xlink:actuate="onLoad"/><draw:image xlink:href="./ObjectReplacements/Object 36" xlink:type="simple" xlink:show="embed" xlink:actuate="onLoad"/></draw:frame></text:p>
      <text:p text:style-name="_30_3_5f_Текст_20_ИТММ">Домножая матрицу A слева на матрицы отражения Hk, получим матрицу R:</text:p>
      <text:p text:style-name="P27"><draw:frame draw:style-name="fr1" draw:name="Объект37" text:anchor-type="as-char" svg:width="2.963cm" svg:height="0.534cm" draw:z-index="53"><draw:object xlink:href="./Object 37" xlink:type="simple" xlink:show="embed" xlink:actuate="onLoad"/><draw:image xlink:href="./ObjectReplacements/Object 37" xlink:type="simple" xlink:show="embed" xlink:actuate="onLoad"/></draw:frame>,</text:p>
      <text:p text:style-name="P27"><draw:frame draw:style-name="fr1" draw:name="Объект38" text:anchor-type="as-char" svg:width="2.794cm" svg:height="0.534cm" draw:z-index="54"><draw:object xlink:href="./Object 38" xlink:type="simple" xlink:show="embed" xlink:actuate="onLoad"/><draw:image xlink:href="./ObjectReplacements/Object 38" xlink:type="simple" xlink:show="embed" xlink:actuate="onLoad"/></draw:frame></text:p>
      <text:p text:style-name="_30_3_5f_Текст_20_ИТММ">Матрица Q при этом хранится и также вычисляется на каждом шаге с помощью последовательных домножений справа всех матриц отражения:</text:p>
      <text:p text:style-name="P27"><draw:frame draw:style-name="fr1" draw:name="Объект39" text:anchor-type="as-char" svg:width="2.443cm" svg:height="0.534cm" draw:z-index="55"><draw:object xlink:href="./Object 39" xlink:type="simple" xlink:show="embed" xlink:actuate="onLoad"/><draw:image xlink:href="./ObjectReplacements/Object 39" xlink:type="simple" xlink:show="embed" xlink:actuate="onLoad"/></draw:frame><text:span text:style-name="Internet_20_link"><text:span text:style-name="T28">.</text:span></text:span></text:p>
      <text:p text:style-name="_30_3_5f_Текст_20_ИТММ"><text:span text:style-name="Internet_20_link"><text:span text:style-name="T28">Выполнив N таких шагов, получим верхнюю треугольную матрицу </text:span></text:span><draw:frame draw:style-name="fr1" draw:name="Объект40" text:anchor-type="as-char" svg:width="3.415cm" svg:height="0.534cm" draw:z-index="56"><draw:object xlink:href="./Object 40" xlink:type="simple" xlink:show="embed" xlink:actuate="onLoad"/><draw:image xlink:href="./ObjectReplacements/Object 40" xlink:type="simple" xlink:show="embed" xlink:actuate="onLoad"/></draw:frame><text:span text:style-name="Internet_20_link"><text:span text:style-name="T28">. Откуда, так как матрицы </text:span></text:span><text:span text:style-name="Internet_20_link"><text:span text:style-name="T29">H</text:span></text:span><text:span text:style-name="Internet_20_link"><text:span text:style-name="T33">j </text:span></text:span><text:span text:style-name="Internet_20_link"><text:span text:style-name="T28">– ортогональные и симметричные, имеем </text:span></text:span><draw:frame draw:style-name="fr1" draw:name="Объект41" text:anchor-type="as-char" svg:width="1.268cm" svg:height="0.471cm" draw:z-index="57"><draw:object xlink:href="./Object 41" xlink:type="simple" xlink:show="embed" xlink:actuate="onLoad"/><draw:image xlink:href="./ObjectReplacements/Object 41" xlink:type="simple" xlink:show="embed" xlink:actuate="onLoad"/></draw:frame><text:span text:style-name="Internet_20_link"><text:span text:style-name="T28">, где </text:span></text:span><draw:frame draw:style-name="fr1" draw:name="Объект42" text:anchor-type="as-char" svg:width="2.711cm" svg:height="0.534cm" draw:z-index="58"><draw:object xlink:href="./Object 42" xlink:type="simple" xlink:show="embed" xlink:actuate="onLoad"/><draw:image xlink:href="./ObjectReplacements/Object 42" xlink:type="simple" xlink:show="embed" xlink:actuate="onLoad"/></draw:frame><text:span text:style-name="Internet_20_link"><text:span text:style-name="T28">.</text:span></text:span></text:p>
      <text:p text:style-name="_30_3_5f_Текст_20_ИТММ" loext:marker-style-name="T17"><text:span text:style-name="T17">Самая очевидная реализация метода Хаусхолдера будет содержать в себе следующие недостатки:</text:span><text:span text:style-name="T17"/></text:p>
      <text:list xml:id="list4156402201" text:style-name="WWNum12">
        <text:list-item>
          <text:p text:style-name="P28" loext:marker-style-name="T17"><text:span text:style-name="T17">использование операции матричного умножения матриц размером NxN; на каждую из (N-1) итераций цикла придётся два матричных произведения. </text:span><text:span text:style-name="T17"/></text:p>
        </text:list-item>
        <text:list-item>
          <text:p text:style-name="P28"><text:span text:style-name="T17">о</text:span>тдельное хранение матриц отражения H (<text:span text:style-name="T17">NxN</text:span> элементов, <text:span text:style-name="T18">(N-1) </text:span><text:span text:style-name="T19">штук</text:span>) для вычисления Q.</text:p>
        </text:list-item>
      </text:list>
      <text:p text:style-name="P29">В связи с выявленными недостатками возможны следующие оптимизации:</text:p>
      <text:list text:style-name="WWNum13">
        <text:list-item>
          <text:p text:style-name="P30">Избавление от матричных умножений</text:p>
        </text:list-item>
      </text:list>
      <text:p text:style-name="_30_3_5f_Текст_20_ИТММ"><text:span text:style-name="T19">Подсчитаем перемножение </text:span><draw:frame draw:style-name="fr1" draw:name="Объект43" text:anchor-type="as-char" svg:width="1.023cm" svg:height="0.534cm" draw:z-index="59"><draw:object xlink:href="./Object 43" xlink:type="simple" xlink:show="embed" xlink:actuate="onLoad"/><draw:image xlink:href="./ObjectReplacements/Object 43" xlink:type="simple" xlink:show="embed" xlink:actuate="onLoad"/></draw:frame><text:span text:style-name="T18"><text:s/></text:span><text:span text:style-name="T19">по-другому:</text:span></text:p>
      <text:p text:style-name="P27"><draw:frame draw:style-name="fr1" draw:name="Объект44" text:anchor-type="as-char" svg:width="7.154cm" svg:height="0.656cm" draw:z-index="60"><draw:object xlink:href="./Object 44" xlink:type="simple" xlink:show="embed" xlink:actuate="onLoad"/><draw:image xlink:href="./ObjectReplacements/Object 44" xlink:type="simple" xlink:show="embed" xlink:actuate="onLoad"/></draw:frame><text:span text:style-name="T18">,</text:span></text:p>
      <text:p text:style-name="_30_3_5f_Текст_20_ИТММ"><text:span text:style-name="T19">получим более дешёвые операции над векторами и матрицей </text:span><text:span text:style-name="T18">A, </text:span><text:span text:style-name="T19">уменьшим сложность в </text:span><text:span text:style-name="T18">N </text:span><text:span text:style-name="T19">раз</text:span><text:span text:style-name="T18">.</text:span></text:p>
      <text:list text:continue-numbering="true" text:style-name="WWNum13">
        <text:list-item>
          <text:p text:style-name="P30"><text:soft-page-break/>Также вычисление<text:span text:style-name="T18"> </text:span><text:span text:style-name="T19">матрицы </text:span><text:span text:style-name="T18">R</text:span><text:span text:style-name="T19"> этим </text:span>способом позволяет упростить вычисление матрицы <text:span text:style-name="T18">Q. </text:span><text:span text:style-name="T19">Для её восстановления понадобится только сохранить вектора Хаусхолдера </text:span><text:span text:style-name="T18">v</text:span><text:span text:style-name="T34">k</text:span><text:span text:style-name="T35">,</text:span><text:span text:style-name="T36"> полученные на каждом шаге алгоритма.</text:span><text:span text:style-name="T37"> </text:span><text:span text:style-name="T19">Вычислять </text:span><text:span text:style-name="T18">Q</text:span><text:span text:style-name="T19"> будем восстанавливая матрицы отражения из сохранённых векторов</text:span><text:span text:style-name="T18"> v, </text:span><text:span text:style-name="T19">в обратном порядке</text:span><text:span text:style-name="T35">:</text:span></text:p>
        </text:list-item>
      </text:list>
      <text:p text:style-name="P27"><draw:frame draw:style-name="fr1" draw:name="Объект45" text:anchor-type="as-char" svg:width="1.367cm" svg:height="0.534cm" draw:z-index="61"><draw:object xlink:href="./Object 45" xlink:type="simple" xlink:show="embed" xlink:actuate="onLoad"/><draw:image xlink:href="./ObjectReplacements/Object 45" xlink:type="simple" xlink:show="embed" xlink:actuate="onLoad"/></draw:frame><text:span text:style-name="T18">,</text:span></text:p>
      <text:p text:style-name="P27"><draw:frame draw:style-name="fr1" draw:name="Объект46" text:anchor-type="as-char" svg:width="8.394cm" svg:height="0.656cm" draw:z-index="62"><draw:object xlink:href="./Object 46" xlink:type="simple" xlink:show="embed" xlink:actuate="onLoad"/><draw:image xlink:href="./ObjectReplacements/Object 46" xlink:type="simple" xlink:show="embed" xlink:actuate="onLoad"/></draw:frame><text:span text:style-name="T18">,</text:span></text:p>
      <text:p text:style-name="P27"><draw:frame draw:style-name="fr1" draw:name="Объект47" text:anchor-type="as-char" svg:width="1.136cm" svg:height="0.534cm" draw:z-index="63"><draw:object xlink:href="./Object 47" xlink:type="simple" xlink:show="embed" xlink:actuate="onLoad"/><draw:image xlink:href="./ObjectReplacements/Object 47" xlink:type="simple" xlink:show="embed" xlink:actuate="onLoad"/></draw:frame></text:p>
      <text:p text:style-name="_30_3_5f_Текст_20_ИТММ"><text:span text:style-name="T36">Получим экономию памяти порядка </text:span><text:span text:style-name="T35">N </text:span><text:span text:style-name="T36">и ускорение времени больше, чем на порядок.</text:span></text:p>
      <text:list text:continue-numbering="true" text:style-name="WWNum13">
        <text:list-item>
          <text:p text:style-name="P30">Работа с нормированными векторами Хаусхолдера позволит формировать вектор <text:span text:style-name="T18">v</text:span><text:span text:style-name="T34">k</text:span><text:span text:style-name="T18">,</text:span><text:span text:style-name="T19"> с</text:span><text:span text:style-name="T18"> v</text:span><text:span text:style-name="T34">kk</text:span><text:span text:style-name="T18">=1:</text:span></text:p>
        </text:list-item>
      </text:list>
      <text:p text:style-name="P27"><draw:frame draw:style-name="fr1" draw:name="Объект48" text:anchor-type="as-char" svg:width="3.649cm" svg:height="0.617cm" draw:z-index="64"><draw:object xlink:href="./Object 48" xlink:type="simple" xlink:show="embed" xlink:actuate="onLoad"/><draw:image xlink:href="./ObjectReplacements/Object 48" xlink:type="simple" xlink:show="embed" xlink:actuate="onLoad"/></draw:frame><text:span text:style-name="T18">,</text:span></text:p>
      <text:p text:style-name="P27"><draw:frame draw:style-name="fr1" draw:name="Объект49" text:anchor-type="as-char" svg:width="7.939cm" svg:height="1.039cm" draw:z-index="65"><draw:object xlink:href="./Object 49" xlink:type="simple" xlink:show="embed" xlink:actuate="onLoad"/><draw:image xlink:href="./ObjectReplacements/Object 49" xlink:type="simple" xlink:show="embed" xlink:actuate="onLoad"/></draw:frame><text:span text:style-name="T35">,</text:span></text:p>
      <text:p text:style-name="P27"><draw:frame draw:style-name="fr1" draw:name="Объект50" text:anchor-type="as-char" svg:width="5.595cm" svg:height="1.064cm" draw:z-index="66"><draw:object xlink:href="./Object 50" xlink:type="simple" xlink:show="embed" xlink:actuate="onLoad"/><draw:image xlink:href="./ObjectReplacements/Object 50" xlink:type="simple" xlink:show="embed" xlink:actuate="onLoad"/></draw:frame><text:span text:style-name="T18">,</text:span></text:p>
      <text:p text:style-name="P27"><draw:frame draw:style-name="fr1" draw:name="Объект51" text:anchor-type="as-char" svg:width="6.839cm" svg:height="0.656cm" draw:z-index="67"><draw:object xlink:href="./Object 51" xlink:type="simple" xlink:show="embed" xlink:actuate="onLoad"/><draw:image xlink:href="./ObjectReplacements/Object 51" xlink:type="simple" xlink:show="embed" xlink:actuate="onLoad"/></draw:frame></text:p>
      <text:list text:continue-numbering="true" text:style-name="WWNum13">
        <text:list-item>
          <text:p text:style-name="P30"><text:span text:style-name="T38">Если изменить способ вычисления вектора Хаусхолдера </text:span><text:span text:style-name="T39">v</text:span><text:span text:style-name="T40">k</text:span><text:span text:style-name="T38">, на тот, что указан в п.3, вычисляя нормированный вектор с незначащими</text:span><text:span text:style-name="T39"> (k-1)</text:span><text:span text:style-name="T41"> первыми позициями и (</text:span><text:span text:style-name="T39">k+1</text:span><text:span text:style-name="T41">) элементом, равным единице, </text:span><text:span text:style-name="T38">то матрицы </text:span><text:span text:style-name="T39">H</text:span><text:span text:style-name="T42">k</text:span><text:span text:style-name="T38"> не потребуется формировать и сохранять в явном виде: достаточно хранить соответствующий вектор </text:span><text:span text:style-name="T39">v</text:span><text:span text:style-name="T42">k</text:span><text:span text:style-name="T38">, который можно записывать в </text:span><text:span text:style-name="T39">k</text:span><text:span text:style-name="T38">-й столбец матрицы </text:span><text:span text:style-name="T39">A</text:span><text:span text:style-name="T36"> под диагональю вместо незначащих нулей следующим образом:</text:span></text:p>
        </text:list-item>
      </text:list>
      <text:p text:style-name="P27"><draw:frame draw:style-name="fr1" draw:name="Объект52" text:anchor-type="as-char" svg:width="7.571cm" svg:height="4.427cm" draw:z-index="68"><draw:object xlink:href="./Object 52" xlink:type="simple" xlink:show="embed" xlink:actuate="onLoad"/><draw:image xlink:href="./ObjectReplacements/Object 52" xlink:type="simple" xlink:show="embed" xlink:actuate="onLoad"/></draw:frame><text:span text:style-name="T19">,</text:span></text:p>
      <text:p text:style-name="P27"><text:soft-page-break/><draw:frame draw:style-name="fr1" draw:name="Объект53" text:anchor-type="as-char" svg:width="8.331cm" svg:height="5.514cm" draw:z-index="69"><draw:object xlink:href="./Object 53" xlink:type="simple" xlink:show="embed" xlink:actuate="onLoad"/><draw:image xlink:href="./ObjectReplacements/Object 53" xlink:type="simple" xlink:show="embed" xlink:actuate="onLoad"/></draw:frame><text:span text:style-name="T19">,</text:span></text:p>
      <text:p text:style-name="P27"><draw:frame draw:style-name="fr1" draw:name="Объект54" text:anchor-type="as-char" svg:width="11.012cm" svg:height="4.427cm" draw:z-index="70"><draw:object xlink:href="./Object 54" xlink:type="simple" xlink:show="embed" xlink:actuate="onLoad"/><draw:image xlink:href="./ObjectReplacements/Object 54" xlink:type="simple" xlink:show="embed" xlink:actuate="onLoad"/></draw:frame></text:p>
      <text:p text:style-name="_30_3_5f_Текст_20_ИТММ"><text:span text:style-name="T19">При этом отражение заключается в применении к столбцам справа от обнуляемого, от (k+1) до (N-1), преобразования </text:span><draw:frame draw:style-name="fr1" draw:name="Объект55" text:anchor-type="as-char" svg:width="2.252cm" svg:height="0.591cm" draw:z-index="71"><draw:object xlink:href="./Object 55" xlink:type="simple" xlink:show="embed" xlink:actuate="onLoad"/><draw:image xlink:href="./ObjectReplacements/Object 55" xlink:type="simple" xlink:show="embed" xlink:actuate="onLoad"/></draw:frame><text:span text:style-name="T19"><text:s/>где </text:span><draw:frame draw:style-name="fr1" draw:name="Объект56" text:anchor-type="as-char" svg:width="1.018cm" svg:height="0.591cm" draw:z-index="72"><draw:object xlink:href="./Object 56" xlink:type="simple" xlink:show="embed" xlink:actuate="onLoad"/><draw:image xlink:href="./ObjectReplacements/Object 56" xlink:type="simple" xlink:show="embed" xlink:actuate="onLoad"/></draw:frame><text:span text:style-name="T19"><text:s/>— скалярное произведение вектора Хаусхолдера из</text:span><text:span text:style-name="T18"> </text:span><text:span text:style-name="T19">столбца </text:span><text:span text:style-name="T18">col</text:span><text:span text:style-name="T19">, вычитание из</text:span><text:span text:style-name="T18"> R </text:span><text:span text:style-name="T19">выполняется над тем же столбцом.</text:span></text:p>
      <text:p text:style-name="_30_3_5f_Текст_20_ИТММ"><text:span text:style-name="T19">Отдельно вычисляется матрица </text:span><text:span text:style-name="T18">Q </text:span><text:span text:style-name="T19">с помощью сохранённых под диагоналями нормированных векторов Хаусхолдера, как в предыдущей реализации, только вместо 2 используется </text:span><draw:frame draw:style-name="fr1" draw:name="Объект57" text:anchor-type="as-char" svg:width="1.312cm" svg:height="1.064cm" draw:z-index="73"><draw:object xlink:href="./Object 57" xlink:type="simple" xlink:show="embed" xlink:actuate="onLoad"/><draw:image xlink:href="./ObjectReplacements/Object 57" xlink:type="simple" xlink:show="embed" xlink:actuate="onLoad"/></draw:frame><text:span text:style-name="T19"><text:s/>в качестве коэффициента. Работа также идёт только над столбцами, от </text:span><text:span text:style-name="T18">k </text:span><text:span text:style-name="T19">до </text:span><text:span text:style-name="T18">N: </text:span><text:span text:style-name="T19">скалярное умножение с вектором и вычитание вектора из столбца.</text:span></text:p>
      <text:p text:style-name="P31"/>
      <text:p text:style-name="P32"><text:bookmark-start text:name="__RefHeading___Toc2693_713544485"/>1.2.4 Метод <text:span text:style-name="T18">QR-</text:span><text:span text:style-name="T19">разложения на основе вращений Гивенса</text:span><text:bookmark-end text:name="__RefHeading___Toc2693_713544485"/></text:p>
      <text:p text:style-name="_30_3_5f_Текст_20_ИТММ"><text:span text:style-name="T19">Метод Гивенса также выполняет разложение матрицы</text:span><text:span text:style-name="T18"> A</text:span><text:span text:style-name="T19"> на</text:span><text:span text:style-name="T18"> Q</text:span><text:span text:style-name="T19"> и</text:span><text:span text:style-name="T18"> R,</text:span><text:span text:style-name="T19"> но с помощью операции вращения. При этом матрица </text:span><text:span text:style-name="T18">Q</text:span><text:span text:style-name="T19"> хранится и используется не в явном виде, а в виде произведения матриц вращения. Каждая из матриц вращения (Гивенса) представлена позициями столбцов</text:span><text:span text:style-name="T18"> i </text:span><text:span text:style-name="T19">и </text:span><text:span text:style-name="T18">j </text:span><text:span text:style-name="T19">и параметрами </text:span><text:span text:style-name="T18">cos </text:span><text:span text:style-name="T19">и </text:span><text:span text:style-name="T18">sin </text:span><text:span text:style-name="T19">вращения:</text:span></text:p>
      <text:p text:style-name="P27"><text:span text:style-name="T19"><text:s/></text:span><draw:frame draw:style-name="fr1" draw:name="Объект58" text:anchor-type="as-char" svg:width="8.842cm" svg:height="6.082cm" draw:z-index="74"><draw:object xlink:href="./Object 58" xlink:type="simple" xlink:show="embed" xlink:actuate="onLoad"/><draw:image xlink:href="./ObjectReplacements/Object 58" xlink:type="simple" xlink:show="embed" xlink:actuate="onLoad"/></draw:frame></text:p>
      <text:p text:style-name="_30_3_5f_Текст_20_ИТММ"><text:span text:style-name="Internet_20_link"><text:span text:style-name="T30">Суть алгоритма QR-разложения, реализованного с помощью вращений Гивенса – в последовательном занулении всех поддиагональных элементов, с целью получения верхнетреугольной матрицы </text:span></text:span><text:span text:style-name="Internet_20_link"><text:span text:style-name="T29">R</text:span></text:span><text:span text:style-name="Internet_20_link"><text:span text:style-name="T30"> как побочного продукта и </text:span></text:span><text:span text:style-name="Internet_20_link"><text:span text:style-name="T29">Q</text:span></text:span><text:span text:style-name="Internet_20_link"><text:span text:style-name="T30"> с помощью явных перемножений в простейшем случае. </text:span></text:span><text:span text:style-name="T19">На каждом шаге алгоритма две строки</text:span><text:span text:style-name="T18"> i</text:span><text:span text:style-name="T19"> и </text:span><text:span text:style-name="T18">j </text:span><text:span text:style-name="T19">преобразуемой матрицы подвергаются преобразованию вращения. При этом параметр такого преобразования подбирается так, чтобы один из поддиагональных элементов преобразуемой матрицы стал нулевым.</text:span></text:p>
      <text:p text:style-name="_30_3_5f_Текст_20_ИТММ"><text:span text:style-name="Internet_20_link"><text:span text:style-name="T28">На каждом шаге алгоритма для зануления элемента с индексами </text:span></text:span><text:span text:style-name="Internet_20_link"><text:span text:style-name="T29">(i,j) </text:span></text:span><text:span text:style-name="Internet_20_link"><text:span text:style-name="T30">п</text:span></text:span><text:span text:style-name="Internet_20_link"><text:span text:style-name="T28">олучаем <text:s/>вращение </text:span></text:span><text:span text:style-name="Internet_20_link"><text:span text:style-name="T29">G</text:span></text:span><text:span text:style-name="Internet_20_link"><text:span text:style-name="T32">ji</text:span></text:span><text:span text:style-name="Internet_20_link"><text:span text:style-name="T28">, домножая на него матрицу </text:span></text:span><text:span text:style-name="Internet_20_link"><text:span text:style-name="T29">A</text:span></text:span><text:span text:style-name="Internet_20_link"><text:span text:style-name="T28"> слева получаем </text:span></text:span><draw:frame draw:style-name="fr1" draw:name="Объект59" text:anchor-type="as-char" svg:width="3.985cm" svg:height="0.609cm" draw:z-index="75"><draw:object xlink:href="./Object 59" xlink:type="simple" xlink:show="embed" xlink:actuate="onLoad"/><draw:image xlink:href="./ObjectReplacements/Object 59" xlink:type="simple" xlink:show="embed" xlink:actuate="onLoad"/></draw:frame><text:span text:style-name="Internet_20_link"><text:span text:style-name="T28">, в которой элементы под главной диагональю, левее (</text:span></text:span><text:span text:style-name="Internet_20_link"><text:span text:style-name="T29">i,j),</text:span></text:span><text:span text:style-name="Internet_20_link"><text:span text:style-name="T30"> занулены</text:span></text:span><text:span text:style-name="Internet_20_link"><text:span text:style-name="T28">:</text:span></text:span></text:p>
      <text:p text:style-name="P27"><draw:frame draw:style-name="fr1" draw:name="Объект60" text:anchor-type="as-char" svg:width="3.739cm" svg:height="2.42cm" draw:z-index="76"><draw:object xlink:href="./Object 60" xlink:type="simple" xlink:show="embed" xlink:actuate="onLoad"/><draw:image xlink:href="./ObjectReplacements/Object 60" xlink:type="simple" xlink:show="embed" xlink:actuate="onLoad"/></draw:frame><text:span text:style-name="Internet_20_link"><text:span text:style-name="T28">, </text:span></text:span><draw:frame draw:style-name="fr1" draw:name="Объект61" text:anchor-type="as-char" svg:width="4.362cm" svg:height="2.42cm" draw:z-index="77"><draw:object xlink:href="./Object 61" xlink:type="simple" xlink:show="embed" xlink:actuate="onLoad"/><draw:image xlink:href="./ObjectReplacements/Object 61" xlink:type="simple" xlink:show="embed" xlink:actuate="onLoad"/></draw:frame><text:span text:style-name="Internet_20_link"><text:span text:style-name="T28">,</text:span></text:span><draw:frame draw:style-name="fr1" draw:name="Объект62" text:anchor-type="as-char" svg:width="4.971cm" svg:height="2.42cm" draw:z-index="78"><draw:object xlink:href="./Object 62" xlink:type="simple" xlink:show="embed" xlink:actuate="onLoad"/><draw:image xlink:href="./ObjectReplacements/Object 62" xlink:type="simple" xlink:show="embed" xlink:actuate="onLoad"/></draw:frame></text:p>
      <text:p text:style-name="_30_3_5f_Текст_20_ИТММ"><text:span text:style-name="T19">Сначала в нуль последовательно обращаются элементы 1-го столбца, затем 2-го, и т.д. до N-1-го, после чего получившаяся матрица - это и есть матрица </text:span><text:span text:style-name="T18">R</text:span><text:span text:style-name="T19">. </text:span></text:p>
      <text:p text:style-name="_30_3_5f_Текст_20_ИТММ" loext:marker-style-name="T19"><text:span text:style-name="T19">Сам шаг алгоритма распадается на две части: подбор параметра вращения и выполнение вращения над двумя строками матрицы.</text:span><text:span text:style-name="T19"/></text:p>
      <text:p text:style-name="_30_3_5f_Текст_20_ИТММ" loext:marker-style-name="T19"><text:span text:style-name="T19">Вращение элементов строк в текущем столбце выполняется одновременно с подбором параметра вращения. Таким образом, вторая часть шага заключается в выполнении вращения </text:span><text:soft-page-break/><text:span text:style-name="T19">двумерных векторов, составленных из элементов вращаемых строк в столбцах справа от "рабочего".</text:span><text:span text:style-name="T19"/></text:p>
      <text:p text:style-name="P29" loext:marker-style-name="T19"><text:span text:style-name="T17">Для получения матрицы R матрицу A последовательно домножают слева на матрицы вращения </text:span><text:span text:style-name="T43">G</text:span><text:span text:style-name="T44">12</text:span><text:span text:style-name="T17">, </text:span><text:span text:style-name="T43">G</text:span><text:span text:style-name="T44">13</text:span><text:span text:style-name="T17">, …, </text:span><text:span text:style-name="T43">G</text:span><text:span text:style-name="T44">1n</text:span><text:span text:style-name="T17">, </text:span><text:span text:style-name="T43">G</text:span><text:span text:style-name="T44">23</text:span><text:span text:style-name="T17">, </text:span><text:span text:style-name="T43">G</text:span><text:span text:style-name="T44">24</text:span><text:span text:style-name="T17">, …, </text:span><text:span text:style-name="T43">G</text:span><text:span text:style-name="T44">2n</text:span><text:span text:style-name="T17">, …, </text:span><text:span text:style-name="T43">G</text:span><text:span text:style-name="T44">N-2,N</text:span><text:span text:style-name="T17">, </text:span><text:span text:style-name="T43">G</text:span><text:span text:style-name="T44">N-1,N</text:span><text:span text:style-name="T45">. Каждая из матриц </text:span><text:span text:style-name="T46">G</text:span><text:span text:style-name="T45"> задаёт вращение в двухмерном подпространстве, связанном с i-й и j-й компонентами столбцов, остальные компоненты не меняются. При этом вращение подбирается так, чтобы элемент новой матрицы в j-й строке и i-м столбце стал нулевым. Поскольку вращения и тождественные преобразования нулевых векторов оставляют их нулевыми, то последующие вращения сохраняют полученные ранее нули слева и сверху от текущего обнуляемого элемента.</text:span></text:p>
      <text:p text:style-name="P27"><draw:frame draw:style-name="fr1" draw:name="Объект63" text:anchor-type="as-char" svg:width="8.073cm" svg:height="0.534cm" draw:z-index="79"><draw:object xlink:href="./Object 63" xlink:type="simple" xlink:show="embed" xlink:actuate="onLoad"/><draw:image xlink:href="./ObjectReplacements/Object 63" xlink:type="simple" xlink:show="embed" xlink:actuate="onLoad"/></draw:frame><text:span text:style-name="T18">.</text:span></text:p>
      <text:p text:style-name="P22" loext:marker-style-name="T19"><text:span text:style-name="T19">Отсюда для получения матрицы </text:span><text:span text:style-name="T18">Q </text:span><text:span text:style-name="T19">необходимо последовательно перемножить все транспонированные матрицы вращения друг на друга справа.</text:span></text:p>
      <text:p text:style-name="P33" loext:marker-style-name="T19"><draw:frame draw:style-name="fr1" draw:name="Объект64" text:anchor-type="as-char" svg:width="15.85cm" svg:height="0.633cm" draw:z-index="80"><draw:object xlink:href="./Object 64" xlink:type="simple" xlink:show="embed" xlink:actuate="onLoad"/><draw:image xlink:href="./ObjectReplacements/Object 64" xlink:type="simple" xlink:show="embed" xlink:actuate="onLoad"/></draw:frame></text:p>
      <text:p text:style-name="_30_3_5f_Текст_20_ИТММ" loext:marker-style-name="T19"><text:span text:style-name="Internet_20_link"><text:span text:style-name="T30">Выполнив </text:span></text:span><draw:frame draw:style-name="fr1" draw:name="Объект65" text:anchor-type="as-char" svg:width="1.72cm" svg:height="1.173cm" draw:z-index="81"><draw:object xlink:href="./Object 65" xlink:type="simple" xlink:show="embed" xlink:actuate="onLoad"/><draw:image xlink:href="./ObjectReplacements/Object 65" xlink:type="simple" xlink:show="embed" xlink:actuate="onLoad"/></draw:frame><text:span text:style-name="Internet_20_link"><text:span text:style-name="T30"><text:s/>таких шагов, получим верхнюю треугольную матрицу</text:span></text:span><text:span text:style-name="Internet_20_link"><text:span text:style-name="T29"> R</text:span></text:span><text:span text:style-name="Internet_20_link"><text:span text:style-name="T30"> и унитарную матрицу</text:span></text:span><text:span text:style-name="Internet_20_link"><text:span text:style-name="T29"> Q.</text:span></text:span></text:p>
      <text:p text:style-name="_30_3_5f_Текст_20_ИТММ" loext:marker-style-name="T17"><text:span text:style-name="T17">Самая очевидная реализация метода Гивенса будет содержать в себе следующие недостатки:</text:span><text:span text:style-name="T17"/></text:p>
      <text:list text:continue-list="list4156402201" text:style-name="WWNum12">
        <text:list-item>
          <text:p text:style-name="P28"><text:span text:style-name="T17">неэффективное, «прямое» хранение матрицы </text:span><text:span text:style-name="T43">Q: о</text:span><text:span text:style-name="T17">бращение к элементам матрицы</text:span><text:span text:style-name="T43"> Q</text:span><text:span text:style-name="T17"> происходит по столбцам, в виду чего выгоднее хранить её транспонированной.</text:span></text:p>
        </text:list-item>
        <text:list-item>
          <text:p text:style-name="P28"><text:span text:style-name="T17">вычислять </text:span><text:span text:style-name="T43">R </text:span><text:span text:style-name="T17">и </text:span><text:span text:style-name="T43">Q </text:span><text:span text:style-name="T17">можно в рамках одной итерации цикла, после вычисления параметров вращения, а можно в разных циклах, сохраняя параметры вращения в отдельной структуре либо в матрице</text:span><text:span text:style-name="T43"> R. </text:span><text:span text:style-name="T17">Необходимо сравнение двух подходов. </text:span></text:p>
        </text:list-item>
        <text:list-item>
          <text:p text:style-name="P28" loext:marker-style-name="T17"><text:span text:style-name="T17">можно не выполнять вращение строки при вычислении матрицы </text:span><text:span text:style-name="T43">R </text:span><text:span text:style-name="T17">целиком, поскольку слева от текущего столбца элементы вращаемых строк равны 0.</text:span></text:p>
        </text:list-item>
        <text:list-item>
          <text:p text:style-name="P28" loext:marker-style-name="T17"><text:span text:style-name="T17">выигрыш по ускорению может дать совместное попарное хранение элементов Q и R благодаря оптимизации доступа к памяти. 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 Это и совместное обновление матриц в одном цикле может дать хорошее ускорение для этой реализации.</text:span><text:span text:style-name="T17"/></text:p>
        </text:list-item>
        <text:list-item>
          <text:p text:style-name="P28" loext:marker-style-name="T17"><text:soft-page-break/><text:span text:style-name="T17">можно ещё эффективнее обращаться к памяти, выполняя вычисления сразу над несколькими последовательно лежащими элементами, применив так называемую векторизацию.</text:span><text:span text:style-name="T17"/></text:p>
        </text:list-item>
      </text:list>
      <text:p text:style-name="P34" loext:marker-style-name="T30"/>
      <text:p text:style-name="P35" loext:marker-style-name="T47"><text:bookmark-start text:name="__RefHeading___Toc2675_713544485_Копия_1"/><text:bookmark-start text:name="_Toc194842668_Копия_3"/><text:span text:style-name="T48">1.</text:span><text:bookmark-end text:name="_Toc194842668_Копия_3"/><text:span text:style-name="T48">3</text:span><text:span text:style-name="T49"> QR </text:span><text:span text:style-name="T48">разложение матрицы Хессенберга</text:span><text:bookmark-end text:name="__RefHeading___Toc2675_713544485_Копия_1"/></text:p>
      <text:p text:style-name="_30_3_5f_Текст_20_ИТММ">Матрица Хессенберга — вид квадратной матрицы, обобщающий треугольные матрицы. Названа так в честь немецкого математика, Карла Хессенберга.</text:p>
      <text:p text:style-name="_30_3_5f_Текст_20_ИТММ">Верхняя матрица Хессенберга — это квадратная матрица, все элементы ниже побочной диагонали которой равны нулю:</text:p>
      <text:p text:style-name="P36" loext:marker-style-name="T19"><text:s/><draw:frame draw:style-name="fr1" draw:name="Объект66" text:anchor-type="as-char" svg:width="6.077cm" svg:height="3.025cm" draw:z-index="82"><draw:object xlink:href="./Object 66" xlink:type="simple" xlink:show="embed" xlink:actuate="onLoad"/><draw:image xlink:href="./ObjectReplacements/Object 66" xlink:type="simple" xlink:show="embed" xlink:actuate="onLoad"/></draw:frame></text:p>
      <text:p text:style-name="_30_3_5f_Текст_20_ИТММ" loext:marker-style-name="T50"><text:span text:style-name="T50">Аналогично определяется нижняя матрица Хессенберга, как квадратная матрица, при транспонировании которой получается верхняя матрица Хессенберга:</text:span><text:span text:style-name="T50"/></text:p>
      <text:p text:style-name="P37" loext:marker-style-name="T19"><draw:frame draw:style-name="fr1" draw:name="Объект67" text:anchor-type="as-char" svg:width="5.898cm" svg:height="3.096cm" draw:z-index="83"><draw:object xlink:href="./Object 67" xlink:type="simple" xlink:show="embed" xlink:actuate="onLoad"/><draw:image xlink:href="./ObjectReplacements/Object 67" xlink:type="simple" xlink:show="embed" xlink:actuate="onLoad"/></draw:frame></text:p>
      <text:p text:style-name="_30_3_5f_Текст_20_ИТММ" loext:marker-style-name="T50"><text:span text:style-name="T50">Таким образом, матрица, являющаяся одновременно и верхней, и нижней матрицами Хессенберга, как раз и будет трёхдиагональна.</text:span><text:span text:style-name="T50"/></text:p>
      <text:p text:style-name="P37" loext:marker-style-name="T19"><draw:frame draw:style-name="fr1" draw:name="Объект68" text:anchor-type="as-char" svg:width="7.742cm" svg:height="3.025cm" draw:z-index="84"><draw:object xlink:href="./Object 68" xlink:type="simple" xlink:show="embed" xlink:actuate="onLoad"/><draw:image xlink:href="./ObjectReplacements/Object 68" xlink:type="simple" xlink:show="embed" xlink:actuate="onLoad"/></draw:frame></text:p>
      <text:p text:style-name="_30_3_5f_Текст_20_ИТММ" loext:marker-style-name="T50"><text:span text:style-name="T50">Пусть верхняя хессенбергова матрица A имет размер 6x6:</text:span><text:span text:style-name="T50"/></text:p>
      <text:p text:style-name="P27" loext:marker-style-name="T51"><draw:frame draw:style-name="fr1" draw:name="Объект69" text:anchor-type="as-char" svg:width="5.057cm" svg:height="3.307cm" draw:z-index="85"><draw:object xlink:href="./Object 69" xlink:type="simple" xlink:show="embed" xlink:actuate="onLoad"/><draw:image xlink:href="./ObjectReplacements/Object 69" xlink:type="simple" xlink:show="embed" xlink:actuate="onLoad"/></draw:frame></text:p>
      <text:p text:style-name="_30_3_5f_Текст_20_ИТММ" loext:marker-style-name="T50"><text:span text:style-name="T50">С помощью алгоритма QR-разложения на основе вращений Гивенса решение задачи разложения верхней Хессенберговой матрицы выглядит следующим образом. Необходимо с </text:span><text:soft-page-break/><text:span text:style-name="T50">помощью вращений Гивенса последовательно занулить</text:span><text:span text:style-name="T52"> (N-1) </text:span><text:span text:style-name="T50">элементов, лежащих на побочной диагонали под главной (выделены красным):</text:span></text:p>
      <text:p text:style-name="P27" loext:marker-style-name="T51"><draw:frame draw:style-name="fr2" draw:name="Изображение3" text:anchor-type="as-char" svg:width="5.921cm" svg:height="3.53cm" draw:z-index="0"><draw:image xlink:href="Pictures/10000001000002050000013480FC8B93.png" xlink:type="simple" xlink:show="embed" xlink:actuate="onLoad" draw:mime-type="image/png"/></draw:frame></text:p>
      <text:p text:style-name="P33" loext:marker-style-name="T50"><text:span text:style-name="T50">После первых двух шагов алгоритма </text:span><text:span text:style-name="T52">QR-</text:span><text:span text:style-name="T53">разложения с использованием вращений Гивенса обнулены элементы с индексами 1 и 2, а также 2 и 3 (выделены красным цветом), следующий шаг должен обнулить элемент с индексами 4 и 3 (выделен синим цветом) с помощью вращения G</text:span><text:span text:style-name="T54">34</text:span><text:span text:style-name="T55">:</text:span></text:p>
      <text:p text:style-name="P37" loext:marker-style-name="T19"><draw:frame draw:style-name="fr2" draw:name="Изображение4" text:anchor-type="as-char" svg:width="6.387cm" svg:height="3.357cm" draw:z-index="1"><draw:image xlink:href="Pictures/10000001000001FE0000010C07221E24.png" xlink:type="simple" xlink:show="embed" xlink:actuate="onLoad" draw:mime-type="image/png"/></draw:frame></text:p>
      <text:p text:style-name="_30_3_5f_Текст_20_ИТММ" loext:marker-style-name="T50"><text:span text:style-name="T50">Применим вращение </text:span><text:span text:style-name="T53">G</text:span><text:span text:style-name="T54">34</text:span><text:span text:style-name="T55"> </text:span><text:span text:style-name="T50">и получим:</text:span></text:p>
      <text:p text:style-name="P37" loext:marker-style-name="T56"><draw:frame draw:style-name="fr2" draw:name="Изображение5" text:anchor-type="as-char" svg:width="6.959cm" svg:height="3.154cm" draw:z-index="2"><draw:image xlink:href="Pictures/1000000100000218000000F300C9021D.png" xlink:type="simple" xlink:show="embed" xlink:actuate="onLoad" draw:mime-type="image/png"/></draw:frame></text:p>
      <text:p text:style-name="_30_3_5f_Текст_20_ИТММ">Таким образом, обобщая, для верхней хессенберговой матрицы алгоритм QR-разложения будет следующим:</text:p>
      <text:p text:style-name="P27"><draw:frame draw:style-name="fr1" draw:name="Объект70" text:anchor-type="as-char" svg:width="8.624cm" svg:height="0.559cm" draw:z-index="86"><draw:object xlink:href="./Object 70" xlink:type="simple" xlink:show="embed" xlink:actuate="onLoad"/><draw:image xlink:href="./ObjectReplacements/Object 70" xlink:type="simple" xlink:show="embed" xlink:actuate="onLoad"/></draw:frame></text:p>
      <text:p text:style-name="P27"><draw:frame draw:style-name="fr1" draw:name="Объект71" text:anchor-type="as-char" svg:width="1.967cm" svg:height="0.531cm" draw:z-index="87"><draw:object xlink:href="./Object 71" xlink:type="simple" xlink:show="embed" xlink:actuate="onLoad"/><draw:image xlink:href="./ObjectReplacements/Object 71" xlink:type="simple" xlink:show="embed" xlink:actuate="onLoad"/></draw:frame></text:p>
      <text:p text:style-name="P27"><draw:frame draw:style-name="fr1" draw:name="Объект72" text:anchor-type="as-char" svg:width="3.106cm" svg:height="0.594cm" draw:z-index="88"><draw:object xlink:href="./Object 72" xlink:type="simple" xlink:show="embed" xlink:actuate="onLoad"/><draw:image xlink:href="./ObjectReplacements/Object 72" xlink:type="simple" xlink:show="embed" xlink:actuate="onLoad"/></draw:frame></text:p>
      <text:p text:style-name="_30_3_5f_Текст_20_ИТММ" loext:marker-style-name="T50"><text:span text:style-name="T50">Пусть нижняя хессенбергова матрица A имет размер 6x6</text:span><text:span text:style-name="T52">:</text:span></text:p>
      <text:p text:style-name="P27" loext:marker-style-name="T51"><draw:frame draw:style-name="fr1" draw:name="Объект73" text:anchor-type="as-char" svg:width="5.043cm" svg:height="3.307cm" draw:z-index="89"><draw:object xlink:href="./Object 73" xlink:type="simple" xlink:show="embed" xlink:actuate="onLoad"/><draw:image xlink:href="./ObjectReplacements/Object 73" xlink:type="simple" xlink:show="embed" xlink:actuate="onLoad"/></draw:frame></text:p>
      <text:p text:style-name="_30_3_5f_Текст_20_ИТММ" loext:marker-style-name="T51"><text:soft-page-break/>С помощью алгоритма QR-разложения на основе <text:span text:style-name="T50">отражений Хаусхолдера </text:span>решение задачи разложения <text:span text:style-name="T50">нижней</text:span> Хессенберговой матрицы выглядит следующим образом. Необходимо с помощью отражений Хаусхолдера последовательно занулить<text:span text:style-name="T18"> </text:span><draw:frame draw:style-name="fr1" draw:name="Объект74" text:anchor-type="as-char" svg:width="1.72cm" svg:height="1.173cm" draw:z-index="90"><draw:object xlink:href="./Object 74" xlink:type="simple" xlink:show="embed" xlink:actuate="onLoad"/><draw:image xlink:href="./ObjectReplacements/Object 74" xlink:type="simple" xlink:show="embed" xlink:actuate="onLoad"/></draw:frame><text:span text:style-name="T18"><text:s/></text:span>элементов, лежащих ниже главной диагонали (выделены красным):</text:p>
      <text:p text:style-name="P38" loext:marker-style-name="T51"/>
      <text:p text:style-name="P38" loext:marker-style-name="T51"/>
      <text:p text:style-name="P39" loext:marker-style-name="T51"><draw:frame draw:style-name="fr2" draw:name="Изображение7" text:anchor-type="as-char" svg:width="5.703cm" svg:height="3.267cm" draw:z-index="3"><draw:image xlink:href="Pictures/10000001000001B1000000F8592D5D6C.png" xlink:type="simple" xlink:show="embed" xlink:actuate="onLoad" draw:mime-type="image/png"/></draw:frame></text:p>
      <text:p text:style-name="_30_3_5f_Текст_20_ИТММ" loext:marker-style-name="T50"><text:span text:style-name="T50">После первых двух отражений </text:span><text:span text:style-name="T52">H</text:span><text:span text:style-name="T57">2</text:span><text:span text:style-name="T52"> </text:span><text:span text:style-name="T53">и </text:span><text:span text:style-name="T52">H1 </text:span><text:span text:style-name="T53">получим нули под главной диагональю в первых двух столбцах (выделены красным), Следующий шаг должен обнулить элементы столбца 3 с помощью отражения </text:span><text:span text:style-name="T52">H</text:span><text:span text:style-name="T57">3</text:span><text:span text:style-name="T53"> (выделен синим)</text:span><text:span text:style-name="T50">:</text:span></text:p>
      <text:p text:style-name="P37" loext:marker-style-name="T19"><draw:frame draw:style-name="fr2" draw:name="Изображение6" text:anchor-type="as-char" svg:width="6.004cm" svg:height="3.253cm" draw:z-index="4"><draw:image xlink:href="Pictures/10000001000001C8000000F7EEF8A8B7.png" xlink:type="simple" xlink:show="embed" xlink:actuate="onLoad" draw:mime-type="image/png"/></draw:frame></text:p>
      <text:p text:style-name="_30_3_5f_Текст_20_ИТММ" loext:marker-style-name="T50"><text:span text:style-name="T53">Применим отражение </text:span><text:span text:style-name="T52">H</text:span><text:span text:style-name="T57">3</text:span><text:span text:style-name="T52"> </text:span><text:span text:style-name="T53">для обнуления следующего столбца и получим</text:span><text:span text:style-name="T50">:</text:span></text:p>
      <text:p text:style-name="P37" loext:marker-style-name="T56"><draw:frame draw:style-name="fr2" draw:name="Изображение8" text:anchor-type="as-char" svg:width="7.034cm" svg:height="3.321cm" draw:z-index="5"><draw:image xlink:href="Pictures/1000000100000207000000F57036D5F2.png" xlink:type="simple" xlink:show="embed" xlink:actuate="onLoad" draw:mime-type="image/png"/></draw:frame></text:p>
      <text:p text:style-name="_30_3_5f_Текст_20_ИТММ" loext:marker-style-name="T50"><text:span text:style-name="T50">Таким образом, обобщая, для нижней хессенберговой матрицы алгоритм QR-разложения не будет отличаться от разложения произвольной плотной квадратной матрицы и будет следующим:</text:span><text:span text:style-name="T50"/></text:p>
      <text:p text:style-name="P27"><draw:frame draw:style-name="fr1" draw:name="Объект75" text:anchor-type="as-char" svg:width="3.657cm" svg:height="0.534cm" draw:z-index="91"><draw:object xlink:href="./Object 75" xlink:type="simple" xlink:show="embed" xlink:actuate="onLoad"/><draw:image xlink:href="./ObjectReplacements/Object 75" xlink:type="simple" xlink:show="embed" xlink:actuate="onLoad"/></draw:frame></text:p>
      <text:p text:style-name="P27"><draw:frame draw:style-name="fr1" draw:name="Объект76" text:anchor-type="as-char" svg:width="1.967cm" svg:height="0.531cm" draw:z-index="92"><draw:object xlink:href="./Object 76" xlink:type="simple" xlink:show="embed" xlink:actuate="onLoad"/><draw:image xlink:href="./ObjectReplacements/Object 76" xlink:type="simple" xlink:show="embed" xlink:actuate="onLoad"/></draw:frame></text:p>
      <text:p text:style-name="P27"><draw:frame draw:style-name="fr1" draw:name="Объект77" text:anchor-type="as-char" svg:width="3.216cm" svg:height="0.594cm" draw:z-index="93"><draw:object xlink:href="./Object 77" xlink:type="simple" xlink:show="embed" xlink:actuate="onLoad"/><draw:image xlink:href="./ObjectReplacements/Object 77" xlink:type="simple" xlink:show="embed" xlink:actuate="onLoad"/></draw:frame></text:p>
      <text:p text:style-name="_30_1_5f_Заголовок_20_1_20_ИТММ"><text:bookmark-start text:name="__RefHeading___Toc2663_713544485"/><text:bookmark-start text:name="_Toc194842670"/>2 Практическая часть<text:bookmark-end text:name="__RefHeading___Toc2663_713544485"/><text:bookmark-end text:name="_Toc194842670"/></text:p>
      <text:p text:style-name="_30_2_5f_Заголовок_20_2_20_ИТММ"><text:bookmark-start text:name="__RefHeading___Toc2671_713544485_Копия_1"/><text:bookmark-start text:name="_Toc194842671_Копия_1"/>2.1 <text:bookmark-end text:name="_Toc194842671_Копия_1"/>Описание разработанной библиотеки <text:span text:style-name="T18">QR-decomposition</text:span><text:bookmark-end text:name="__RefHeading___Toc2671_713544485_Копия_1"/></text:p>
      <text:p text:style-name="P22"><text:span text:style-name="Internet_20_link"><text:span text:style-name="T30">Класс для вызова </text:span></text:span><text:span text:style-name="Internet_20_link"><text:span text:style-name="T29">QR-</text:span></text:span><text:span text:style-name="Internet_20_link"><text:span text:style-name="T30">разложения для матрицы описан в интерфейсе </text:span></text:span><text:span text:style-name="Internet_20_link"><text:span text:style-name="T29">IQRSolver. </text:span></text:span><text:span text:style-name="Internet_20_link"><text:span text:style-name="T30">Он содержит единственный абстрактный метод </text:span></text:span><text:span text:style-name="Internet_20_link"><text:span text:style-name="T58">QR_decomposition </text:span></text:span><text:span text:style-name="Internet_20_link"><text:span text:style-name="T30">для выполнения разложения, который будет определён в классе с конкретным методом. Сигнатура функции </text:span></text:span><text:span text:style-name="Internet_20_link"><text:span text:style-name="T29">QR-</text:span></text:span><text:span text:style-name="Internet_20_link"><text:span text:style-name="T30">разложения внутри этого интерфейса:</text:span></text:span></text:p>
      <text:p text:style-name="P40"><text:span text:style-name="Internet_20_link"><text:span text:style-name="T59">void</text:span></text:span><text:span text:style-name="T60"> QR_decomposition(</text:span><text:span text:style-name="T61">const</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A</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Q</text:span><text:span text:style-name="T60">, std::</text:span><text:span text:style-name="T62">vector</text:span><text:span text:style-name="T60">&lt;std::</text:span><text:span text:style-name="T62">vector</text:span><text:span text:style-name="T60">&lt;</text:span><text:span text:style-name="T62">T</text:span><text:span text:style-name="T60">&gt;&gt;&amp; </text:span><text:span text:style-name="T63">R</text:span><text:span text:style-name="T60">)</text:span></text:p>
      <text:p text:style-name="P22"><text:span text:style-name="Internet_20_link"><text:span text:style-name="T30">Функция принимает ссылку на неизменяемый входной двумерный массив </text:span></text:span><text:span text:style-name="Internet_20_link"><text:span text:style-name="T29">A – </text:span></text:span><text:span text:style-name="Internet_20_link"><text:span text:style-name="T30">исходная квадратная матрица </text:span></text:span><text:span text:style-name="Internet_20_link"><text:span text:style-name="T29">A</text:span></text:span><text:span text:style-name="Internet_20_link"><text:span text:style-name="T30">, а также ссылки на выходные двумерные массивы </text:span></text:span><text:span text:style-name="Internet_20_link"><text:span text:style-name="T29">Q </text:span></text:span><text:span text:style-name="Internet_20_link"><text:span text:style-name="T30">и </text:span></text:span><text:span text:style-name="Internet_20_link"><text:span text:style-name="T29">R.</text:span></text:span></text:p>
      <text:p text:style-name="P22"><text:span text:style-name="Internet_20_link"><text:span text:style-name="T30">Имплементации этого интерфейса используют для разложения либо отражения Хаусхолдера (лежат в директории </text:span></text:span><text:span text:style-name="Internet_20_link"><text:span text:style-name="T29">HouseholderMethod</text:span></text:span><text:span text:style-name="Internet_20_link"><text:span text:style-name="T30">), либо вращения Гивенса (соответственно, в </text:span></text:span><text:span text:style-name="Internet_20_link"><text:span text:style-name="T29">GivensMethod </text:span></text:span><text:span text:style-name="Internet_20_link"><text:span text:style-name="T30">директории)</text:span></text:span><text:span text:style-name="Internet_20_link"><text:span text:style-name="T29">. </text:span></text:span><text:span text:style-name="Internet_20_link"><text:span text:style-name="T30">Классы (например, HouseholderBasic.</text:span></text:span><text:span text:style-name="Internet_20_link"><text:span text:style-name="T29">h, </text:span></text:span><text:span text:style-name="Internet_20_link"><text:span text:style-name="T30">и др.) разработаны в процессе итеративной оптимизации базовой реализации </text:span></text:span><text:span text:style-name="Internet_20_link"><text:span text:style-name="T29">QR-</text:span></text:span><text:span text:style-name="Internet_20_link"><text:span text:style-name="T30">разложения с использованием одного из двух этих методов. Порядок оптимизации следующий:</text:span></text:span></text:p>
      <text:list text:style-name="WWNum16">
        <text:list-item>
          <text:p text:style-name="P41"><text:span text:style-name="Internet_20_link"><text:span text:style-name="T30">«Семейство» классов на основе метода Хаусхолдера:</text:span></text:span></text:p>
          <text:list>
            <text:list-item>
              <text:p text:style-name="P41"><text:span text:style-name="Internet_20_link"><text:span text:style-name="T30">HouseholderBasic.</text:span></text:span><text:span text:style-name="Internet_20_link"><text:span text:style-name="T29">h </text:span></text:span><text:span text:style-name="Internet_20_link"><text:span text:style-name="T30">содержит базовую версию разложения с использованием отражений Хаусхолдера.</text:span></text:span></text:p>
            </text:list-item>
            <text:list-item>
              <text:p text:style-name="P41"><text:span text:style-name="Internet_20_link"><text:span text:style-name="T30">HouseholderWithoutMatrixMultiplication.h — вторая реализация, избавленная от использования матричных умножений. </text:span></text:span></text:p>
            </text:list-item>
            <text:list-item>
              <text:p text:style-name="P41"><text:span text:style-name="Internet_20_link"><text:span text:style-name="T30">HouseholderWithNormWInplace.h — третья реализация, использующая </text:span></text:span><text:span text:style-name="Internet_20_link"><text:span text:style-name="T29">in-place </text:span></text:span><text:span text:style-name="Internet_20_link"><text:span text:style-name="T30">хранение векторов вращения.</text:span></text:span></text:p>
            </text:list-item>
          </text:list>
        </text:list-item>
        <text:list-item>
          <text:p text:style-name="P41"><text:span text:style-name="Internet_20_link"><text:span text:style-name="T30">«Семейство» классов на основе метода Гивенса:</text:span></text:span></text:p>
          <text:list>
            <text:list-item>
              <text:p text:style-name="P41"><text:span text:style-name="Internet_20_link"><text:span text:style-name="T29">GivensBasic.h </text:span></text:span><text:span text:style-name="Internet_20_link"><text:span text:style-name="T30">содержит базовую версию разложения с использованием вращений Гивенса.</text:span></text:span></text:p>
            </text:list-item>
            <text:list-item>
              <text:p text:style-name="P41"><text:span text:style-name="Internet_20_link"><text:span text:style-name="T30">GivensQRInOneStruct.h — вторая реализация, в которой произведено улучшение кэш-локальности матриц </text:span></text:span><text:span text:style-name="Internet_20_link"><text:span text:style-name="T29">Q </text:span></text:span><text:span text:style-name="Internet_20_link"><text:span text:style-name="T30">и </text:span></text:span><text:span text:style-name="Internet_20_link"><text:span text:style-name="T29">R</text:span></text:span><text:span text:style-name="Internet_20_link"><text:span text:style-name="T30">. </text:span></text:span></text:p>
            </text:list-item>
            <text:list-item>
              <text:p text:style-name="P41"><text:span text:style-name="Internet_20_link"><text:span text:style-name="T30">GivensVectorized.h — третья реализация, использующая векторизацию.</text:span></text:span></text:p>
            </text:list-item>
          </text:list>
        </text:list-item>
      </text:list>
      <text:p text:style-name="P22"><text:span text:style-name="Internet_20_link"><text:span text:style-name="T30">Конечный пользователь может единообразно использовать их, согласно принципу полиморфизма –</text:span></text:span><text:span text:style-name="Internet_20_link"><text:span text:style-name="T29"> </text:span></text:span><text:span text:style-name="Internet_20_link"><text:span text:style-name="T30">одной из парадигм Объектно-Ориентированного языка, коим является </text:span></text:span><text:span text:style-name="Internet_20_link"><text:span text:style-name="T29">C++, </text:span></text:span><text:span text:style-name="Internet_20_link"><text:span text:style-name="T30">т.е. создав экземпляр очередного класса оптимизации как указатель на базовый класс </text:span></text:span><text:span text:style-name="Internet_20_link"><text:span text:style-name="T29">IQRSolver.</text:span></text:span></text:p>
      <text:p text:style-name="P22"><text:soft-page-break/><text:span text:style-name="Internet_20_link"><text:span text:style-name="T30">Структура данных для матрицы</text:span></text:span><text:span text:style-name="Internet_20_link"><text:span text:style-name="T28"> — это шаблонный вектор векторов из стандартной библиотеки: </text:span></text:span><text:span text:style-name="Internet_20_link"><text:span text:style-name="T29">std::vector</text:span></text:span><text:span text:style-name="Internet_20_link"><text:span text:style-name="T28">&lt;</text:span></text:span><text:span text:style-name="Internet_20_link"><text:span text:style-name="T29">std::vector</text:span></text:span><text:span text:style-name="Internet_20_link"><text:span text:style-name="T28">&lt;T&gt;&gt;. Это позволяет удобно работать с изменяемым параметром алгоритма «тип данных» и передать управление программной памятью методам класса, так как:</text:span></text:span></text:p>
      <text:list text:style-name="WWNum15">
        <text:list-item>
          <text:p text:style-name="P42"><text:span text:style-name="Internet_20_link"><text:span text:style-name="T29">std::vector </text:span></text:span><text:span text:style-name="Internet_20_link"><text:span text:style-name="T30">может быть инициализирован с использованием шаблонного параметра </text:span></text:span><text:span text:style-name="Internet_20_link"><text:span text:style-name="T29">float </text:span></text:span><text:span text:style-name="Internet_20_link"><text:span text:style-name="T30">или </text:span></text:span><text:span text:style-name="Internet_20_link"><text:span text:style-name="T29">double,</text:span></text:span></text:p>
        </text:list-item>
        <text:list-item>
          <text:p text:style-name="P42"><text:span text:style-name="Internet_20_link"><text:span text:style-name="T29">std::vector </text:span></text:span><text:span text:style-name="Internet_20_link"><text:span text:style-name="T30">самостоятельно контролирует аллокацию и освобождение памяти.</text:span></text:span></text:p>
        </text:list-item>
      </text:list>
      <text:p text:style-name="P22"><text:span text:style-name="Internet_20_link"><text:span text:style-name="T30">Разработана также небольшая шаблонная статическая библиотека</text:span></text:span><text:span text:style-name="Internet_20_link"><text:span text:style-name="T29"> Matrix/MatrixOperations.h,</text:span></text:span><text:span text:style-name="Internet_20_link"><text:span text:style-name="T30"> в которой </text:span></text:span><text:span text:style-name="Internet_20_link"><text:span text:style-name="T28">реализованы некоторые алгебраические операции (сложение, вычитание, умножение, транспонирование матриц), а также функции для генерации матриц заданных форматов (произвольная или хессенбергова) со случайными числами, вывода данных на экран и в файл и др.</text:span></text:span></text:p>
      <text:p text:style-name="P22"><text:span text:style-name="Internet_20_link"><text:span text:style-name="T64">Для работы с транспонированной матрицей внутри статической шаблонной библиотеки Matrix/TransposedMatrix.h представлен одноимённый шаблонный класс. Матрица также представлена стандартным вектором из векторов: std::vector&lt;std::vector&lt;T&gt;&gt;.</text:span></text:span></text:p>
      <text:p text:style-name="_30_3_5f_Текст_20_ИТММ">Некоторые оптимизированные версии алгоритмов используют для представления матрицы небольшие модификации представленного выше типа данных:</text:p>
      <text:list text:style-name="WWNum6">
        <text:list-item>
          <text:p text:style-name="P43"><text:span text:style-name="T65">стандартный вектор длины </text:span><text:span text:style-name="T66">NxN, </text:span><text:span text:style-name="T67">матрица записана по строкам (матрица в ленточном виде);</text:span></text:p>
        </text:list-item>
        <text:list-item>
          <text:p text:style-name="P43"><text:span text:style-name="T66">TransposedMatrix — </text:span><text:span text:style-name="T67">транспонированная матрица, записанная по столбцам. В основе такой же стандартный вектор длины </text:span><text:span text:style-name="T66">NxN;</text:span></text:p>
        </text:list-item>
        <text:list-item>
          <text:p text:style-name="P43"><text:span text:style-name="T66">QRMatrix – </text:span><text:span text:style-name="T67">матрица, хранящая в себе элементы структуры для одновременного доступа к одному элементу </text:span><text:span text:style-name="T66">Q </text:span><text:span text:style-name="T67">и </text:span><text:span text:style-name="T66">R </text:span><text:span text:style-name="T67">в одной и той же позиции для оптимизации обращения к аппаратному кэшу.</text:span></text:p>
        </text:list-item>
      </text:list>
      <text:p text:style-name="_30_3_5f_Текст_20_ИТММ"><text:span text:style-name="Internet_20_link"><text:span text:style-name="T28">Файл </text:span></text:span><text:span text:style-name="Internet_20_link"><text:span text:style-name="T29">main.cpp</text:span></text:span><text:span text:style-name="Internet_20_link"><text:span text:style-name="T28"> содержит примеры использования структур данных и классов-оптимизаций </text:span></text:span><text:span text:style-name="Internet_20_link"><text:span text:style-name="T29">QR-</text:span></text:span><text:span text:style-name="Internet_20_link"><text:span text:style-name="T28">разложения из разработанной библиотеки</text:span></text:span><text:span text:style-name="Internet_20_link"><text:span text:style-name="T29">.</text:span></text:span></text:p>
      <text:list text:style-name="WWNum14">
        <text:list-item>
          <text:p text:style-name="P44"><text:span text:style-name="Internet_20_link"><text:span text:style-name="T28">Различные тестовые сценарии для разложения произвольных матриц </text:span></text:span><text:span text:style-name="Internet_20_link"><text:span text:style-name="T29">A </text:span></text:span><text:span text:style-name="Internet_20_link"><text:span text:style-name="T30">размером </text:span></text:span><text:span text:style-name="Internet_20_link"><text:span text:style-name="T29">NxN </text:span></text:span><text:span text:style-name="Internet_20_link"><text:span text:style-name="T30">с указанным типом данных</text:span></text:span><text:span text:style-name="Internet_20_link"><text:span text:style-name="T29">,</text:span></text:span></text:p>
        </text:list-item>
        <text:list-item>
          <text:p text:style-name="P44"><text:span text:style-name="Internet_20_link"><text:span text:style-name="T64">а также сценарии для разложения хессенберговых верхних и нижних матриц A размером NxN с указанным типом данных.</text:span></text:span></text:p>
        </text:list-item>
      </text:list>
      <text:p text:style-name="_30_3_5f_Текст_20_ИТММ"><text:span text:style-name="Internet_20_link"><text:span text:style-name="T68">Для всех тестов выводятся на экран:</text:span></text:span></text:p>
      <text:list text:style-name="WWNum17">
        <text:list-item>
          <text:p text:style-name="P45"><text:span text:style-name="Internet_20_link"><text:span text:style-name="T68">Рамер задачи: test size: N</text:span></text:span></text:p>
        </text:list-item>
        <text:list-item>
          <text:p text:style-name="P45"><text:span text:style-name="Internet_20_link"><text:span text:style-name="T68">Время выполнения: time: &lt;число в секундах&gt;</text:span></text:span></text:p>
        </text:list-item>
        <text:list-item>
          <text:p text:style-name="P45"><text:span text:style-name="Internet_20_link"><text:span text:style-name="T68">Абсолютная ошибка: abs error: &lt;вещественное число, </text:span></text:span><draw:frame draw:style-name="fr1" draw:name="Объект78" text:anchor-type="as-char" svg:width="1.861cm" svg:height="0.547cm" draw:z-index="94"><draw:object xlink:href="./Object 78" xlink:type="simple" xlink:show="embed" xlink:actuate="onLoad"/><draw:image xlink:href="./ObjectReplacements/Object 78" xlink:type="simple" xlink:show="embed" xlink:actuate="onLoad"/></draw:frame><text:span text:style-name="Internet_20_link"><text:span text:style-name="T68">&gt;</text:span></text:span></text:p>
        </text:list-item>
        <text:list-item>
          <text:p text:style-name="P45"><text:soft-page-break/><text:span text:style-name="Internet_20_link"><text:span text:style-name="T68">Отн</text:span></text:span><text:span text:style-name="Internet_20_link"><text:span text:style-name="T28">осительная ошибка:</text:span></text:span><text:span text:style-name="Internet_20_link"><text:span text:style-name="T69"> </text:span></text:span><text:span text:style-name="Internet_20_link"><text:span text:style-name="T70">rel</text:span></text:span><text:span text:style-name="Internet_20_link"><text:span text:style-name="T71"> </text:span></text:span><text:span text:style-name="Internet_20_link"><text:span text:style-name="T70">error</text:span></text:span><text:span text:style-name="Internet_20_link"><text:span text:style-name="T71">: &lt;вещественное число, </text:span></text:span><draw:frame draw:style-name="fr1" draw:name="Объект79" text:anchor-type="as-char" svg:width="1.914cm" svg:height="1.185cm" draw:z-index="95"><draw:object xlink:href="./Object 79" xlink:type="simple" xlink:show="embed" xlink:actuate="onLoad"/><draw:image xlink:href="./ObjectReplacements/Object 79" xlink:type="simple" xlink:show="embed" xlink:actuate="onLoad"/></draw:frame><text:span text:style-name="Internet_20_link"><text:span text:style-name="T69">&gt;</text:span></text:span></text:p>
        </text:list-item>
      </text:list>
      <text:p text:style-name="_30_3_5f_Текст_20_ИТММ"><text:span text:style-name="Internet_20_link"><text:span text:style-name="T72">При этом точность чисел с плавающей запятой, </text:span></text:span><text:span text:style-name="Internet_20_link"><text:span text:style-name="T73">float </text:span></text:span><text:span text:style-name="Internet_20_link"><text:span text:style-name="T72">или </text:span></text:span><text:span text:style-name="Internet_20_link"><text:span text:style-name="T73">double, </text:span></text:span><text:span text:style-name="Internet_20_link"><text:span text:style-name="T72">указывается через тип </text:span></text:span><text:span text:style-name="Internet_20_link"><text:span text:style-name="T73">currentType. </text:span></text:span><text:span text:style-name="T72">Тут стоит отметить, что в ходе работы была выявлена проблема быстрого накопления ошибки для типа данных, представляющих в</text:span><text:span text:style-name="T73"> C++ </text:span><text:span text:style-name="T72">числа с плавающей точкой одинарной точности,</text:span><text:span text:style-name="T73"> float.</text:span><text:span text:style-name="T72"> Ошибка вела себя нестабильно, различные методы корректировки точности не помогали. Изменение на double, тип данных для числа с плавающей точкой двойной точности, дало стабильность для порядка абсолютной ошибки — не менее 10 знаков после запятой вне зависимости от размеров данных. При этом различные версии работают без серьёзного замедления даже на данных более 1000х1000 элементов. Шаблонный код позволяет легко управлять этим параметром через механизм создания псевдонимов для типов данных:</text:span></text:p>
      <text:p text:style-name="_30_3_5f_Текст_20_ИТММ"><text:span text:style-name="T61">typedef</text:span><text:span text:style-name="T60"> </text:span><text:span text:style-name="T61">double</text:span><text:span text:style-name="T60"> </text:span><text:span text:style-name="T62">currentType</text:span><text:span text:style-name="T60">;</text:span></text:p>
      <text:p text:style-name="_30_3_5f_Текст_20_ИТММ">Другой параметр для тестирования алгоритмов, количество потоков (по умолчанию равный максимальному количеству логических ядер в системе, где велась разработка):</text:p>
      <text:p text:style-name="_30_3_5f_Текст_20_ИТММ"><text:span text:style-name="Internet_20_link"><text:span text:style-name="T74">size_t</text:span></text:span><text:span text:style-name="Internet_20_link"><text:span text:style-name="T75"> thread_num = 8;</text:span></text:span></text:p>
      <text:p text:style-name="_30_3_5f_Текст_20_ИТММ"><text:span text:style-name="Internet_20_link"><text:span text:style-name="T28">Для проверки корректности работы программы в директории</text:span></text:span><text:span text:style-name="Internet_20_link"><text:span text:style-name="T29"> test_data</text:span></text:span><text:span text:style-name="Internet_20_link"><text:span text:style-name="T30"> хранится скрипт</text:span></text:span><text:span text:style-name="Internet_20_link"><text:span text:style-name="T28"> для </text:span></text:span><text:span text:style-name="Internet_20_link"><text:span text:style-name="T29">Scilab,</text:span></text:span><text:span text:style-name="Internet_20_link"><text:span text:style-name="T30"> который:</text:span></text:span></text:p>
      <text:list text:style-name="WWNum18">
        <text:list-item>
          <text:p text:style-name="P46"><text:span text:style-name="Internet_20_link"><text:span text:style-name="T68">Считывает из файла ту же матрицу A, над которой производила расчёты тестируемая библиотека.</text:span></text:span></text:p>
        </text:list-item>
        <text:list-item>
          <text:p text:style-name="P46"><text:span text:style-name="Internet_20_link"><text:span text:style-name="T68">Вычисляет для неё QR-разложение и подсчитывает время разложения.</text:span></text:span></text:p>
        </text:list-item>
        <text:list-item>
          <text:p text:style-name="P46"><text:span text:style-name="Internet_20_link"><text:span text:style-name="T68">Считывает вычисленные тестируемой программой и записанные в текстовые файлы матрицы Q и R.</text:span></text:span></text:p>
        </text:list-item>
        <text:list-item>
          <text:p text:style-name="P46"><text:span text:style-name="Internet_20_link"><text:span text:style-name="T68">Подсчитывает для каждой абсолютную и относительные ошибки по сравнению с полученным в скрипте разложением.</text:span></text:span></text:p>
        </text:list-item>
        <text:list-item>
          <text:p text:style-name="P46"><text:span text:style-name="Internet_20_link"><text:span text:style-name="T68">Выводит данные на экран в формате</text:span></text:span></text:p>
          <text:list>
            <text:list-item>
              <text:p text:style-name="P46"><text:span text:style-name="Internet_20_link"><text:span text:style-name="T28">Рамер задачи: </text:span></text:span><text:span text:style-name="Internet_20_link"><text:span text:style-name="T71">test size: </text:span></text:span><text:span text:style-name="Internet_20_link"><text:span text:style-name="T70">N</text:span></text:span></text:p>
            </text:list-item>
            <text:list-item>
              <text:p text:style-name="P46"><text:span text:style-name="Internet_20_link"><text:span text:style-name="T68">Время выполнения: time: &lt;число в секундах&gt;</text:span></text:span></text:p>
            </text:list-item>
            <text:list-item>
              <text:p text:style-name="P46"><text:span text:style-name="Internet_20_link"><text:span text:style-name="T68">Абсолютная ошибка для матрицы A: abs error: &lt;вещественное число, </text:span></text:span><draw:frame draw:style-name="fr1" draw:name="Объект80" text:anchor-type="as-char" svg:width="5.098cm" svg:height="0.547cm" draw:z-index="96"><draw:object xlink:href="./Object 80" xlink:type="simple" xlink:show="embed" xlink:actuate="onLoad"/><draw:image xlink:href="./ObjectReplacements/Object 80" xlink:type="simple" xlink:show="embed" xlink:actuate="onLoad"/></draw:frame><text:span text:style-name="Internet_20_link"><text:span text:style-name="T68">&gt;</text:span></text:span></text:p>
            </text:list-item>
            <text:list-item>
              <text:p text:style-name="P46"><text:span text:style-name="Internet_20_link"><text:span text:style-name="T68">Относительная ошибка для матрицы A: rel error: &lt;вещественное число, </text:span></text:span><draw:frame draw:style-name="fr1" draw:name="Объект81" text:anchor-type="as-char" svg:width="5.14cm" svg:height="1.155cm" draw:z-index="97"><draw:object xlink:href="./Object 81" xlink:type="simple" xlink:show="embed" xlink:actuate="onLoad"/><draw:image xlink:href="./ObjectReplacements/Object 81" xlink:type="simple" xlink:show="embed" xlink:actuate="onLoad"/></draw:frame><text:span text:style-name="Internet_20_link"><text:span text:style-name="T68">&gt; </text:span></text:span></text:p>
            </text:list-item>
            <text:list-item>
              <text:p text:style-name="P46"><text:span text:style-name="Internet_20_link"><text:span text:style-name="T68">Абсолютная ошибка для предвычисленной матрицы Q: abs error: &lt;вещественное число, </text:span></text:span><draw:frame draw:style-name="fr1" draw:name="Объект82" text:anchor-type="as-char" svg:width="3.852cm" svg:height="0.547cm" draw:z-index="98"><draw:object xlink:href="./Object 82" xlink:type="simple" xlink:show="embed" xlink:actuate="onLoad"/><draw:image xlink:href="./ObjectReplacements/Object 82" xlink:type="simple" xlink:show="embed" xlink:actuate="onLoad"/></draw:frame><text:span text:style-name="Internet_20_link"><text:span text:style-name="T68">&gt;</text:span></text:span></text:p>
            </text:list-item>
            <text:list-item>
              <text:p text:style-name="P46"><text:soft-page-break/><text:span text:style-name="Internet_20_link"><text:span text:style-name="T68">Относительная ошибка для предвычисленной матрицы Q: rel error: &lt;вещественное число, </text:span></text:span><draw:frame draw:style-name="fr1" draw:name="Объект83" text:anchor-type="as-char" svg:width="3.895cm" svg:height="1.155cm" draw:z-index="99"><draw:object xlink:href="./Object 83" xlink:type="simple" xlink:show="embed" xlink:actuate="onLoad"/><draw:image xlink:href="./ObjectReplacements/Object 83" xlink:type="simple" xlink:show="embed" xlink:actuate="onLoad"/></draw:frame><text:span text:style-name="Internet_20_link"><text:span text:style-name="T68">&gt;</text:span></text:span></text:p>
            </text:list-item>
            <text:list-item>
              <text:p text:style-name="P46"><text:span text:style-name="Internet_20_link"><text:span text:style-name="T68">Абсолютная ошибка для предвычисленной матрицы R: abs error: &lt;вещественное число, </text:span></text:span><draw:frame draw:style-name="fr1" draw:name="Объект84" text:anchor-type="as-char" svg:width="3.81cm" svg:height="0.547cm" draw:z-index="100"><draw:object xlink:href="./Object 84" xlink:type="simple" xlink:show="embed" xlink:actuate="onLoad"/><draw:image xlink:href="./ObjectReplacements/Object 84" xlink:type="simple" xlink:show="embed" xlink:actuate="onLoad"/></draw:frame><text:span text:style-name="Internet_20_link"><text:span text:style-name="T68">&gt;</text:span></text:span></text:p>
            </text:list-item>
            <text:list-item>
              <text:p text:style-name="P46"><text:span text:style-name="Internet_20_link"><text:span text:style-name="T68">Относительная ошибка для предвычисленной матрицы R: rel error: &lt;вещественное число, </text:span></text:span><draw:frame draw:style-name="fr1" draw:name="Объект85" text:anchor-type="as-char" svg:width="3.852cm" svg:height="1.155cm" draw:z-index="101"><draw:object xlink:href="./Object 85" xlink:type="simple" xlink:show="embed" xlink:actuate="onLoad"/><draw:image xlink:href="./ObjectReplacements/Object 85" xlink:type="simple" xlink:show="embed" xlink:actuate="onLoad"/></draw:frame><text:span text:style-name="Internet_20_link"><text:span text:style-name="T68">&gt;</text:span></text:span></text:p>
            </text:list-item>
          </text:list>
        </text:list-item>
      </text:list>
      <text:p text:style-name="_30_2_5f_Заголовок_20_2_20_ИТММ"/>
      <text:p text:style-name="P24"><text:bookmark-start text:name="__RefHeading___Toc2671_713544485"/><text:bookmark-start text:name="_Toc194842671"/>2.<text:span text:style-name="T18">2</text:span> <text:bookmark-end text:name="_Toc194842671"/>Реализация метода отражений Хаусхолдера<text:bookmark-end text:name="__RefHeading___Toc2671_713544485"/></text:p>
      <text:p text:style-name="_30_4_5f_Заголовок_20_3_20_уровня_20_ИИТММ"><text:bookmark-start text:name="__RefHeading___Toc2687_713544485"/><text:bookmark-start text:name="_Toc194842672"/>2.1.2 <text:bookmark-end text:name="_Toc194842672"/>Первая реализация<text:bookmark-end text:name="__RefHeading___Toc2687_713544485"/></text:p>
      <text:p text:style-name="_30_3_5f_Текст_20_ИТММ"><text:span text:style-name="Internet_20_link"><text:span text:style-name="T28">С помощью ортогональных преобразований приведём матрицу A к треугольному виду. Возьмём первый столбец матрицы A: </text:span></text:span><draw:frame draw:style-name="fr1" draw:name="Объект86" text:anchor-type="as-char" svg:width="3.134cm" svg:height="0.594cm" draw:z-index="102"><draw:object xlink:href="./Object 86" xlink:type="simple" xlink:show="embed" xlink:actuate="onLoad"/><draw:image xlink:href="./ObjectReplacements/Object 86" xlink:type="simple" xlink:show="embed" xlink:actuate="onLoad"/></draw:frame><text:span text:style-name="Internet_20_link"><text:span text:style-name="T28"><text:s/>Построим матрицу Хасухолдера </text:span></text:span><draw:frame draw:style-name="fr1" draw:name="Объект87" text:anchor-type="as-char" svg:width="2.607cm" svg:height="0.594cm" draw:z-index="103"><draw:object xlink:href="./Object 87" xlink:type="simple" xlink:show="embed" xlink:actuate="onLoad"/><draw:image xlink:href="./ObjectReplacements/Object 87" xlink:type="simple" xlink:show="embed" xlink:actuate="onLoad"/></draw:frame><text:span text:style-name="Internet_20_link"><text:span text:style-name="T28"><text:s/>с помощью вектора </text:span></text:span><draw:frame draw:style-name="fr1" draw:name="Объект88" text:anchor-type="as-char" svg:width="4.854cm" svg:height="0.594cm" draw:z-index="104"><draw:object xlink:href="./Object 88" xlink:type="simple" xlink:show="embed" xlink:actuate="onLoad"/><draw:image xlink:href="./ObjectReplacements/Object 88" xlink:type="simple" xlink:show="embed" xlink:actuate="onLoad"/></draw:frame><text:span text:style-name="Internet_20_link"><text:span text:style-name="T28"><text:s/>и скаляров </text:span></text:span><draw:frame draw:style-name="fr1" draw:name="Объект89" text:anchor-type="as-char" svg:width="3.909cm" svg:height="1.235cm" draw:z-index="105"><draw:object xlink:href="./Object 89" xlink:type="simple" xlink:show="embed" xlink:actuate="onLoad"/><draw:image xlink:href="./ObjectReplacements/Object 89" xlink:type="simple" xlink:show="embed" xlink:actuate="onLoad"/></draw:frame><text:span text:style-name="Internet_20_link"><text:span text:style-name="T28"><text:s/>и </text:span></text:span><draw:frame draw:style-name="fr1" draw:name="Объект90" text:anchor-type="as-char" svg:width="3.26cm" svg:height="1.171cm" draw:z-index="106"><draw:object xlink:href="./Object 90" xlink:type="simple" xlink:show="embed" xlink:actuate="onLoad"/><draw:image xlink:href="./ObjectReplacements/Object 90" xlink:type="simple" xlink:show="embed" xlink:actuate="onLoad"/></draw:frame><text:span text:style-name="Internet_20_link"><text:span text:style-name="T28">. И, применив её к матрице, получим матрицу </text:span></text:span><draw:frame draw:style-name="fr1" draw:name="Объект91" text:anchor-type="as-char" svg:width="1.72cm" svg:height="0.575cm" draw:z-index="107"><draw:object xlink:href="./Object 91" xlink:type="simple" xlink:show="embed" xlink:actuate="onLoad"/><draw:image xlink:href="./ObjectReplacements/Object 91" xlink:type="simple" xlink:show="embed" xlink:actuate="onLoad"/></draw:frame><text:span text:style-name="Internet_20_link"><text:span text:style-name="T28"><text:s/>со столбцом нулей под первым диагональным элементом, где </text:span></text:span><draw:frame draw:style-name="fr1" draw:name="Объект92" text:anchor-type="as-char" svg:width="1.233cm" svg:height="0.534cm" draw:z-index="108"><draw:object xlink:href="./Object 92" xlink:type="simple" xlink:show="embed" xlink:actuate="onLoad"/><draw:image xlink:href="./ObjectReplacements/Object 92" xlink:type="simple" xlink:show="embed" xlink:actuate="onLoad"/></draw:frame><text:span text:style-name="Internet_20_link"><text:span text:style-name="T28">.</text:span></text:span></text:p>
      <text:p text:style-name="_30_3_5f_Текст_20_ИТММ"><text:span text:style-name="Internet_20_link"><text:span text:style-name="T28">На втором этапе нужно поступить таким же образом с подматрицей матрицы, которая получается вычеркиванием в первой строки и первого столбца. Легко проверить, что это равносильно применению ко всей матрице преобразования Хаусхолдера, определяемого формулами </text:span></text:span><draw:frame draw:style-name="fr1" draw:name="Объект93" text:anchor-type="as-char" svg:width="2.593cm" svg:height="0.594cm" draw:z-index="109"><draw:object xlink:href="./Object 93" xlink:type="simple" xlink:show="embed" xlink:actuate="onLoad"/><draw:image xlink:href="./ObjectReplacements/Object 93" xlink:type="simple" xlink:show="embed" xlink:actuate="onLoad"/></draw:frame><text:span text:style-name="Internet_20_link"><text:span text:style-name="T28">, </text:span></text:span><draw:frame draw:style-name="fr1" draw:name="Объект94" text:anchor-type="as-char" svg:width="5.334cm" svg:height="0.594cm" draw:z-index="110"><draw:object xlink:href="./Object 94" xlink:type="simple" xlink:show="embed" xlink:actuate="onLoad"/><draw:image xlink:href="./ObjectReplacements/Object 94" xlink:type="simple" xlink:show="embed" xlink:actuate="onLoad"/></draw:frame><text:span text:style-name="Internet_20_link"><text:span text:style-name="T28">, </text:span></text:span><draw:frame draw:style-name="fr1" draw:name="Объект95" text:anchor-type="as-char" svg:width="3.928cm" svg:height="1.235cm" draw:z-index="111"><draw:object xlink:href="./Object 95" xlink:type="simple" xlink:show="embed" xlink:actuate="onLoad"/><draw:image xlink:href="./ObjectReplacements/Object 95" xlink:type="simple" xlink:show="embed" xlink:actuate="onLoad"/></draw:frame><text:span text:style-name="Internet_20_link"><text:span text:style-name="T28">, </text:span></text:span><draw:frame draw:style-name="fr1" draw:name="Объект96" text:anchor-type="as-char" svg:width="3.279cm" svg:height="1.171cm" draw:z-index="112"><draw:object xlink:href="./Object 96" xlink:type="simple" xlink:show="embed" xlink:actuate="onLoad"/><draw:image xlink:href="./ObjectReplacements/Object 96" xlink:type="simple" xlink:show="embed" xlink:actuate="onLoad"/></draw:frame><text:span text:style-name="Internet_20_link"><text:span text:style-name="T28">. </text:span></text:span></text:p>
      <text:p text:style-name="_30_3_5f_Текст_20_ИТММ"><text:span text:style-name="Internet_20_link"><text:span text:style-name="T28">Таким образом, чтобы занулить </text:span></text:span><text:span text:style-name="Internet_20_link"><text:span text:style-name="T29">N</text:span></text:span><text:span text:style-name="Internet_20_link"><text:span text:style-name="T28">-1 строк матрицы </text:span></text:span><text:span text:style-name="Internet_20_link"><text:span text:style-name="T29">A</text:span></text:span><text:span text:style-name="Internet_20_link"><text:span text:style-name="T28"> размером </text:span></text:span><text:span text:style-name="Internet_20_link"><text:span text:style-name="T64">NxN</text:span></text:span><text:span text:style-name="Internet_20_link"><text:span text:style-name="T28">, требуется выполнить N-1 шагов. На каждом из них нужно вычислять матрицу отражения H:</text:span></text:span></text:p>
      <text:list text:style-name="WWNum7">
        <text:list-item>
          <text:p text:style-name="P47" loext:marker-style-name="T31"><draw:frame draw:style-name="fr1" draw:name="Объект97" text:anchor-type="as-char" svg:width="3.896cm" svg:height="1.235cm" draw:z-index="113"><draw:object xlink:href="./Object 97" xlink:type="simple" xlink:show="embed" xlink:actuate="onLoad"/><draw:image xlink:href="./ObjectReplacements/Object 97" xlink:type="simple" xlink:show="embed" xlink:actuate="onLoad"/></draw:frame></text:p>
        </text:list-item>
        <text:list-item>
          <text:p text:style-name="P47" loext:marker-style-name="T31"><draw:frame draw:style-name="fr1" draw:name="Объект98" text:anchor-type="as-char" svg:width="3.291cm" svg:height="1.171cm" draw:z-index="114"><draw:object xlink:href="./Object 98" xlink:type="simple" xlink:show="embed" xlink:actuate="onLoad"/><draw:image xlink:href="./ObjectReplacements/Object 98" xlink:type="simple" xlink:show="embed" xlink:actuate="onLoad"/></draw:frame></text:p>
        </text:list-item>
        <text:list-item>
          <text:p text:style-name="P48"><draw:frame draw:style-name="fr1" draw:name="Объект99" text:anchor-type="as-char" svg:width="6.877cm" svg:height="0.628cm" draw:z-index="115"><draw:object xlink:href="./Object 99" xlink:type="simple" xlink:show="embed" xlink:actuate="onLoad"/><draw:image xlink:href="./ObjectReplacements/Object 99" xlink:type="simple" xlink:show="embed" xlink:actuate="onLoad"/></draw:frame><text:span text:style-name="Internet_20_link"><text:span text:style-name="T28">первые (k-1) позиций –нулевые.</text:span></text:span></text:p>
        </text:list-item>
        <text:list-item>
          <text:p text:style-name="P47" loext:marker-style-name="T31"><draw:frame draw:style-name="fr1" draw:name="Объект100" text:anchor-type="as-char" svg:width="2.607cm" svg:height="0.594cm" draw:z-index="116"><draw:object xlink:href="./Object 100" xlink:type="simple" xlink:show="embed" xlink:actuate="onLoad"/><draw:image xlink:href="./ObjectReplacements/Object 100" xlink:type="simple" xlink:show="embed" xlink:actuate="onLoad"/></draw:frame></text:p>
        </text:list-item>
      </text:list>
      <text:p text:style-name="_30_3_5f_Текст_20_ИТММ"><text:span text:style-name="Internet_20_link"><text:span text:style-name="T28">Матрица </text:span></text:span><draw:frame draw:style-name="fr1" draw:name="Объект101" text:anchor-type="as-char" svg:width="3.06cm" svg:height="0.575cm" draw:z-index="117"><draw:object xlink:href="./Object 101" xlink:type="simple" xlink:show="embed" xlink:actuate="onLoad"/><draw:image xlink:href="./ObjectReplacements/Object 101" xlink:type="simple" xlink:show="embed" xlink:actuate="onLoad"/></draw:frame><text:span text:style-name="Internet_20_link"><text:span text:style-name="T28">, т.е. на каждом шаге алгоритма домножаем матрицу A слева на новую матрицу отражения и производим следующие вычисления уже над ней. При этом матрицу </text:span></text:span><draw:frame draw:style-name="fr1" draw:name="Объект102" text:anchor-type="as-char" svg:width="0.497cm" svg:height="0.575cm" draw:z-index="118"><draw:object xlink:href="./Object 102" xlink:type="simple" xlink:show="embed" xlink:actuate="onLoad"/><draw:image xlink:href="./ObjectReplacements/Object 102" xlink:type="simple" xlink:show="embed" xlink:actuate="onLoad"/></draw:frame><text:span text:style-name="Internet_20_link"><text:span text:style-name="T28"><text:s/>можно не хранить отдельно, по сути таким образом накапливается матрица </text:span></text:span><text:span text:style-name="Internet_20_link"><text:span text:style-name="T29">R</text:span></text:span><text:span text:style-name="Internet_20_link"><text:span text:style-name="T28">: </text:span></text:span><draw:frame draw:style-name="fr1" draw:name="Объект103" text:anchor-type="as-char" svg:width="2.861cm" svg:height="0.534cm" draw:z-index="119"><draw:object xlink:href="./Object 103" xlink:type="simple" xlink:show="embed" xlink:actuate="onLoad"/><draw:image xlink:href="./ObjectReplacements/Object 103" xlink:type="simple" xlink:show="embed" xlink:actuate="onLoad"/></draw:frame><text:span text:style-name="Internet_20_link"><text:span text:style-name="T28">. Для простейшей реализации матрицу </text:span></text:span><text:span text:style-name="Internet_20_link"><text:span text:style-name="T29">Q</text:span></text:span><text:span text:style-name="Internet_20_link"><text:span text:style-name="T28"> храним и вычисляем отдельно на каждом шаге как произведение всех матриц отражения: </text:span></text:span><draw:frame draw:style-name="fr1" draw:name="Объект104" text:anchor-type="as-char" svg:width="2.302cm" svg:height="0.534cm" draw:z-index="120"><draw:object xlink:href="./Object 104" xlink:type="simple" xlink:show="embed" xlink:actuate="onLoad"/><draw:image xlink:href="./ObjectReplacements/Object 104" xlink:type="simple" xlink:show="embed" xlink:actuate="onLoad"/></draw:frame><text:span text:style-name="Internet_20_link"><text:span text:style-name="T28">. В результате получим </text:span></text:span><draw:frame draw:style-name="fr1" draw:name="Объект105" text:anchor-type="as-char" svg:width="2.51cm" svg:height="0.534cm" draw:z-index="121"><draw:object xlink:href="./Object 105" xlink:type="simple" xlink:show="embed" xlink:actuate="onLoad"/><draw:image xlink:href="./ObjectReplacements/Object 105" xlink:type="simple" xlink:show="embed" xlink:actuate="onLoad"/></draw:frame><text:span text:style-name="Internet_20_link"><text:span text:style-name="T28">.</text:span></text:span></text:p>
      <text:p text:style-name="_30_3_5f_Текст_20_ИТММ">Первая реализация метода Хаусхолдера имеет существенные недостатки:</text:p>
      <text:list text:style-name="WWNum5">
        <text:list-item>
          <text:p text:style-name="P49">два матричных произведения на каждую<text:span text:style-name="T18"> </text:span><text:span text:style-name="T19">из (</text:span><text:span text:style-name="T18">N-1</text:span><text:span text:style-name="T19">)</text:span><text:span text:style-name="T18"> </text:span><text:span text:style-name="T19">итераций цикла,</text:span></text:p>
        </text:list-item>
        <text:list-item>
          <text:p text:style-name="P49">отдельное хранение матрицы отражения<text:span text:style-name="T18"> H</text:span> (<text:span text:style-name="T17">NxN</text:span><text:span text:style-name="T18"> </text:span>элементов<text:span text:style-name="T18">)</text:span> для вычисления<text:span text:style-name="T18"> Q.</text:span></text:p>
        </text:list-item>
      </text:list>
      <text:p text:style-name="_30_3_5f_Текст_20_ИТММ"><text:soft-page-break/><text:span text:style-name="T19">На каждом шаге алгоритма получается вектор Хаусхолдера v</text:span><text:span text:style-name="T18"> </text:span><text:span text:style-name="T19">и матрица отражения </text:span><text:span text:style-name="T18">H:</text:span></text:p>
      <text:p text:style-name="P27"><draw:frame draw:style-name="fr1" draw:name="Объект106" text:anchor-type="as-char" svg:width="2.159cm" svg:height="1.124cm" draw:z-index="122"><draw:object xlink:href="./Object 106" xlink:type="simple" xlink:show="embed" xlink:actuate="onLoad"/><draw:image xlink:href="./ObjectReplacements/Object 106" xlink:type="simple" xlink:show="embed" xlink:actuate="onLoad"/></draw:frame></text:p>
      <text:p text:style-name="_30_3_5f_Текст_20_ИТММ"><text:span text:style-name="T76">Домножая матрицу </text:span><text:span text:style-name="T77">A </text:span><text:span text:style-name="T76">слева на матрицы отражения</text:span><text:span text:style-name="T77"> H</text:span><text:span text:style-name="T78">k</text:span><text:span text:style-name="T79">,</text:span><text:span text:style-name="T80"> получим матрицу</text:span><text:span text:style-name="T79"> R</text:span><text:span text:style-name="T80">:</text:span></text:p>
      <text:p text:style-name="P27"><draw:frame draw:style-name="fr1" draw:name="Объект107" text:anchor-type="as-char" svg:width="2.963cm" svg:height="0.534cm" draw:z-index="123"><draw:object xlink:href="./Object 107" xlink:type="simple" xlink:show="embed" xlink:actuate="onLoad"/><draw:image xlink:href="./ObjectReplacements/Object 107" xlink:type="simple" xlink:show="embed" xlink:actuate="onLoad"/></draw:frame>,</text:p>
      <text:p text:style-name="P27"><draw:frame draw:style-name="fr1" draw:name="Объект108" text:anchor-type="as-char" svg:width="2.794cm" svg:height="0.534cm" draw:z-index="124"><draw:object xlink:href="./Object 108" xlink:type="simple" xlink:show="embed" xlink:actuate="onLoad"/><draw:image xlink:href="./ObjectReplacements/Object 108" xlink:type="simple" xlink:show="embed" xlink:actuate="onLoad"/></draw:frame></text:p>
      <text:p text:style-name="_30_3_5f_Текст_20_ИТММ">Матрица Q при этом хранится и также вычисляется на каждом шаге с помощью последовательных домножений справа всех матриц отражения:</text:p>
      <text:p text:style-name="P27"><draw:frame draw:style-name="fr1" draw:name="Объект109" text:anchor-type="as-char" svg:width="2.443cm" svg:height="0.534cm" draw:z-index="125"><draw:object xlink:href="./Object 109" xlink:type="simple" xlink:show="embed" xlink:actuate="onLoad"/><draw:image xlink:href="./ObjectReplacements/Object 109" xlink:type="simple" xlink:show="embed" xlink:actuate="onLoad"/></draw:frame></text:p>
      <text:p text:style-name="_30_3_5f_Текст_20_ИТММ"><text:span text:style-name="Internet_20_link"><text:span text:style-name="T30">Программная реализация с учётом описанного выше алгоритма будет следующей.</text:span></text:span><text:span text:style-name="Internet_20_link"><text:span text:style-name="T28"> Копируем матрицу </text:span></text:span><text:span text:style-name="Internet_20_link"><text:span text:style-name="T29">A</text:span></text:span><text:span text:style-name="Internet_20_link"><text:span text:style-name="T28"> в </text:span></text:span><text:span text:style-name="Internet_20_link"><text:span text:style-name="T29">R</text:span></text:span><text:span text:style-name="Internet_20_link"><text:span text:style-name="T28">. В цикле от 0 до </text:span></text:span><text:span text:style-name="Internet_20_link"><text:span text:style-name="T29">N</text:span></text:span><text:span text:style-name="Internet_20_link"><text:span text:style-name="T28">-1 подсчитываем по формулам </text:span></text:span><draw:frame draw:style-name="fr1" draw:name="Объект110" text:anchor-type="as-char" svg:width="1.817cm" svg:height="0.471cm" draw:z-index="126"><draw:object xlink:href="./Object 110" xlink:type="simple" xlink:show="embed" xlink:actuate="onLoad"/><draw:image xlink:href="./ObjectReplacements/Object 110" xlink:type="simple" xlink:show="embed" xlink:actuate="onLoad"/></draw:frame><text:span text:style-name="Internet_20_link"><text:span text:style-name="T28">. Подсчитываем </text:span></text:span><text:span text:style-name="Internet_20_link"><text:span text:style-name="T29">Q</text:span></text:span><text:span text:style-name="Internet_20_link"><text:span text:style-name="T28"> как перемножение матриц отражения друг на друга, домножаем </text:span></text:span><text:span text:style-name="Internet_20_link"><text:span text:style-name="T29">R</text:span></text:span><text:span text:style-name="Internet_20_link"><text:span text:style-name="T28"> на </text:span></text:span><text:span text:style-name="Internet_20_link"><text:span text:style-name="T29">H</text:span></text:span><text:span text:style-name="Internet_20_link"><text:span text:style-name="T28"> слева и получаем матрицу для следующей итерации:</text:span></text:span></text:p>
      <text:p text:style-name="P50" loext:marker-style-name="T81"><text:span text:style-name="T81">Процедура QR_decomposition(A, Q, R):</text:span><text:span text:style-name="T81"/></text:p>
      <text:p text:style-name="P50" loext:marker-style-name="T81"><text:span text:style-name="T81">R = A </text:span><text:span text:style-name="T82">// копирование исходной матрицы в </text:span><text:span text:style-name="T83">R</text:span></text:p>
      <text:p text:style-name="P50" loext:marker-style-name="T81"><text:span text:style-name="T70">Q</text:span><text:span text:style-name="T81"> = </text:span><text:span text:style-name="T70">I</text:span><text:span text:style-name="T81"> </text:span><text:span text:style-name="T82">//</text:span><text:span text:style-name="T83"> Q </text:span><text:span text:style-name="T82">инициализируется как единичная</text:span></text:p>
      <text:p text:style-name="P50" loext:marker-style-name="T84"><text:span text:style-name="T81">Для k от 0 до N-</text:span><text:span text:style-name="T70">1</text:span><text:span text:style-name="T81"> выполнить: </text:span><text:span text:style-name="T85">// цикл по столбцам</text:span></text:p>
      <text:p text:style-name="P50" loext:marker-style-name="T86"><text:span text:style-name="T81"><text:s text:c="9"/></text:span><text:span text:style-name="T85">// подсчёт β</text:span></text:p>
      <text:p text:style-name="P50" loext:marker-style-name="T81"><text:span text:style-name="T81"><text:s text:c="9"/>sum = 0</text:span><text:span text:style-name="T81"/></text:p>
      <text:p text:style-name="P50" loext:marker-style-name="T81"><text:span text:style-name="T81"><text:s text:c="9"/>Для i от k до N-1:</text:span><text:span text:style-name="T81"/></text:p>
      <text:p text:style-name="P50" loext:marker-style-name="T81"><text:span text:style-name="T81"><text:s text:c="13"/>sum = sum + R[i][k] * R[i][k]</text:span><text:span text:style-name="T81"/></text:p>
      <text:p text:style-name="P50" loext:marker-style-name="T81"><text:span text:style-name="T81"><text:s text:c="9"/>Конец цикла</text:span><text:span text:style-name="T81"/></text:p>
      <text:p text:style-name="P50" loext:marker-style-name="T86"><text:span text:style-name="T81"><text:s text:c="9"/>β = sign(-R[k][k]) * sqrt(sum)</text:span><text:span text:style-name="T81"/></text:p>
      <text:p text:style-name="P51" loext:marker-style-name="T86"/>
      <text:p text:style-name="P50" loext:marker-style-name="T86"><text:span text:style-name="T81"><text:s text:c="9"/></text:span><text:span text:style-name="T85">// подсчёт μ</text:span></text:p>
      <text:p text:style-name="P50" loext:marker-style-name="T70"><text:span text:style-name="T81"><text:s text:c="9"/>μ = 1.0 / sqrt(2.0 * β </text:span><text:span text:style-name="T70">(</text:span><text:span text:style-name="T81">β - R[k][k])</text:span><text:span text:style-name="T70">)</text:span></text:p>
      <text:p text:style-name="P52" loext:marker-style-name="T81"/>
      <text:p text:style-name="P50" loext:marker-style-name="T86"><text:span text:style-name="T81"><text:s text:c="7"/></text:span><text:span text:style-name="T85"><text:s text:c="2"/>// построение </text:span><text:span text:style-name="T87">v</text:span><text:span text:style-name="T85">[N]</text:span></text:p>
      <text:p text:style-name="P50" loext:marker-style-name="T88"><text:span text:style-name="T85"><text:s text:c="9"/></text:span><text:span text:style-name="T89">v = (0, …, 0), len(v) = N</text:span></text:p>
      <text:p text:style-name="P50" loext:marker-style-name="T81"><text:span text:style-name="T81"><text:s text:c="9"/>Для i от 0 до N-1:</text:span><text:span text:style-name="T81"/></text:p>
      <text:p text:style-name="P50" loext:marker-style-name="T81"><text:span text:style-name="T81"><text:s text:c="12"/></text:span><text:span text:style-name="T70">v</text:span><text:span text:style-name="T81">[i] </text:span><text:span text:style-name="T70">=</text:span><text:span text:style-name="T81"> R[i][k] * μ</text:span></text:p>
      <text:p text:style-name="P50" loext:marker-style-name="T81"><text:span text:style-name="T81"><text:s text:c="9"/>Конец цикла</text:span><text:span text:style-name="T81"/></text:p>
      <text:p text:style-name="P50" loext:marker-style-name="T81"><text:span text:style-name="T81"><text:s text:c="9"/></text:span><text:span text:style-name="T70">v</text:span><text:span text:style-name="T81">[k] </text:span><text:span text:style-name="T70">=</text:span><text:span text:style-name="T81"> </text:span><text:span text:style-name="T70">v</text:span><text:span text:style-name="T81">[k] - β * μ</text:span></text:p>
      <text:p text:style-name="P52" loext:marker-style-name="T81"/>
      <text:p text:style-name="P50" loext:marker-style-name="T86"><text:span text:style-name="T81"><text:s text:c="9"/></text:span><text:span text:style-name="T85">// построение матрицы Хаусхолдера H</text:span></text:p>
      <text:p text:style-name="P50" loext:marker-style-name="T86"><text:span text:style-name="T81"><text:s text:c="5"/></text:span><text:span text:style-name="T89"><text:s text:c="4"/>H = I - 2 * </text:span><text:span text:style-name="T90">v</text:span><text:span text:style-name="T89"> * </text:span><text:span text:style-name="T90">v^</text:span><text:span text:style-name="T89">T</text:span></text:p>
      <text:p text:style-name="P51" loext:marker-style-name="T86"/>
      <text:p text:style-name="P50" loext:marker-style-name="T81"><text:span text:style-name="T81"><text:s text:c="9"/>R = H * R </text:span><text:span text:style-name="T85">// построение матрицы R</text:span></text:p>
      <text:p text:style-name="P50" loext:marker-style-name="T86"><text:span text:style-name="T81"><text:s text:c="9"/>Q = Q * H </text:span><text:span text:style-name="T85">// построение матрицы Q</text:span></text:p>
      <text:p text:style-name="P53" loext:marker-style-name="T91"><text:span text:style-name="T91">Конец цикла</text:span><text:span text:style-name="T91"/></text:p>
      <text:p text:style-name="P50" loext:marker-style-name="T81"><text:span text:style-name="T81">Конец процедуры</text:span><text:span text:style-name="T81"/></text:p>
      <text:p text:style-name="P54" loext:marker-style-name="T92"><text:span text:style-name="Internet_20_link"><text:span text:style-name="T92"/></text:span></text:p>
      <text:p text:style-name="P55"><text:span text:style-name="Internet_20_link"><text:span text:style-name="T92">Эта реализация полностью соответствует описанному ранее теоретическому алгоритму, но долго работает. Получить параллельную версию можно с помощью добавления параллельного блочного алгоритма умножения матриц и использования параллелизма при вычислении вектора Хаусхолдера </text:span></text:span><text:span text:style-name="Internet_20_link"><text:span text:style-name="T93">v:</text:span></text:span></text:p>
      <text:list text:style-name="WWNum19">
        <text:list-item>
          <text:p text:style-name="P56"><text:span text:style-name="Internet_20_link"><text:span text:style-name="T94">Для циклов подсчёта вектора Хаусхолдера</text:span></text:span><text:span text:style-name="Internet_20_link"><text:span text:style-name="T95"> v (</text:span></text:span><draw:frame draw:style-name="fr1" draw:name="Объект111" text:anchor-type="as-char" svg:width="6.727cm" svg:height="0.628cm" draw:z-index="127"><draw:object xlink:href="./Object 111" xlink:type="simple" xlink:show="embed" xlink:actuate="onLoad"/><draw:image xlink:href="./ObjectReplacements/Object 111" xlink:type="simple" xlink:show="embed" xlink:actuate="onLoad"/></draw:frame><text:span text:style-name="Internet_20_link"><text:span text:style-name="T95">)</text:span></text:span><text:span text:style-name="Internet_20_link"><text:span text:style-name="T94"> и матрицы отражения</text:span></text:span><text:span text:style-name="Internet_20_link"><text:span text:style-name="T95"> H (</text:span></text:span><draw:frame draw:style-name="fr1" draw:name="Объект112" text:anchor-type="as-char" svg:width="2.159cm" svg:height="1.124cm" draw:z-index="128"><draw:object xlink:href="./Object 112" xlink:type="simple" xlink:show="embed" xlink:actuate="onLoad"/><draw:image xlink:href="./ObjectReplacements/Object 112" xlink:type="simple" xlink:show="embed" xlink:actuate="onLoad"/></draw:frame><text:span text:style-name="Internet_20_link"><text:span text:style-name="T95">)</text:span></text:span><text:span text:style-name="Internet_20_link"><text:span text:style-name="T94"> воспользоваться прагмой</text:span></text:span><text:span text:style-name="Internet_20_link"><text:span text:style-name="T95"> OpenMP</text:span></text:span><text:span text:style-name="Internet_20_link"><text:span text:style-name="T94"> для расспараллеливания циклов</text:span></text:span><text:span text:style-name="Internet_20_link"><text:span text:style-name="T96"> </text:span></text:span><text:span text:style-name="Internet_20_link"><text:span text:style-name="T97">#pragma omp parallel for</text:span></text:span><text:span text:style-name="Internet_20_link"><text:span text:style-name="T94"> с параметром </text:span></text:span><text:span text:style-name="Internet_20_link"><text:span text:style-name="T97">num_threads(thread_num)</text:span></text:span><text:span text:style-name="Internet_20_link"><text:span text:style-name="T94">, который можно менять для удобства замеров времени.</text:span></text:span></text:p>
        </text:list-item>
        <text:list-item>
          <text:p text:style-name="P56"><text:span text:style-name="Internet_20_link"><text:span text:style-name="T94">Для подсчёта суммы квадратов по столбцу в рамках расчёта </text:span></text:span><text:span text:style-name="Internet_20_link"><text:span text:style-name="T98">β</text:span></text:span><text:span text:style-name="Internet_20_link"><text:span text:style-name="T94"> (</text:span></text:span><draw:frame draw:style-name="fr1" draw:name="Объект113" text:anchor-type="as-char" svg:width="3.896cm" svg:height="1.235cm" draw:z-index="129"><draw:object xlink:href="./Object 113" xlink:type="simple" xlink:show="embed" xlink:actuate="onLoad"/><draw:image xlink:href="./ObjectReplacements/Object 113" xlink:type="simple" xlink:show="embed" xlink:actuate="onLoad"/></draw:frame><text:span text:style-name="Internet_20_link"><text:span text:style-name="T94">) воспользоваться клаузой для прагмы параллельного вычисления циклов</text:span></text:span><text:span text:style-name="Internet_20_link"><text:span text:style-name="T99"> reduction</text:span></text:span><text:span text:style-name="Internet_20_link"><text:span text:style-name="T100">(+:sum)</text:span></text:span><text:span text:style-name="Internet_20_link"><text:span text:style-name="T101">.</text:span></text:span></text:p>
        </text:list-item>
      </text:list>
      <text:p text:style-name="_30_3_5f_Текст_20_ИТММ"><text:span text:style-name="Internet_20_link"><text:span text:style-name="T92">Замеры для типа данных</text:span></text:span><text:span text:style-name="Internet_20_link"><text:span text:style-name="T93"> double (</text:span></text:span><text:span text:style-name="Internet_20_link"><text:span text:style-name="T101">вещественное число двойной точности) на разном количестве потоков</text:span></text:span><text:span text:style-name="Internet_20_link"><text:span text:style-name="T93"> д</text:span></text:span><text:span text:style-name="Internet_20_link"><text:span text:style-name="T101">али</text:span></text:span><text:span text:style-name="Internet_20_link"><text:span text:style-name="T92"> следующие результаты:</text:span></text:span></text:p>
      <text:p text:style-name="_30_3_5f_Текст_20_ИТММ"><draw:frame draw:style-name="fr3" draw:name="Объект144" text:anchor-type="char" svg:y="0.718cm" svg:width="17.858cm" svg:height="11.8cm" draw:z-index="8"><draw:object xlink:href="./Object 115" xlink:type="simple" xlink:show="embed" xlink:actuate="onLoad"/><draw:image xlink:href="./ObjectReplacements/Object 115" xlink:type="simple" xlink:show="embed" xlink:actuate="onLoad"/></draw:frame><text:span text:style-name="T19">Схема </text:span>1 – Замеры времени работы программы на разных размерах матрицы <text:span text:style-name="T18">A</text:span></text:p>
      <text:p text:style-name="_30_3_5f_Текст_20_ИТММ"><text:soft-page-break/><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_30_5_5f_Таблица_20_ИТММ">Таблица 1 – Данные об ускорении для первой реализации <text:line-break/><text:span text:style-name="T18">QR-</text:span><text:span text:style-name="T19">разложения с помощью отражений Хаусхолдера в зависимости</text:span> от количества потоков</text:p>
      <table:table table:name="Таблица1" table:style-name="Таблица1">
        <table:table-column table:style-name="Таблица1.A" table:number-columns-repeated="5"/>
        <table:table-row table:style-name="Таблица1.1">
          <table:table-cell table:style-name="Таблица1.A1" table:number-rows-spanned="2" office:value-type="string">
            <text:p text:style-name="P57" loext:marker-style-name="T102"><text:span text:style-name="T102">Размер данных, </text:span><text:span text:style-name="T103">NxN</text:span></text:p>
          </table:table-cell>
          <table:table-cell table:style-name="Таблица1.A1" table:number-rows-spanned="2" office:value-type="string">
            <text:p text:style-name="P57" loext:marker-style-name="T102"><text:span text:style-name="T102">Время работы последовательной версии</text:span><text:span text:style-name="T102"/></text:p>
          </table:table-cell>
          <table:table-cell table:style-name="Таблица1.C1" table:number-columns-spanned="3" office:value-type="string">
            <text:p text:style-name="P57" loext:marker-style-name="T102"><text:span text:style-name="T102">Ускорение относительно последовательной версии</text:span><text:span text:style-name="T102"/></text:p>
          </table:table-cell>
          <table:covered-table-cell/>
          <table:covered-table-cell/>
        </table:table-row>
        <table:table-row table:style-name="Таблица1.1">
          <table:covered-table-cell table:style-name="Таблица1.A2"/>
          <table:covered-table-cell table:style-name="Таблица1.A2"/>
          <table:table-cell table:style-name="Таблица1.A2" office:value-type="string">
            <text:p text:style-name="P57" loext:marker-style-name="T102"><text:span text:style-name="T102">2 потока</text:span><text:span text:style-name="T102"/></text:p>
          </table:table-cell>
          <table:table-cell table:style-name="Таблица1.A2" office:value-type="string">
            <text:p text:style-name="P57" loext:marker-style-name="T102"><text:span text:style-name="T102">4 потока</text:span><text:span text:style-name="T102"/></text:p>
          </table:table-cell>
          <table:table-cell table:style-name="Таблица1.E2" office:value-type="string">
            <text:p text:style-name="P57" loext:marker-style-name="T102"><text:span text:style-name="T102">8 потоков</text:span><text:span text:style-name="T102"/></text:p>
          </table:table-cell>
        </table:table-row>
        <table:table-row table:style-name="Таблица1.1">
          <table:table-cell table:style-name="Таблица1.E2" office:value-type="string">
            <text:p text:style-name="P58"><text:span text:style-name="Internet_20_link"><text:span text:style-name="T104">100</text:span></text:span></text:p>
          </table:table-cell>
          <table:table-cell table:style-name="Таблица1.A2" office:value-type="string">
            <text:p text:style-name="P59"><text:span text:style-name="Internet_20_link"><text:span text:style-name="T105">0,154983</text:span></text:span></text:p>
          </table:table-cell>
          <table:table-cell table:style-name="Таблица1.A2" office:value-type="string">
            <text:p text:style-name="P59"><text:span text:style-name="Internet_20_link"><text:span text:style-name="T105">1,6</text:span></text:span></text:p>
          </table:table-cell>
          <table:table-cell table:style-name="Таблица1.A2" office:value-type="string">
            <text:p text:style-name="P59"><text:span text:style-name="Internet_20_link"><text:span text:style-name="T105">2,19</text:span></text:span></text:p>
          </table:table-cell>
          <table:table-cell table:style-name="Таблица1.E2" office:value-type="string">
            <text:p text:style-name="P59"><text:span text:style-name="Internet_20_link"><text:span text:style-name="T105">3,17</text:span></text:span></text:p>
          </table:table-cell>
        </table:table-row>
        <table:table-row table:style-name="Таблица1.1">
          <table:table-cell table:style-name="Таблица1.E2" office:value-type="string">
            <text:p text:style-name="P58"><text:span text:style-name="Internet_20_link"><text:span text:style-name="T104">200</text:span></text:span></text:p>
          </table:table-cell>
          <table:table-cell table:style-name="Таблица1.A2" office:value-type="string">
            <text:p text:style-name="P59"><text:span text:style-name="Internet_20_link"><text:span text:style-name="T105">2,53974</text:span></text:span></text:p>
          </table:table-cell>
          <table:table-cell table:style-name="Таблица1.A2" office:value-type="string">
            <text:p text:style-name="P59"><text:span text:style-name="Internet_20_link"><text:span text:style-name="T105">1,79</text:span></text:span></text:p>
          </table:table-cell>
          <table:table-cell table:style-name="Таблица1.A2" office:value-type="string">
            <text:p text:style-name="P59"><text:span text:style-name="Internet_20_link"><text:span text:style-name="T105">2,55</text:span></text:span></text:p>
          </table:table-cell>
          <table:table-cell table:style-name="Таблица1.E2" office:value-type="string">
            <text:p text:style-name="P59"><text:span text:style-name="Internet_20_link"><text:span text:style-name="T105">4,3</text:span></text:span></text:p>
          </table:table-cell>
        </table:table-row>
        <table:table-row table:style-name="Таблица1.1">
          <table:table-cell table:style-name="Таблица1.E2" office:value-type="string">
            <text:p text:style-name="P58"><text:span text:style-name="Internet_20_link"><text:span text:style-name="T104">300</text:span></text:span></text:p>
          </table:table-cell>
          <table:table-cell table:style-name="Таблица1.A2" office:value-type="string">
            <text:p text:style-name="P59"><text:span text:style-name="Internet_20_link"><text:span text:style-name="T105">11,855</text:span></text:span></text:p>
          </table:table-cell>
          <table:table-cell table:style-name="Таблица1.A2" office:value-type="string">
            <text:p text:style-name="P59"><text:span text:style-name="Internet_20_link"><text:span text:style-name="T105">1,86</text:span></text:span></text:p>
          </table:table-cell>
          <table:table-cell table:style-name="Таблица1.A2" office:value-type="string">
            <text:p text:style-name="P59"><text:span text:style-name="Internet_20_link"><text:span text:style-name="T105">2,49</text:span></text:span></text:p>
          </table:table-cell>
          <table:table-cell table:style-name="Таблица1.E2" office:value-type="string">
            <text:p text:style-name="P59"><text:span text:style-name="Internet_20_link"><text:span text:style-name="T105">3,99</text:span></text:span></text:p>
          </table:table-cell>
        </table:table-row>
        <table:table-row table:style-name="Таблица1.1">
          <table:table-cell table:style-name="Таблица1.E2" office:value-type="string">
            <text:p text:style-name="P58"><text:span text:style-name="Internet_20_link"><text:span text:style-name="T104">400</text:span></text:span></text:p>
          </table:table-cell>
          <table:table-cell table:style-name="Таблица1.A2" office:value-type="string">
            <text:p text:style-name="P59"><text:span text:style-name="Internet_20_link"><text:span text:style-name="T105">36,759</text:span></text:span></text:p>
          </table:table-cell>
          <table:table-cell table:style-name="Таблица1.A2" office:value-type="string">
            <text:p text:style-name="P59"><text:span text:style-name="Internet_20_link"><text:span text:style-name="T105">1,93</text:span></text:span></text:p>
          </table:table-cell>
          <table:table-cell table:style-name="Таблица1.A2" office:value-type="string">
            <text:p text:style-name="P59"><text:span text:style-name="Internet_20_link"><text:span text:style-name="T105">3,05</text:span></text:span></text:p>
          </table:table-cell>
          <table:table-cell table:style-name="Таблица1.E2" office:value-type="string">
            <text:p text:style-name="P59"><text:span text:style-name="Internet_20_link"><text:span text:style-name="T105">3,93</text:span></text:span></text:p>
          </table:table-cell>
        </table:table-row>
        <table:table-row table:style-name="Таблица1.1">
          <table:table-cell table:style-name="Таблица1.E2" office:value-type="string">
            <text:p text:style-name="P58"><text:span text:style-name="Internet_20_link"><text:span text:style-name="T104">500</text:span></text:span></text:p>
          </table:table-cell>
          <table:table-cell table:style-name="Таблица1.A2" office:value-type="string">
            <text:p text:style-name="P59"><text:span text:style-name="Internet_20_link"><text:span text:style-name="T105">100,427</text:span></text:span></text:p>
          </table:table-cell>
          <table:table-cell table:style-name="Таблица1.A2" office:value-type="string">
            <text:p text:style-name="P59"><text:span text:style-name="Internet_20_link"><text:span text:style-name="T105">1,93</text:span></text:span></text:p>
          </table:table-cell>
          <table:table-cell table:style-name="Таблица1.A2" office:value-type="string">
            <text:p text:style-name="P59"><text:span text:style-name="Internet_20_link"><text:span text:style-name="T105">3,14</text:span></text:span></text:p>
          </table:table-cell>
          <table:table-cell table:style-name="Таблица1.E2" office:value-type="string">
            <text:p text:style-name="P59"><text:span text:style-name="Internet_20_link"><text:span text:style-name="T105">4,18</text:span></text:span></text:p>
          </table:table-cell>
        </table:table-row>
        <table:table-row table:style-name="Таблица1.1">
          <table:table-cell table:style-name="Таблица1.E2" office:value-type="string">
            <text:p text:style-name="P58"><text:span text:style-name="Internet_20_link"><text:span text:style-name="T104">600</text:span></text:span></text:p>
          </table:table-cell>
          <table:table-cell table:style-name="Таблица1.A2" office:value-type="string">
            <text:p text:style-name="P59"><text:span text:style-name="Internet_20_link"><text:span text:style-name="T105">210,789</text:span></text:span></text:p>
          </table:table-cell>
          <table:table-cell table:style-name="Таблица1.A2" office:value-type="string">
            <text:p text:style-name="P59"><text:span text:style-name="Internet_20_link"><text:span text:style-name="T105">1,89</text:span></text:span></text:p>
          </table:table-cell>
          <table:table-cell table:style-name="Таблица1.A2" office:value-type="string">
            <text:p text:style-name="P59"><text:span text:style-name="Internet_20_link"><text:span text:style-name="T105">2,64</text:span></text:span></text:p>
          </table:table-cell>
          <table:table-cell table:style-name="Таблица1.E2" office:value-type="string">
            <text:p text:style-name="P59"><text:span text:style-name="Internet_20_link"><text:span text:style-name="T105">3,9</text:span></text:span></text:p>
          </table:table-cell>
        </table:table-row>
        <table:table-row table:style-name="Таблица1.1">
          <table:table-cell table:style-name="Таблица1.E2" office:value-type="string">
            <text:p text:style-name="P58"><text:span text:style-name="Internet_20_link"><text:span text:style-name="T104">700</text:span></text:span></text:p>
          </table:table-cell>
          <table:table-cell table:style-name="Таблица1.A2" office:value-type="string">
            <text:p text:style-name="P59"><text:span text:style-name="Internet_20_link"><text:span text:style-name="T105">≈ 410</text:span></text:span></text:p>
          </table:table-cell>
          <table:table-cell table:style-name="Таблица1.A2" office:value-type="string">
            <text:p text:style-name="P59"><text:span text:style-name="Internet_20_link"><text:span text:style-name="T105">1,97</text:span></text:span></text:p>
          </table:table-cell>
          <table:table-cell table:style-name="Таблица1.A2" office:value-type="string">
            <text:p text:style-name="P59"><text:span text:style-name="Internet_20_link"><text:span text:style-name="T105">2,93</text:span></text:span></text:p>
          </table:table-cell>
          <table:table-cell table:style-name="Таблица1.E2" office:value-type="string">
            <text:p text:style-name="P59"><text:span text:style-name="Internet_20_link"><text:span text:style-name="T105">4,19</text:span></text:span></text:p>
          </table:table-cell>
        </table:table-row>
        <table:table-row table:style-name="Таблица1.1">
          <table:table-cell table:style-name="Таблица1.E2" office:value-type="string">
            <text:p text:style-name="P58"><text:span text:style-name="Internet_20_link"><text:span text:style-name="T104">800</text:span></text:span></text:p>
          </table:table-cell>
          <table:table-cell table:style-name="Таблица1.A2" office:value-type="string">
            <text:p text:style-name="P59"><text:span text:style-name="Internet_20_link"><text:span text:style-name="T105">≈ 720</text:span></text:span></text:p>
          </table:table-cell>
          <table:table-cell table:style-name="Таблица1.A2" office:value-type="string">
            <text:p text:style-name="P59"><text:span text:style-name="Internet_20_link"><text:span text:style-name="T105">1,97</text:span></text:span></text:p>
          </table:table-cell>
          <table:table-cell table:style-name="Таблица1.A2" office:value-type="string">
            <text:p text:style-name="P59"><text:span text:style-name="Internet_20_link"><text:span text:style-name="T105">2,94</text:span></text:span></text:p>
          </table:table-cell>
          <table:table-cell table:style-name="Таблица1.E2" office:value-type="string">
            <text:p text:style-name="P59"><text:span text:style-name="Internet_20_link"><text:span text:style-name="T105">4,11</text:span></text:span></text:p>
          </table:table-cell>
        </table:table-row>
        <table:table-row table:style-name="Таблица1.1">
          <table:table-cell table:style-name="Таблица1.E2" office:value-type="string">
            <text:p text:style-name="P58"><text:span text:style-name="Internet_20_link"><text:span text:style-name="T104">900</text:span></text:span></text:p>
          </table:table-cell>
          <table:table-cell table:style-name="Таблица1.A2" office:value-type="string">
            <text:p text:style-name="P59"><text:span text:style-name="Internet_20_link"><text:span text:style-name="T105">≈ 1190</text:span></text:span></text:p>
          </table:table-cell>
          <table:table-cell table:style-name="Таблица1.A2" office:value-type="string">
            <text:p text:style-name="P59"><text:span text:style-name="Internet_20_link"><text:span text:style-name="T105">1,98</text:span></text:span></text:p>
          </table:table-cell>
          <table:table-cell table:style-name="Таблица1.A2" office:value-type="string">
            <text:p text:style-name="P59"><text:span text:style-name="Internet_20_link"><text:span text:style-name="T105">2,98</text:span></text:span></text:p>
          </table:table-cell>
          <table:table-cell table:style-name="Таблица1.E2" office:value-type="string">
            <text:p text:style-name="P59"><text:span text:style-name="Internet_20_link"><text:span text:style-name="T105">3,64</text:span></text:span></text:p>
          </table:table-cell>
        </table:table-row>
        <table:table-row table:style-name="Таблица1.1">
          <table:table-cell table:style-name="Таблица1.E2" office:value-type="string">
            <text:p text:style-name="P58" loext:marker-style-name="T18"><text:span text:style-name="Internet_20_link"><text:span text:style-name="T106">1000</text:span></text:span><text:span text:style-name="T106"/></text:p>
          </table:table-cell>
          <table:table-cell table:style-name="Таблица1.A2" office:value-type="string">
            <text:p text:style-name="P59"><text:span text:style-name="Internet_20_link"><text:span text:style-name="T105">≈ 1850</text:span></text:span></text:p>
          </table:table-cell>
          <table:table-cell table:style-name="Таблица1.A2" office:value-type="string">
            <text:p text:style-name="P59"><text:span text:style-name="Internet_20_link"><text:span text:style-name="T105">1,99</text:span></text:span></text:p>
          </table:table-cell>
          <table:table-cell table:style-name="Таблица1.A2" office:value-type="string">
            <text:p text:style-name="P59"><text:span text:style-name="Internet_20_link"><text:span text:style-name="T105">2,98</text:span></text:span></text:p>
          </table:table-cell>
          <table:table-cell table:style-name="Таблица1.E2" office:value-type="string">
            <text:p text:style-name="P59"><text:span text:style-name="Internet_20_link"><text:span text:style-name="T105">3,39</text:span></text:span></text:p>
          </table:table-cell>
        </table:table-row>
        <table:table-row table:style-name="Таблица1.1">
          <table:table-cell table:style-name="Таблица1.E2" office:value-type="string">
            <text:p text:style-name="P60" loext:marker-style-name="T107"><text:span text:style-name="T107">СРЕДНЕЕ ПОЛУЧЕННОЕ УСКОРЕНИЕ</text:span><text:span text:style-name="T107"/></text:p>
          </table:table-cell>
          <table:table-cell table:style-name="Таблица1.A2" office:value-type="string">
            <text:p text:style-name="P59"><text:span text:style-name="Internet_20_link"><text:span text:style-name="T108">-</text:span></text:span></text:p>
          </table:table-cell>
          <table:table-cell table:style-name="Таблица1.A2" office:value-type="string">
            <text:p text:style-name="P59"><text:span text:style-name="Internet_20_link"><text:span text:style-name="T108">1,89</text:span></text:span></text:p>
          </table:table-cell>
          <table:table-cell table:style-name="Таблица1.A2" office:value-type="string">
            <text:p text:style-name="P59"><text:span text:style-name="Internet_20_link"><text:span text:style-name="T108">2,79</text:span></text:span></text:p>
          </table:table-cell>
          <table:table-cell table:style-name="Таблица1.E2" office:value-type="string">
            <text:p text:style-name="P59"><text:span text:style-name="Internet_20_link"><text:span text:style-name="T108">3,88</text:span></text:span></text:p>
          </table:table-cell>
        </table:table-row>
      </table:table>
      <text:p text:style-name="_30_3_5f_Текст_20_ИТММ" loext:marker-style-name="T19">Видно, что для двух потоков получилось ускорить решение в два раза, в то время как для четырёх и восьми потоков дела обстоят хуже. Хорошее масштабирование для двух потоков, накладные расходы на создание и поддержание потоков минимальны. Пик ускорения достигается при N=500-800, затем наблюдается спад из-за кэш-промахов. Линейного ускорения тут добиться не получилось из-за того, что повышение накладных расходов перекрывает эффект от параллельного исполнения операций. Вероятно, все упирается в обращения к памяти — разные потоки обращаются к разным участкам, не влезающим в один кэш.<text:span text:style-name="T19"/></text:p>
      <text:p text:style-name="_30_3_5f_Текст_20_ИТММ" loext:marker-style-name="T19"><text:span text:style-name="Internet_20_link"><text:span text:style-name="T109">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10">e-12, </text:span></text:span><text:span text:style-name="Internet_20_link"><text:span text:style-name="T109">относительная — 1e-15</text:span></text:span><text:span text:style-name="Internet_20_link"><text:span text:style-name="T110">.</text:span></text:span></text:p>
      <text:p text:style-name="_30_3_5f_Текст_20_ИТММ" loext:marker-style-name="T19"><text:span text:style-name="Internet_20_link"><text:span text:style-name="T109">Реализация прикреплена в Приложении 1.</text:span></text:span><text:span text:style-name="T109"/></text:p>
      <text:p text:style-name="P26" loext:marker-style-name="T19"><text:bookmark-start text:name="__RefHeading___Toc2685_713544485"/><text:bookmark-start text:name="_Toc194842672_Копия_4"/><text:span text:style-name="T19">2.1.2 </text:span><text:bookmark-end text:name="_Toc194842672_Копия_4"/><text:span text:style-name="T19">Избавление от матричных умножений</text:span><text:bookmark-end text:name="__RefHeading___Toc2685_713544485"/><text:span text:style-name="T19"/></text:p>
      <text:p text:style-name="_30_3_5f_Текст_20_ИТММ"><text:span text:style-name="T19">Напрямую перемножать матрицы </text:span><text:span text:style-name="T18">NxN</text:span><text:span text:style-name="T19"> на каждой итерации очень неэффективно, подсчитаем перемножение </text:span><draw:frame draw:style-name="fr1" draw:name="Объект114" text:anchor-type="as-char" svg:width="1.023cm" svg:height="0.534cm" draw:z-index="130"><draw:object xlink:href="./Object 116" xlink:type="simple" xlink:show="embed" xlink:actuate="onLoad"/><draw:image xlink:href="./ObjectReplacements/Object 116" xlink:type="simple" xlink:show="embed" xlink:actuate="onLoad"/></draw:frame><text:span text:style-name="T18"><text:s/></text:span><text:span text:style-name="T19">по-другому:</text:span></text:p>
      <text:p text:style-name="P27"><draw:frame draw:style-name="fr1" draw:name="Объект115" text:anchor-type="as-char" svg:width="6.498cm" svg:height="0.656cm" draw:z-index="131"><draw:object xlink:href="./Object 117" xlink:type="simple" xlink:show="embed" xlink:actuate="onLoad"/><draw:image xlink:href="./ObjectReplacements/Object 117" xlink:type="simple" xlink:show="embed" xlink:actuate="onLoad"/></draw:frame><text:span text:style-name="T18">,</text:span></text:p>
      <text:p text:style-name="_30_3_5f_Текст_20_ИТММ"><text:span text:style-name="T19">получим более дешёвые операции над векторами и матрицей </text:span><text:span text:style-name="T18">A, </text:span><text:span text:style-name="T19">уменьшим сложность в </text:span><text:span text:style-name="T18">N </text:span><text:span text:style-name="T19">раз</text:span><text:span text:style-name="T18">.</text:span></text:p>
      <text:p text:style-name="_30_3_5f_Текст_20_ИТММ">Также вычисление<text:span text:style-name="T18"> R</text:span><text:span text:style-name="T19"> этим </text:span>способом позволяет упростить вычисление <text:span text:style-name="T18">Q. </text:span><text:span text:style-name="T19">Для неё понадобится только сохранить отдельно вектора Хаусхолдера </text:span><text:span text:style-name="T18">v</text:span><text:span text:style-name="T34">k</text:span><text:span text:style-name="T35">.</text:span><text:span text:style-name="T34"> </text:span><text:span text:style-name="T19">Вычислять </text:span><text:span text:style-name="T18">Q</text:span><text:span text:style-name="T19"> будем восстанавливая матрицы отражения из сохранённых векторов</text:span><text:span text:style-name="T18"> w, </text:span><text:span text:style-name="T19">в обратном порядке</text:span><text:span text:style-name="T35">:</text:span></text:p>
      <text:p text:style-name="P27"><draw:frame draw:style-name="fr1" draw:name="Объект116" text:anchor-type="as-char" svg:width="1.367cm" svg:height="0.534cm" draw:z-index="132"><draw:object xlink:href="./Object 118" xlink:type="simple" xlink:show="embed" xlink:actuate="onLoad"/><draw:image xlink:href="./ObjectReplacements/Object 118" xlink:type="simple" xlink:show="embed" xlink:actuate="onLoad"/></draw:frame><text:span text:style-name="T18">,</text:span></text:p>
      <text:p text:style-name="P27"><draw:frame draw:style-name="fr1" draw:name="Объект117" text:anchor-type="as-char" svg:width="8.394cm" svg:height="0.656cm" draw:z-index="133"><draw:object xlink:href="./Object 119" xlink:type="simple" xlink:show="embed" xlink:actuate="onLoad"/><draw:image xlink:href="./ObjectReplacements/Object 119" xlink:type="simple" xlink:show="embed" xlink:actuate="onLoad"/></draw:frame><text:span text:style-name="T18">,</text:span></text:p>
      <text:p text:style-name="P27"><draw:frame draw:style-name="fr1" draw:name="Объект118" text:anchor-type="as-char" svg:width="1.136cm" svg:height="0.534cm" draw:z-index="134"><draw:object xlink:href="./Object 120" xlink:type="simple" xlink:show="embed" xlink:actuate="onLoad"/><draw:image xlink:href="./ObjectReplacements/Object 120" xlink:type="simple" xlink:show="embed" xlink:actuate="onLoad"/></draw:frame></text:p>
      <text:p text:style-name="_30_3_5f_Текст_20_ИТММ"><text:span text:style-name="T36">Получим экономию памяти порядка </text:span><text:span text:style-name="T35">N </text:span><text:span text:style-name="T36">и ускорение времени больше, чем на порядок.</text:span></text:p>
      <text:p text:style-name="_30_3_5f_Текст_20_ИТММ"><text:span text:style-name="Internet_20_link"><text:span text:style-name="T111">В данной реализации используется ленточное представление матриц (в виде одномерных массивов, в которые матрицы записаны по строкам) или в виде плоского массива (одномерный массив, в который рекурсивно объединены элементы вложенных подмассивов до указанного уровня вложенности). Все вектора Хаусхолдера складываются в all_</text:span></text:span><text:span text:style-name="Internet_20_link"><text:span text:style-name="T112">v</text:span></text:span><text:span text:style-name="Internet_20_link"><text:span text:style-name="T111"> одномерный массив длины Nx(N-1) (незначащие k нулей не хранятся) для вычисления Q. Вычисление матрицы R выполняется с сохранением векторов в этот массив. Матрица Q строится обратным применением сохранённых преобразований к единичной матрице. Для ускорения вычислений используются предварительно вычисленные смещения kN и указатели на столбцы матрицы. Алгоритм использует параллелизм OpenMP только для больших матриц (N≥1000). Итоговые результаты конвертируются обратно в вектор вложенных векторов.</text:span></text:span></text:p>
      <text:p text:style-name="_30_3_5f_Текст_20_ИТММ"><text:span text:style-name="Internet_20_link"><text:span text:style-name="T30">Программная реализация с учётом описанного выше алгоритма будет следующей.</text:span></text:span><text:span text:style-name="Internet_20_link"><text:span text:style-name="T28"> Перевод данных в плоский вид. Инициализируем массив для хранения векторов Хаусхолдера. В цикле от 0 до </text:span></text:span><text:span text:style-name="Internet_20_link"><text:span text:style-name="T29">N</text:span></text:span><text:span text:style-name="Internet_20_link"><text:span text:style-name="T28">-1 подсчитываем по формулам </text:span></text:span><draw:frame draw:style-name="fr1" draw:name="Объект119" text:anchor-type="as-char" svg:width="1.817cm" svg:height="0.471cm" draw:z-index="135"><draw:object xlink:href="./Object 121" xlink:type="simple" xlink:show="embed" xlink:actuate="onLoad"/><draw:image xlink:href="./ObjectReplacements/Object 121" xlink:type="simple" xlink:show="embed" xlink:actuate="onLoad"/></draw:frame>. Д<text:span text:style-name="Internet_20_link"><text:span text:style-name="T28">омножаем </text:span></text:span><text:span text:style-name="Internet_20_link"><text:span text:style-name="T29">R</text:span></text:span><text:span text:style-name="Internet_20_link"><text:span text:style-name="T28"> на </text:span></text:span><text:span text:style-name="Internet_20_link"><text:span text:style-name="T29">H</text:span></text:span><text:span text:style-name="Internet_20_link"><text:span text:style-name="T28"> слева и получаем матрицу для следующей итерации. Сохраняем </text:span></text:span><text:span text:style-name="Internet_20_link"><text:span text:style-name="T29">v </text:span></text:span><text:span text:style-name="Internet_20_link"><text:span text:style-name="T30">в массив векторов. </text:span></text:span><text:span text:style-name="Internet_20_link"><text:span text:style-name="T28">Подсчитываем </text:span></text:span><text:span text:style-name="Internet_20_link"><text:span text:style-name="T29">Q</text:span></text:span><text:span text:style-name="Internet_20_link"><text:span text:style-name="T28"> с помощью сохранённых отражений в обратном порядке:</text:span></text:span></text:p>
      <text:p text:style-name="P52" loext:marker-style-name="T81"/>
      <text:p text:style-name="P61" loext:marker-style-name="T81"><text:span text:style-name="T81">Процедура QR_decomposition(A, Q, R):</text:span><text:span text:style-name="T81"/></text:p>
      <text:p text:style-name="P50" loext:marker-style-name="T81"><text:span text:style-name="T81">R</text:span><text:span text:style-name="T70">_flat</text:span><text:span text:style-name="T81"> = A</text:span><text:span text:style-name="T70">_flat</text:span><text:span text:style-name="T81"> </text:span><text:span text:style-name="T82">// копирование исходной матрицы в </text:span><text:span text:style-name="T83">R</text:span></text:p>
      <text:p text:style-name="P53" loext:marker-style-name="T81"><text:span text:style-name="T70">Q_flat</text:span><text:span text:style-name="T81"> = </text:span><text:span text:style-name="T70">I</text:span><text:span text:style-name="T81"> </text:span><text:span text:style-name="T82">//</text:span><text:span text:style-name="T83"> Q </text:span><text:span text:style-name="T82">инициализируется как едини</text:span><text:span text:style-name="T85">чная</text:span></text:p>
      <text:p text:style-name="P53" loext:marker-style-name="T91"><text:span text:style-name="T91">all_v = матрица Nx(N-1), инициализированная 0</text:span><text:span text:style-name="T91"/></text:p>
      <text:p text:style-name="P50" loext:marker-style-name="T84"><text:span text:style-name="T81">Для k от 0 до N-</text:span><text:span text:style-name="T70">1</text:span><text:span text:style-name="T81"> выполнить: </text:span><text:span text:style-name="T85">// цикл по столбцам</text:span></text:p>
      <text:p text:style-name="P53" loext:marker-style-name="T91"><text:span text:style-name="T91"><text:s text:c="9"/>v = </text:span><text:span text:style-name="T113">ссылка на</text:span><text:span text:style-name="T114"> </text:span><text:span text:style-name="T91">all_v[k]</text:span></text:p>
      <text:p text:style-name="P50" loext:marker-style-name="T86"><text:span text:style-name="T81"><text:s text:c="9"/></text:span><text:span text:style-name="T85">// подсчёт β из предыдущего кода</text:span></text:p>
      <text:p text:style-name="P50" loext:marker-style-name="T86"><text:span text:style-name="T81"><text:s text:c="9"/></text:span><text:span text:style-name="T85">// подсчёт μ из предыдущего кода</text:span></text:p>
      <text:p text:style-name="P50" loext:marker-style-name="T86"><text:span text:style-name="T81"><text:s text:c="7"/></text:span><text:span text:style-name="T85"><text:s text:c="2"/>// построение </text:span><text:span text:style-name="T87">v</text:span><text:span text:style-name="T85">[N] из предыдущего кода</text:span></text:p>
      <text:p text:style-name="P62" loext:marker-style-name="T88"/>
      <text:p text:style-name="P53" loext:marker-style-name="T115"><text:span text:style-name="T81"><text:s text:c="7"/></text:span><text:span text:style-name="T85"><text:s text:c="2"/></text:span><text:span text:style-name="T115">// отражение</text:span></text:p>
      <text:p text:style-name="P53"><text:span text:style-name="T89"><text:s text:c="9"/></text:span><text:span text:style-name="T85">// R - 2 * v * (v^T * R)</text:span></text:p>
      <text:p text:style-name="P53"><text:span text:style-name="T116"><text:s text:c="9"/></text:span><text:span text:style-name="T85">// предварительно вычисляем 2*v^TR для каждого столбца</text:span></text:p>
      <text:p text:style-name="P53" loext:marker-style-name="T84"><text:span text:style-name="T85"><text:s text:c="9"/></text:span><text:span text:style-name="T91">_2vTR = вектор(</text:span><text:span text:style-name="T81">длина</text:span><text:span text:style-name="T70">(v)</text:span><text:span text:style-name="T91">)</text:span></text:p>
      <text:p text:style-name="P53" loext:marker-style-name="T84"><text:span text:style-name="T91"><text:s text:c="9"/>Для j от k до N-1 вып</text:span><text:span text:style-name="T81">олнить:</text:span></text:p>
      <text:p text:style-name="P50" loext:marker-style-name="T88"><text:span text:style-name="T81"><text:s text:c="12"/></text:span><text:span text:style-name="T70">vTR = 0</text:span></text:p>
      <text:p text:style-name="P50" loext:marker-style-name="T84"><text:span text:style-name="T81"><text:s text:c="12"/>Для </text:span><text:span text:style-name="T70">i </text:span><text:span text:style-name="T81">от </text:span><text:span text:style-name="T70">0</text:span><text:span text:style-name="T81"> до длина</text:span><text:span text:style-name="T70">(v)</text:span><text:span text:style-name="T81"> выполнить:</text:span></text:p>
      <text:p text:style-name="P50" loext:marker-style-name="T88"><text:span text:style-name="T81"><text:s text:c="15"/></text:span><text:span text:style-name="T70">vTR = vTR + v[i] </text:span><text:span text:style-name="T81">* </text:span><text:span text:style-name="T70">R_flat[i*N + j]</text:span></text:p>
      <text:p text:style-name="P50" loext:marker-style-name="T88"><text:span text:style-name="T81"><text:s text:c="12"/>Конец цикла</text:span><text:span text:style-name="T70"/></text:p>
      <text:p text:style-name="P50" loext:marker-style-name="T88"><text:span text:style-name="T70"><text:s text:c="12"/></text:span><text:span text:style-name="T90">_2vTR[j-k] = 2 * vTR</text:span></text:p>
      <text:p text:style-name="P50" loext:marker-style-name="T88"><text:span text:style-name="T89"><text:s text:c="9"/>Конец цикла</text:span><text:span text:style-name="T90"/></text:p>
      <text:p text:style-name="P63" loext:marker-style-name="T115"/>
      <text:p text:style-name="P53" loext:marker-style-name="T115"><text:span text:style-name="T115"><text:s text:c="9"/>// обновление R</text:span><text:span text:style-name="T115"/></text:p>
      <text:p text:style-name="P53" loext:marker-style-name="T115"><text:span text:style-name="T115"><text:s text:c="9"/>// R - v * 2v^TR</text:span><text:span text:style-name="T115"/></text:p>
      <text:p text:style-name="P53" loext:marker-style-name="T84"><text:span text:style-name="T117"><text:s text:c="9"/>Для j от k до N-1 вып</text:span><text:span text:style-name="T118">олнить:</text:span></text:p>
      <text:p text:style-name="P53" loext:marker-style-name="T117"><text:span text:style-name="T117"><text:s text:c="12"/>Для </text:span><text:span text:style-name="T119">i</text:span><text:span text:style-name="T117"> от </text:span><text:span text:style-name="T119">0</text:span><text:span text:style-name="T117"> до</text:span><text:span text:style-name="T120"> длина(</text:span><text:span text:style-name="T119">v)</text:span><text:span text:style-name="T120"> </text:span><text:span text:style-name="T117">вып</text:span><text:span text:style-name="T118">олнить:</text:span></text:p>
      <text:p text:style-name="P53" loext:marker-style-name="T81"><text:span text:style-name="T117"><text:s text:c="15"/></text:span><text:span text:style-name="T119">R_flat[i*N + j] = R_flat[i*N + j] – v[i] * _2vTR[j - k]</text:span></text:p>
      <text:p text:style-name="P53" loext:marker-style-name="T81"><text:span text:style-name="T81"><text:s text:c="12"/>Конец цикла</text:span><text:span text:style-name="T81"/></text:p>
      <text:p text:style-name="P53" loext:marker-style-name="T81"><text:span text:style-name="T81"><text:s text:c="9"/>Конец цикла</text:span><text:span text:style-name="T81"/></text:p>
      <text:p text:style-name="P53" loext:marker-style-name="T91"><text:span text:style-name="T91">Конец цикла</text:span><text:span text:style-name="T91"/></text:p>
      <text:p text:style-name="P52" loext:marker-style-name="T81"/>
      <text:p text:style-name="P64" loext:marker-style-name="T86"/>
      <text:p text:style-name="P61" loext:marker-style-name="T86"><text:span text:style-name="T121">/</text:span><text:span text:style-name="T115">/ вычисление Q</text:span></text:p>
      <text:p text:style-name="P53" loext:marker-style-name="T115"><text:span text:style-name="T115">// начать с </text:span><text:span text:style-name="T83">Q</text:span><text:span text:style-name="T122">N</text:span><text:span text:style-name="T123">-1</text:span><text:span text:style-name="T115"> = H</text:span><text:span text:style-name="T123">N-2</text:span><text:span text:style-name="T115"> * I = I - 2 * v</text:span><text:span text:style-name="T123">N-2</text:span><text:span text:style-name="T115"> * (v</text:span><text:span text:style-name="T123">N-2</text:span><text:span text:style-name="T115">^T * I) и домножать слева на матрицы отражения</text:span></text:p>
      <text:p text:style-name="P53" loext:marker-style-name="T115"><text:span text:style-name="T115">// Q = H</text:span><text:span text:style-name="T123">1</text:span><text:span text:style-name="T115"> * ... * </text:span><text:span text:style-name="T83">(</text:span><text:span text:style-name="T115">H</text:span><text:span text:style-name="T123">k</text:span><text:span text:style-name="T115"> * Q</text:span><text:span text:style-name="T123">k-</text:span><text:span text:style-name="T122">1</text:span><text:span text:style-name="T115">) = </text:span><text:span text:style-name="T83">H</text:span><text:span text:style-name="T122">1</text:span><text:span text:style-name="T115"> * ... * (Q</text:span><text:span text:style-name="T123">k-1</text:span><text:span text:style-name="T115"> - 2 * v</text:span><text:span text:style-name="T123">k</text:span><text:span text:style-name="T115"> * (v</text:span><text:span text:style-name="T123">k</text:span><text:span text:style-name="T115">^T * Q</text:span><text:span text:style-name="T123">k-1</text:span><text:span text:style-name="T115">)</text:span></text:p>
      <text:p text:style-name="P50" loext:marker-style-name="T84"><text:span text:style-name="T89">Для k от </text:span><text:span text:style-name="T90">N-2</text:span><text:span text:style-name="T89"> до </text:span><text:span text:style-name="T90">0</text:span><text:span text:style-name="T89"> выполнить:</text:span></text:p>
      <text:p text:style-name="P50" loext:marker-style-name="T88"><text:span text:style-name="T89"><text:s text:c="3"/></text:span><text:span text:style-name="T90">v = </text:span><text:span text:style-name="T89">ссылка на </text:span><text:span text:style-name="T90">all_v[k]</text:span></text:p>
      <text:p text:style-name="P53" loext:marker-style-name="T115"><text:span text:style-name="T115"><text:s text:c="3"/>// 2v^TQ параллельно по столбцам</text:span><text:span text:style-name="T115"/></text:p>
      <text:p text:style-name="P53" loext:marker-style-name="T114"><text:span text:style-name="T114"><text:s text:c="3"/>_2vTQ = вектор(N) инициализированный 0</text:span><text:span text:style-name="T114"/></text:p>
      <text:p text:style-name="P53" loext:marker-style-name="T114"><text:span text:style-name="T114"><text:s text:c="3"/>Для j от 0 до N-1 выполнить:</text:span><text:span text:style-name="T114"/></text:p>
      <text:p text:style-name="P50" loext:marker-style-name="T88"><text:span text:style-name="T116"><text:s text:c="6"/></text:span><text:span text:style-name="T124">sum = 0</text:span></text:p>
      <text:p text:style-name="P50" loext:marker-style-name="T88"><text:span text:style-name="T124"><text:s text:c="6"/></text:span><text:span text:style-name="T116">Для</text:span><text:span text:style-name="T124"> i </text:span><text:span text:style-name="T116">от 0 до длина(</text:span><text:span text:style-name="T124">V)</text:span><text:span text:style-name="T116"> выполнить:</text:span></text:p>
      <text:p text:style-name="P50" loext:marker-style-name="T88"><text:span text:style-name="T116"><text:s text:c="9"/></text:span><text:span text:style-name="T124">sum = sum + v[i] * Q_flat[(k + I) * N + j]</text:span></text:p>
      <text:p text:style-name="P50" loext:marker-style-name="T88"><text:span text:style-name="T124"><text:s text:c="6"/>Конец цикла</text:span><text:span text:style-name="T124"/></text:p>
      <text:p text:style-name="P50" loext:marker-style-name="T88"><text:span text:style-name="T124"><text:s text:c="6"/>_2vTQ </text:span><text:span text:style-name="T116">= 2 * </text:span><text:span text:style-name="T124">sum</text:span></text:p>
      <text:p text:style-name="P50" loext:marker-style-name="T88"><text:span text:style-name="T116"><text:s text:c="3"/>Конец цикла</text:span><text:span text:style-name="T124"/></text:p>
      <text:p text:style-name="P62" loext:marker-style-name="T88"/>
      <text:p text:style-name="P53" loext:marker-style-name="T115"><text:span text:style-name="T115"><text:s text:c="3"/>// Q - v * 2v^TQ параллельно по строкам</text:span><text:span text:style-name="T115"/></text:p>
      <text:p text:style-name="P50" loext:marker-style-name="T88"><text:span text:style-name="T116"><text:s text:c="3"/>Для</text:span><text:span text:style-name="T124"> i </text:span><text:span text:style-name="T116">от 0 до длина(</text:span><text:span text:style-name="T124">V)</text:span><text:span text:style-name="T116"> выполнить:</text:span></text:p>
      <text:p text:style-name="P50" loext:marker-style-name="T88"><text:span text:style-name="T116"><text:s text:c="6"/>Для</text:span><text:span text:style-name="T124"> j </text:span><text:span text:style-name="T116">от 0 до </text:span><text:span text:style-name="T124">N-1</text:span><text:span text:style-name="T116"> выполнить:</text:span></text:p>
      <text:p text:style-name="P50" loext:marker-style-name="T88"><text:span text:style-name="T116"><text:s text:c="9"/></text:span><text:span text:style-name="T124">Q_flat[(k + I) * N + j] = Q_flat[(k + I) * N + j] – v[i] *_2vTQ[j]</text:span></text:p>
      <text:p text:style-name="P50" loext:marker-style-name="T88"><text:span text:style-name="T116"><text:s text:c="6"/>Конец цикла</text:span><text:span text:style-name="T124"/></text:p>
      <text:p text:style-name="P53" loext:marker-style-name="T91"><text:span text:style-name="T91"><text:s text:c="3"/>Конец цикла</text:span><text:span text:style-name="T91"/></text:p>
      <text:p text:style-name="P53" loext:marker-style-name="T91"><text:span text:style-name="T91">Конец цикла</text:span><text:span text:style-name="T91"/></text:p>
      <text:p text:style-name="P53" loext:marker-style-name="T91"><text:span text:style-name="T114">R = R_flat</text:span><text:span text:style-name="T114"/></text:p>
      <text:p text:style-name="P53" loext:marker-style-name="T91"><text:span text:style-name="T91">Q</text:span><text:span text:style-name="T114"> = Q_flat</text:span></text:p>
      <text:p text:style-name="P50" loext:marker-style-name="T81"><text:span text:style-name="Internet_20_link"><text:span text:style-name="T125">Конец процедуры</text:span></text:span><text:span text:style-name="T125"/></text:p>
      <text:p text:style-name="_30_3_5f_Текст_20_ИТММ"><text:span text:style-name="Internet_20_link"><text:span text:style-name="T68">Использовани</text:span></text:span><text:span text:style-name="Internet_20_link"><text:span text:style-name="T126">е</text:span></text:span><text:span text:style-name="Internet_20_link"><text:span text:style-name="T68"> параллелизма</text:span></text:span><text:span text:style-name="Internet_20_link"><text:span text:style-name="T109">:</text:span></text:span></text:p>
      <text:list xml:id="list4442573608669" text:continue-numbering="true" text:style-name="WWNum19">
        <text:list-item>
          <text:p text:style-name="P56"><text:span text:style-name="Internet_20_link"><text:span text:style-name="T68">при вычислении </text:span></text:span><draw:frame draw:style-name="fr1" draw:name="Объект120" text:anchor-type="as-char" svg:width="0.707cm" svg:height="0.471cm" draw:z-index="136"><draw:object xlink:href="./Object 122" xlink:type="simple" xlink:show="embed" xlink:actuate="onLoad"/><draw:image xlink:href="./ObjectReplacements/Object 122" xlink:type="simple" xlink:show="embed" xlink:actuate="onLoad"/></draw:frame><text:span text:style-name="Internet_20_link"><text:span text:style-name="T68"><text:s/></text:span></text:span><text:span text:style-name="Internet_20_link"><text:span text:style-name="T109">и </text:span></text:span><text:span text:style-name="Internet_20_link"><text:span text:style-name="T68">вектора Хаусхолдера в цикле с помощью </text:span></text:span><text:span text:style-name="Internet_20_link"><text:span text:style-name="T97">#pragma omp parallel for <text:s/></text:span></text:span><text:span text:style-name="Internet_20_link"><text:span text:style-name="T94">и с редукцией при суммировании элементов: </text:span></text:span><text:span text:style-name="Internet_20_link"><text:span text:style-name="T99">reduction</text:span></text:span><text:span text:style-name="Internet_20_link"><text:span text:style-name="T100">(+:sum)</text:span></text:span></text:p>
        </text:list-item>
        <text:list-item>
          <text:p text:style-name="P56"><text:span text:style-name="Internet_20_link"><text:span text:style-name="T94">отражение в цикле по строкам при вычислении </text:span></text:span><text:span text:style-name="Internet_20_link"><text:span text:style-name="T95">R </text:span></text:span><text:span text:style-name="Internet_20_link"><text:span text:style-name="T94">и </text:span></text:span><text:span text:style-name="Internet_20_link"><text:span text:style-name="T95">Q </text:span></text:span><text:span text:style-name="Internet_20_link"><text:span text:style-name="T94">можно также выполнять параллельно.</text:span></text:span></text:p>
        </text:list-item>
      </text:list>
      <text:p text:style-name="_30_3_5f_Текст_20_ИТММ"><text:span text:style-name="Internet_20_link"><text:span text:style-name="T92">Замеры для типа данных</text:span></text:span><text:span text:style-name="Internet_20_link"><text:span text:style-name="T93"> double (</text:span></text:span><text:span text:style-name="Internet_20_link"><text:span text:style-name="T101">вещественное число двойной точности) на разном количестве потоков</text:span></text:span><text:span text:style-name="Internet_20_link"><text:span text:style-name="T93"> д</text:span></text:span><text:span text:style-name="Internet_20_link"><text:span text:style-name="T101">али</text:span></text:span><text:span text:style-name="Internet_20_link"><text:span text:style-name="T92"> следующие результаты:</text:span></text:span></text:p>
      <text:p text:style-name="P65" loext:marker-style-name="T19"/>
      <text:p text:style-name="P66"><text:span text:style-name="T19">Схема 2</text:span> – Замеры времени работы программы на разных размерах матрицы</text:p>
      <text:p text:style-name="P67"><draw:frame draw:style-name="fr4" draw:name="Объект155" text:anchor-type="as-char" svg:width="16.155cm" svg:height="20.165cm" draw:z-index="10"><draw:object xlink:href="./Object 124" xlink:type="simple" xlink:show="embed" xlink:actuate="onLoad"/><draw:image xlink:href="./ObjectReplacements/Object 124" xlink:type="simple" xlink:show="embed" xlink:actuate="onLoad"/><svg:desc>диаграмма</svg:desc></draw:frame></text:p>
      <text:p text:style-name="P68"><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69"><text:span text:style-name="Internet_20_link"><text:span text:style-name="T68"/></text:span></text:p>
      <text:p text:style-name="_30_5_5f_Таблица_20_ИТММ">Таблица 2 – Данные об ускорении для второй реализации <text:line-break/><text:span text:style-name="T18">QR-</text:span><text:span text:style-name="T19">разложения с помощью отражений Хаусхолдера в зависимости</text:span> от количества потоков</text:p>
      <table:table table:name="Таблица2" table:style-name="Таблица2">
        <table:table-column table:style-name="Таблица2.A" table:number-columns-repeated="5"/>
        <table:table-row table:style-name="Таблица2.1">
          <table:table-cell table:style-name="Таблица2.A1" table:number-rows-spanned="2" office:value-type="string">
            <text:p text:style-name="P57" loext:marker-style-name="T102"><text:span text:style-name="T102">Размер данных, </text:span><text:span text:style-name="T103">NxN</text:span></text:p>
          </table:table-cell>
          <table:table-cell table:style-name="Таблица2.A1" table:number-rows-spanned="2" office:value-type="string">
            <text:p text:style-name="P57" loext:marker-style-name="T102"><text:span text:style-name="T102">Время работы последовательной версии</text:span><text:span text:style-name="T102"/></text:p>
          </table:table-cell>
          <table:table-cell table:style-name="Таблица2.C1" table:number-columns-spanned="3" office:value-type="string">
            <text:p text:style-name="P57" loext:marker-style-name="T102"><text:span text:style-name="T102">Ускорение относительно последовательной версии</text:span><text:span text:style-name="T102"/></text:p>
          </table:table-cell>
          <table:covered-table-cell/>
          <table:covered-table-cell/>
        </table:table-row>
        <table:table-row table:style-name="Таблица2.1">
          <table:covered-table-cell table:style-name="Таблица2.A2"/>
          <table:covered-table-cell table:style-name="Таблица2.A2"/>
          <table:table-cell table:style-name="Таблица2.A2" office:value-type="string">
            <text:p text:style-name="P57" loext:marker-style-name="T102"><text:span text:style-name="T102">2 потока</text:span><text:span text:style-name="T102"/></text:p>
          </table:table-cell>
          <table:table-cell table:style-name="Таблица2.A2" office:value-type="string">
            <text:p text:style-name="P57" loext:marker-style-name="T102"><text:span text:style-name="T102">4 потока</text:span><text:span text:style-name="T102"/></text:p>
          </table:table-cell>
          <table:table-cell table:style-name="Таблица2.E2" office:value-type="string">
            <text:p text:style-name="P57" loext:marker-style-name="T102"><text:span text:style-name="T102">8 потоков</text:span><text:span text:style-name="T102"/></text:p>
          </table:table-cell>
        </table:table-row>
        <table:table-row table:style-name="Таблица2.1">
          <table:table-cell table:style-name="Таблица2.E2" office:value-type="string">
            <text:p text:style-name="P58"><text:span text:style-name="Internet_20_link"><text:span text:style-name="T104">100</text:span></text:span></text:p>
          </table:table-cell>
          <table:table-cell table:style-name="Таблица2.A2" office:value-type="string">
            <text:p text:style-name="P59"><text:span text:style-name="Internet_20_link"><text:span text:style-name="T105">0,0014857</text:span></text:span></text:p>
          </table:table-cell>
          <table:table-cell table:style-name="Таблица2.A2" office:value-type="string">
            <text:p text:style-name="P59"><text:span text:style-name="Internet_20_link"><text:span text:style-name="T105">0,83</text:span></text:span></text:p>
          </table:table-cell>
          <table:table-cell table:style-name="Таблица2.A2" office:value-type="string">
            <text:p text:style-name="P59"><text:span text:style-name="Internet_20_link"><text:span text:style-name="T105">0,72</text:span></text:span></text:p>
          </table:table-cell>
          <table:table-cell table:style-name="Таблица2.E2" office:value-type="string">
            <text:p text:style-name="P59"><text:span text:style-name="Internet_20_link"><text:span text:style-name="T105">0,4</text:span></text:span></text:p>
          </table:table-cell>
        </table:table-row>
        <table:table-row table:style-name="Таблица2.1">
          <table:table-cell table:style-name="Таблица2.E2" office:value-type="string">
            <text:p text:style-name="P58"><text:span text:style-name="Internet_20_link"><text:span text:style-name="T104">200</text:span></text:span></text:p>
          </table:table-cell>
          <table:table-cell table:style-name="Таблица2.A2" office:value-type="string">
            <text:p text:style-name="P59"><text:span text:style-name="Internet_20_link"><text:span text:style-name="T105">0,0066652</text:span></text:span></text:p>
          </table:table-cell>
          <table:table-cell table:style-name="Таблица2.A2" office:value-type="string">
            <text:p text:style-name="P59"><text:span text:style-name="Internet_20_link"><text:span text:style-name="T105">0,9</text:span></text:span></text:p>
          </table:table-cell>
          <table:table-cell table:style-name="Таблица2.A2" office:value-type="string">
            <text:p text:style-name="P59"><text:span text:style-name="Internet_20_link"><text:span text:style-name="T105">1,21</text:span></text:span></text:p>
          </table:table-cell>
          <table:table-cell table:style-name="Таблица2.E2" office:value-type="string">
            <text:p text:style-name="P59"><text:span text:style-name="Internet_20_link"><text:span text:style-name="T105">0,76</text:span></text:span></text:p>
          </table:table-cell>
        </table:table-row>
        <table:table-row table:style-name="Таблица2.1">
          <table:table-cell table:style-name="Таблица2.E2" office:value-type="string">
            <text:p text:style-name="P58"><text:span text:style-name="Internet_20_link"><text:span text:style-name="T104">300</text:span></text:span></text:p>
          </table:table-cell>
          <table:table-cell table:style-name="Таблица2.A2" office:value-type="string">
            <text:p text:style-name="P59"><text:span text:style-name="Internet_20_link"><text:span text:style-name="T105">0,022568</text:span></text:span></text:p>
          </table:table-cell>
          <table:table-cell table:style-name="Таблица2.A2" office:value-type="string">
            <text:p text:style-name="P59"><text:span text:style-name="Internet_20_link"><text:span text:style-name="T105">1,14</text:span></text:span></text:p>
          </table:table-cell>
          <table:table-cell table:style-name="Таблица2.A2" office:value-type="string">
            <text:p text:style-name="P59"><text:span text:style-name="Internet_20_link"><text:span text:style-name="T105">1,38</text:span></text:span></text:p>
          </table:table-cell>
          <table:table-cell table:style-name="Таблица2.E2" office:value-type="string">
            <text:p text:style-name="P59"><text:span text:style-name="Internet_20_link"><text:span text:style-name="T105">1,17</text:span></text:span></text:p>
          </table:table-cell>
        </table:table-row>
        <table:table-row table:style-name="Таблица2.1">
          <table:table-cell table:style-name="Таблица2.E2" office:value-type="string">
            <text:p text:style-name="P58"><text:span text:style-name="Internet_20_link"><text:span text:style-name="T104">400</text:span></text:span></text:p>
          </table:table-cell>
          <table:table-cell table:style-name="Таблица2.A2" office:value-type="string">
            <text:p text:style-name="P59"><text:span text:style-name="Internet_20_link"><text:span text:style-name="T105">0,0631678</text:span></text:span></text:p>
          </table:table-cell>
          <table:table-cell table:style-name="Таблица2.A2" office:value-type="string">
            <text:p text:style-name="P59"><text:span text:style-name="Internet_20_link"><text:span text:style-name="T105">1,37</text:span></text:span></text:p>
          </table:table-cell>
          <table:table-cell table:style-name="Таблица2.A2" office:value-type="string">
            <text:p text:style-name="P59"><text:span text:style-name="Internet_20_link"><text:span text:style-name="T105">1,7</text:span></text:span></text:p>
          </table:table-cell>
          <table:table-cell table:style-name="Таблица2.E2" office:value-type="string">
            <text:p text:style-name="P59"><text:span text:style-name="Internet_20_link"><text:span text:style-name="T105">1,4</text:span></text:span></text:p>
          </table:table-cell>
        </table:table-row>
        <table:table-row table:style-name="Таблица2.1">
          <table:table-cell table:style-name="Таблица2.E2" office:value-type="string">
            <text:p text:style-name="P58"><text:span text:style-name="Internet_20_link"><text:span text:style-name="T104">500</text:span></text:span></text:p>
          </table:table-cell>
          <table:table-cell table:style-name="Таблица2.A2" office:value-type="string">
            <text:p text:style-name="P59"><text:span text:style-name="Internet_20_link"><text:span text:style-name="T105">0,106889</text:span></text:span></text:p>
          </table:table-cell>
          <table:table-cell table:style-name="Таблица2.A2" office:value-type="string">
            <text:p text:style-name="P59"><text:span text:style-name="Internet_20_link"><text:span text:style-name="T105">1,38</text:span></text:span></text:p>
          </table:table-cell>
          <table:table-cell table:style-name="Таблица2.A2" office:value-type="string">
            <text:p text:style-name="P59"><text:span text:style-name="Internet_20_link"><text:span text:style-name="T105">1,79</text:span></text:span></text:p>
          </table:table-cell>
          <table:table-cell table:style-name="Таблица2.E2" office:value-type="string">
            <text:p text:style-name="P59"><text:span text:style-name="Internet_20_link"><text:span text:style-name="T105">2,21</text:span></text:span></text:p>
          </table:table-cell>
        </table:table-row>
        <table:table-row table:style-name="Таблица2.1">
          <table:table-cell table:style-name="Таблица2.E2" office:value-type="string">
            <text:p text:style-name="P58"><text:span text:style-name="Internet_20_link"><text:span text:style-name="T104">1000</text:span></text:span></text:p>
          </table:table-cell>
          <table:table-cell table:style-name="Таблица2.A2" office:value-type="string">
            <text:p text:style-name="P59"><text:span text:style-name="Internet_20_link"><text:span text:style-name="T105">1,1182</text:span></text:span></text:p>
          </table:table-cell>
          <table:table-cell table:style-name="Таблица2.A2" office:value-type="string">
            <text:p text:style-name="P59"><text:span text:style-name="Internet_20_link"><text:span text:style-name="T105">1,87</text:span></text:span></text:p>
          </table:table-cell>
          <table:table-cell table:style-name="Таблица2.A2" office:value-type="string">
            <text:p text:style-name="P59"><text:span text:style-name="Internet_20_link"><text:span text:style-name="T105">2,57</text:span></text:span></text:p>
          </table:table-cell>
          <table:table-cell table:style-name="Таблица2.E2" office:value-type="string">
            <text:p text:style-name="P59"><text:span text:style-name="Internet_20_link"><text:span text:style-name="T105">2,27</text:span></text:span></text:p>
          </table:table-cell>
        </table:table-row>
        <table:table-row table:style-name="Таблица2.1">
          <table:table-cell table:style-name="Таблица2.E2" office:value-type="string">
            <text:p text:style-name="P58"><text:span text:style-name="Internet_20_link"><text:span text:style-name="T104">1500</text:span></text:span></text:p>
          </table:table-cell>
          <table:table-cell table:style-name="Таблица2.A2" office:value-type="string">
            <text:p text:style-name="P59"><text:span text:style-name="Internet_20_link"><text:span text:style-name="T105">4,92117</text:span></text:span></text:p>
          </table:table-cell>
          <table:table-cell table:style-name="Таблица2.A2" office:value-type="string">
            <text:p text:style-name="P59"><text:span text:style-name="Internet_20_link"><text:span text:style-name="T105">1,67</text:span></text:span></text:p>
          </table:table-cell>
          <table:table-cell table:style-name="Таблица2.A2" office:value-type="string">
            <text:p text:style-name="P59"><text:span text:style-name="Internet_20_link"><text:span text:style-name="T105">2,13</text:span></text:span></text:p>
          </table:table-cell>
          <table:table-cell table:style-name="Таблица2.E2" office:value-type="string">
            <text:p text:style-name="P59"><text:span text:style-name="Internet_20_link"><text:span text:style-name="T105">1,8</text:span></text:span></text:p>
          </table:table-cell>
        </table:table-row>
        <table:table-row table:style-name="Таблица2.1">
          <table:table-cell table:style-name="Таблица2.E2" office:value-type="string">
            <text:p text:style-name="P58"><text:span text:style-name="Internet_20_link"><text:span text:style-name="T104">2000</text:span></text:span></text:p>
          </table:table-cell>
          <table:table-cell table:style-name="Таблица2.A2" office:value-type="string">
            <text:p text:style-name="P59"><text:span text:style-name="Internet_20_link"><text:span text:style-name="T105">21,0609</text:span></text:span></text:p>
          </table:table-cell>
          <table:table-cell table:style-name="Таблица2.A2" office:value-type="string">
            <text:p text:style-name="P59"><text:span text:style-name="Internet_20_link"><text:span text:style-name="T105">1,96</text:span></text:span></text:p>
          </table:table-cell>
          <table:table-cell table:style-name="Таблица2.A2" office:value-type="string">
            <text:p text:style-name="P59"><text:span text:style-name="Internet_20_link"><text:span text:style-name="T105">2,48</text:span></text:span></text:p>
          </table:table-cell>
          <table:table-cell table:style-name="Таблица2.E2" office:value-type="string">
            <text:p text:style-name="P59"><text:span text:style-name="Internet_20_link"><text:span text:style-name="T105">2,16</text:span></text:span></text:p>
          </table:table-cell>
        </table:table-row>
        <table:table-row table:style-name="Таблица2.1">
          <table:table-cell table:style-name="Таблица2.E2" office:value-type="string">
            <text:p text:style-name="P58"><text:span text:style-name="Internet_20_link"><text:span text:style-name="T104">2500</text:span></text:span></text:p>
          </table:table-cell>
          <table:table-cell table:style-name="Таблица2.A2" office:value-type="string">
            <text:p text:style-name="P59"><text:span text:style-name="Internet_20_link"><text:span text:style-name="T105">40,5992</text:span></text:span></text:p>
          </table:table-cell>
          <table:table-cell table:style-name="Таблица2.A2" office:value-type="string">
            <text:p text:style-name="P59"><text:span text:style-name="Internet_20_link"><text:span text:style-name="T105">1,82</text:span></text:span></text:p>
          </table:table-cell>
          <table:table-cell table:style-name="Таблица2.A2" office:value-type="string">
            <text:p text:style-name="P59"><text:span text:style-name="Internet_20_link"><text:span text:style-name="T105">2,61</text:span></text:span></text:p>
          </table:table-cell>
          <table:table-cell table:style-name="Таблица2.E2" office:value-type="string">
            <text:p text:style-name="P59"><text:span text:style-name="Internet_20_link"><text:span text:style-name="T105">2,05</text:span></text:span></text:p>
          </table:table-cell>
        </table:table-row>
        <table:table-row table:style-name="Таблица2.1">
          <table:table-cell table:style-name="Таблица2.E2" office:value-type="string">
            <text:p text:style-name="P58" loext:marker-style-name="T18"><text:span text:style-name="Internet_20_link"><text:span text:style-name="T127">3000</text:span></text:span><text:span text:style-name="T106"/></text:p>
          </table:table-cell>
          <table:table-cell table:style-name="Таблица2.A2" office:value-type="string">
            <text:p text:style-name="P59"><text:span text:style-name="Internet_20_link"><text:span text:style-name="T105">99,9885</text:span></text:span></text:p>
          </table:table-cell>
          <table:table-cell table:style-name="Таблица2.A2" office:value-type="string">
            <text:p text:style-name="P59"><text:span text:style-name="Internet_20_link"><text:span text:style-name="T105">1,86</text:span></text:span></text:p>
          </table:table-cell>
          <table:table-cell table:style-name="Таблица2.A2" office:value-type="string">
            <text:p text:style-name="P59"><text:span text:style-name="Internet_20_link"><text:span text:style-name="T105">2,86</text:span></text:span></text:p>
          </table:table-cell>
          <table:table-cell table:style-name="Таблица2.E2" office:value-type="string">
            <text:p text:style-name="P59"><text:span text:style-name="Internet_20_link"><text:span text:style-name="T105">2,54</text:span></text:span></text:p>
          </table:table-cell>
        </table:table-row>
        <table:table-row table:style-name="Таблица2.1">
          <table:table-cell table:style-name="Таблица2.E2" office:value-type="string">
            <text:p text:style-name="P58" loext:marker-style-name="T19"><text:span text:style-name="T19">3500</text:span><text:span text:style-name="T19"/></text:p>
          </table:table-cell>
          <table:table-cell table:style-name="Таблица2.A2" office:value-type="string">
            <text:p text:style-name="P59"><text:span text:style-name="Internet_20_link"><text:span text:style-name="T105">196,143</text:span></text:span></text:p>
          </table:table-cell>
          <table:table-cell table:style-name="Таблица2.A2" office:value-type="string">
            <text:p text:style-name="P59"><text:span text:style-name="Internet_20_link"><text:span text:style-name="T105">1,87</text:span></text:span></text:p>
          </table:table-cell>
          <table:table-cell table:style-name="Таблица2.A2" office:value-type="string">
            <text:p text:style-name="P59"><text:span text:style-name="Internet_20_link"><text:span text:style-name="T105">2,57</text:span></text:span></text:p>
          </table:table-cell>
          <table:table-cell table:style-name="Таблица2.E2" office:value-type="string">
            <text:p text:style-name="P59"><text:span text:style-name="Internet_20_link"><text:span text:style-name="T105">3,07</text:span></text:span></text:p>
          </table:table-cell>
        </table:table-row>
        <table:table-row table:style-name="Таблица2.1">
          <table:table-cell table:style-name="Таблица2.E2" office:value-type="string">
            <text:p text:style-name="P58" loext:marker-style-name="T19"><text:span text:style-name="T19">4000</text:span><text:span text:style-name="T19"/></text:p>
          </table:table-cell>
          <table:table-cell table:style-name="Таблица2.A2" office:value-type="string">
            <text:p text:style-name="P59"><text:span text:style-name="Internet_20_link"><text:span text:style-name="T105">400,319</text:span></text:span></text:p>
          </table:table-cell>
          <table:table-cell table:style-name="Таблица2.A2" office:value-type="string">
            <text:p text:style-name="P59"><text:span text:style-name="Internet_20_link"><text:span text:style-name="T105">1,9</text:span></text:span></text:p>
          </table:table-cell>
          <table:table-cell table:style-name="Таблица2.A2" office:value-type="string">
            <text:p text:style-name="P59"><text:span text:style-name="Internet_20_link"><text:span text:style-name="T105">3,06</text:span></text:span></text:p>
          </table:table-cell>
          <table:table-cell table:style-name="Таблица2.E2" office:value-type="string">
            <text:p text:style-name="P59"><text:span text:style-name="Internet_20_link"><text:span text:style-name="T105">3,4</text:span></text:span></text:p>
          </table:table-cell>
        </table:table-row>
        <table:table-row table:style-name="Таблица2.1">
          <table:table-cell table:style-name="Таблица2.E2" office:value-type="string">
            <text:p text:style-name="P60" loext:marker-style-name="T107"><text:span text:style-name="T107">СРЕДНЕЕ ПОЛУЧЕННОЕ УСКОРЕНИЕ</text:span><text:span text:style-name="T107"/></text:p>
          </table:table-cell>
          <table:table-cell table:style-name="Таблица2.A2" office:value-type="string">
            <text:p text:style-name="P59"><text:span text:style-name="Internet_20_link"><text:span text:style-name="T108">-</text:span></text:span></text:p>
          </table:table-cell>
          <table:table-cell table:style-name="Таблица2.A2" office:value-type="string">
            <text:p text:style-name="P59"><text:span text:style-name="Internet_20_link"><text:span text:style-name="T108">1,55</text:span></text:span></text:p>
          </table:table-cell>
          <table:table-cell table:style-name="Таблица2.A2" office:value-type="string">
            <text:p text:style-name="P59"><text:span text:style-name="Internet_20_link"><text:span text:style-name="T108">2,09</text:span></text:span></text:p>
          </table:table-cell>
          <table:table-cell table:style-name="Таблица2.E2" office:value-type="string">
            <text:p text:style-name="P59"><text:span text:style-name="Internet_20_link"><text:span text:style-name="T108">1,94</text:span></text:span></text:p>
          </table:table-cell>
        </table:table-row>
      </table:table>
      <text:p text:style-name="_30_3_5f_Текст_20_ИТММ" loext:marker-style-name="T19"><text:span text:style-name="Internet_20_link"><text:span text:style-name="T109">В этой версии не удаётся добиться линейного ускорения, видно, что при N≤300 использование нескольких потоков замедляет вычисления (ускорение становится &lt; 1), так как накладные расходы на создание потоков и их синхронизацию превышают время самих вычислений. Для небольших данных можно было бы отключить распараллеливание. Возможно, улучшения можно добиться путём объединения нескольких циклов в один для избежания излишней синхронизации. Может быть улучшен не совсем оптимальный доступ к памяти при обновлении R с шагом в </text:span></text:span><text:span text:style-name="Internet_20_link"><text:span text:style-name="T110">N </text:span></text:span><text:span text:style-name="Internet_20_link"><text:span text:style-name="T109">элементов, что ухудшает кэш-локальность алгоритма. Избыточное выделение памяти под промежуточные вектора может также создавать дополнительные задержки для больших </text:span></text:span><text:span text:style-name="Internet_20_link"><text:span text:style-name="T110">N</text:span></text:span><text:span text:style-name="Internet_20_link"><text:span text:style-name="T109">.</text:span></text:span></text:p>
      <text:p text:style-name="_30_3_5f_Текст_20_ИТММ" loext:marker-style-name="T19"><text:span text:style-name="Internet_20_link"><text:span text:style-name="T109">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10">e-12, </text:span></text:span><text:span text:style-name="Internet_20_link"><text:span text:style-name="T109">относительная — 1e-15</text:span></text:span><text:span text:style-name="Internet_20_link"><text:span text:style-name="T110">.</text:span></text:span></text:p>
      <text:p text:style-name="_30_3_5f_Текст_20_ИТММ" loext:marker-style-name="T19"><text:span text:style-name="Internet_20_link"><text:span text:style-name="T109">Реализация прикреплена в Приложении 2.</text:span></text:span></text:p>
      <text:p text:style-name="P26"><text:bookmark-start text:name="__RefHeading___Toc2683_713544485"/><text:bookmark-start text:name="_Toc194842672_Копия_4_Копия_1"/>2.1.3 <text:bookmark-end text:name="_Toc194842672_Копия_4_Копия_1"/>Работа с нормированными векторами Хаусхолдера<text:bookmark-end text:name="__RefHeading___Toc2683_713544485"/></text:p>
      <text:p text:style-name="_30_3_5f_Текст_20_ИТММ"><text:span text:style-name="T36">Если изменить способ вычисления вектора Хаусхолдера </text:span><text:span text:style-name="T35">v</text:span><text:span text:style-name="T34">k</text:span><text:span text:style-name="T35">:</text:span></text:p>
      <text:p text:style-name="P27"><draw:frame draw:style-name="fr1" draw:name="Объект121" text:anchor-type="as-char" svg:width="3.649cm" svg:height="0.617cm" draw:z-index="137"><draw:object xlink:href="./Object 125" xlink:type="simple" xlink:show="embed" xlink:actuate="onLoad"/><draw:image xlink:href="./ObjectReplacements/Object 125" xlink:type="simple" xlink:show="embed" xlink:actuate="onLoad"/></draw:frame><text:span text:style-name="T18">,</text:span></text:p>
      <text:p text:style-name="P27"><draw:frame draw:style-name="fr1" draw:name="Объект122" text:anchor-type="as-char" svg:width="7.939cm" svg:height="1.039cm" draw:z-index="138"><draw:object xlink:href="./Object 126" xlink:type="simple" xlink:show="embed" xlink:actuate="onLoad"/><draw:image xlink:href="./ObjectReplacements/Object 126" xlink:type="simple" xlink:show="embed" xlink:actuate="onLoad"/></draw:frame><text:span text:style-name="T35">,</text:span></text:p>
      <text:p text:style-name="P27"><draw:frame draw:style-name="fr1" draw:name="Объект123" text:anchor-type="as-char" svg:width="5.02cm" svg:height="1.064cm" draw:z-index="139"><draw:object xlink:href="./Object 127" xlink:type="simple" xlink:show="embed" xlink:actuate="onLoad"/><draw:image xlink:href="./ObjectReplacements/Object 127" xlink:type="simple" xlink:show="embed" xlink:actuate="onLoad"/></draw:frame><text:span text:style-name="T18">,</text:span></text:p>
      <text:p text:style-name="P27"><draw:frame draw:style-name="fr1" draw:name="Объект124" text:anchor-type="as-char" svg:width="6.551cm" svg:height="0.656cm" draw:z-index="140"><draw:object xlink:href="./Object 128" xlink:type="simple" xlink:show="embed" xlink:actuate="onLoad"/><draw:image xlink:href="./ObjectReplacements/Object 128" xlink:type="simple" xlink:show="embed" xlink:actuate="onLoad"/></draw:frame></text:p>
      <text:p text:style-name="_30_3_5f_Текст_20_ИТММ"><text:span text:style-name="T36">его можно сохранить под диагональю в матрице</text:span><text:span text:style-name="T35"> A</text:span><text:span text:style-name="T34">k</text:span><text:span text:style-name="T36"> вместо незначащих нулей следующим образом:</text:span></text:p>
      <text:p text:style-name="P27"><draw:frame draw:style-name="fr1" draw:name="Объект125" text:anchor-type="as-char" svg:width="7.571cm" svg:height="4.427cm" draw:z-index="141"><draw:object xlink:href="./Object 129" xlink:type="simple" xlink:show="embed" xlink:actuate="onLoad"/><draw:image xlink:href="./ObjectReplacements/Object 129" xlink:type="simple" xlink:show="embed" xlink:actuate="onLoad"/></draw:frame><text:span text:style-name="T128">,</text:span></text:p>
      <text:p text:style-name="P27"><draw:frame draw:style-name="fr1" draw:name="Объект126" text:anchor-type="as-char" svg:width="8.331cm" svg:height="5.514cm" draw:z-index="142"><draw:object xlink:href="./Object 130" xlink:type="simple" xlink:show="embed" xlink:actuate="onLoad"/><draw:image xlink:href="./ObjectReplacements/Object 130" xlink:type="simple" xlink:show="embed" xlink:actuate="onLoad"/></draw:frame><text:span text:style-name="T128">,</text:span></text:p>
      <text:p text:style-name="P27"><draw:frame draw:style-name="fr1" draw:name="Объект127" text:anchor-type="as-char" svg:width="11.012cm" svg:height="4.427cm" draw:z-index="143"><draw:object xlink:href="./Object 131" xlink:type="simple" xlink:show="embed" xlink:actuate="onLoad"/><draw:image xlink:href="./ObjectReplacements/Object 131" xlink:type="simple" xlink:show="embed" xlink:actuate="onLoad"/></draw:frame></text:p>
      <text:p text:style-name="_30_3_5f_Текст_20_ИТММ" loext:marker-style-name="T19"><text:span text:style-name="T19">Такое использование данных называется in-place алгоритмом. Такие алгоритмы модифицируют входные данные непосредственно в месте их исходного хранения, без выделения дополнительной памяти. Это позволяет повысить эффективность работы с </text:span><text:soft-page-break/><text:span text:style-name="T19">памятью при вычислении над большими объёмами данных или в условиях ограниченных ресурсов.</text:span><text:span text:style-name="T19"/></text:p>
      <text:p text:style-name="_30_3_5f_Текст_20_ИТММ"><text:span text:style-name="T19">Отражение заключается в применении к столбцам справа от обнуляемого, от </text:span><text:span text:style-name="T18">(</text:span><text:span text:style-name="T19">k+1</text:span><text:span text:style-name="T18">)</text:span><text:span text:style-name="T19"> до </text:span><text:span text:style-name="T18">(</text:span><text:span text:style-name="T19">N-1</text:span><text:span text:style-name="T18">)</text:span><text:span text:style-name="T19">, преобразования </text:span><draw:frame draw:style-name="fr1" draw:name="Объект128" text:anchor-type="as-char" svg:width="2.252cm" svg:height="0.591cm" draw:z-index="144"><draw:object xlink:href="./Object 132" xlink:type="simple" xlink:show="embed" xlink:actuate="onLoad"/><draw:image xlink:href="./ObjectReplacements/Object 132" xlink:type="simple" xlink:show="embed" xlink:actuate="onLoad"/></draw:frame><text:span text:style-name="T19"><text:s/>где </text:span><draw:frame draw:style-name="fr1" draw:name="Объект129" text:anchor-type="as-char" svg:width="1.018cm" svg:height="0.591cm" draw:z-index="145"><draw:object xlink:href="./Object 133" xlink:type="simple" xlink:show="embed" xlink:actuate="onLoad"/><draw:image xlink:href="./ObjectReplacements/Object 133" xlink:type="simple" xlink:show="embed" xlink:actuate="onLoad"/></draw:frame><text:span text:style-name="T19"><text:s/>— скалярное произведение вектора Хаусхолдера из</text:span><text:span text:style-name="T18"> </text:span><text:span text:style-name="T19">столбца </text:span><text:span text:style-name="T18">col</text:span><text:span text:style-name="T19">, вычитание из</text:span><text:span text:style-name="T18"> R </text:span><text:span text:style-name="T19">выполняется над тем же столбцом.</text:span></text:p>
      <text:p text:style-name="_30_3_5f_Текст_20_ИТММ"><text:span text:style-name="T19">Отдельно вычисляется матрица </text:span><text:span text:style-name="T18">Q </text:span><text:span text:style-name="T19">с помощью сохранённых под диагоналями нормированных векторов Хаусхолдера, как в предыдущей реализации, только вместо 2 используется </text:span><draw:frame draw:style-name="fr1" draw:name="Объект130" text:anchor-type="as-char" svg:width="1.312cm" svg:height="1.064cm" draw:z-index="146"><draw:object xlink:href="./Object 134" xlink:type="simple" xlink:show="embed" xlink:actuate="onLoad"/><draw:image xlink:href="./ObjectReplacements/Object 134" xlink:type="simple" xlink:show="embed" xlink:actuate="onLoad"/></draw:frame><text:span text:style-name="T19"><text:s/>в качестве коэффициента. Работа также идёт только над столбцами, от </text:span><text:span text:style-name="T18">k </text:span><text:span text:style-name="T19">до </text:span><text:span text:style-name="T18">N: </text:span><text:span text:style-name="T19">скалярное умножение с вектором и вычитание вектора из столбца.</text:span></text:p>
      <text:p text:style-name="_30_3_5f_Текст_20_ИТММ">Третья версия QR-разложения методом Хаусхолдера представляет собой дальнейшую оптимизацию алгоритма, направленную на повышение эффективности работы с памятью. Данная версия использует класс для транспонированной матрицы TransposedMatrix, что позволяет быстрее работать со столбцам. По сравнению с предыдущей версией векторы Хаусхолдера не хранятся отдельно, а сохраняются в поддиагональных элементах матрицы R.</text:p>
      <text:p text:style-name="_30_3_5f_Текст_20_ИТММ"><text:span text:style-name="T50">Вычисление отражений Хаусхолдера производится новым способом: вектор Хаусхолдера </text:span><text:span text:style-name="T52">v</text:span><text:span text:style-name="T57">k</text:span><text:span text:style-name="T50"> формируется таким образом, чтобы первый элемент становится равным единице. Эта нормировка помогает уменьшить погрешность, не хранить (</text:span><text:span text:style-name="T52">k+1</text:span><text:span text:style-name="T50">)-ый элемент явно.</text:span></text:p>
      <text:p text:style-name="_30_3_5f_Текст_20_ИТММ">Применение отражений к правой части матрицы R и построение матрицы Q оптимизированы за счёт более быстрого обращения к столбцам.</text:p>
      <text:p text:style-name="_30_3_5f_Текст_20_ИТММ">Транспонирование осуществляется средствами класса TransposedMatrix.</text:p>
      <text:p text:style-name="_30_3_5f_Текст_20_ИТММ"><text:span text:style-name="Internet_20_link"><text:span text:style-name="T30">Программная реализация с учётом описанного выше алгоритма будет следующей.</text:span></text:span><text:span text:style-name="Internet_20_link"><text:span text:style-name="T28"> Перевод данных в плоский и транспонированный вид. Инициализируем массив для хранения векторов Хаусхолдера. В цикле от 0 до </text:span></text:span><text:span text:style-name="Internet_20_link"><text:span text:style-name="T29">N</text:span></text:span><text:span text:style-name="Internet_20_link"><text:span text:style-name="T28">-1 подсчитываем по формулам </text:span></text:span><draw:frame draw:style-name="fr1" draw:name="Объект131" text:anchor-type="as-char" svg:width="1.081cm" svg:height="0.471cm" draw:z-index="147"><draw:object xlink:href="./Object 135" xlink:type="simple" xlink:show="embed" xlink:actuate="onLoad"/><draw:image xlink:href="./ObjectReplacements/Object 135" xlink:type="simple" xlink:show="embed" xlink:actuate="onLoad"/></draw:frame>. Д<text:span text:style-name="Internet_20_link"><text:span text:style-name="T28">омножаем </text:span></text:span><text:span text:style-name="Internet_20_link"><text:span text:style-name="T29">R</text:span></text:span><text:span text:style-name="Internet_20_link"><text:span text:style-name="T28"> на </text:span></text:span><text:span text:style-name="Internet_20_link"><text:span text:style-name="T29">H</text:span></text:span><text:span text:style-name="Internet_20_link"><text:span text:style-name="T28"> слева и получаем матрицу для следующей итерации. Сохраняем </text:span></text:span><text:span text:style-name="Internet_20_link"><text:span text:style-name="T29">v </text:span></text:span><text:span text:style-name="Internet_20_link"><text:span text:style-name="T30">в </text:span></text:span><text:span text:style-name="Internet_20_link"><text:span text:style-name="T29">R </text:span></text:span><text:span text:style-name="Internet_20_link"><text:span text:style-name="T30">под диагональю. </text:span></text:span><text:span text:style-name="Internet_20_link"><text:span text:style-name="T28">Подсчитываем </text:span></text:span><text:span text:style-name="Internet_20_link"><text:span text:style-name="T29">Q</text:span></text:span><text:span text:style-name="Internet_20_link"><text:span text:style-name="T28"> с помощью сохранённых отражений в обратном порядке:</text:span></text:span></text:p>
      <text:p text:style-name="P52" loext:marker-style-name="T81"/>
      <text:p text:style-name="P61" loext:marker-style-name="T81"><text:span text:style-name="T81">Процедура QR_decomposition(A, Q, R):</text:span><text:span text:style-name="T81"/></text:p>
      <text:p text:style-name="P50" loext:marker-style-name="T81"><text:span text:style-name="T81">R</text:span><text:span text:style-name="T70">_T</text:span><text:span text:style-name="T81"> = A </text:span><text:span text:style-name="T82">// копирование исходной матрицы в </text:span><text:span text:style-name="T83">R</text:span></text:p>
      <text:p text:style-name="P53" loext:marker-style-name="T81"><text:span text:style-name="T70">Q_T</text:span><text:span text:style-name="T81"> = </text:span><text:span text:style-name="T70">I</text:span><text:span text:style-name="T81"> </text:span><text:span text:style-name="T82">//</text:span><text:span text:style-name="T83"> Q </text:span><text:span text:style-name="T82">инициализируется как едини</text:span><text:span text:style-name="T85">чная</text:span></text:p>
      <text:p text:style-name="P50" loext:marker-style-name="T84"><text:span text:style-name="T81">Для k от 0 до N-</text:span><text:span text:style-name="T70">1</text:span><text:span text:style-name="T81"> выполнить: </text:span><text:span text:style-name="T85">// цикл по столбцам</text:span></text:p>
      <text:p text:style-name="P50" loext:marker-style-name="T86"><text:span text:style-name="T81"><text:s text:c="9"/></text:span><text:span text:style-name="T85">// подсчёт σ</text:span></text:p>
      <text:p text:style-name="P50"><text:span text:style-name="T87"><text:s text:c="9"/></text:span><text:span text:style-name="T129">sum = 0</text:span></text:p>
      <text:p text:style-name="P53" loext:marker-style-name="T84"><text:span text:style-name="T81"><text:s text:c="9"/></text:span><text:span text:style-name="T129">Для i от k до N-1 выполнить:</text:span></text:p>
      <text:p text:style-name="P50"><text:span text:style-name="T87"><text:s text:c="12"/></text:span><text:span text:style-name="T129">sum = sum + R_T[i][k] * R_T[i][k]</text:span></text:p>
      <text:p text:style-name="P50" loext:marker-style-name="T88"><text:span text:style-name="T89"><text:s text:c="9"/>Конец цикла</text:span><text:span text:style-name="T90"/></text:p>
      <text:p text:style-name="P50" loext:marker-style-name="T88"><text:span text:style-name="T89"><text:s text:c="9"/>σ = -</text:span><text:span text:style-name="T90">sign(R_T[k][k]) * sqrt(sum)</text:span></text:p>
      <text:p text:style-name="P62" loext:marker-style-name="T88"/>
      <text:p text:style-name="P50" loext:marker-style-name="T86"><text:span text:style-name="T81"><text:s text:c="9"/></text:span><text:span text:style-name="T85">// подсчёт </text:span><text:span text:style-name="T87">v</text:span></text:p>
      <text:p text:style-name="P53" loext:marker-style-name="T83"><text:span text:style-name="T83"><text:s text:c="9"/>// </text:span><text:span text:style-name="T82">копирование в буфер</text:span><text:span text:style-name="T83"> v</text:span></text:p>
      <text:p text:style-name="P53" loext:marker-style-name="T91"><text:span text:style-name="T91"><text:s text:c="9"/>v = вектор(N-k)</text:span><text:span text:style-name="T91"/></text:p>
      <text:p text:style-name="P53" loext:marker-style-name="T91"><text:span text:style-name="T91"><text:s text:c="9"/>Для i от </text:span><text:span text:style-name="T114">1</text:span><text:span text:style-name="T91"> до N-</text:span><text:span text:style-name="T114">k-</text:span><text:span text:style-name="T91">1 выполнить:</text:span></text:p>
      <text:p text:style-name="P53" loext:marker-style-name="T91"><text:span text:style-name="T91"><text:s text:c="12"/></text:span><text:span text:style-name="T114">v[i] </text:span><text:span text:style-name="T91">= </text:span><text:span text:style-name="T114">R_T[k+i][k]</text:span></text:p>
      <text:p text:style-name="P50" loext:marker-style-name="T88"><text:span text:style-name="T89"><text:s text:c="9"/>Конец цикла</text:span><text:span text:style-name="T90"/></text:p>
      <text:p text:style-name="P53" loext:marker-style-name="T91"><text:span text:style-name="T71"><text:s text:c="9"/></text:span><text:span text:style-name="T70">v[0] </text:span><text:span text:style-name="T71">= </text:span><text:span text:style-name="T70">R_T[k][k]- </text:span><text:span text:style-name="T89">σ</text:span></text:p>
      <text:p text:style-name="P70" loext:marker-style-name="T89"/>
      <text:p text:style-name="P50" loext:marker-style-name="T86"><text:span text:style-name="T81"><text:s text:c="7"/></text:span><text:span text:style-name="T85"><text:s text:c="2"/>// подсчёт τ</text:span></text:p>
      <text:p text:style-name="P53" loext:marker-style-name="T91"><text:span text:style-name="T91"><text:s text:c="9"/>s</text:span><text:span text:style-name="T114">um = 0</text:span></text:p>
      <text:p text:style-name="P53" loext:marker-style-name="T91"><text:span text:style-name="T91"><text:s text:c="9"/>Для i от </text:span><text:span text:style-name="T114">0</text:span><text:span text:style-name="T91"> до N-</text:span><text:span text:style-name="T114">k-</text:span><text:span text:style-name="T91">1 выполнить:</text:span></text:p>
      <text:p text:style-name="P53" loext:marker-style-name="T91"><text:span text:style-name="T91"><text:s text:c="12"/>s</text:span><text:span text:style-name="T114">um </text:span><text:span text:style-name="T91">= s</text:span><text:span text:style-name="T114">um <text:s/>+ v[i] * v[i]</text:span></text:p>
      <text:p text:style-name="P50" loext:marker-style-name="T88"><text:span text:style-name="T89"><text:s text:c="9"/>Конец цикла</text:span><text:span text:style-name="T90"/></text:p>
      <text:p text:style-name="P53" loext:marker-style-name="T91"><text:span text:style-name="T71"><text:s text:c="9"/></text:span><text:span text:style-name="T130">τ = 2 / sum</text:span></text:p>
      <text:p text:style-name="P62" loext:marker-style-name="T88"/>
      <text:p text:style-name="P53" loext:marker-style-name="T115"><text:span text:style-name="T81"><text:s text:c="7"/></text:span><text:span text:style-name="T85"><text:s text:c="2"/></text:span><text:span text:style-name="T115">// сохраняем нормированный v для Q (v[0]=1) в R под диагональю</text:span></text:p>
      <text:p text:style-name="P53" loext:marker-style-name="T91"><text:span text:style-name="T130"><text:s text:c="8"/>scale = 1 / v[0]</text:span><text:span text:style-name="T131"/></text:p>
      <text:p text:style-name="P53" loext:marker-style-name="T91"><text:span text:style-name="T91"><text:s text:c="9"/>Для i от </text:span><text:span text:style-name="T114">1</text:span><text:span text:style-name="T91"> до N-</text:span><text:span text:style-name="T114">k-</text:span><text:span text:style-name="T91">1 выполнить:</text:span></text:p>
      <text:p text:style-name="P53" loext:marker-style-name="T91"><text:span text:style-name="T91"><text:s text:c="12"/></text:span><text:span text:style-name="T114">R_T[k+i][k] = v[i] * scale</text:span></text:p>
      <text:p text:style-name="P50" loext:marker-style-name="T88"><text:span text:style-name="T89"><text:s text:c="9"/>Конец цикла</text:span><text:span text:style-name="T90"/></text:p>
      <text:p text:style-name="P53" loext:marker-style-name="T91"><text:span text:style-name="T89"><text:s text:c="9"/></text:span><text:span text:style-name="T114">R_T[k][k] = </text:span><text:span text:style-name="T89">σ</text:span></text:p>
      <text:p text:style-name="P71" loext:marker-style-name="T114"/>
      <text:p text:style-name="P53"><text:span text:style-name="T81"><text:s text:c="7"/></text:span><text:span text:style-name="T85"><text:s text:c="2"/></text:span><text:span text:style-name="T115">// отражение</text:span></text:p>
      <text:p text:style-name="P53" loext:marker-style-name="T84"><text:span text:style-name="T91"><text:s text:c="9"/>Для col от k+1 до N-1 вып</text:span><text:span text:style-name="T81">олнить:</text:span></text:p>
      <text:p text:style-name="P50" loext:marker-style-name="T88"><text:span text:style-name="T81"><text:s text:c="12"/></text:span><text:span text:style-name="T70">vTR = 0</text:span></text:p>
      <text:p text:style-name="P50" loext:marker-style-name="T84"><text:span text:style-name="T81"><text:s text:c="12"/>Для </text:span><text:span text:style-name="T70">i </text:span><text:span text:style-name="T81">от </text:span><text:span text:style-name="T70">0</text:span><text:span text:style-name="T81"> до длина</text:span><text:span text:style-name="T70">(v)</text:span><text:span text:style-name="T81"> выполнить:</text:span></text:p>
      <text:p text:style-name="P50" loext:marker-style-name="T88"><text:span text:style-name="T81"><text:s text:c="15"/></text:span><text:span text:style-name="T70">vTR = vTR + v[i] </text:span><text:span text:style-name="T81">* </text:span><text:span text:style-name="T70">R_T[k + i][col]</text:span></text:p>
      <text:p text:style-name="P50" loext:marker-style-name="T88"><text:span text:style-name="T81"><text:s text:c="12"/>Конец цикла</text:span><text:span text:style-name="T70"/></text:p>
      <text:p text:style-name="P50" loext:marker-style-name="T88"><text:span text:style-name="T70"><text:s text:c="12"/></text:span><text:span text:style-name="T90">scale = </text:span><text:span text:style-name="T132">τ * vTR</text:span></text:p>
      <text:p text:style-name="P53" loext:marker-style-name="T115"><text:span text:style-name="T115"><text:s text:c="12"/>// обновляем столбец col: R[:,col] -= v * scale</text:span><text:span text:style-name="T115"/></text:p>
      <text:p text:style-name="P53" loext:marker-style-name="T84"><text:span text:style-name="T117"><text:s text:c="12"/>Для </text:span><text:span text:style-name="T119">i</text:span><text:span text:style-name="T117"> от </text:span><text:span text:style-name="T119">0</text:span><text:span text:style-name="T117"> до </text:span><text:span text:style-name="T81">длина</text:span><text:span text:style-name="T70">(v)</text:span><text:span text:style-name="T117"> вып</text:span><text:span text:style-name="T118">олнить:</text:span></text:p>
      <text:p text:style-name="P53" loext:marker-style-name="T117"><text:span text:style-name="T117"><text:s text:c="15"/></text:span><text:span text:style-name="T119">R_T[k + i][col] = R_T[k + i][col] – v[i] * scale</text:span></text:p>
      <text:p text:style-name="P53" loext:marker-style-name="T81"><text:span text:style-name="T81"><text:s text:c="12"/>Конец цикла</text:span><text:span text:style-name="T81"/></text:p>
      <text:p text:style-name="P50" loext:marker-style-name="T88"><text:span text:style-name="T89"><text:s text:c="9"/>Конец цикла</text:span><text:span text:style-name="T90"/></text:p>
      <text:p text:style-name="P53" loext:marker-style-name="T91"><text:span text:style-name="T91">Конец цикла</text:span><text:span text:style-name="T91"/></text:p>
      <text:p text:style-name="P52" loext:marker-style-name="T81"/>
      <text:p text:style-name="P64" loext:marker-style-name="T86"/>
      <text:p text:style-name="P61" loext:marker-style-name="T86"><text:span text:style-name="T121">/</text:span><text:span text:style-name="T115">/ вычисление Q</text:span></text:p>
      <text:p text:style-name="P53" loext:marker-style-name="T115"><text:span text:style-name="T115">// применяем отражения в обратном порядке</text:span><text:span text:style-name="T115"/></text:p>
      <text:p text:style-name="P50" loext:marker-style-name="T84"><text:span text:style-name="T89">Для k от </text:span><text:span text:style-name="T90">N-2</text:span><text:span text:style-name="T89"> до </text:span><text:span text:style-name="T90">0</text:span><text:span text:style-name="T89"> выполнить:</text:span></text:p>
      <text:p text:style-name="P53" loext:marker-style-name="T115"><text:span text:style-name="T115"><text:s text:c="3"/>// берём вектор v из R</text:span><text:span text:style-name="T115"/></text:p>
      <text:p text:style-name="P53" loext:marker-style-name="T91"><text:span text:style-name="T91"><text:s text:c="3"/>v = вектор(N-k), </text:span><text:span text:style-name="T114">v[0] = 1</text:span></text:p>
      <text:p text:style-name="P53" loext:marker-style-name="T84"><text:span text:style-name="T117"><text:s text:c="3"/>Для </text:span><text:span text:style-name="T119">i</text:span><text:span text:style-name="T117"> от </text:span><text:span text:style-name="T119">1</text:span><text:span text:style-name="T117"> до </text:span><text:span text:style-name="T81">длина</text:span><text:span text:style-name="T70">(v)</text:span><text:span text:style-name="T117"> вып</text:span><text:span text:style-name="T118">олнить:</text:span></text:p>
      <text:p text:style-name="P53" loext:marker-style-name="T117"><text:span text:style-name="T117"><text:s text:c="6"/></text:span><text:span text:style-name="T119">v[i] = R_T[k + i][k]</text:span></text:p>
      <text:p text:style-name="P53" loext:marker-style-name="T117"><text:span text:style-name="T119"><text:s text:c="6"/>R_T[k + i][k] = 0</text:span><text:span text:style-name="T119"/></text:p>
      <text:p text:style-name="P53" loext:marker-style-name="T81"><text:span text:style-name="T81"><text:s text:c="3"/>Конец цикла</text:span><text:span text:style-name="T81"/></text:p>
      <text:p text:style-name="P72" loext:marker-style-name="T81"/>
      <text:p text:style-name="P50" loext:marker-style-name="T86"><text:span text:style-name="T81"><text:s text:c="3"/></text:span><text:span text:style-name="T85">// подсчёт τ</text:span></text:p>
      <text:p text:style-name="P53" loext:marker-style-name="T91"><text:span text:style-name="T91"><text:s text:c="3"/>s</text:span><text:span text:style-name="T114">um = 0</text:span></text:p>
      <text:p text:style-name="P53" loext:marker-style-name="T91"><text:span text:style-name="T91"><text:s text:c="3"/>Для i от </text:span><text:span text:style-name="T114">0</text:span><text:span text:style-name="T91"> до N-</text:span><text:span text:style-name="T114">k-</text:span><text:span text:style-name="T91">1 выполнить:</text:span></text:p>
      <text:p text:style-name="P53" loext:marker-style-name="T91"><text:span text:style-name="T91"><text:s text:c="3"/>s</text:span><text:span text:style-name="T114">um </text:span><text:span text:style-name="T91">= s</text:span><text:span text:style-name="T114">um <text:s/>+ v[i] * v[i]</text:span></text:p>
      <text:p text:style-name="P50" loext:marker-style-name="T88"><text:span text:style-name="T89"><text:s text:c="3"/>Конец цикла</text:span><text:span text:style-name="T90"/></text:p>
      <text:p text:style-name="P53" loext:marker-style-name="T91"><text:span text:style-name="T133"><text:s text:c="3"/></text:span><text:span text:style-name="T134">τ = 2 / sum</text:span></text:p>
      <text:p text:style-name="P73" loext:marker-style-name="T91"/>
      <text:p text:style-name="P53" loext:marker-style-name="T115"><text:span text:style-name="T115"><text:s text:c="3"/>// H = I - tau * v * vT к Q[k:N, :]</text:span><text:span text:style-name="T115"/></text:p>
      <text:p text:style-name="P53" loext:marker-style-name="T91"><text:span text:style-name="T91"><text:s text:c="3"/>Для </text:span><text:span text:style-name="T114">j</text:span><text:span text:style-name="T91"> от </text:span><text:span text:style-name="T114">0</text:span><text:span text:style-name="T91"> до N-1 выполнить:</text:span></text:p>
      <text:p text:style-name="P53"><text:span text:style-name="T91"><text:s text:c="6"/></text:span><text:span text:style-name="T85">// vTQ = vT * Q[k:N, col]</text:span></text:p>
      <text:p text:style-name="P53"><text:span text:style-name="T85"><text:s text:c="5"/></text:span><text:span text:style-name="T89"><text:s/>vTQ = Q_T[k][j]</text:span><text:span text:style-name="T87"> // v[0] = 1</text:span></text:p>
      <text:p text:style-name="P53" loext:marker-style-name="T91"><text:span text:style-name="T91"><text:s text:c="6"/>Для </text:span><text:span text:style-name="T114">i</text:span><text:span text:style-name="T91"> от </text:span><text:span text:style-name="T114">1</text:span><text:span text:style-name="T91"> до </text:span><text:span text:style-name="T81">длина</text:span><text:span text:style-name="T70">(v)</text:span><text:span text:style-name="T91"> выполнить:</text:span></text:p>
      <text:p text:style-name="P53" loext:marker-style-name="T91"><text:span text:style-name="T91"><text:s text:c="9"/></text:span><text:span text:style-name="T114">vTQ = vTQ + v[i] * Q_T[k+i][j]</text:span></text:p>
      <text:p text:style-name="P53" loext:marker-style-name="T91"><text:span text:style-name="T91"><text:s text:c="6"/>Конец цикла</text:span><text:span text:style-name="T91"/></text:p>
      <text:p text:style-name="P53" loext:marker-style-name="T91"><text:span text:style-name="T91"><text:s text:c="6"/>vTQ = </text:span><text:span text:style-name="T114">vTQ * <text:s/></text:span><text:span text:style-name="T134">τ</text:span></text:p>
      <text:p text:style-name="P74" loext:marker-style-name="T134"/>
      <text:p text:style-name="P53" loext:marker-style-name="T115"><text:span text:style-name="T115"><text:s text:c="6"/>// Q[k][j] -= vTQ * v</text:span><text:span text:style-name="T115"/></text:p>
      <text:p text:style-name="P53" loext:marker-style-name="T134"><text:span text:style-name="T134"><text:s text:c="6"/>Q_T[k][j] = Q_T[k][j] – vTQ</text:span><text:span text:style-name="T134"/></text:p>
      <text:p text:style-name="P53" loext:marker-style-name="T91"><text:span text:style-name="T91"><text:s text:c="6"/>Для </text:span><text:span text:style-name="T114">i</text:span><text:span text:style-name="T91"> от </text:span><text:span text:style-name="T114">1</text:span><text:span text:style-name="T91"> до </text:span><text:span text:style-name="T81">длина</text:span><text:span text:style-name="T70">(v)</text:span><text:span text:style-name="T91"> выполнить:</text:span></text:p>
      <text:p text:style-name="P53" loext:marker-style-name="T91"><text:span text:style-name="T91"><text:s text:c="9"/></text:span><text:span text:style-name="T114">Q_T[k+i][j] = Q_T[k+i][j] - vTQ * v[i]</text:span></text:p>
      <text:p text:style-name="P53" loext:marker-style-name="T91"><text:span text:style-name="T91"><text:s text:c="6"/>Конец цикла</text:span><text:span text:style-name="T91"/></text:p>
      <text:p text:style-name="P53" loext:marker-style-name="T91"><text:span text:style-name="T91"><text:s text:c="3"/>Конец цикла</text:span><text:span text:style-name="T91"/></text:p>
      <text:p text:style-name="P53" loext:marker-style-name="T91"><text:span text:style-name="T91">Конец цикла</text:span><text:span text:style-name="T91"/></text:p>
      <text:p text:style-name="P53" loext:marker-style-name="T91"><text:span text:style-name="T114">R = </text:span><text:span text:style-name="T113">транспонировать(</text:span><text:span text:style-name="T114">R_T</text:span><text:span text:style-name="T113">)</text:span></text:p>
      <text:p text:style-name="P53" loext:marker-style-name="T91"><text:span text:style-name="T91">Q</text:span><text:span text:style-name="T114"> = </text:span><text:span text:style-name="T113">транспонировать(Q</text:span><text:span text:style-name="T114">_T</text:span><text:span text:style-name="T113">)</text:span></text:p>
      <text:p text:style-name="P50" loext:marker-style-name="T81"><text:span text:style-name="Internet_20_link"><text:span text:style-name="T125">Конец процедуры</text:span></text:span><text:span text:style-name="T125"/></text:p>
      <text:p text:style-name="_30_3_5f_Текст_20_ИТММ"><text:span text:style-name="Internet_20_link"><text:span text:style-name="T68">Использовани</text:span></text:span><text:span text:style-name="Internet_20_link"><text:span text:style-name="T126">е</text:span></text:span><text:span text:style-name="Internet_20_link"><text:span text:style-name="T68"> параллелизма:</text:span></text:span></text:p>
      <text:list text:style-name="WWNum20">
        <text:list-item>
          <text:p text:style-name="P75"><text:span text:style-name="Internet_20_link"><text:span text:style-name="T68">при вычислении </text:span></text:span><text:span text:style-name="Internet_20_link"><text:span text:style-name="T89">σ, </text:span></text:span><text:span text:style-name="Internet_20_link"><text:span text:style-name="T135">τ (</text:span></text:span><text:span text:style-name="Internet_20_link"><text:span text:style-name="T136">reduction</text:span></text:span><text:span text:style-name="Internet_20_link"><text:span text:style-name="T137">(+:sum)</text:span></text:span><text:span text:style-name="Internet_20_link"><text:span text:style-name="T136">)</text:span></text:span><text:span text:style-name="Internet_20_link"><text:span text:style-name="T138"> и</text:span></text:span><text:span text:style-name="Internet_20_link"><text:span text:style-name="T135"> </text:span></text:span><text:span text:style-name="Internet_20_link"><text:span text:style-name="T68"><text:s/>вектора Хаусхолдера v в цикле с помощью </text:span></text:span><text:span text:style-name="Internet_20_link"><text:span text:style-name="T97">#pragma omp parallel for</text:span></text:span></text:p>
        </text:list-item>
      </text:list>
      <text:list text:continue-list="list4442573608669" text:style-name="WWNum19">
        <text:list-item>
          <text:p text:style-name="P56"><text:span text:style-name="Internet_20_link"><text:span text:style-name="T94">отражение в цикле по строкам при вычислении </text:span></text:span><text:span text:style-name="Internet_20_link"><text:span text:style-name="T95">R </text:span></text:span><text:span text:style-name="Internet_20_link"><text:span text:style-name="T94">и </text:span></text:span><text:span text:style-name="Internet_20_link"><text:span text:style-name="T95">Q </text:span></text:span><text:span text:style-name="Internet_20_link"><text:span text:style-name="T94">можно также выполнять параллельно.</text:span></text:span></text:p>
        </text:list-item>
      </text:list>
      <text:p text:style-name="_30_3_5f_Текст_20_ИТММ"><text:span text:style-name="Internet_20_link"><text:span text:style-name="T139">Замеры для типа данных double (вещественное число двойной точности) на разном количестве потоков дали следующие результаты:</text:span></text:span></text:p>
      <text:p text:style-name="P65" loext:marker-style-name="T19"/>
      <text:p text:style-name="P55"><text:span text:style-name="T19">Схема 3</text:span> – Замеры времени работы программы на разных размерах матрицы <text:span text:style-name="T18">A</text:span></text:p>
      <text:p text:style-name="P76"><draw:frame draw:style-name="fr5" draw:name="Объект146" text:anchor-type="as-char" svg:width="16.475cm" svg:height="20.72cm" draw:z-index="17"><draw:object xlink:href="./Object 137" xlink:type="simple" xlink:show="embed" xlink:actuate="onLoad"/><draw:image xlink:href="./ObjectReplacements/Object 137" xlink:type="simple" xlink:show="embed" xlink:actuate="onLoad"/><svg:desc>диаграмма</svg:desc></draw:frame></text:p>
      <text:p text:style-name="_30_3_5f_Текст_20_ИТММ"><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77">Таблица 3 – Данные об ускорении для третьей реализации <text:line-break/><text:span text:style-name="T18">QR-</text:span><text:span text:style-name="T19">разложения с помощью отражений Хаусхолдера в зависимости</text:span> от количества потоков</text:p>
      <table:table table:name="Таблица3" table:style-name="Таблица3">
        <table:table-column table:style-name="Таблица3.A" table:number-columns-repeated="3"/>
        <table:table-column table:style-name="Таблица3.D"/>
        <table:table-column table:style-name="Таблица3.E"/>
        <table:table-row table:style-name="Таблица3.1">
          <table:table-cell table:style-name="Таблица3.A1" table:number-rows-spanned="2" office:value-type="string">
            <text:p text:style-name="P57" loext:marker-style-name="T102"><text:span text:style-name="T102">Размер данных, </text:span><text:span text:style-name="T103">NxN</text:span></text:p>
          </table:table-cell>
          <table:table-cell table:style-name="Таблица3.A1" table:number-rows-spanned="2" office:value-type="string">
            <text:p text:style-name="P57" loext:marker-style-name="T102"><text:span text:style-name="T102">Время работы последовательной версии</text:span><text:span text:style-name="T102"/></text:p>
          </table:table-cell>
          <table:table-cell table:style-name="Таблица3.C1" table:number-columns-spanned="3" office:value-type="string">
            <text:p text:style-name="P57" loext:marker-style-name="T102"><text:span text:style-name="T102">Ускорение относительно последовательной версии</text:span><text:span text:style-name="T102"/></text:p>
          </table:table-cell>
          <table:covered-table-cell/>
          <table:covered-table-cell/>
        </table:table-row>
        <table:table-row table:style-name="Таблица3.1">
          <table:covered-table-cell table:style-name="Таблица3.A2"/>
          <table:covered-table-cell table:style-name="Таблица3.A2"/>
          <table:table-cell table:style-name="Таблица3.A2" office:value-type="string">
            <text:p text:style-name="P57" loext:marker-style-name="T102"><text:span text:style-name="T102">2 потока</text:span><text:span text:style-name="T102"/></text:p>
          </table:table-cell>
          <table:table-cell table:style-name="Таблица3.A2" office:value-type="string">
            <text:p text:style-name="P57" loext:marker-style-name="T102"><text:span text:style-name="T102">4 потока</text:span><text:span text:style-name="T102"/></text:p>
          </table:table-cell>
          <table:table-cell table:style-name="Таблица3.E2" office:value-type="string">
            <text:p text:style-name="P57" loext:marker-style-name="T102"><text:span text:style-name="T102">8 потоков</text:span><text:span text:style-name="T102"/></text:p>
          </table:table-cell>
        </table:table-row>
        <table:table-row table:style-name="Таблица3.1">
          <table:table-cell table:style-name="Таблица3.E2" office:value-type="string">
            <text:p text:style-name="P58"><text:span text:style-name="Internet_20_link"><text:span text:style-name="T104">100</text:span></text:span></text:p>
          </table:table-cell>
          <table:table-cell table:style-name="Таблица3.A2" office:value-type="string">
            <text:p text:style-name="P59"><text:span text:style-name="Internet_20_link"><text:span text:style-name="T105">0,0009985</text:span></text:span></text:p>
          </table:table-cell>
          <table:table-cell table:style-name="Таблица3.A2" office:value-type="string">
            <text:p text:style-name="P59"><text:span text:style-name="Internet_20_link"><text:span text:style-name="T105">0,68</text:span></text:span></text:p>
          </table:table-cell>
          <table:table-cell table:style-name="Таблица3.A2" office:value-type="string">
            <text:p text:style-name="P59"><text:span text:style-name="Internet_20_link"><text:span text:style-name="T105">0,6</text:span></text:span></text:p>
          </table:table-cell>
          <table:table-cell table:style-name="Таблица3.E2" office:value-type="string">
            <text:p text:style-name="P59"><text:span text:style-name="Internet_20_link"><text:span text:style-name="T105">0,26</text:span></text:span></text:p>
          </table:table-cell>
        </table:table-row>
        <table:table-row table:style-name="Таблица3.1">
          <table:table-cell table:style-name="Таблица3.E2" office:value-type="string">
            <text:p text:style-name="P58"><text:span text:style-name="Internet_20_link"><text:span text:style-name="T104">200</text:span></text:span></text:p>
          </table:table-cell>
          <table:table-cell table:style-name="Таблица3.A2" office:value-type="string">
            <text:p text:style-name="P59"><text:span text:style-name="Internet_20_link"><text:span text:style-name="T105">0,0052362</text:span></text:span></text:p>
          </table:table-cell>
          <table:table-cell table:style-name="Таблица3.A2" office:value-type="string">
            <text:p text:style-name="P59"><text:span text:style-name="Internet_20_link"><text:span text:style-name="T105">0,8</text:span></text:span></text:p>
          </table:table-cell>
          <table:table-cell table:style-name="Таблица3.A2" office:value-type="string">
            <text:p text:style-name="P59"><text:span text:style-name="Internet_20_link"><text:span text:style-name="T105">1,46</text:span></text:span></text:p>
          </table:table-cell>
          <table:table-cell table:style-name="Таблица3.E2" office:value-type="string">
            <text:p text:style-name="P59"><text:span text:style-name="Internet_20_link"><text:span text:style-name="T105">0,68</text:span></text:span></text:p>
          </table:table-cell>
        </table:table-row>
        <table:table-row table:style-name="Таблица3.1">
          <table:table-cell table:style-name="Таблица3.E2" office:value-type="string">
            <text:p text:style-name="P58"><text:span text:style-name="Internet_20_link"><text:span text:style-name="T104">300</text:span></text:span></text:p>
          </table:table-cell>
          <table:table-cell table:style-name="Таблица3.A2" office:value-type="string">
            <text:p text:style-name="P59"><text:span text:style-name="Internet_20_link"><text:span text:style-name="T105">0,0154869</text:span></text:span></text:p>
          </table:table-cell>
          <table:table-cell table:style-name="Таблица3.A2" office:value-type="string">
            <text:p text:style-name="P59"><text:span text:style-name="Internet_20_link"><text:span text:style-name="T105">0,83</text:span></text:span></text:p>
          </table:table-cell>
          <table:table-cell table:style-name="Таблица3.A2" office:value-type="string">
            <text:p text:style-name="P59"><text:span text:style-name="Internet_20_link"><text:span text:style-name="T105">1,52</text:span></text:span></text:p>
          </table:table-cell>
          <table:table-cell table:style-name="Таблица3.E2" office:value-type="string">
            <text:p text:style-name="P59"><text:span text:style-name="Internet_20_link"><text:span text:style-name="T105">1,38</text:span></text:span></text:p>
          </table:table-cell>
        </table:table-row>
        <table:table-row table:style-name="Таблица3.1">
          <table:table-cell table:style-name="Таблица3.E2" office:value-type="string">
            <text:p text:style-name="P58"><text:span text:style-name="Internet_20_link"><text:span text:style-name="T104">400</text:span></text:span></text:p>
          </table:table-cell>
          <table:table-cell table:style-name="Таблица3.A2" office:value-type="string">
            <text:p text:style-name="P59"><text:span text:style-name="Internet_20_link"><text:span text:style-name="T105">0,0404785</text:span></text:span></text:p>
          </table:table-cell>
          <table:table-cell table:style-name="Таблица3.A2" office:value-type="string">
            <text:p text:style-name="P59"><text:span text:style-name="Internet_20_link"><text:span text:style-name="T105">1,11</text:span></text:span></text:p>
          </table:table-cell>
          <table:table-cell table:style-name="Таблица3.A2" office:value-type="string">
            <text:p text:style-name="P59"><text:span text:style-name="Internet_20_link"><text:span text:style-name="T105">2,61</text:span></text:span></text:p>
          </table:table-cell>
          <table:table-cell table:style-name="Таблица3.E2" office:value-type="string">
            <text:p text:style-name="P59"><text:span text:style-name="Internet_20_link"><text:span text:style-name="T105">1,67</text:span></text:span></text:p>
          </table:table-cell>
        </table:table-row>
        <table:table-row table:style-name="Таблица3.1">
          <table:table-cell table:style-name="Таблица3.E2" office:value-type="string">
            <text:p text:style-name="P58"><text:span text:style-name="Internet_20_link"><text:span text:style-name="T104">500</text:span></text:span></text:p>
          </table:table-cell>
          <table:table-cell table:style-name="Таблица3.A2" office:value-type="string">
            <text:p text:style-name="P59"><text:span text:style-name="Internet_20_link"><text:span text:style-name="T105">0,0771692</text:span></text:span></text:p>
          </table:table-cell>
          <table:table-cell table:style-name="Таблица3.A2" office:value-type="string">
            <text:p text:style-name="P59"><text:span text:style-name="Internet_20_link"><text:span text:style-name="T105">1,07</text:span></text:span></text:p>
          </table:table-cell>
          <table:table-cell table:style-name="Таблица3.A2" office:value-type="string">
            <text:p text:style-name="P59"><text:span text:style-name="Internet_20_link"><text:span text:style-name="T105">2,14</text:span></text:span></text:p>
          </table:table-cell>
          <table:table-cell table:style-name="Таблица3.E2" office:value-type="string">
            <text:p text:style-name="P59"><text:span text:style-name="Internet_20_link"><text:span text:style-name="T105">2,62</text:span></text:span></text:p>
          </table:table-cell>
        </table:table-row>
        <table:table-row table:style-name="Таблица3.1">
          <table:table-cell table:style-name="Таблица3.E2" office:value-type="string">
            <text:p text:style-name="P58"><text:span text:style-name="Internet_20_link"><text:span text:style-name="T104">1000</text:span></text:span></text:p>
          </table:table-cell>
          <table:table-cell table:style-name="Таблица3.A2" office:value-type="string">
            <text:p text:style-name="P59"><text:span text:style-name="Internet_20_link"><text:span text:style-name="T105">0,638065</text:span></text:span></text:p>
          </table:table-cell>
          <table:table-cell table:style-name="Таблица3.A2" office:value-type="string">
            <text:p text:style-name="P59"><text:span text:style-name="Internet_20_link"><text:span text:style-name="T105">3,58</text:span></text:span></text:p>
          </table:table-cell>
          <table:table-cell table:style-name="Таблица3.A2" office:value-type="string">
            <text:p text:style-name="P59"><text:span text:style-name="Internet_20_link"><text:span text:style-name="T105">2,93</text:span></text:span></text:p>
          </table:table-cell>
          <table:table-cell table:style-name="Таблица3.E2" office:value-type="string">
            <text:p text:style-name="P59"><text:span text:style-name="Internet_20_link"><text:span text:style-name="T105">3,83</text:span></text:span></text:p>
          </table:table-cell>
        </table:table-row>
        <table:table-row table:style-name="Таблица3.1">
          <table:table-cell table:style-name="Таблица3.E2" office:value-type="string">
            <text:p text:style-name="P58"><text:span text:style-name="Internet_20_link"><text:span text:style-name="T104">1500</text:span></text:span></text:p>
          </table:table-cell>
          <table:table-cell table:style-name="Таблица3.A2" office:value-type="string">
            <text:p text:style-name="P59"><text:span text:style-name="Internet_20_link"><text:span text:style-name="T105">2,3033</text:span></text:span></text:p>
          </table:table-cell>
          <table:table-cell table:style-name="Таблица3.A2" office:value-type="string">
            <text:p text:style-name="P59"><text:span text:style-name="Internet_20_link"><text:span text:style-name="T105">2,91</text:span></text:span></text:p>
          </table:table-cell>
          <table:table-cell table:style-name="Таблица3.A2" office:value-type="string">
            <text:p text:style-name="P59"><text:span text:style-name="Internet_20_link"><text:span text:style-name="T105">2,72</text:span></text:span></text:p>
          </table:table-cell>
          <table:table-cell table:style-name="Таблица3.E2" office:value-type="string">
            <text:p text:style-name="P59"><text:span text:style-name="Internet_20_link"><text:span text:style-name="T105">3,48</text:span></text:span></text:p>
          </table:table-cell>
        </table:table-row>
        <table:table-row table:style-name="Таблица3.1">
          <table:table-cell table:style-name="Таблица3.E2" office:value-type="string">
            <text:p text:style-name="P58"><text:span text:style-name="Internet_20_link"><text:span text:style-name="T104">2000</text:span></text:span></text:p>
          </table:table-cell>
          <table:table-cell table:style-name="Таблица3.A2" office:value-type="string">
            <text:p text:style-name="P59"><text:span text:style-name="Internet_20_link"><text:span text:style-name="T105">5,85005</text:span></text:span></text:p>
          </table:table-cell>
          <table:table-cell table:style-name="Таблица3.A2" office:value-type="string">
            <text:p text:style-name="P59"><text:span text:style-name="Internet_20_link"><text:span text:style-name="T105">2,2</text:span></text:span></text:p>
          </table:table-cell>
          <table:table-cell table:style-name="Таблица3.A2" office:value-type="string">
            <text:p text:style-name="P59"><text:span text:style-name="Internet_20_link"><text:span text:style-name="T105">2,21</text:span></text:span></text:p>
          </table:table-cell>
          <table:table-cell table:style-name="Таблица3.E2" office:value-type="string">
            <text:p text:style-name="P59"><text:span text:style-name="Internet_20_link"><text:span text:style-name="T105">2,37</text:span></text:span></text:p>
          </table:table-cell>
        </table:table-row>
        <table:table-row table:style-name="Таблица3.1">
          <table:table-cell table:style-name="Таблица3.E2" office:value-type="string">
            <text:p text:style-name="P58"><text:span text:style-name="Internet_20_link"><text:span text:style-name="T104">2500</text:span></text:span></text:p>
          </table:table-cell>
          <table:table-cell table:style-name="Таблица3.A2" office:value-type="string">
            <text:p text:style-name="P59"><text:span text:style-name="Internet_20_link"><text:span text:style-name="T105">11,9563</text:span></text:span></text:p>
          </table:table-cell>
          <table:table-cell table:style-name="Таблица3.A2" office:value-type="string">
            <text:p text:style-name="P59"><text:span text:style-name="Internet_20_link"><text:span text:style-name="T105">2,16</text:span></text:span></text:p>
          </table:table-cell>
          <table:table-cell table:style-name="Таблица3.A2" office:value-type="string">
            <text:p text:style-name="P59"><text:span text:style-name="Internet_20_link"><text:span text:style-name="T105">2,02</text:span></text:span></text:p>
          </table:table-cell>
          <table:table-cell table:style-name="Таблица3.E2" office:value-type="string">
            <text:p text:style-name="P59"><text:span text:style-name="Internet_20_link"><text:span text:style-name="T105">2,29</text:span></text:span></text:p>
          </table:table-cell>
        </table:table-row>
        <table:table-row table:style-name="Таблица3.1">
          <table:table-cell table:style-name="Таблица3.E2" office:value-type="string">
            <text:p text:style-name="P58" loext:marker-style-name="T18"><text:span text:style-name="Internet_20_link"><text:span text:style-name="T127">3000</text:span></text:span><text:span text:style-name="T106"/></text:p>
          </table:table-cell>
          <table:table-cell table:style-name="Таблица3.A2" office:value-type="string">
            <text:p text:style-name="P59"><text:span text:style-name="Internet_20_link"><text:span text:style-name="T105">20,7962</text:span></text:span></text:p>
          </table:table-cell>
          <table:table-cell table:style-name="Таблица3.A2" office:value-type="string">
            <text:p text:style-name="P59"><text:span text:style-name="Internet_20_link"><text:span text:style-name="T105">2,09</text:span></text:span></text:p>
          </table:table-cell>
          <table:table-cell table:style-name="Таблица3.A2" office:value-type="string">
            <text:p text:style-name="P59"><text:span text:style-name="Internet_20_link"><text:span text:style-name="T105">2,09</text:span></text:span></text:p>
          </table:table-cell>
          <table:table-cell table:style-name="Таблица3.E2" office:value-type="string">
            <text:p text:style-name="P59"><text:span text:style-name="Internet_20_link"><text:span text:style-name="T105">2,14</text:span></text:span></text:p>
          </table:table-cell>
        </table:table-row>
        <table:table-row table:style-name="Таблица3.1">
          <table:table-cell table:style-name="Таблица3.E2" office:value-type="string">
            <text:p text:style-name="P58" loext:marker-style-name="T19"><text:span text:style-name="T19">3500</text:span><text:span text:style-name="T19"/></text:p>
          </table:table-cell>
          <table:table-cell table:style-name="Таблица3.A2" office:value-type="string">
            <text:p text:style-name="P59"><text:span text:style-name="Internet_20_link"><text:span text:style-name="T105">33,538</text:span></text:span></text:p>
          </table:table-cell>
          <table:table-cell table:style-name="Таблица3.A2" office:value-type="string">
            <text:p text:style-name="P59"><text:span text:style-name="Internet_20_link"><text:span text:style-name="T105">2,02</text:span></text:span></text:p>
          </table:table-cell>
          <table:table-cell table:style-name="Таблица3.A2" office:value-type="string">
            <text:p text:style-name="P59"><text:span text:style-name="Internet_20_link"><text:span text:style-name="T105">2,09</text:span></text:span></text:p>
          </table:table-cell>
          <table:table-cell table:style-name="Таблица3.E2" office:value-type="string">
            <text:p text:style-name="P59"><text:span text:style-name="Internet_20_link"><text:span text:style-name="T105">2,15</text:span></text:span></text:p>
          </table:table-cell>
        </table:table-row>
        <table:table-row table:style-name="Таблица3.1">
          <table:table-cell table:style-name="Таблица3.E2" office:value-type="string">
            <text:p text:style-name="P58" loext:marker-style-name="T19"><text:span text:style-name="T19">4000</text:span><text:span text:style-name="T19"/></text:p>
          </table:table-cell>
          <table:table-cell table:style-name="Таблица3.A2" office:value-type="string">
            <text:p text:style-name="P59"><text:span text:style-name="Internet_20_link"><text:span text:style-name="T105">50,5261</text:span></text:span></text:p>
          </table:table-cell>
          <table:table-cell table:style-name="Таблица3.A2" office:value-type="string">
            <text:p text:style-name="P59"><text:span text:style-name="Internet_20_link"><text:span text:style-name="T105">1,99</text:span></text:span></text:p>
          </table:table-cell>
          <table:table-cell table:style-name="Таблица3.A2" office:value-type="string">
            <text:p text:style-name="P59"><text:span text:style-name="Internet_20_link"><text:span text:style-name="T105">2,07</text:span></text:span></text:p>
          </table:table-cell>
          <table:table-cell table:style-name="Таблица3.E2" office:value-type="string">
            <text:p text:style-name="P59"><text:span text:style-name="Internet_20_link"><text:span text:style-name="T105">2,12</text:span></text:span></text:p>
          </table:table-cell>
        </table:table-row>
        <table:table-row table:style-name="Таблица3.1">
          <table:table-cell table:style-name="Таблица3.E2" office:value-type="string">
            <text:p text:style-name="P60" loext:marker-style-name="T107"><text:span text:style-name="T107">СРЕДНЕЕ ПОЛУЧЕННОЕ УСКОРЕНИЕ</text:span><text:span text:style-name="T107"/></text:p>
          </table:table-cell>
          <table:table-cell table:style-name="Таблица3.A2" office:value-type="string">
            <text:p text:style-name="P59"><text:span text:style-name="Internet_20_link"><text:span text:style-name="T108">-</text:span></text:span></text:p>
          </table:table-cell>
          <table:table-cell table:style-name="Таблица3.A2" office:value-type="string">
            <text:p text:style-name="P59"><text:span text:style-name="Internet_20_link"><text:span text:style-name="T108">1,79</text:span></text:span></text:p>
          </table:table-cell>
          <table:table-cell table:style-name="Таблица3.A2" office:value-type="string">
            <text:p text:style-name="P59"><text:span text:style-name="Internet_20_link"><text:span text:style-name="T108">2,04</text:span></text:span></text:p>
          </table:table-cell>
          <table:table-cell table:style-name="Таблица3.E2" office:value-type="string">
            <text:p text:style-name="P59"><text:span text:style-name="Internet_20_link"><text:span text:style-name="T108">2,08</text:span></text:span></text:p>
          </table:table-cell>
        </table:table-row>
      </table:table>
      <text:p text:style-name="_30_3_5f_Текст_20_ИТММ" loext:marker-style-name="T19"><text:span text:style-name="Internet_20_link"><text:span text:style-name="T109">Полученная версия быстрее при последовательном исполнении, но хуже параллелизуется. Получено о</text:span></text:span><text:span text:style-name="Internet_20_link"><text:span text:style-name="T140">трицательное ускорение для малых N. </text:span></text:span><text:span text:style-name="Internet_20_link"><text:span text:style-name="T109">По представленным выше данным заметно, как для N≤200 использование 8 потоков замедляет работу в 2-4 раза. Это говорит о необходимости отказаться от распараллеливания для таких размеров. Возможные улучшения: отказ от многократного создания векторов на каждой итерации, выделение единого буфера до начала цикла; использование отдельного класса </text:span></text:span><text:span text:style-name="Internet_20_link"><text:span text:style-name="T110">TransposedMatrix </text:span></text:span><text:span text:style-name="Internet_20_link"><text:span text:style-name="T109">и метода для доступа к данным может быть причиной существенного замедления; также можно объединить раздельные циклы для их соввместной параллелизации.</text:span></text:span></text:p>
      <text:p text:style-name="_30_3_5f_Текст_20_ИТММ" loext:marker-style-name="T19"><text:span text:style-name="Internet_20_link"><text:span text:style-name="T109">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10">e-12, </text:span></text:span><text:span text:style-name="Internet_20_link"><text:span text:style-name="T109">относительная — 1e-15</text:span></text:span><text:span text:style-name="Internet_20_link"><text:span text:style-name="T110">.</text:span></text:span></text:p>
      <text:p text:style-name="P29"><text:span text:style-name="Internet_20_link"><text:span text:style-name="T109">Реализация прикреплена в Приложении 3.</text:span></text:span></text:p>
      <text:p text:style-name="P55"><text:span text:style-name="T67">Сводные данные ниже содержат сравнение всех полученных реализаций </text:span><text:span text:style-name="T66">QR-</text:span><text:span text:style-name="T67">разложения на основе отражений Хаусхолдера с первой последовательной реализацией. Последним столбцом прикреплено время работы </text:span><text:span text:style-name="T66">QR-</text:span><text:span text:style-name="T67">разложения из библиотеки </text:span><text:span text:style-name="T66">SciLab. </text:span><text:span text:style-name="T67">Условия исполнения: максимально доступное количество потоков в тестируемой системе (восемь), произвольная плотная матрица</text:span><text:span text:style-name="T66"> A, </text:span><text:span text:style-name="T67">тип данных матрицы </text:span><text:span text:style-name="T66">A – double</text:span><text:span text:style-name="T67">, число с плавающей точкой двойной точности.</text:span></text:p>
      <text:p text:style-name="P78">Схема 4 – Сравнение реализаций <text:span text:style-name="T18">QR-</text:span><text:span text:style-name="T19">разложения </text:span>методом Хаусхолдера с<text:span text:style-name="T18"> QR-</text:span><text:span text:style-name="T19">разложением</text:span><text:span text:style-name="T18"> </text:span>из библиотеки SciLab</text:p>
      <text:p text:style-name="P39"><draw:frame draw:style-name="fr5" draw:name="Объект165" text:anchor-type="as-char" svg:width="16.455cm" svg:height="18.434cm" draw:z-index="18"><draw:object xlink:href="./Object 139" xlink:type="simple" xlink:show="embed" xlink:actuate="onLoad"/><draw:image xlink:href="./ObjectReplacements/Object 139" xlink:type="simple" xlink:show="embed" xlink:actuate="onLoad"/><svg:desc>диаграмма</svg:desc></draw:frame></text:p>
      <text:p text:style-name="_30_5_5f_Таблица_20_ИТММ"><text:soft-page-break/>Таблица 4 – Сравнение версий метода Хаусхолдера и версии из библиотеки SciLab</text:p>
      <table:table table:name="Таблица4" table:style-name="Таблица4">
        <table:table-column table:style-name="Таблица4.A" table:number-columns-repeated="5"/>
        <table:table-row table:style-name="Таблица4.1">
          <table:table-cell table:style-name="Таблица4.A1" office:value-type="string">
            <text:p text:style-name="P79" loext:marker-style-name="T102"><text:span text:style-name="T141">Размер данных (матрица NxN)</text:span><text:span text:style-name="T141"/></text:p>
          </table:table-cell>
          <table:table-cell table:style-name="Таблица4.A1" office:value-type="string">
            <text:p text:style-name="P57" loext:marker-style-name="T102"><text:span text:style-name="T102">Время работы </text:span><text:span text:style-name="T142">первой реализации </text:span><text:span text:style-name="T102">QR-разложения на основе отражений Хаусхолдера, с</text:span></text:p>
          </table:table-cell>
          <table:table-cell table:style-name="Таблица4.C1" office:value-type="string">
            <text:p text:style-name="P57" loext:marker-style-name="T102"><text:span text:style-name="T102">Время работы второй</text:span><text:span text:style-name="T142"> реализации, без матричных умножений</text:span><text:span text:style-name="T102"> с</text:span></text:p>
          </table:table-cell>
          <table:table-cell table:style-name="Таблица4.C1" office:value-type="string">
            <text:p text:style-name="P57" loext:marker-style-name="T102"><text:span text:style-name="T102">Время работы третьей</text:span><text:span text:style-name="T142"> реализации</text:span><text:span text:style-name="T102">,</text:span><text:span text:style-name="T103"> in-place</text:span><text:span text:style-name="T142"> алгоритм </text:span><text:span text:style-name="T102">с</text:span></text:p>
          </table:table-cell>
          <table:table-cell table:style-name="Таблица4.A1" office:value-type="string">
            <text:p text:style-name="P57" loext:marker-style-name="T102"><text:span text:style-name="T102">Время работы QR-разложения из библиотеки SciLab, с</text:span><text:span text:style-name="T102"/></text:p>
          </table:table-cell>
        </table:table-row>
        <table:table-row table:style-name="Таблица4.1">
          <table:table-cell table:style-name="Таблица4.A2" office:value-type="string">
            <text:p text:style-name="P60" loext:marker-style-name="T143"><text:span text:style-name="T143">100</text:span><text:span text:style-name="T143"/></text:p>
          </table:table-cell>
          <table:table-cell table:style-name="Таблица4.A2" office:value-type="string">
            <text:p text:style-name="P59" loext:marker-style-name="T143"><text:span text:style-name="T143">0,0489507</text:span><text:span text:style-name="T143"/></text:p>
          </table:table-cell>
          <table:table-cell table:style-name="Таблица4.C2" office:value-type="string">
            <text:p text:style-name="P59" loext:marker-style-name="T143"><text:span text:style-name="T143">0,0037046</text:span><text:span text:style-name="T143"/></text:p>
          </table:table-cell>
          <table:table-cell table:style-name="Таблица4.C2" office:value-type="string">
            <text:p text:style-name="P59" loext:marker-style-name="T143"><text:span text:style-name="T143">0,0038215</text:span><text:span text:style-name="T143"/></text:p>
          </table:table-cell>
          <table:table-cell table:style-name="Таблица4.A2" office:value-type="string">
            <text:p text:style-name="P59" loext:marker-style-name="T143"><text:span text:style-name="T143">0.0335941</text:span><text:span text:style-name="T143"/></text:p>
          </table:table-cell>
        </table:table-row>
        <table:table-row table:style-name="Таблица4.1">
          <table:table-cell table:style-name="Таблица4.A2" office:value-type="string">
            <text:p text:style-name="P60" loext:marker-style-name="T143"><text:span text:style-name="T143">200</text:span><text:span text:style-name="T143"/></text:p>
          </table:table-cell>
          <table:table-cell table:style-name="Таблица4.A2" office:value-type="string">
            <text:p text:style-name="P59" loext:marker-style-name="T143"><text:span text:style-name="T143">0,590008</text:span><text:span text:style-name="T143"/></text:p>
          </table:table-cell>
          <table:table-cell table:style-name="Таблица4.C2" office:value-type="string">
            <text:p text:style-name="P59" loext:marker-style-name="T143"><text:span text:style-name="T143">0,0087853</text:span><text:span text:style-name="T143"/></text:p>
          </table:table-cell>
          <table:table-cell table:style-name="Таблица4.C2" office:value-type="string">
            <text:p text:style-name="P59" loext:marker-style-name="T143"><text:span text:style-name="T143">0,0076733</text:span><text:span text:style-name="T143"/></text:p>
          </table:table-cell>
          <table:table-cell table:style-name="Таблица4.A2" office:value-type="string">
            <text:p text:style-name="P59" loext:marker-style-name="T143"><text:span text:style-name="T143">0.0039998</text:span><text:span text:style-name="T143"/></text:p>
          </table:table-cell>
        </table:table-row>
        <table:table-row table:style-name="Таблица4.1">
          <table:table-cell table:style-name="Таблица4.A2" office:value-type="string">
            <text:p text:style-name="P60" loext:marker-style-name="T143"><text:span text:style-name="T143">300</text:span><text:span text:style-name="T143"/></text:p>
          </table:table-cell>
          <table:table-cell table:style-name="Таблица4.A2" office:value-type="string">
            <text:p text:style-name="P59" loext:marker-style-name="T143"><text:span text:style-name="T143">2,97088</text:span><text:span text:style-name="T143"/></text:p>
          </table:table-cell>
          <table:table-cell table:style-name="Таблица4.C2" office:value-type="string">
            <text:p text:style-name="P59" loext:marker-style-name="T143"><text:span text:style-name="T143">0,0192567</text:span><text:span text:style-name="T143"/></text:p>
          </table:table-cell>
          <table:table-cell table:style-name="Таблица4.C2" office:value-type="string">
            <text:p text:style-name="P59" loext:marker-style-name="T143"><text:span text:style-name="T143">0,011263</text:span><text:span text:style-name="T143"/></text:p>
          </table:table-cell>
          <table:table-cell table:style-name="Таблица4.A2" office:value-type="string">
            <text:p text:style-name="P59" loext:marker-style-name="T143"><text:span text:style-name="T143">0.0084994</text:span><text:span text:style-name="T143"/></text:p>
          </table:table-cell>
        </table:table-row>
        <table:table-row table:style-name="Таблица4.1">
          <table:table-cell table:style-name="Таблица4.A2" office:value-type="string">
            <text:p text:style-name="P60" loext:marker-style-name="T143"><text:span text:style-name="T143">400</text:span><text:span text:style-name="T143"/></text:p>
          </table:table-cell>
          <table:table-cell table:style-name="Таблица4.A2" office:value-type="string">
            <text:p text:style-name="P59" loext:marker-style-name="T143"><text:span text:style-name="T143">9,34946</text:span><text:span text:style-name="T143"/></text:p>
          </table:table-cell>
          <table:table-cell table:style-name="Таблица4.C2" office:value-type="string">
            <text:p text:style-name="P59" loext:marker-style-name="T143"><text:span text:style-name="T143">0,0449681</text:span><text:span text:style-name="T143"/></text:p>
          </table:table-cell>
          <table:table-cell table:style-name="Таблица4.C2" office:value-type="string">
            <text:p text:style-name="P59" loext:marker-style-name="T143"><text:span text:style-name="T143">0,0242997</text:span><text:span text:style-name="T143"/></text:p>
          </table:table-cell>
          <table:table-cell table:style-name="Таблица4.A2" office:value-type="string">
            <text:p text:style-name="P59" loext:marker-style-name="T143"><text:span text:style-name="T143">0.0054738</text:span><text:span text:style-name="T143"/></text:p>
          </table:table-cell>
        </table:table-row>
        <table:table-row table:style-name="Таблица4.1">
          <table:table-cell table:style-name="Таблица4.A2" office:value-type="string">
            <text:p text:style-name="P60" loext:marker-style-name="T143"><text:span text:style-name="T143">500</text:span><text:span text:style-name="T143"/></text:p>
          </table:table-cell>
          <table:table-cell table:style-name="Таблица4.A2" office:value-type="string">
            <text:p text:style-name="P59" loext:marker-style-name="T143"><text:span text:style-name="T143">24,0397</text:span><text:span text:style-name="T143"/></text:p>
          </table:table-cell>
          <table:table-cell table:style-name="Таблица4.C2" office:value-type="string">
            <text:p text:style-name="P59" loext:marker-style-name="T143"><text:span text:style-name="T143">0,0484657</text:span><text:span text:style-name="T143"/></text:p>
          </table:table-cell>
          <table:table-cell table:style-name="Таблица4.C2" office:value-type="string">
            <text:p text:style-name="P59" loext:marker-style-name="T143"><text:span text:style-name="T143">0,029481</text:span><text:span text:style-name="T143"/></text:p>
          </table:table-cell>
          <table:table-cell table:style-name="Таблица4.A2" office:value-type="string">
            <text:p text:style-name="P59" loext:marker-style-name="T143"><text:span text:style-name="T143">0.0088187</text:span><text:span text:style-name="T143"/></text:p>
          </table:table-cell>
        </table:table-row>
        <table:table-row table:style-name="Таблица4.1">
          <table:table-cell table:style-name="Таблица4.A2" office:value-type="string">
            <text:p text:style-name="P60" loext:marker-style-name="T143"><text:span text:style-name="T143">1000</text:span><text:span text:style-name="T143"/></text:p>
          </table:table-cell>
          <table:table-cell table:style-name="Таблица4.A2" office:value-type="string">
            <text:p text:style-name="P59" loext:marker-style-name="T143"><text:span text:style-name="T143">545</text:span><text:span text:style-name="T143"/></text:p>
          </table:table-cell>
          <table:table-cell table:style-name="Таблица4.C2" office:value-type="string">
            <text:p text:style-name="P59" loext:marker-style-name="T143"><text:span text:style-name="T143">0,493081</text:span><text:span text:style-name="T143"/></text:p>
          </table:table-cell>
          <table:table-cell table:style-name="Таблица4.C2" office:value-type="string">
            <text:p text:style-name="P59" loext:marker-style-name="T143"><text:span text:style-name="T143">0,166714</text:span><text:span text:style-name="T143"/></text:p>
          </table:table-cell>
          <table:table-cell table:style-name="Таблица4.A2" office:value-type="string">
            <text:p text:style-name="P59" loext:marker-style-name="T143"><text:span text:style-name="T143">0.0412016</text:span><text:span text:style-name="T143"/></text:p>
          </table:table-cell>
        </table:table-row>
        <table:table-row table:style-name="Таблица4.1">
          <table:table-cell table:style-name="Таблица4.A2" office:value-type="string">
            <text:p text:style-name="P60" loext:marker-style-name="T143"><text:span text:style-name="T143">1500</text:span><text:span text:style-name="T143"/></text:p>
          </table:table-cell>
          <table:table-cell table:style-name="Таблица4.A2" office:value-type="string">
            <text:p text:style-name="P59" loext:marker-style-name="T143"><text:span text:style-name="T143">-</text:span><text:span text:style-name="T143"/></text:p>
          </table:table-cell>
          <table:table-cell table:style-name="Таблица4.C2" office:value-type="string">
            <text:p text:style-name="P59" loext:marker-style-name="T143"><text:span text:style-name="T143">2,74045</text:span><text:span text:style-name="T143"/></text:p>
          </table:table-cell>
          <table:table-cell table:style-name="Таблица4.C2" office:value-type="string">
            <text:p text:style-name="P59" loext:marker-style-name="T143"><text:span text:style-name="T143">0,662782</text:span><text:span text:style-name="T143"/></text:p>
          </table:table-cell>
          <table:table-cell table:style-name="Таблица4.A2" office:value-type="string">
            <text:p text:style-name="P59" loext:marker-style-name="T143"><text:span text:style-name="T143">0.0998157</text:span><text:span text:style-name="T143"/></text:p>
          </table:table-cell>
        </table:table-row>
        <table:table-row table:style-name="Таблица4.1">
          <table:table-cell table:style-name="Таблица4.A2" office:value-type="string">
            <text:p text:style-name="P60" loext:marker-style-name="T143"><text:span text:style-name="T143">2000</text:span><text:span text:style-name="T143"/></text:p>
          </table:table-cell>
          <table:table-cell table:style-name="Таблица4.A2" office:value-type="string">
            <text:p text:style-name="P59" loext:marker-style-name="T143"><text:span text:style-name="T143">-</text:span><text:span text:style-name="T143"/></text:p>
          </table:table-cell>
          <table:table-cell table:style-name="Таблица4.C2" office:value-type="string">
            <text:p text:style-name="P59" loext:marker-style-name="T143"><text:span text:style-name="T143">9,7409</text:span><text:span text:style-name="T143"/></text:p>
          </table:table-cell>
          <table:table-cell table:style-name="Таблица4.C2" office:value-type="string">
            <text:p text:style-name="P59" loext:marker-style-name="T143"><text:span text:style-name="T143">2,47128</text:span><text:span text:style-name="T143"/></text:p>
          </table:table-cell>
          <table:table-cell table:style-name="Таблица4.A2" office:value-type="string">
            <text:p text:style-name="P59" loext:marker-style-name="T143"><text:span text:style-name="T143">0.1859652</text:span><text:span text:style-name="T143"/></text:p>
          </table:table-cell>
        </table:table-row>
        <table:table-row table:style-name="Таблица4.1">
          <table:table-cell table:style-name="Таблица4.A2" office:value-type="string">
            <text:p text:style-name="P60" loext:marker-style-name="T143"><text:span text:style-name="T143">2500</text:span><text:span text:style-name="T143"/></text:p>
          </table:table-cell>
          <table:table-cell table:style-name="Таблица4.A2" office:value-type="string">
            <text:p text:style-name="P59" loext:marker-style-name="T143"><text:span text:style-name="T143">-</text:span><text:span text:style-name="T143"/></text:p>
          </table:table-cell>
          <table:table-cell table:style-name="Таблица4.C2" office:value-type="string">
            <text:p text:style-name="P59" loext:marker-style-name="T143"><text:span text:style-name="T143">19,7588</text:span><text:span text:style-name="T143"/></text:p>
          </table:table-cell>
          <table:table-cell table:style-name="Таблица4.C2" office:value-type="string">
            <text:p text:style-name="P59" loext:marker-style-name="T143"><text:span text:style-name="T143">5,2263</text:span><text:span text:style-name="T143"/></text:p>
          </table:table-cell>
          <table:table-cell table:style-name="Таблица4.A2" office:value-type="string">
            <text:p text:style-name="P59" loext:marker-style-name="T143"><text:span text:style-name="T143">0.3497936</text:span><text:span text:style-name="T143"/></text:p>
          </table:table-cell>
        </table:table-row>
        <table:table-row table:style-name="Таблица4.1">
          <table:table-cell table:style-name="Таблица4.A2" office:value-type="string">
            <text:p text:style-name="P60" loext:marker-style-name="T143"><text:span text:style-name="T143">3000</text:span><text:span text:style-name="T143"/></text:p>
          </table:table-cell>
          <table:table-cell table:style-name="Таблица4.A2" office:value-type="string">
            <text:p text:style-name="P59" loext:marker-style-name="T143"><text:span text:style-name="T143">-</text:span><text:span text:style-name="T143"/></text:p>
          </table:table-cell>
          <table:table-cell table:style-name="Таблица4.C2" office:value-type="string">
            <text:p text:style-name="P59" loext:marker-style-name="T143"><text:span text:style-name="T143">39,3139</text:span><text:span text:style-name="T143"/></text:p>
          </table:table-cell>
          <table:table-cell table:style-name="Таблица4.C2" office:value-type="string">
            <text:p text:style-name="P59" loext:marker-style-name="T143"><text:span text:style-name="T143">9,71765</text:span><text:span text:style-name="T143"/></text:p>
          </table:table-cell>
          <table:table-cell table:style-name="Таблица4.A2" office:value-type="string">
            <text:p text:style-name="P59" loext:marker-style-name="T143"><text:span text:style-name="T143">0.6075179</text:span><text:span text:style-name="T143"/></text:p>
          </table:table-cell>
        </table:table-row>
        <table:table-row table:style-name="Таблица4.1">
          <table:table-cell table:style-name="Таблица4.A2" office:value-type="string">
            <text:p text:style-name="P60" loext:marker-style-name="T143"><text:span text:style-name="T143">3500</text:span><text:span text:style-name="T143"/></text:p>
          </table:table-cell>
          <table:table-cell table:style-name="Таблица4.A2" office:value-type="string">
            <text:p text:style-name="P59" loext:marker-style-name="T143"><text:span text:style-name="T143">-</text:span><text:span text:style-name="T143"/></text:p>
          </table:table-cell>
          <table:table-cell table:style-name="Таблица4.C2" office:value-type="string">
            <text:p text:style-name="P59" loext:marker-style-name="T143"><text:span text:style-name="T143">63,9547</text:span><text:span text:style-name="T143"/></text:p>
          </table:table-cell>
          <table:table-cell table:style-name="Таблица4.C2" office:value-type="string">
            <text:p text:style-name="P59" loext:marker-style-name="T143"><text:span text:style-name="T143">15,6171</text:span><text:span text:style-name="T143"/></text:p>
          </table:table-cell>
          <table:table-cell table:style-name="Таблица4.A2" office:value-type="string">
            <text:p text:style-name="P59" loext:marker-style-name="T143"><text:span text:style-name="T143">0.9034108</text:span><text:span text:style-name="T143"/></text:p>
          </table:table-cell>
        </table:table-row>
        <table:table-row table:style-name="Таблица4.1">
          <table:table-cell table:style-name="Таблица4.A2" office:value-type="string">
            <text:p text:style-name="P60" loext:marker-style-name="T143"><text:span text:style-name="T143">4000</text:span><text:span text:style-name="T143"/></text:p>
          </table:table-cell>
          <table:table-cell table:style-name="Таблица4.A2" office:value-type="string">
            <text:p text:style-name="P59" loext:marker-style-name="T143"><text:span text:style-name="T143">-</text:span><text:span text:style-name="T143"/></text:p>
          </table:table-cell>
          <table:table-cell table:style-name="Таблица4.C2" office:value-type="string">
            <text:p text:style-name="P59" loext:marker-style-name="T143"><text:span text:style-name="T143">117,753</text:span><text:span text:style-name="T143"/></text:p>
          </table:table-cell>
          <table:table-cell table:style-name="Таблица4.C2" office:value-type="string">
            <text:p text:style-name="P59" loext:marker-style-name="T143"><text:span text:style-name="T143">23,7826</text:span><text:span text:style-name="T143"/></text:p>
          </table:table-cell>
          <table:table-cell table:style-name="Таблица4.A2" office:value-type="string">
            <text:p text:style-name="P59" loext:marker-style-name="T143"><text:span text:style-name="T143">1.4172756</text:span><text:span text:style-name="T143"/></text:p>
          </table:table-cell>
        </table:table-row>
      </table:table>
      <text:p text:style-name="P80" loext:marker-style-name="T19"/>
      <text:p text:style-name="P24" loext:marker-style-name="T19"><text:bookmark-start text:name="__RefHeading___Toc2669_713544485"/><text:bookmark-start text:name="_Toc194842671_Копия_5"/><text:span text:style-name="T19">2.2 </text:span><text:bookmark-end text:name="_Toc194842671_Копия_5"/><text:span text:style-name="T19">Реализация метода вращений Гивенса</text:span><text:bookmark-end text:name="__RefHeading___Toc2669_713544485"/><text:span text:style-name="T19"/></text:p>
      <text:p text:style-name="_30_4_5f_Заголовок_20_3_20_уровня_20_ИИТММ"><text:bookmark-start text:name="__RefHeading___Toc2681_713544485"/><text:bookmark-start text:name="_Toc194842672_Копия_4_Копия_1_Копия_1"/>2.2.1<text:bookmark-end text:name="_Toc194842672_Копия_4_Копия_1_Копия_1"/> Первая реализация<text:bookmark-end text:name="__RefHeading___Toc2681_713544485"/></text:p>
      <text:p text:style-name="_30_3_5f_Текст_20_ИТММ">Базовая реализация алгоритма разложения двумерной матрицы <text:span text:style-name="T18">A </text:span><text:span text:style-name="T19">а двумерные верхнетреугольную </text:span><text:span text:style-name="T18">R </text:span><text:span text:style-name="T19">и ортогональную </text:span><text:span text:style-name="T18">Q </text:span><text:span text:style-name="T19">будет следующим:</text:span></text:p>
      <text:list text:style-name="WWNum9">
        <text:list-item>
          <text:p text:style-name="P81"><text:span text:style-name="T18">для всех диагональных элементов (i, j) по очереди </text:span><text:span text:style-name="T19">слева направо сверху вниз вычисляется параметр вращения:</text:span></text:p>
        </text:list-item>
      </text:list>
      <text:p text:style-name="P27"><draw:frame draw:style-name="fr1" draw:name="Объект132" text:anchor-type="as-char" svg:width="6.964cm" svg:height="1.235cm" draw:z-index="148"><draw:object xlink:href="./Object 140" xlink:type="simple" xlink:show="embed" xlink:actuate="onLoad"/><draw:image xlink:href="./ObjectReplacements/Object 140" xlink:type="simple" xlink:show="embed" xlink:actuate="onLoad"/></draw:frame></text:p>
      <text:list text:continue-numbering="true" text:style-name="WWNum9">
        <text:list-item>
          <text:p text:style-name="P81"><text:span text:style-name="T19">матрица </text:span><text:span text:style-name="T18">A </text:span><text:span text:style-name="T19">домножается слева на матрицу вращения </text:span><text:span text:style-name="T18">G</text:span><text:span text:style-name="T34">ji</text:span><text:span text:style-name="T35">:</text:span></text:p>
        </text:list-item>
      </text:list>
      <text:p text:style-name="P37" loext:marker-style-name="T19"><draw:frame draw:style-name="fr1" draw:name="Объект133" text:anchor-type="as-char" svg:width="1.861cm" svg:height="0.534cm" draw:z-index="149"><draw:object xlink:href="./Object 141" xlink:type="simple" xlink:show="embed" xlink:actuate="onLoad"/><draw:image xlink:href="./ObjectReplacements/Object 141" xlink:type="simple" xlink:show="embed" xlink:actuate="onLoad"/></draw:frame><text:span text:style-name="T18">=</text:span></text:p>
      <text:p text:style-name="P39"><draw:frame draw:style-name="fr2" draw:name="Изображение9" text:anchor-type="as-char" svg:width="16.999cm" svg:height="4.964cm" draw:z-index="9"><draw:image xlink:href="Pictures/100000010000055D0000019116E31829.png" xlink:type="simple" xlink:show="embed" xlink:actuate="onLoad" draw:mime-type="image/png"/></draw:frame></text:p>
      <text:p text:style-name="_30_3_5f_Текст_20_ИТММ"><text:span text:style-name="T19">Красным отмечена главная диагональ, ниже которой все элементы должны быть занулены. Зелёным отмечен текущий зануляемый элемент </text:span><text:span text:style-name="T18">a</text:span><text:span text:style-name="T34">ij</text:span><text:span text:style-name="T18">, </text:span><text:span text:style-name="T19">все столбцы левее его уже занулены, также занулены все элементы того же столбца выше </text:span><text:span text:style-name="T18">a</text:span><text:span text:style-name="T34">ij</text:span><text:span text:style-name="T18">. </text:span><text:span text:style-name="T19">Синим выделены cosθ (</text:span><text:span text:style-name="T18">G</text:span><text:span text:style-name="T34">jj</text:span><text:span text:style-name="T18"> </text:span><text:span text:style-name="T19">и </text:span><text:span text:style-name="T18">G</text:span><text:span text:style-name="T34">ii</text:span><text:span text:style-name="T18">) </text:span><text:span text:style-name="T19">и sinθ (</text:span><text:span text:style-name="T18">G</text:span><text:span text:style-name="T34">ji</text:span><text:span text:style-name="T18"> </text:span><text:span text:style-name="T19">и </text:span><text:span text:style-name="T18">G</text:span><text:span text:style-name="T34">ij</text:span><text:span text:style-name="T18">) </text:span><text:span text:style-name="T19">и строки, которые будут вращаться</text:span><text:span text:style-name="T18">.</text:span></text:p>
      <text:p text:style-name="_30_3_5f_Текст_20_ИТММ"><text:span text:style-name="T19">Для вычисления новых значений в строках</text:span><text:span text:style-name="T18"> Aj</text:span><text:span text:style-name="T19"> и</text:span><text:span text:style-name="T18"> Ai </text:span><text:span text:style-name="T19">перемножаются строка </text:span><text:span text:style-name="T18">Gj </text:span><text:span text:style-name="T19">и столбцы </text:span><text:span text:style-name="T18">Ak, </text:span><draw:frame draw:style-name="fr1" draw:name="Объект134" text:anchor-type="as-char" svg:width="2.177cm" svg:height="0.52cm" draw:z-index="150"><draw:object xlink:href="./Object 142" xlink:type="simple" xlink:show="embed" xlink:actuate="onLoad"/><draw:image xlink:href="./ObjectReplacements/Object 142" xlink:type="simple" xlink:show="embed" xlink:actuate="onLoad"/></draw:frame><text:span text:style-name="T18"><text:s/></text:span><text:span text:style-name="T19">и </text:span><text:span text:style-name="T18">Gi </text:span><text:span text:style-name="T19">и столбцы </text:span><text:span text:style-name="T18">Ak, </text:span><draw:frame draw:style-name="fr1" draw:name="Объект135" text:anchor-type="as-char" svg:width="2.177cm" svg:height="0.52cm" draw:z-index="151"><draw:object xlink:href="./Object 143" xlink:type="simple" xlink:show="embed" xlink:actuate="onLoad"/><draw:image xlink:href="./ObjectReplacements/Object 143" xlink:type="simple" xlink:show="embed" xlink:actuate="onLoad"/></draw:frame><text:span text:style-name="T18">, т</text:span><text:span text:style-name="T19">о есть при этом в строках </text:span><text:span text:style-name="T18">Aj</text:span><text:span text:style-name="T19"> и</text:span><text:span text:style-name="T18"> Ai </text:span><text:span text:style-name="T19">ненулевые значения будут только правее, начиная с</text:span><text:span text:style-name="T18"> j </text:span><text:span text:style-name="T19">столбца, что уменьшает количество вычислений</text:span><text:span text:style-name="T18">. </text:span><text:span text:style-name="T144">Вычисление</text:span><text:span text:style-name="T19"> нового значения заключается в сложении двух умножений:</text:span></text:p>
      <text:p text:style-name="P39"><draw:frame draw:style-name="fr1" draw:name="Объект136" text:anchor-type="as-char" svg:width="3.177cm" svg:height="0.534cm" draw:z-index="152"><draw:object xlink:href="./Object 144" xlink:type="simple" xlink:show="embed" xlink:actuate="onLoad"/><draw:image xlink:href="./ObjectReplacements/Object 144" xlink:type="simple" xlink:show="embed" xlink:actuate="onLoad"/></draw:frame><text:span text:style-name="T19">,</text:span></text:p>
      <text:p text:style-name="P39"><draw:frame draw:style-name="fr1" draw:name="Объект137" text:anchor-type="as-char" svg:width="3.149cm" svg:height="0.534cm" draw:z-index="153"><draw:object xlink:href="./Object 145" xlink:type="simple" xlink:show="embed" xlink:actuate="onLoad"/><draw:image xlink:href="./ObjectReplacements/Object 145" xlink:type="simple" xlink:show="embed" xlink:actuate="onLoad"/></draw:frame><text:span text:style-name="T19">.</text:span></text:p>
      <text:p text:style-name="P82" loext:marker-style-name="T36"/>
      <text:list text:continue-numbering="true" text:style-name="WWNum9">
        <text:list-item>
          <text:p text:style-name="P83"><text:span text:style-name="T36">матрица </text:span><text:span text:style-name="T35">Q </text:span><text:span text:style-name="T36">вычисляется с помощью полученной матрицы вращения домножением на неё справа</text:span><text:span text:style-name="T35">:</text:span></text:p>
        </text:list-item>
      </text:list>
      <text:p text:style-name="P37" loext:marker-style-name="T19"><draw:frame draw:style-name="fr1" draw:name="Объект138" text:anchor-type="as-char" svg:width="2.168cm" svg:height="0.594cm" draw:z-index="154"><draw:object xlink:href="./Object 146" xlink:type="simple" xlink:show="embed" xlink:actuate="onLoad"/><draw:image xlink:href="./ObjectReplacements/Object 146" xlink:type="simple" xlink:show="embed" xlink:actuate="onLoad"/></draw:frame></text:p>
      <text:p text:style-name="P37"><draw:frame draw:style-name="fr2" draw:name="Изображение1" text:anchor-type="as-char" svg:width="17.002cm" svg:height="4.819cm" draw:z-index="7"><draw:image xlink:href="Pictures/100000010000052400000175F392F201.png" xlink:type="simple" xlink:show="embed" xlink:actuate="onLoad" draw:mime-type="image/png"/></draw:frame></text:p>
      <text:p text:style-name="_30_3_5f_Текст_20_ИТММ">Красным отмечена главная диагональ. Синим выделены cosθ (Gjj и Gii) и sinθ (Gji и Gij) и столбцы, которые будут вращаться.</text:p>
      <text:p text:style-name="_30_3_5f_Текст_20_ИТММ">Для вычисления новых значений в столбцах Qj и Qi перемножаются строка Qk, <draw:frame draw:style-name="fr1" draw:name="Объект139" text:anchor-type="as-char" svg:width="2.191cm" svg:height="0.52cm" draw:z-index="155"><draw:object xlink:href="./Object 147" xlink:type="simple" xlink:show="embed" xlink:actuate="onLoad"/><draw:image xlink:href="./ObjectReplacements/Object 147" xlink:type="simple" xlink:show="embed" xlink:actuate="onLoad"/></draw:frame>и столбцы Gj, и Qk, <draw:frame draw:style-name="fr1" draw:name="Объект140" text:anchor-type="as-char" svg:width="2.191cm" svg:height="0.52cm" draw:z-index="156"><draw:object xlink:href="./Object 148" xlink:type="simple" xlink:show="embed" xlink:actuate="onLoad"/><draw:image xlink:href="./ObjectReplacements/Object 148" xlink:type="simple" xlink:show="embed" xlink:actuate="onLoad"/></draw:frame><text:s/>и столбцы Gi, количество вычислений здесь не уменьшается. Вычисление нового значения заключается в сложении двух умножений:</text:p>
      <text:p text:style-name="P27"><draw:frame draw:style-name="fr1" draw:name="Объект141" text:anchor-type="as-char" svg:width="3.062cm" svg:height="0.534cm" draw:z-index="157"><draw:object xlink:href="./Object 149" xlink:type="simple" xlink:show="embed" xlink:actuate="onLoad"/><draw:image xlink:href="./ObjectReplacements/Object 149" xlink:type="simple" xlink:show="embed" xlink:actuate="onLoad"/></draw:frame>,</text:p>
      <text:p text:style-name="P27"><draw:frame draw:style-name="fr1" draw:name="Объект142" text:anchor-type="as-char" svg:width="3.14cm" svg:height="0.534cm" draw:z-index="158"><draw:object xlink:href="./Object 150" xlink:type="simple" xlink:show="embed" xlink:actuate="onLoad"/><draw:image xlink:href="./ObjectReplacements/Object 150" xlink:type="simple" xlink:show="embed" xlink:actuate="onLoad"/></draw:frame>.</text:p>
      <text:p text:style-name="_30_3_5f_Текст_20_ИТММ">Базовая версия программы выполнена по следующему алгоритму:</text:p>
      <text:list text:style-name="WWNum10">
        <text:list-item>
          <text:p text:style-name="P84">Занулить <draw:frame draw:style-name="fr1" draw:name="Объект143" text:anchor-type="as-char" svg:width="1.72cm" svg:height="1.173cm" draw:z-index="159"><draw:object xlink:href="./Object 151" xlink:type="simple" xlink:show="embed" xlink:actuate="onLoad"/><draw:image xlink:href="./ObjectReplacements/Object 151" xlink:type="simple" xlink:show="embed" xlink:actuate="onLoad"/></draw:frame><text:span text:style-name="T18"><text:s/></text:span><text:span text:style-name="T19">элементов, для этого в цикле по столбцам </text:span><text:span text:style-name="T18">j, </text:span><draw:frame draw:style-name="fr1" draw:name="Объект145" text:anchor-type="as-char" svg:width="2.244cm" svg:height="0.522cm" draw:z-index="160"><draw:object xlink:href="./Object 152" xlink:type="simple" xlink:show="embed" xlink:actuate="onLoad"/><draw:image xlink:href="./ObjectReplacements/Object 152" xlink:type="simple" xlink:show="embed" xlink:actuate="onLoad"/></draw:frame><text:span text:style-name="T18"><text:s/></text:span><text:span text:style-name="T19">для всех строк</text:span><text:span text:style-name="T18"> i, </text:span><draw:frame draw:style-name="fr1" draw:name="Объект147" text:anchor-type="as-char" svg:width="2.291cm" svg:height="0.522cm" draw:z-index="161"><draw:object xlink:href="./Object 153" xlink:type="simple" xlink:show="embed" xlink:actuate="onLoad"/><draw:image xlink:href="./ObjectReplacements/Object 153" xlink:type="simple" xlink:show="embed" xlink:actuate="onLoad"/></draw:frame><text:span text:style-name="T18"><text:s/></text:span><text:span text:style-name="T19">в</text:span>ыполнить вращения элемента <text:span text:style-name="T18">(i,j)</text:span><text:span text:style-name="T19">:</text:span></text:p>
          <text:list>
            <text:list-item>
              <text:p text:style-name="P84">Проверить, нужно ли занулять элемент <text:span text:style-name="T18">(i,j). </text:span><text:span text:style-name="T19">Если он уже близок к нулю, пропустить это вращение.</text:span></text:p>
            </text:list-item>
            <text:list-item>
              <text:p text:style-name="P84">Вычислить c и s по формулам:</text:p>
            </text:list-item>
          </text:list>
        </text:list-item>
      </text:list>
      <text:p text:style-name="_30_3_5f_Текст_20_ИТММ"><draw:frame draw:style-name="fr1" draw:name="Объект148" text:anchor-type="as-char" svg:width="6.964cm" svg:height="1.235cm" draw:z-index="162"><draw:object xlink:href="./Object 154" xlink:type="simple" xlink:show="embed" xlink:actuate="onLoad"/><draw:image xlink:href="./ObjectReplacements/Object 154" xlink:type="simple" xlink:show="embed" xlink:actuate="onLoad"/></draw:frame><text:span text:style-name="T19">.</text:span></text:p>
      <text:list text:continue-numbering="true" text:style-name="WWNum10">
        <text:list-item>
          <text:list>
            <text:list-item>
              <text:p text:style-name="P84">Вращать две строки i и j (элементы ajk и aik, <draw:frame draw:style-name="fr1" draw:name="Объект149" text:anchor-type="as-char" svg:width="1.598cm" svg:height="0.522cm" draw:z-index="163"><draw:object xlink:href="./Object 155" xlink:type="simple" xlink:show="embed" xlink:actuate="onLoad"/><draw:image xlink:href="./ObjectReplacements/Object 155" xlink:type="simple" xlink:show="embed" xlink:actuate="onLoad"/></draw:frame>), выполнив вычисления по формулам:</text:p>
            </text:list-item>
          </text:list>
        </text:list-item>
      </text:list>
      <text:p text:style-name="P27"><draw:frame draw:style-name="fr1" draw:name="Объект150" text:anchor-type="as-char" svg:width="3.177cm" svg:height="0.534cm" draw:z-index="164"><draw:object xlink:href="./Object 156" xlink:type="simple" xlink:show="embed" xlink:actuate="onLoad"/><draw:image xlink:href="./ObjectReplacements/Object 156" xlink:type="simple" xlink:show="embed" xlink:actuate="onLoad"/></draw:frame><text:span text:style-name="T19">,</text:span></text:p>
      <text:p text:style-name="P27"><draw:frame draw:style-name="fr1" draw:name="Объект151" text:anchor-type="as-char" svg:width="3.149cm" svg:height="0.534cm" draw:z-index="165"><draw:object xlink:href="./Object 157" xlink:type="simple" xlink:show="embed" xlink:actuate="onLoad"/><draw:image xlink:href="./ObjectReplacements/Object 157" xlink:type="simple" xlink:show="embed" xlink:actuate="onLoad"/></draw:frame><text:span text:style-name="T145">.</text:span><text:span text:style-name="T146"> </text:span></text:p>
      <text:p text:style-name="_30_3_5f_Текст_20_ИТММ"><text:span text:style-name="T145">Это можно сделать параллельно для всех </text:span><text:span text:style-name="T146">k</text:span><text:span text:style-name="T145">.</text:span></text:p>
      <text:list text:continue-numbering="true" text:style-name="WWNum10">
        <text:list-item>
          <text:list>
            <text:list-item>
              <text:p text:style-name="P84"><text:soft-page-break/>С помощью матрицы вращения накапливать матрицу Q. Для этого вращать два столбца i и j (элементы qkj и qki, <draw:frame draw:style-name="fr1" draw:name="Объект152" text:anchor-type="as-char" svg:width="1.693cm" svg:height="0.522cm" draw:z-index="166"><draw:object xlink:href="./Object 158" xlink:type="simple" xlink:show="embed" xlink:actuate="onLoad"/><draw:image xlink:href="./ObjectReplacements/Object 158" xlink:type="simple" xlink:show="embed" xlink:actuate="onLoad"/></draw:frame>), выполнив вычисления по формулам:</text:p>
            </text:list-item>
          </text:list>
        </text:list-item>
      </text:list>
      <text:p text:style-name="P39"><draw:frame draw:style-name="fr1" draw:name="Объект153" text:anchor-type="as-char" svg:width="3.062cm" svg:height="0.534cm" draw:z-index="167"><draw:object xlink:href="./Object 159" xlink:type="simple" xlink:show="embed" xlink:actuate="onLoad"/><draw:image xlink:href="./ObjectReplacements/Object 159" xlink:type="simple" xlink:show="embed" xlink:actuate="onLoad"/></draw:frame>,</text:p>
      <text:p text:style-name="P39"><draw:frame draw:style-name="fr1" draw:name="Объект154" text:anchor-type="as-char" svg:width="3.14cm" svg:height="0.534cm" draw:z-index="168"><draw:object xlink:href="./Object 160" xlink:type="simple" xlink:show="embed" xlink:actuate="onLoad"/><draw:image xlink:href="./ObjectReplacements/Object 160" xlink:type="simple" xlink:show="embed" xlink:actuate="onLoad"/></draw:frame>.</text:p>
      <text:p text:style-name="_30_3_5f_Текст_20_ИТММ">К вычислению Q может быть два подхода. </text:p>
      <text:p text:style-name="_30_3_5f_Текст_20_ИТММ">Можно вычислять вращения столбцов для Q в том же месте, где вычисляется R. В результате код будет выглядеть следующим образом:</text:p>
      <text:p text:style-name="P50" loext:marker-style-name="T81"><text:span text:style-name="T81">Процедура QR_decomposition(A, Q, R):</text:span><text:span text:style-name="T81"/></text:p>
      <text:p text:style-name="P50" loext:marker-style-name="T81"><text:span text:style-name="T81">R = A </text:span><text:span text:style-name="T82">// копирование исходной матрицы в </text:span><text:span text:style-name="T83">R</text:span></text:p>
      <text:p text:style-name="P50" loext:marker-style-name="T86"><text:span text:style-name="T81">Q = I </text:span><text:span text:style-name="T85">// Q инициализируется единичной матрицей</text:span></text:p>
      <text:p text:style-name="P85" loext:marker-style-name="T147"/>
      <text:p text:style-name="P86" loext:marker-style-name="T147"><text:span text:style-name="T89">Для j от 0 до N-2 выполнить:</text:span><text:span text:style-name="T147"> </text:span><text:span text:style-name="T85">// цикл по столбцам</text:span></text:p>
      <text:p text:style-name="P86" loext:marker-style-name="T147"><text:span text:style-name="T89"><text:s text:c="4"/>Для i от j+1 до N-1 выполнить:</text:span><text:span text:style-name="T147"> </text:span><text:span text:style-name="T85">// цикл по строкам ниже диагонали</text:span></text:p>
      <text:p text:style-name="P86" loext:marker-style-name="T147"><text:span text:style-name="T147"><text:s text:c="8"/></text:span><text:span text:style-name="T115">// зануление элементов R[i][j]</text:span></text:p>
      <text:p text:style-name="P86" loext:marker-style-name="T115"><text:span text:style-name="T115"><text:s text:c="8"/>// вычисление коэффициентов вращения c = cos(θ), s = -sin(θ)</text:span><text:span text:style-name="T115"/></text:p>
      <text:p text:style-name="P86" loext:marker-style-name="T91"><text:span text:style-name="T91"><text:s text:c="8"/>r = √(R[j][j]² + R[i][j]²)</text:span><text:span text:style-name="T91"/></text:p>
      <text:p text:style-name="P86" loext:marker-style-name="T91"><text:span text:style-name="T91"><text:s text:c="8"/>c = R[j][j] / r</text:span><text:span text:style-name="T91"/></text:p>
      <text:p text:style-name="P86" loext:marker-style-name="T91"><text:span text:style-name="T91"><text:s text:c="8"/>s = -R[i][j] / r</text:span><text:span text:style-name="T91"/></text:p>
      <text:p text:style-name="P86" loext:marker-style-name="T147"><text:span text:style-name="T147"><text:s text:c="8"/></text:span><text:span text:style-name="T85">// вращение двух строк i</text:span><text:span text:style-name="T87"> </text:span><text:span text:style-name="T85">и </text:span><text:span text:style-name="T87">j</text:span></text:p>
      <text:p text:style-name="P86" loext:marker-style-name="T91"><text:span text:style-name="T91"><text:s text:c="8"/>Для k от 0 до N-1 выполнить (параллельно):</text:span><text:span text:style-name="T91"/></text:p>
      <text:p text:style-name="P86" loext:marker-style-name="T91"><text:span text:style-name="T91"><text:s text:c="12"/>temp_R <text:s/>= R[j][k] * c - R[i][k] * s</text:span><text:span text:style-name="T91"/></text:p>
      <text:p text:style-name="P86" loext:marker-style-name="T91"><text:span text:style-name="T91"><text:s text:c="12"/>R[i][k] = R[j][k] * s + R[i][k] * c</text:span><text:span text:style-name="T91"/></text:p>
      <text:p text:style-name="P86" loext:marker-style-name="T91"><text:span text:style-name="T91"><text:s text:c="12"/>R[j][k] = temp_R</text:span><text:span text:style-name="T91"/></text:p>
      <text:p text:style-name="P86" loext:marker-style-name="T91"><text:span text:style-name="T91"><text:s text:c="8"/>Конец цикла по k</text:span><text:span text:style-name="T91"/></text:p>
      <text:p text:style-name="P85" loext:marker-style-name="T147"/>
      <text:p text:style-name="P86" loext:marker-style-name="T147"><text:span text:style-name="T147"><text:s text:c="8"/></text:span><text:span text:style-name="T85">// вращение двух столбцов i</text:span><text:span text:style-name="T87"> </text:span><text:span text:style-name="T85">и </text:span><text:span text:style-name="T87">j</text:span></text:p>
      <text:p text:style-name="P86" loext:marker-style-name="T91"><text:span text:style-name="T91"><text:s text:c="8"/>Для k от 0 до N-1 выполнить (параллельно):</text:span><text:span text:style-name="T91"/></text:p>
      <text:p text:style-name="P86" loext:marker-style-name="T91"><text:span text:style-name="T91"><text:s text:c="12"/>temp_Q <text:s/>= c * Q[k][j] - s * Q[k][i]</text:span><text:span text:style-name="T91"/></text:p>
      <text:p text:style-name="P86" loext:marker-style-name="T91"><text:span text:style-name="T91"><text:s text:c="12"/>Q[k][i] = s * Q[k][j] + c * Q[k][i]</text:span><text:span text:style-name="T91"/></text:p>
      <text:p text:style-name="P86" loext:marker-style-name="T91"><text:span text:style-name="T91"><text:s text:c="12"/>Q[k][j] = temp_Q</text:span><text:span text:style-name="T91"/></text:p>
      <text:p text:style-name="P86" loext:marker-style-name="T117"><text:span text:style-name="T91"><text:s text:c="8"/>Конец цикла по k</text:span><text:span text:style-name="T91"/></text:p>
      <text:p text:style-name="P86" loext:marker-style-name="T91"><text:span text:style-name="T91"><text:s text:c="4"/>Конец цикла по i</text:span><text:span text:style-name="T91"/></text:p>
      <text:p text:style-name="P86" loext:marker-style-name="T91"><text:span text:style-name="T91">Конец цикла по j</text:span><text:span text:style-name="T91"/></text:p>
      <text:p text:style-name="P86" loext:marker-style-name="T91"><text:span text:style-name="T91">Конец процедуры.</text:span><text:span text:style-name="T91"/></text:p>
      <text:p text:style-name="P87" loext:marker-style-name="T145"/>
      <text:p text:style-name="P55"><text:span text:style-name="T145">Можно сохранить параметры вращения параметры вращения </text:span><text:span text:style-name="T146">cos</text:span><text:span text:style-name="T148">θ</text:span><text:span text:style-name="T145"> и </text:span><text:span text:style-name="T146">sin</text:span><text:span text:style-name="T148">θ</text:span><text:span text:style-name="T145"> и позже, после накопления матрицы</text:span><text:span text:style-name="T146"> R,</text:span><text:span text:style-name="T145"> восстановить матрицы вращения и вычислить матрицу</text:span><text:span text:style-name="T146"> Q.</text:span></text:p>
      <text:p text:style-name="_30_3_5f_Текст_20_ИТММ"><text:span text:style-name="T145">Для этого не потребуется лишней памяти, параметры вращения </text:span><text:span text:style-name="T146">cos</text:span><text:span text:style-name="T149">θ</text:span><text:span text:style-name="T145"> и </text:span><text:span text:style-name="T146">sin</text:span><text:span text:style-name="T149">θ</text:span><text:span text:style-name="T145"> можно сохранить</text:span><text:span text:style-name="T146"> </text:span><text:span text:style-name="T145">в позиции Rij, брать в цикле для восстановления матриц вращения и вычисления Q, занулять элемент Rij. Для этого </text:span><text:span text:style-name="T146">cos</text:span><text:span text:style-name="T149">θ</text:span><text:span text:style-name="T145"> и </text:span><text:span text:style-name="T146">sin</text:span><text:span text:style-name="T149">θ</text:span><text:span text:style-name="T146"> </text:span><text:span text:style-name="T145">по формуле превратим в одно число:</text:span></text:p>
      <text:p text:style-name="P39"><draw:frame draw:style-name="fr1" draw:name="Объект156" text:anchor-type="as-char" svg:width="1.365cm" svg:height="1.004cm" draw:z-index="169"><draw:object xlink:href="./Object 161" xlink:type="simple" xlink:show="embed" xlink:actuate="onLoad"/><draw:image xlink:href="./ObjectReplacements/Object 161" xlink:type="simple" xlink:show="embed" xlink:actuate="onLoad"/></draw:frame><text:span text:style-name="T145">.</text:span></text:p>
      <text:p text:style-name="_30_3_5f_Текст_20_ИТММ"><text:span text:style-name="T145">Обратная его трансформация в </text:span><text:span text:style-name="T146">cos</text:span><text:span text:style-name="T149">θ</text:span><text:span text:style-name="T145"> и </text:span><text:span text:style-name="T146">sin</text:span><text:span text:style-name="T149">θ</text:span><text:span text:style-name="T146"> </text:span><text:span text:style-name="T145">выполняется по формулам:</text:span></text:p>
      <text:p text:style-name="P39"><draw:frame draw:style-name="fr1" draw:name="Объект157" text:anchor-type="as-char" svg:width="1.572cm" svg:height="1.124cm" draw:z-index="170"><draw:object xlink:href="./Object 162" xlink:type="simple" xlink:show="embed" xlink:actuate="onLoad"/><draw:image xlink:href="./ObjectReplacements/Object 162" xlink:type="simple" xlink:show="embed" xlink:actuate="onLoad"/></draw:frame><text:span text:style-name="T145">, </text:span><draw:frame draw:style-name="fr1" draw:name="Объект158" text:anchor-type="as-char" svg:width="1.736cm" svg:height="1.064cm" draw:z-index="171"><draw:object xlink:href="./Object 163" xlink:type="simple" xlink:show="embed" xlink:actuate="onLoad"/><draw:image xlink:href="./ObjectReplacements/Object 163" xlink:type="simple" xlink:show="embed" xlink:actuate="onLoad"/></draw:frame>.</text:p>
      <text:p text:style-name="_30_3_5f_Текст_20_ИТММ">Кроме того, хранение в памяти матрицы <text:span text:style-name="T18">Q </text:span>по столбцам с точки зрения устройства компьютерной памяти совсем неудачно — элементы разделены, не будет оптимизации по попаданию нескольких подряд лежащих элементов в кэш. Если хранить матрицу <text:span text:style-name="T18">Q </text:span><text:span text:style-name="T19">транспонированной, обращение будет к элементам одной строки, которые в памяти будут лежать рядом. Должно смениться обращение:</text:span></text:p>
      <text:p text:style-name="P39"><draw:frame draw:style-name="fr1" draw:name="Объект159" text:anchor-type="as-char" svg:width="2.981cm" svg:height="0.52cm" draw:z-index="172"><draw:object xlink:href="./Object 164" xlink:type="simple" xlink:show="embed" xlink:actuate="onLoad"/><draw:image xlink:href="./ObjectReplacements/Object 164" xlink:type="simple" xlink:show="embed" xlink:actuate="onLoad"/></draw:frame>,</text:p>
      <text:p text:style-name="P39"><draw:frame draw:style-name="fr1" draw:name="Объект160" text:anchor-type="as-char" svg:width="3.119cm" svg:height="0.52cm" draw:z-index="173"><draw:object xlink:href="./Object 165" xlink:type="simple" xlink:show="embed" xlink:actuate="onLoad"/><draw:image xlink:href="./ObjectReplacements/Object 165" xlink:type="simple" xlink:show="embed" xlink:actuate="onLoad"/></draw:frame>.</text:p>
      <text:p text:style-name="_30_3_5f_Текст_20_ИТММ">А также в конце выполнения разложения необходимо сделать транспонирование:</text:p>
      <text:p text:style-name="_30_3_5f_Текст_20_ИТММ">Эксперимент показал, что наибольший выигрыш по времени<text:span text:style-name="T18"> </text:span><text:span text:style-name="T19">для матрицы </text:span><text:span text:style-name="T18">A</text:span><text:span text:style-name="T19"> больше </text:span><text:span text:style-name="T18">1000x1000 </text:span><text:span text:style-name="T19">элементов </text:span>даёт способ, согласно которому нужно вычислять матрицу <text:span text:style-name="T18">Q </text:span><text:span text:style-name="T19">отдельно от матрицы </text:span><text:span text:style-name="T18">R </text:span><text:span text:style-name="T19">и хранить </text:span><text:span text:style-name="T18">Q </text:span><text:span text:style-name="T19">транспонированной</text:span><text:span text:style-name="T18">.</text:span></text:p>
      <text:p text:style-name="_30_3_5f_Текст_20_ИТММ"><text:span text:style-name="Internet_20_link"><text:span text:style-name="T139">Замеры для типа данных double (вещественное число двойной точности) на разном количестве потоков дали следующие результаты:</text:span></text:span></text:p>
      <text:p text:style-name="_30_5_5f_Таблица_20_ИТММ"><text:soft-page-break/><text:span text:style-name="T19">Схема 5</text:span> – Замеры времени работы программы на разных размерах матрицы <text:span text:style-name="T18">A</text:span><draw:frame draw:style-name="fr5" draw:name="Объект162" text:anchor-type="as-char" svg:width="16.701cm" svg:height="19.3cm" draw:z-index="13"><draw:object xlink:href="./Object 167" xlink:type="simple" xlink:show="embed" xlink:actuate="onLoad"/><draw:image xlink:href="./ObjectReplacements/Object 167" xlink:type="simple" xlink:show="embed" xlink:actuate="onLoad"/><svg:desc>диаграмма</svg:desc></draw:frame></text:p>
      <text:p text:style-name="_30_3_5f_Текст_20_ИТММ"><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_30_5_5f_Таблица_20_ИТММ"/>
      <text:p text:style-name="P77">Таблица 5 – Данные об ускорении для первой реализации<text:line-break/><text:span text:style-name="T18">QR-</text:span><text:span text:style-name="T19">разложения с помощью вращений Гивенса в зависимости</text:span> от количества потоков</text:p>
      <table:table table:name="Таблица5" table:style-name="Таблица5">
        <table:table-column table:style-name="Таблица5.A" table:number-columns-repeated="3"/>
        <table:table-column table:style-name="Таблица5.D"/>
        <table:table-column table:style-name="Таблица5.E"/>
        <table:table-row table:style-name="Таблица5.1">
          <table:table-cell table:style-name="Таблица5.A1" table:number-rows-spanned="2" office:value-type="string">
            <text:p text:style-name="P57" loext:marker-style-name="T102"><text:span text:style-name="T102">Размер данных, </text:span><text:span text:style-name="T103">NxN</text:span></text:p>
          </table:table-cell>
          <table:table-cell table:style-name="Таблица5.A1" table:number-rows-spanned="2" office:value-type="string">
            <text:p text:style-name="P57" loext:marker-style-name="T102"><text:span text:style-name="T102">Время работы последовательной версии</text:span><text:span text:style-name="T102"/></text:p>
          </table:table-cell>
          <table:table-cell table:style-name="Таблица5.C1" table:number-columns-spanned="3" office:value-type="string">
            <text:p text:style-name="P57" loext:marker-style-name="T102"><text:span text:style-name="T102">Ускорение относительно последовательной версии</text:span><text:span text:style-name="T102"/></text:p>
          </table:table-cell>
          <table:covered-table-cell/>
          <table:covered-table-cell/>
        </table:table-row>
        <table:table-row table:style-name="Таблица5.1">
          <table:covered-table-cell table:style-name="Таблица5.A2"/>
          <table:covered-table-cell table:style-name="Таблица5.A2"/>
          <table:table-cell table:style-name="Таблица5.A2" office:value-type="string">
            <text:p text:style-name="P57" loext:marker-style-name="T102"><text:span text:style-name="T102">2 потока</text:span><text:span text:style-name="T102"/></text:p>
          </table:table-cell>
          <table:table-cell table:style-name="Таблица5.A2" office:value-type="string">
            <text:p text:style-name="P57" loext:marker-style-name="T102"><text:span text:style-name="T102">4 потока</text:span><text:span text:style-name="T102"/></text:p>
          </table:table-cell>
          <table:table-cell table:style-name="Таблица5.E2" office:value-type="string">
            <text:p text:style-name="P57" loext:marker-style-name="T102"><text:span text:style-name="T102">8 потоков</text:span><text:span text:style-name="T102"/></text:p>
          </table:table-cell>
        </table:table-row>
        <table:table-row table:style-name="Таблица5.1">
          <table:table-cell table:style-name="Таблица5.E2" office:value-type="string">
            <text:p text:style-name="P58"><text:span text:style-name="Internet_20_link"><text:span text:style-name="T104">100</text:span></text:span></text:p>
          </table:table-cell>
          <table:table-cell table:style-name="Таблица5.A2" office:value-type="string">
            <text:p text:style-name="P59" loext:marker-style-name="T105"><text:span text:style-name="Internet_20_link"><text:span text:style-name="T105">0,0013115</text:span></text:span><text:span text:style-name="T105"/></text:p>
          </table:table-cell>
          <table:table-cell table:style-name="Таблица5.A2" office:value-type="string">
            <text:p text:style-name="P59" loext:marker-style-name="T105"><text:span text:style-name="Internet_20_link"><text:span text:style-name="T105">0,91</text:span></text:span><text:span text:style-name="T105"/></text:p>
          </table:table-cell>
          <table:table-cell table:style-name="Таблица5.A2" office:value-type="string">
            <text:p text:style-name="P59" loext:marker-style-name="T105"><text:span text:style-name="Internet_20_link"><text:span text:style-name="T105">0,7</text:span></text:span><text:span text:style-name="T105"/></text:p>
          </table:table-cell>
          <table:table-cell table:style-name="Таблица5.E2" office:value-type="string">
            <text:p text:style-name="P59" loext:marker-style-name="T105"><text:span text:style-name="Internet_20_link"><text:span text:style-name="T105">1,05</text:span></text:span><text:span text:style-name="T105"/></text:p>
          </table:table-cell>
        </table:table-row>
        <table:table-row table:style-name="Таблица5.1">
          <table:table-cell table:style-name="Таблица5.E2" office:value-type="string">
            <text:p text:style-name="P58"><text:span text:style-name="Internet_20_link"><text:span text:style-name="T104">200</text:span></text:span></text:p>
          </table:table-cell>
          <table:table-cell table:style-name="Таблица5.A2" office:value-type="string">
            <text:p text:style-name="P59" loext:marker-style-name="T105"><text:span text:style-name="Internet_20_link"><text:span text:style-name="T105">0,0102885</text:span></text:span><text:span text:style-name="T105"/></text:p>
          </table:table-cell>
          <table:table-cell table:style-name="Таблица5.A2" office:value-type="string">
            <text:p text:style-name="P59" loext:marker-style-name="T105"><text:span text:style-name="Internet_20_link"><text:span text:style-name="T105">1,04</text:span></text:span><text:span text:style-name="T105"/></text:p>
          </table:table-cell>
          <table:table-cell table:style-name="Таблица5.A2" office:value-type="string">
            <text:p text:style-name="P59" loext:marker-style-name="T105"><text:span text:style-name="Internet_20_link"><text:span text:style-name="T105">1,01</text:span></text:span><text:span text:style-name="T105"/></text:p>
          </table:table-cell>
          <table:table-cell table:style-name="Таблица5.E2" office:value-type="string">
            <text:p text:style-name="P59" loext:marker-style-name="T105"><text:span text:style-name="Internet_20_link"><text:span text:style-name="T105">0,93</text:span></text:span><text:span text:style-name="T105"/></text:p>
          </table:table-cell>
        </table:table-row>
        <table:table-row table:style-name="Таблица5.1">
          <table:table-cell table:style-name="Таблица5.E2" office:value-type="string">
            <text:p text:style-name="P58"><text:span text:style-name="Internet_20_link"><text:span text:style-name="T104">300</text:span></text:span></text:p>
          </table:table-cell>
          <table:table-cell table:style-name="Таблица5.A2" office:value-type="string">
            <text:p text:style-name="P59" loext:marker-style-name="T105"><text:span text:style-name="Internet_20_link"><text:span text:style-name="T105">0,0331369</text:span></text:span><text:span text:style-name="T105"/></text:p>
          </table:table-cell>
          <table:table-cell table:style-name="Таблица5.A2" office:value-type="string">
            <text:p text:style-name="P59" loext:marker-style-name="T105"><text:span text:style-name="Internet_20_link"><text:span text:style-name="T105">1,05</text:span></text:span><text:span text:style-name="T105"/></text:p>
          </table:table-cell>
          <table:table-cell table:style-name="Таблица5.A2" office:value-type="string">
            <text:p text:style-name="P59" loext:marker-style-name="T105"><text:span text:style-name="Internet_20_link"><text:span text:style-name="T105">1,11</text:span></text:span><text:span text:style-name="T105"/></text:p>
          </table:table-cell>
          <table:table-cell table:style-name="Таблица5.E2" office:value-type="string">
            <text:p text:style-name="P59" loext:marker-style-name="T105"><text:span text:style-name="Internet_20_link"><text:span text:style-name="T105">1,05</text:span></text:span><text:span text:style-name="T105"/></text:p>
          </table:table-cell>
        </table:table-row>
        <table:table-row table:style-name="Таблица5.1">
          <table:table-cell table:style-name="Таблица5.E2" office:value-type="string">
            <text:p text:style-name="P58"><text:span text:style-name="Internet_20_link"><text:span text:style-name="T104">400</text:span></text:span></text:p>
          </table:table-cell>
          <table:table-cell table:style-name="Таблица5.A2" office:value-type="string">
            <text:p text:style-name="P59" loext:marker-style-name="T105"><text:span text:style-name="Internet_20_link"><text:span text:style-name="T105">0,0681976</text:span></text:span><text:span text:style-name="T105"/></text:p>
          </table:table-cell>
          <table:table-cell table:style-name="Таблица5.A2" office:value-type="string">
            <text:p text:style-name="P59" loext:marker-style-name="T105"><text:span text:style-name="Internet_20_link"><text:span text:style-name="T105">0,97</text:span></text:span><text:span text:style-name="T105"/></text:p>
          </table:table-cell>
          <table:table-cell table:style-name="Таблица5.A2" office:value-type="string">
            <text:p text:style-name="P59" loext:marker-style-name="T105"><text:span text:style-name="Internet_20_link"><text:span text:style-name="T105">1,01</text:span></text:span><text:span text:style-name="T105"/></text:p>
          </table:table-cell>
          <table:table-cell table:style-name="Таблица5.E2" office:value-type="string">
            <text:p text:style-name="P59" loext:marker-style-name="T105"><text:span text:style-name="Internet_20_link"><text:span text:style-name="T105">0,87</text:span></text:span><text:span text:style-name="T105"/></text:p>
          </table:table-cell>
        </table:table-row>
        <table:table-row table:style-name="Таблица5.1">
          <table:table-cell table:style-name="Таблица5.E2" office:value-type="string">
            <text:p text:style-name="P58"><text:span text:style-name="Internet_20_link"><text:span text:style-name="T104">500</text:span></text:span></text:p>
          </table:table-cell>
          <table:table-cell table:style-name="Таблица5.A2" office:value-type="string">
            <text:p text:style-name="P59" loext:marker-style-name="T105"><text:span text:style-name="Internet_20_link"><text:span text:style-name="T105">0,126461</text:span></text:span><text:span text:style-name="T105"/></text:p>
          </table:table-cell>
          <table:table-cell table:style-name="Таблица5.A2" office:value-type="string">
            <text:p text:style-name="P59" loext:marker-style-name="T105"><text:span text:style-name="Internet_20_link"><text:span text:style-name="T105">0,9</text:span></text:span><text:span text:style-name="T105"/></text:p>
          </table:table-cell>
          <table:table-cell table:style-name="Таблица5.A2" office:value-type="string">
            <text:p text:style-name="P59" loext:marker-style-name="T105"><text:span text:style-name="Internet_20_link"><text:span text:style-name="T105">1,02</text:span></text:span><text:span text:style-name="T105"/></text:p>
          </table:table-cell>
          <table:table-cell table:style-name="Таблица5.E2" office:value-type="string">
            <text:p text:style-name="P59" loext:marker-style-name="T105"><text:span text:style-name="Internet_20_link"><text:span text:style-name="T105">0,9</text:span></text:span><text:span text:style-name="T105"/></text:p>
          </table:table-cell>
        </table:table-row>
        <table:table-row table:style-name="Таблица5.1">
          <table:table-cell table:style-name="Таблица5.E2" office:value-type="string">
            <text:p text:style-name="P58"><text:span text:style-name="Internet_20_link"><text:span text:style-name="T104">1000</text:span></text:span></text:p>
          </table:table-cell>
          <table:table-cell table:style-name="Таблица5.A2" office:value-type="string">
            <text:p text:style-name="P59" loext:marker-style-name="T105"><text:span text:style-name="Internet_20_link"><text:span text:style-name="T105">1,03255</text:span></text:span><text:span text:style-name="T105"/></text:p>
          </table:table-cell>
          <table:table-cell table:style-name="Таблица5.A2" office:value-type="string">
            <text:p text:style-name="P59" loext:marker-style-name="T105"><text:span text:style-name="Internet_20_link"><text:span text:style-name="T105">0,83</text:span></text:span><text:span text:style-name="T105"/></text:p>
          </table:table-cell>
          <table:table-cell table:style-name="Таблица5.A2" office:value-type="string">
            <text:p text:style-name="P59" loext:marker-style-name="T105"><text:span text:style-name="Internet_20_link"><text:span text:style-name="T105">0,79</text:span></text:span><text:span text:style-name="T105"/></text:p>
          </table:table-cell>
          <table:table-cell table:style-name="Таблица5.E2" office:value-type="string">
            <text:p text:style-name="P59" loext:marker-style-name="T105"><text:span text:style-name="Internet_20_link"><text:span text:style-name="T105">0,74</text:span></text:span><text:span text:style-name="T105"/></text:p>
          </table:table-cell>
        </table:table-row>
        <table:table-row table:style-name="Таблица5.1">
          <table:table-cell table:style-name="Таблица5.E2" office:value-type="string">
            <text:p text:style-name="P58"><text:span text:style-name="Internet_20_link"><text:span text:style-name="T104">1500</text:span></text:span></text:p>
          </table:table-cell>
          <table:table-cell table:style-name="Таблица5.A2" office:value-type="string">
            <text:p text:style-name="P59" loext:marker-style-name="T105"><text:span text:style-name="Internet_20_link"><text:span text:style-name="T105">4,23951</text:span></text:span><text:span text:style-name="T105"/></text:p>
          </table:table-cell>
          <table:table-cell table:style-name="Таблица5.A2" office:value-type="string">
            <text:p text:style-name="P59" loext:marker-style-name="T105"><text:span text:style-name="Internet_20_link"><text:span text:style-name="T105">1,23</text:span></text:span><text:span text:style-name="T105"/></text:p>
          </table:table-cell>
          <table:table-cell table:style-name="Таблица5.A2" office:value-type="string">
            <text:p text:style-name="P59" loext:marker-style-name="T105"><text:span text:style-name="Internet_20_link"><text:span text:style-name="T105">1,22</text:span></text:span><text:span text:style-name="T105"/></text:p>
          </table:table-cell>
          <table:table-cell table:style-name="Таблица5.E2" office:value-type="string">
            <text:p text:style-name="P59" loext:marker-style-name="T105"><text:span text:style-name="Internet_20_link"><text:span text:style-name="T105">1,16</text:span></text:span><text:span text:style-name="T105"/></text:p>
          </table:table-cell>
        </table:table-row>
        <table:table-row table:style-name="Таблица5.1">
          <table:table-cell table:style-name="Таблица5.E2" office:value-type="string">
            <text:p text:style-name="P58"><text:span text:style-name="Internet_20_link"><text:span text:style-name="T104">2000</text:span></text:span></text:p>
          </table:table-cell>
          <table:table-cell table:style-name="Таблица5.A2" office:value-type="string">
            <text:p text:style-name="P59" loext:marker-style-name="T105"><text:span text:style-name="Internet_20_link"><text:span text:style-name="T105">9,38852</text:span></text:span><text:span text:style-name="T105"/></text:p>
          </table:table-cell>
          <table:table-cell table:style-name="Таблица5.A2" office:value-type="string">
            <text:p text:style-name="P59" loext:marker-style-name="T105"><text:span text:style-name="Internet_20_link"><text:span text:style-name="T105">1,36</text:span></text:span><text:span text:style-name="T105"/></text:p>
          </table:table-cell>
          <table:table-cell table:style-name="Таблица5.A2" office:value-type="string">
            <text:p text:style-name="P59" loext:marker-style-name="T105"><text:span text:style-name="Internet_20_link"><text:span text:style-name="T105">1,39</text:span></text:span><text:span text:style-name="T105"/></text:p>
          </table:table-cell>
          <table:table-cell table:style-name="Таблица5.E2" office:value-type="string">
            <text:p text:style-name="P59" loext:marker-style-name="T105"><text:span text:style-name="Internet_20_link"><text:span text:style-name="T105">1,21</text:span></text:span><text:span text:style-name="T105"/></text:p>
          </table:table-cell>
        </table:table-row>
        <table:table-row table:style-name="Таблица5.1">
          <table:table-cell table:style-name="Таблица5.E2" office:value-type="string">
            <text:p text:style-name="P58"><text:span text:style-name="Internet_20_link"><text:span text:style-name="T104">2500</text:span></text:span></text:p>
          </table:table-cell>
          <table:table-cell table:style-name="Таблица5.A2" office:value-type="string">
            <text:p text:style-name="P59" loext:marker-style-name="T105"><text:span text:style-name="Internet_20_link"><text:span text:style-name="T105">18,5025</text:span></text:span><text:span text:style-name="T105"/></text:p>
          </table:table-cell>
          <table:table-cell table:style-name="Таблица5.A2" office:value-type="string">
            <text:p text:style-name="P59" loext:marker-style-name="T105"><text:span text:style-name="Internet_20_link"><text:span text:style-name="T105">1,44</text:span></text:span><text:span text:style-name="T105"/></text:p>
          </table:table-cell>
          <table:table-cell table:style-name="Таблица5.A2" office:value-type="string">
            <text:p text:style-name="P59" loext:marker-style-name="T105"><text:span text:style-name="Internet_20_link"><text:span text:style-name="T105">1,6</text:span></text:span><text:span text:style-name="T105"/></text:p>
          </table:table-cell>
          <table:table-cell table:style-name="Таблица5.E2" office:value-type="string">
            <text:p text:style-name="P59" loext:marker-style-name="T105"><text:span text:style-name="Internet_20_link"><text:span text:style-name="T105">1,42</text:span></text:span><text:span text:style-name="T105"/></text:p>
          </table:table-cell>
        </table:table-row>
        <table:table-row table:style-name="Таблица5.1">
          <table:table-cell table:style-name="Таблица5.E2" office:value-type="string">
            <text:p text:style-name="P58" loext:marker-style-name="T18"><text:span text:style-name="Internet_20_link"><text:span text:style-name="T127">3000</text:span></text:span><text:span text:style-name="T106"/></text:p>
          </table:table-cell>
          <table:table-cell table:style-name="Таблица5.A2" office:value-type="string">
            <text:p text:style-name="P59" loext:marker-style-name="T105"><text:span text:style-name="Internet_20_link"><text:span text:style-name="T105">31,8739</text:span></text:span><text:span text:style-name="T105"/></text:p>
          </table:table-cell>
          <table:table-cell table:style-name="Таблица5.A2" office:value-type="string">
            <text:p text:style-name="P59" loext:marker-style-name="T105"><text:span text:style-name="Internet_20_link"><text:span text:style-name="T105">1,47</text:span></text:span><text:span text:style-name="T105"/></text:p>
          </table:table-cell>
          <table:table-cell table:style-name="Таблица5.A2" office:value-type="string">
            <text:p text:style-name="P59" loext:marker-style-name="T105"><text:span text:style-name="Internet_20_link"><text:span text:style-name="T105">1,71</text:span></text:span><text:span text:style-name="T105"/></text:p>
          </table:table-cell>
          <table:table-cell table:style-name="Таблица5.E2" office:value-type="string">
            <text:p text:style-name="P59" loext:marker-style-name="T105"><text:span text:style-name="Internet_20_link"><text:span text:style-name="T105">1,58</text:span></text:span><text:span text:style-name="T105"/></text:p>
          </table:table-cell>
        </table:table-row>
        <table:table-row table:style-name="Таблица5.1">
          <table:table-cell table:style-name="Таблица5.E2" office:value-type="string">
            <text:p text:style-name="P58" loext:marker-style-name="T19"><text:span text:style-name="T19">3500</text:span><text:span text:style-name="T19"/></text:p>
          </table:table-cell>
          <table:table-cell table:style-name="Таблица5.A2" office:value-type="string">
            <text:p text:style-name="P59" loext:marker-style-name="T105"><text:span text:style-name="Internet_20_link"><text:span text:style-name="T105">50,2523</text:span></text:span><text:span text:style-name="T105"/></text:p>
          </table:table-cell>
          <table:table-cell table:style-name="Таблица5.A2" office:value-type="string">
            <text:p text:style-name="P59" loext:marker-style-name="T105"><text:span text:style-name="Internet_20_link"><text:span text:style-name="T105">1,54</text:span></text:span><text:span text:style-name="T105"/></text:p>
          </table:table-cell>
          <table:table-cell table:style-name="Таблица5.A2" office:value-type="string">
            <text:p text:style-name="P59" loext:marker-style-name="T105"><text:span text:style-name="Internet_20_link"><text:span text:style-name="T105">1,8</text:span></text:span><text:span text:style-name="T105"/></text:p>
          </table:table-cell>
          <table:table-cell table:style-name="Таблица5.E2" office:value-type="string">
            <text:p text:style-name="P59" loext:marker-style-name="T105"><text:span text:style-name="Internet_20_link"><text:span text:style-name="T105">1,62</text:span></text:span><text:span text:style-name="T105"/></text:p>
          </table:table-cell>
        </table:table-row>
        <table:table-row table:style-name="Таблица5.1">
          <table:table-cell table:style-name="Таблица5.E2" office:value-type="string">
            <text:p text:style-name="P58" loext:marker-style-name="T19"><text:span text:style-name="T19">4000</text:span><text:span text:style-name="T19"/></text:p>
          </table:table-cell>
          <table:table-cell table:style-name="Таблица5.A2" office:value-type="string">
            <text:p text:style-name="P59" loext:marker-style-name="T105"><text:span text:style-name="Internet_20_link"><text:span text:style-name="T105">75,3927</text:span></text:span><text:span text:style-name="T105"/></text:p>
          </table:table-cell>
          <table:table-cell table:style-name="Таблица5.A2" office:value-type="string">
            <text:p text:style-name="P59" loext:marker-style-name="T105"><text:span text:style-name="Internet_20_link"><text:span text:style-name="T105">1,59</text:span></text:span><text:span text:style-name="T105"/></text:p>
          </table:table-cell>
          <table:table-cell table:style-name="Таблица5.A2" office:value-type="string">
            <text:p text:style-name="P59" loext:marker-style-name="T105"><text:span text:style-name="Internet_20_link"><text:span text:style-name="T105">1,88</text:span></text:span><text:span text:style-name="T105"/></text:p>
          </table:table-cell>
          <table:table-cell table:style-name="Таблица5.E2" office:value-type="string">
            <text:p text:style-name="P59" loext:marker-style-name="T105"><text:span text:style-name="Internet_20_link"><text:span text:style-name="T105">1,81</text:span></text:span><text:span text:style-name="T105"/></text:p>
          </table:table-cell>
        </table:table-row>
        <table:table-row table:style-name="Таблица5.15">
          <table:table-cell table:style-name="Таблица5.E2" office:value-type="string">
            <text:p text:style-name="P60" loext:marker-style-name="T107"><text:span text:style-name="T107">СРЕДНЕЕ ПОЛУЧЕННОЕ УСКОРЕНИЕ</text:span><text:span text:style-name="T107"/></text:p>
          </table:table-cell>
          <table:table-cell table:style-name="Таблица5.A2" office:value-type="string">
            <text:p text:style-name="P59"><text:span text:style-name="Internet_20_link"><text:span text:style-name="T108">-</text:span></text:span></text:p>
          </table:table-cell>
          <table:table-cell table:style-name="Таблица5.A2" office:value-type="string">
            <text:p text:style-name="P59" loext:marker-style-name="T108"><text:span text:style-name="Internet_20_link"><text:span text:style-name="T108">1,19</text:span></text:span><text:span text:style-name="T108"/></text:p>
          </table:table-cell>
          <table:table-cell table:style-name="Таблица5.A2" office:value-type="string">
            <text:p text:style-name="P59" loext:marker-style-name="T108"><text:span text:style-name="Internet_20_link"><text:span text:style-name="T108">1,27</text:span></text:span><text:span text:style-name="T108"/></text:p>
          </table:table-cell>
          <table:table-cell table:style-name="Таблица5.E2" office:value-type="string">
            <text:p text:style-name="P59" loext:marker-style-name="T108"><text:span text:style-name="Internet_20_link"><text:span text:style-name="T108">1,2</text:span></text:span><text:span text:style-name="T108"/></text:p>
          </table:table-cell>
        </table:table-row>
      </table:table>
      <text:p text:style-name="P88" loext:marker-style-name="T19">Первая версия <text:span text:style-name="T18">QR-</text:span>разложения по методу Гивенса показала плохую способность к распараллеливанию. Вероятно это из-за того, что области с использованием параллелизма небольшие, пороги для распараллеливания для <text:span text:style-name="T18">N&lt;1000 </text:span>отсутствуют, а главные операции — вращение строк на каждой итерации, не поддаются распараллеливанию в виду последовательной зависимости по данным (нельзя вращать несколько строк одновременно). Кроме того имеет значение порядок зануления элементов: слева направо и сверху вниз. Не получается исполнять вращение независимых строк так, чтобы получить итоговые унитарную матрицу <text:span text:style-name="T18">Q </text:span>и верхнетреугольную матрицу <text:span text:style-name="T18">R. </text:span>Операции вращения хоть и несложные арифметически, но требуют множественных обращений к памяти. Стоит также отметить, что доступ к памяти для матриц<text:span text:style-name="T18"> </text:span>был бы эффективнее, если бы они хранилась транспонированно.</text:p>
      <text:p text:style-name="_30_3_5f_Текст_20_ИТММ" loext:marker-style-name="T19"><text:span text:style-name="Internet_20_link"><text:span text:style-name="T109">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10">e-12, </text:span></text:span><text:span text:style-name="Internet_20_link"><text:span text:style-name="T109">относительная — 1e-15</text:span></text:span><text:span text:style-name="Internet_20_link"><text:span text:style-name="T110">.</text:span></text:span></text:p>
      <text:p text:style-name="P29"><text:span text:style-name="Internet_20_link"><text:span text:style-name="T109">Реализация прикреплена в Приложении 4.</text:span></text:span></text:p>
      <text:p text:style-name="P89"><text:bookmark-start text:name="__RefHeading___Toc9987_388816865"/><text:bookmark-start text:name="_Toc194842672_Копия_4_Копия_1_Копия_1_Ко"/>2.2.<text:bookmark-end text:name="_Toc194842672_Копия_4_Копия_1_Копия_1_Ко"/>2 <text:bookmark text:name="__RefHeading___Toc4775_3249338211"/><text:span text:style-name="T150">Хранение матриц </text:span><text:span text:style-name="T151">Q </text:span><text:span text:style-name="T152">и </text:span><text:span text:style-name="T151">R </text:span><text:span text:style-name="T152">в одной структуре</text:span><text:bookmark-end text:name="__RefHeading___Toc9987_388816865"/></text:p>
      <text:p text:style-name="_30_3_5f_Текст_20_ИТММ"><text:span text:style-name="T145">Если использовать подход, при котором матрица Q вычисляется там же, где и матрица R, во время основного цикла вращения, возможно использование специализированной структуры данных с быстрым доступ к элементам обоих матриц. Эта идея берёт за основу тот факт, что алгоритм обращается к i и j строкам матрицы R и одновременно к i и j столбцам матрицы Q, и если хранить матрицу Q транспонированной, произойдёт обращение к одним и тем же элементам R</text:span><text:span text:style-name="T153">ik</text:span><text:span text:style-name="T145"> и Q</text:span><text:span text:style-name="T154">T</text:span><text:span text:style-name="T153">ik</text:span><text:span text:style-name="T145">, R</text:span><text:span text:style-name="T153">jk </text:span><text:span text:style-name="T145">и Q</text:span><text:span text:style-name="T154">T</text:span><text:span text:style-name="T153">jk</text:span><text:span text:style-name="T145"> во время вращения строк (транспонированных столбцов , в случае матрицы Q).</text:span></text:p>
      <text:p text:style-name="_30_3_5f_Текст_20_ИТММ">Небольшой выигрыш по ускорению может дать совместное попарное хранение элементов Q и R благодаря оптимизации доступа к памяти. 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text:p>
      <text:p text:style-name="_30_3_5f_Текст_20_ИТММ">Для уменьшения времени работы программы можно попробовать использовать структуру данных, которая обеспечит лучшее обращение к памяти. Алгоритм использует специализированную структуру данных QRMatrix, которая объединяет хранение матриц Q и R для оптимизации доступа к памяти:</text:p>
      <text:p text:style-name="P90" loext:marker-style-name="T155"/>
      <text:p text:style-name="_30_3_5f_Текст_20_ИТММ"><text:span text:style-name="T50">При этом матрица </text:span><text:span text:style-name="T52">R </text:span><text:span text:style-name="T53">хранится по строкам, а матрица </text:span><text:span text:style-name="T52">Q, </text:span><text:span text:style-name="T53">транспонированная, по столбцам.</text:span></text:p>
      <text:p text:style-name="_30_3_5f_Текст_20_ИТММ">Применение вращения затрагивает только две строки матрицы R и два столбца матрицы Q. Для матрицы R обновляются элементы с индексами k ≥ j, тогда как для матрицы Q преобразуются все элементы соответствующих столбцов. Реализация включает несколько уровней проверок численной устойчивости: игнорируются вращения для пренебрежимо малых элементов и контролируется относительная величина элементов для предотвращения потери точности.</text:p>
      <text:p text:style-name="_30_3_5f_Текст_20_ИТММ">Небольшой выигрыш по ускорению может дать совместное попарное хранение элементов Q и R благодаря оптимизации доступа к памяти. 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 Это и совместное обновление матриц в одном цикле может дать хорошее ускорение для этой реализации.</text:p>
      <text:p text:style-name="_30_3_5f_Текст_20_ИТММ"><text:span text:style-name="Internet_20_link"><text:span text:style-name="T139">Замеры для типа данных double (вещественное число двойной точности) на разном количестве потоков дали следующие результаты:</text:span></text:span></text:p>
      <text:p text:style-name="_30_5_5f_Таблица_20_ИТММ"><text:soft-page-break/><text:span text:style-name="T19">Схема 6</text:span> – Замеры времени работы программы на разных размерах матрицы <text:span text:style-name="T18">A</text:span></text:p>
      <text:p text:style-name="P91"><draw:frame draw:style-name="fr5" draw:name="Объект163" text:anchor-type="as-char" svg:width="16.596cm" svg:height="19.995cm" draw:z-index="14"><draw:object xlink:href="./Object 169" xlink:type="simple" xlink:show="embed" xlink:actuate="onLoad"/><draw:image xlink:href="./ObjectReplacements/Object 169" xlink:type="simple" xlink:show="embed" xlink:actuate="onLoad"/><svg:desc>диаграмма</svg:desc></draw:frame></text:p>
      <text:p text:style-name="P91"><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92"><text:span text:style-name="Internet_20_link"><text:span text:style-name="T68"/></text:span></text:p>
      <text:p text:style-name="_30_5_5f_Таблица_20_ИТММ">Таблица 6 – Данные об ускорении для второй реализации <text:span text:style-name="T18">QR-</text:span><text:span text:style-name="T19">разложения с помощью вращений Гивенса в зависимости</text:span> от количества потоков</text:p>
      <table:table table:name="Таблица6" table:style-name="Таблица6">
        <table:table-column table:style-name="Таблица6.A" table:number-columns-repeated="3"/>
        <table:table-column table:style-name="Таблица6.D"/>
        <table:table-column table:style-name="Таблица6.E"/>
        <table:table-row table:style-name="Таблица6.1">
          <table:table-cell table:style-name="Таблица6.A1" table:number-rows-spanned="2" office:value-type="string">
            <text:p text:style-name="P57" loext:marker-style-name="T102"><text:span text:style-name="T102">Размер данных, </text:span><text:span text:style-name="T103">NxN</text:span></text:p>
          </table:table-cell>
          <table:table-cell table:style-name="Таблица6.A1" table:number-rows-spanned="2" office:value-type="string">
            <text:p text:style-name="P57" loext:marker-style-name="T102"><text:span text:style-name="T102">Время работы последовательной версии</text:span><text:span text:style-name="T102"/></text:p>
          </table:table-cell>
          <table:table-cell table:style-name="Таблица6.C1" table:number-columns-spanned="3" office:value-type="string">
            <text:p text:style-name="P57" loext:marker-style-name="T102"><text:span text:style-name="T102">Ускорение относительно последовательной версии</text:span><text:span text:style-name="T102"/></text:p>
          </table:table-cell>
          <table:covered-table-cell/>
          <table:covered-table-cell/>
        </table:table-row>
        <table:table-row table:style-name="Таблица6.1">
          <table:covered-table-cell table:style-name="Таблица6.A2"/>
          <table:covered-table-cell table:style-name="Таблица6.A2"/>
          <table:table-cell table:style-name="Таблица6.A2" office:value-type="string">
            <text:p text:style-name="P57" loext:marker-style-name="T102"><text:span text:style-name="T102">2 потока</text:span><text:span text:style-name="T102"/></text:p>
          </table:table-cell>
          <table:table-cell table:style-name="Таблица6.A2" office:value-type="string">
            <text:p text:style-name="P57" loext:marker-style-name="T102"><text:span text:style-name="T102">4 потока</text:span><text:span text:style-name="T102"/></text:p>
          </table:table-cell>
          <table:table-cell table:style-name="Таблица6.E2" office:value-type="string">
            <text:p text:style-name="P57" loext:marker-style-name="T102"><text:span text:style-name="T102">8 потоков</text:span><text:span text:style-name="T102"/></text:p>
          </table:table-cell>
        </table:table-row>
        <table:table-row table:style-name="Таблица6.1">
          <table:table-cell table:style-name="Таблица6.E2" office:value-type="string">
            <text:p text:style-name="P58"><text:span text:style-name="Internet_20_link"><text:span text:style-name="T104">100</text:span></text:span></text:p>
          </table:table-cell>
          <table:table-cell table:style-name="Таблица6.A2" office:value-type="string">
            <text:p text:style-name="P59" loext:marker-style-name="T105"><text:span text:style-name="Internet_20_link"><text:span text:style-name="T105">0,0014271</text:span></text:span><text:span text:style-name="T105"/></text:p>
          </table:table-cell>
          <table:table-cell table:style-name="Таблица6.A2" office:value-type="string">
            <text:p text:style-name="P59" loext:marker-style-name="T105"><text:span text:style-name="Internet_20_link"><text:span text:style-name="T105">0,74</text:span></text:span><text:span text:style-name="T105"/></text:p>
          </table:table-cell>
          <table:table-cell table:style-name="Таблица6.A2" office:value-type="string">
            <text:p text:style-name="P59" loext:marker-style-name="T105"><text:span text:style-name="Internet_20_link"><text:span text:style-name="T105">1,04</text:span></text:span><text:span text:style-name="T105"/></text:p>
          </table:table-cell>
          <table:table-cell table:style-name="Таблица6.E2" office:value-type="string">
            <text:p text:style-name="P59" loext:marker-style-name="T105"><text:span text:style-name="Internet_20_link"><text:span text:style-name="T105">1,08</text:span></text:span><text:span text:style-name="T105"/></text:p>
          </table:table-cell>
        </table:table-row>
        <table:table-row table:style-name="Таблица6.1">
          <table:table-cell table:style-name="Таблица6.E2" office:value-type="string">
            <text:p text:style-name="P58"><text:span text:style-name="Internet_20_link"><text:span text:style-name="T104">200</text:span></text:span></text:p>
          </table:table-cell>
          <table:table-cell table:style-name="Таблица6.A2" office:value-type="string">
            <text:p text:style-name="P59" loext:marker-style-name="T105"><text:span text:style-name="Internet_20_link"><text:span text:style-name="T105">0,0100838</text:span></text:span><text:span text:style-name="T105"/></text:p>
          </table:table-cell>
          <table:table-cell table:style-name="Таблица6.A2" office:value-type="string">
            <text:p text:style-name="P59" loext:marker-style-name="T105"><text:span text:style-name="Internet_20_link"><text:span text:style-name="T105">0,9</text:span></text:span><text:span text:style-name="T105"/></text:p>
          </table:table-cell>
          <table:table-cell table:style-name="Таблица6.A2" office:value-type="string">
            <text:p text:style-name="P59" loext:marker-style-name="T105"><text:span text:style-name="Internet_20_link"><text:span text:style-name="T105">0,77</text:span></text:span><text:span text:style-name="T105"/></text:p>
          </table:table-cell>
          <table:table-cell table:style-name="Таблица6.E2" office:value-type="string">
            <text:p text:style-name="P59" loext:marker-style-name="T105"><text:span text:style-name="Internet_20_link"><text:span text:style-name="T105">1,02</text:span></text:span><text:span text:style-name="T105"/></text:p>
          </table:table-cell>
        </table:table-row>
        <table:table-row table:style-name="Таблица6.1">
          <table:table-cell table:style-name="Таблица6.E2" office:value-type="string">
            <text:p text:style-name="P58"><text:span text:style-name="Internet_20_link"><text:span text:style-name="T104">300</text:span></text:span></text:p>
          </table:table-cell>
          <table:table-cell table:style-name="Таблица6.A2" office:value-type="string">
            <text:p text:style-name="P59" loext:marker-style-name="T105"><text:span text:style-name="Internet_20_link"><text:span text:style-name="T105">0,0319887</text:span></text:span><text:span text:style-name="T105"/></text:p>
          </table:table-cell>
          <table:table-cell table:style-name="Таблица6.A2" office:value-type="string">
            <text:p text:style-name="P59" loext:marker-style-name="T105"><text:span text:style-name="Internet_20_link"><text:span text:style-name="T105">1,02</text:span></text:span><text:span text:style-name="T105"/></text:p>
          </table:table-cell>
          <table:table-cell table:style-name="Таблица6.A2" office:value-type="string">
            <text:p text:style-name="P59" loext:marker-style-name="T105"><text:span text:style-name="Internet_20_link"><text:span text:style-name="T105">1,05</text:span></text:span><text:span text:style-name="T105"/></text:p>
          </table:table-cell>
          <table:table-cell table:style-name="Таблица6.E2" office:value-type="string">
            <text:p text:style-name="P59" loext:marker-style-name="T105"><text:span text:style-name="Internet_20_link"><text:span text:style-name="T105">1</text:span></text:span><text:span text:style-name="T105"/></text:p>
          </table:table-cell>
        </table:table-row>
        <table:table-row table:style-name="Таблица6.1">
          <table:table-cell table:style-name="Таблица6.E2" office:value-type="string">
            <text:p text:style-name="P58"><text:span text:style-name="Internet_20_link"><text:span text:style-name="T104">400</text:span></text:span></text:p>
          </table:table-cell>
          <table:table-cell table:style-name="Таблица6.A2" office:value-type="string">
            <text:p text:style-name="P59" loext:marker-style-name="T105"><text:span text:style-name="Internet_20_link"><text:span text:style-name="T105">0,0708905</text:span></text:span><text:span text:style-name="T105"/></text:p>
          </table:table-cell>
          <table:table-cell table:style-name="Таблица6.A2" office:value-type="string">
            <text:p text:style-name="P59" loext:marker-style-name="T105"><text:span text:style-name="Internet_20_link"><text:span text:style-name="T105">0,94</text:span></text:span><text:span text:style-name="T105"/></text:p>
          </table:table-cell>
          <table:table-cell table:style-name="Таблица6.A2" office:value-type="string">
            <text:p text:style-name="P59" loext:marker-style-name="T105"><text:span text:style-name="Internet_20_link"><text:span text:style-name="T105">0,98</text:span></text:span><text:span text:style-name="T105"/></text:p>
          </table:table-cell>
          <table:table-cell table:style-name="Таблица6.E2" office:value-type="string">
            <text:p text:style-name="P59" loext:marker-style-name="T105"><text:span text:style-name="Internet_20_link"><text:span text:style-name="T105">0,93</text:span></text:span><text:span text:style-name="T105"/></text:p>
          </table:table-cell>
        </table:table-row>
        <table:table-row table:style-name="Таблица6.1">
          <table:table-cell table:style-name="Таблица6.E2" office:value-type="string">
            <text:p text:style-name="P58"><text:span text:style-name="Internet_20_link"><text:span text:style-name="T104">500</text:span></text:span></text:p>
          </table:table-cell>
          <table:table-cell table:style-name="Таблица6.A2" office:value-type="string">
            <text:p text:style-name="P59" loext:marker-style-name="T105"><text:span text:style-name="Internet_20_link"><text:span text:style-name="T105">0,141176</text:span></text:span><text:span text:style-name="T105"/></text:p>
          </table:table-cell>
          <table:table-cell table:style-name="Таблица6.A2" office:value-type="string">
            <text:p text:style-name="P59" loext:marker-style-name="T105"><text:span text:style-name="Internet_20_link"><text:span text:style-name="T105">1,03</text:span></text:span><text:span text:style-name="T105"/></text:p>
          </table:table-cell>
          <table:table-cell table:style-name="Таблица6.A2" office:value-type="string">
            <text:p text:style-name="P59" loext:marker-style-name="T105"><text:span text:style-name="Internet_20_link"><text:span text:style-name="T105">1,01</text:span></text:span><text:span text:style-name="T105"/></text:p>
          </table:table-cell>
          <table:table-cell table:style-name="Таблица6.E2" office:value-type="string">
            <text:p text:style-name="P59" loext:marker-style-name="T105"><text:span text:style-name="Internet_20_link"><text:span text:style-name="T105">1,01</text:span></text:span><text:span text:style-name="T105"/></text:p>
          </table:table-cell>
        </table:table-row>
        <table:table-row table:style-name="Таблица6.1">
          <table:table-cell table:style-name="Таблица6.E2" office:value-type="string">
            <text:p text:style-name="P58"><text:span text:style-name="Internet_20_link"><text:span text:style-name="T104">1000</text:span></text:span></text:p>
          </table:table-cell>
          <table:table-cell table:style-name="Таблица6.A2" office:value-type="string">
            <text:p text:style-name="P59" loext:marker-style-name="T105"><text:span text:style-name="Internet_20_link"><text:span text:style-name="T105">1,18734</text:span></text:span><text:span text:style-name="T105"/></text:p>
          </table:table-cell>
          <table:table-cell table:style-name="Таблица6.A2" office:value-type="string">
            <text:p text:style-name="P59" loext:marker-style-name="T105"><text:span text:style-name="Internet_20_link"><text:span text:style-name="T105">1,16</text:span></text:span><text:span text:style-name="T105"/></text:p>
          </table:table-cell>
          <table:table-cell table:style-name="Таблица6.A2" office:value-type="string">
            <text:p text:style-name="P59" loext:marker-style-name="T105"><text:span text:style-name="Internet_20_link"><text:span text:style-name="T105">1,3</text:span></text:span><text:span text:style-name="T105"/></text:p>
          </table:table-cell>
          <table:table-cell table:style-name="Таблица6.E2" office:value-type="string">
            <text:p text:style-name="P59" loext:marker-style-name="T156"><text:span text:style-name="T156">1,18</text:span><text:span text:style-name="T156"/></text:p>
          </table:table-cell>
        </table:table-row>
        <table:table-row table:style-name="Таблица6.1">
          <table:table-cell table:style-name="Таблица6.E2" office:value-type="string">
            <text:p text:style-name="P58"><text:span text:style-name="Internet_20_link"><text:span text:style-name="T104">1500</text:span></text:span></text:p>
          </table:table-cell>
          <table:table-cell table:style-name="Таблица6.A2" office:value-type="string">
            <text:p text:style-name="P59" loext:marker-style-name="T105"><text:span text:style-name="Internet_20_link"><text:span text:style-name="T105">3,9269</text:span></text:span><text:span text:style-name="T105"/></text:p>
          </table:table-cell>
          <table:table-cell table:style-name="Таблица6.A2" office:value-type="string">
            <text:p text:style-name="P59" loext:marker-style-name="T105"><text:span text:style-name="Internet_20_link"><text:span text:style-name="T105">1,26</text:span></text:span><text:span text:style-name="T105"/></text:p>
          </table:table-cell>
          <table:table-cell table:style-name="Таблица6.A2" office:value-type="string">
            <text:p text:style-name="P59" loext:marker-style-name="T105"><text:span text:style-name="Internet_20_link"><text:span text:style-name="T105">1,49</text:span></text:span><text:span text:style-name="T105"/></text:p>
          </table:table-cell>
          <table:table-cell table:style-name="Таблица6.E2" office:value-type="string">
            <text:p text:style-name="P59" loext:marker-style-name="T105"><text:span text:style-name="Internet_20_link"><text:span text:style-name="T105">1,54</text:span></text:span><text:span text:style-name="T105"/></text:p>
          </table:table-cell>
        </table:table-row>
        <table:table-row table:style-name="Таблица6.1">
          <table:table-cell table:style-name="Таблица6.E2" office:value-type="string">
            <text:p text:style-name="P58"><text:span text:style-name="Internet_20_link"><text:span text:style-name="T104">2000</text:span></text:span></text:p>
          </table:table-cell>
          <table:table-cell table:style-name="Таблица6.A2" office:value-type="string">
            <text:p text:style-name="P59" loext:marker-style-name="T105"><text:span text:style-name="Internet_20_link"><text:span text:style-name="T105">9,11078</text:span></text:span><text:span text:style-name="T105"/></text:p>
          </table:table-cell>
          <table:table-cell table:style-name="Таблица6.A2" office:value-type="string">
            <text:p text:style-name="P59" loext:marker-style-name="T105"><text:span text:style-name="Internet_20_link"><text:span text:style-name="T105">1,36</text:span></text:span><text:span text:style-name="T105"/></text:p>
          </table:table-cell>
          <table:table-cell table:style-name="Таблица6.A2" office:value-type="string">
            <text:p text:style-name="P59" loext:marker-style-name="T105"><text:span text:style-name="Internet_20_link"><text:span text:style-name="T105">1,66</text:span></text:span><text:span text:style-name="T105"/></text:p>
          </table:table-cell>
          <table:table-cell table:style-name="Таблица6.E2" office:value-type="string">
            <text:p text:style-name="P59" loext:marker-style-name="T105"><text:span text:style-name="Internet_20_link"><text:span text:style-name="T105">1,78</text:span></text:span><text:span text:style-name="T105"/></text:p>
          </table:table-cell>
        </table:table-row>
        <table:table-row table:style-name="Таблица6.1">
          <table:table-cell table:style-name="Таблица6.E2" office:value-type="string">
            <text:p text:style-name="P58"><text:span text:style-name="Internet_20_link"><text:span text:style-name="T104">2500</text:span></text:span></text:p>
          </table:table-cell>
          <table:table-cell table:style-name="Таблица6.A2" office:value-type="string">
            <text:p text:style-name="P59" loext:marker-style-name="T105"><text:span text:style-name="Internet_20_link"><text:span text:style-name="T105">17,9521</text:span></text:span><text:span text:style-name="T105"/></text:p>
          </table:table-cell>
          <table:table-cell table:style-name="Таблица6.A2" office:value-type="string">
            <text:p text:style-name="P59" loext:marker-style-name="T105"><text:span text:style-name="Internet_20_link"><text:span text:style-name="T105">1,38</text:span></text:span><text:span text:style-name="T105"/></text:p>
          </table:table-cell>
          <table:table-cell table:style-name="Таблица6.A2" office:value-type="string">
            <text:p text:style-name="P59" loext:marker-style-name="T105"><text:span text:style-name="Internet_20_link"><text:span text:style-name="T105">1,79</text:span></text:span><text:span text:style-name="T105"/></text:p>
          </table:table-cell>
          <table:table-cell table:style-name="Таблица6.E2" office:value-type="string">
            <text:p text:style-name="P59" loext:marker-style-name="T105"><text:span text:style-name="Internet_20_link"><text:span text:style-name="T105">1,91</text:span></text:span><text:span text:style-name="T105"/></text:p>
          </table:table-cell>
        </table:table-row>
        <table:table-row table:style-name="Таблица6.1">
          <table:table-cell table:style-name="Таблица6.E2" office:value-type="string">
            <text:p text:style-name="P58" loext:marker-style-name="T18"><text:span text:style-name="Internet_20_link"><text:span text:style-name="T127">3000</text:span></text:span><text:span text:style-name="T106"/></text:p>
          </table:table-cell>
          <table:table-cell table:style-name="Таблица6.A2" office:value-type="string">
            <text:p text:style-name="P59" loext:marker-style-name="T105"><text:span text:style-name="Internet_20_link"><text:span text:style-name="T105">30,0101</text:span></text:span><text:span text:style-name="T105"/></text:p>
          </table:table-cell>
          <table:table-cell table:style-name="Таблица6.A2" office:value-type="string">
            <text:p text:style-name="P59" loext:marker-style-name="T105"><text:span text:style-name="Internet_20_link"><text:span text:style-name="T105">1,39</text:span></text:span><text:span text:style-name="T105"/></text:p>
          </table:table-cell>
          <table:table-cell table:style-name="Таблица6.A2" office:value-type="string">
            <text:p text:style-name="P59" loext:marker-style-name="T105"><text:span text:style-name="Internet_20_link"><text:span text:style-name="T105">1,78</text:span></text:span><text:span text:style-name="T105"/></text:p>
          </table:table-cell>
          <table:table-cell table:style-name="Таблица6.E2" office:value-type="string">
            <text:p text:style-name="P59" loext:marker-style-name="T105"><text:span text:style-name="Internet_20_link"><text:span text:style-name="T105">1,92</text:span></text:span><text:span text:style-name="T105"/></text:p>
          </table:table-cell>
        </table:table-row>
        <table:table-row table:style-name="Таблица6.1">
          <table:table-cell table:style-name="Таблица6.E2" office:value-type="string">
            <text:p text:style-name="P58" loext:marker-style-name="T19"><text:span text:style-name="T19">3500</text:span><text:span text:style-name="T19"/></text:p>
          </table:table-cell>
          <table:table-cell table:style-name="Таблица6.A2" office:value-type="string">
            <text:p text:style-name="P59" loext:marker-style-name="T105"><text:span text:style-name="Internet_20_link"><text:span text:style-name="T105">48,9718</text:span></text:span><text:span text:style-name="T105"/></text:p>
          </table:table-cell>
          <table:table-cell table:style-name="Таблица6.A2" office:value-type="string">
            <text:p text:style-name="P59" loext:marker-style-name="T105"><text:span text:style-name="Internet_20_link"><text:span text:style-name="T105">1,45</text:span></text:span><text:span text:style-name="T105"/></text:p>
          </table:table-cell>
          <table:table-cell table:style-name="Таблица6.A2" office:value-type="string">
            <text:p text:style-name="P59" loext:marker-style-name="T105"><text:span text:style-name="Internet_20_link"><text:span text:style-name="T105">1,88</text:span></text:span><text:span text:style-name="T105"/></text:p>
          </table:table-cell>
          <table:table-cell table:style-name="Таблица6.E2" office:value-type="string">
            <text:p text:style-name="P59" loext:marker-style-name="T105"><text:span text:style-name="Internet_20_link"><text:span text:style-name="T105">2,04</text:span></text:span><text:span text:style-name="T105"/></text:p>
          </table:table-cell>
        </table:table-row>
        <table:table-row table:style-name="Таблица6.1">
          <table:table-cell table:style-name="Таблица6.E2" office:value-type="string">
            <text:p text:style-name="P58" loext:marker-style-name="T19"><text:span text:style-name="T19">4000</text:span><text:span text:style-name="T19"/></text:p>
          </table:table-cell>
          <table:table-cell table:style-name="Таблица6.A2" office:value-type="string">
            <text:p text:style-name="P59" loext:marker-style-name="T105"><text:span text:style-name="Internet_20_link"><text:span text:style-name="T105">73,9241</text:span></text:span><text:span text:style-name="T105"/></text:p>
          </table:table-cell>
          <table:table-cell table:style-name="Таблица6.A2" office:value-type="string">
            <text:p text:style-name="P59" loext:marker-style-name="T105"><text:span text:style-name="Internet_20_link"><text:span text:style-name="T105">1,47</text:span></text:span><text:span text:style-name="T105"/></text:p>
          </table:table-cell>
          <table:table-cell table:style-name="Таблица6.A2" office:value-type="string">
            <text:p text:style-name="P59" loext:marker-style-name="T105"><text:span text:style-name="Internet_20_link"><text:span text:style-name="T105">1,94</text:span></text:span><text:span text:style-name="T105"/></text:p>
          </table:table-cell>
          <table:table-cell table:style-name="Таблица6.E2" office:value-type="string">
            <text:p text:style-name="P59" loext:marker-style-name="T105"><text:span text:style-name="Internet_20_link"><text:span text:style-name="T105">2,1</text:span></text:span><text:span text:style-name="T105"/></text:p>
          </table:table-cell>
        </table:table-row>
        <table:table-row table:style-name="Таблица6.15">
          <table:table-cell table:style-name="Таблица6.E2" office:value-type="string">
            <text:p text:style-name="P60" loext:marker-style-name="T107"><text:span text:style-name="T107">СРЕДНЕЕ ПОЛУЧЕННОЕ УСКОРЕНИЕ</text:span><text:span text:style-name="T107"/></text:p>
          </table:table-cell>
          <table:table-cell table:style-name="Таблица6.A2" office:value-type="string">
            <text:p text:style-name="P59"><text:span text:style-name="Internet_20_link"><text:span text:style-name="T108">-</text:span></text:span></text:p>
          </table:table-cell>
          <table:table-cell table:style-name="Таблица6.A2" office:value-type="string">
            <text:p text:style-name="P59" loext:marker-style-name="T108"><text:span text:style-name="Internet_20_link"><text:span text:style-name="T108">1,18</text:span></text:span><text:span text:style-name="T108"/></text:p>
          </table:table-cell>
          <table:table-cell table:style-name="Таблица6.A2" office:value-type="string">
            <text:p text:style-name="P59" loext:marker-style-name="T108"><text:span text:style-name="Internet_20_link"><text:span text:style-name="T108">1,39</text:span></text:span><text:span text:style-name="T108"/></text:p>
          </table:table-cell>
          <table:table-cell table:style-name="Таблица6.E2" office:value-type="string">
            <text:p text:style-name="P59" loext:marker-style-name="T108"><text:span text:style-name="Internet_20_link"><text:span text:style-name="T108">1,46</text:span></text:span><text:span text:style-name="T108"/></text:p>
          </table:table-cell>
        </table:table-row>
      </table:table>
      <text:p text:style-name="_30_3_5f_Текст_20_ИТММ" loext:marker-style-name="T157">Вторая версия <text:span text:style-name="T158">метода Гивенса </text:span>немного лучше <text:span text:style-name="T158">первой</text:span>, но параллелизация всё ещё неэффективна. <text:span text:style-name="T158">Всё ещё дают о себе знать промахи кэша и плохая локальность. Структура данных, хранящая в себе элементы </text:span><text:span text:style-name="T159">Q </text:span><text:span text:style-name="T160">и </text:span><text:span text:style-name="T161">R </text:span><text:span text:style-name="T162">рядом, не оправдала себя. Следует использовать другой способ оптимизации доступа к памяти. Большое количество потоков только создало дополнительные накладные расходы на создание и синхронизацию по сравнению с теми небольшими объёмами вычислений, для которых они были созданы.</text:span></text:p>
      <text:p text:style-name="_30_3_5f_Текст_20_ИТММ" loext:marker-style-name="T19"><text:span text:style-name="Internet_20_link"><text:span text:style-name="T109">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10">e-12, </text:span></text:span><text:span text:style-name="Internet_20_link"><text:span text:style-name="T109">относительная — 1e-15</text:span></text:span><text:span text:style-name="Internet_20_link"><text:span text:style-name="T110">.</text:span></text:span></text:p>
      <text:p text:style-name="P29"><text:span text:style-name="Internet_20_link"><text:span text:style-name="T163">Реализация прикреплена в Приложении 5.</text:span></text:span></text:p>
      <text:p text:style-name="P89"><text:bookmark-start text:name="__RefHeading___Toc4777_3249338211"/><text:span text:style-name="T48">2.2.3 </text:span>Использование <text:span text:style-name="T18">SIMD</text:span><text:bookmark-end text:name="__RefHeading___Toc4777_3249338211"/></text:p>
      <text:p text:style-name="_30_3_5f_Текст_20_ИТММ" loext:marker-style-name="T50"><text:span text:style-name="T50">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text:span><text:span text:style-name="T50"/></text:p>
      <text:p text:style-name="_30_3_5f_Текст_20_ИТММ" loext:marker-style-name="T50"><text:span text:style-name="T50">Для максимального эффекта по части улучшения обращения к памяти можно использовать векторизацию и SIMD.</text:span><text:span text:style-name="T50"/></text:p>
      <text:p text:style-name="_30_3_5f_Текст_20_ИТММ" loext:marker-style-name="T50"><text:span text:style-name="T50">Векторизация — вид распараллеливания программного кода, при котором однопоточные программы, исполняющие одну операцию над одним элементом (single instruction-single data) в каждый момент времени, модифицируются таким образом, чтобы они могли выполнять более одной операции единовременно. Скалярные операции, обрабатывающие пару аргументов заменяются на векторные аналоги, способные производить одну и ту же операцию над массивом данных в единицу времени. Векторная обработка данных широко применяется как в лабораторных суперкомпьютерах, так и в обычных домашних компьютерах.</text:span><text:span text:style-name="T50"/></text:p>
      <text:p text:style-name="_30_3_5f_Текст_20_ИТММ" loext:marker-style-name="T50"><text:span text:style-name="T50">SIMD (Single Instruction, Multiple Data) — это технология из области компьютерных высокоэффективных вычислений, позволяющая с помощью одной машинной инструкции (single instruction) процессора обрабатывать несколько элементов данных (multiple data). SIMD-инструкции используют специальные векторные регистры, в которые помещается несколько элементов. Чтение/запись, арифметические операции над этими регистрами выполняются процессором одновременно. Количество данных, которые могут храниться и обрабатываться одновременно, зависит от размеров регистра и данных. Некоторые распространённые SIMD-расширения современных процессоров:</text:span><text:span text:style-name="T50"/></text:p>
      <text:list text:style-name="WWNum8">
        <text:list-item>
          <text:p text:style-name="P93" loext:marker-style-name="T50"><text:span text:style-name="T50">SSE (Streaming SIMD Extensions) — 128-битные регистры, позволяющие обрабатывать четыре 32-битных значения с плавающей запятой одинарной точности в один момент времени. Расширение SSE2 позволило использовать два 64-битных значения с плавающей точкой двойной точности, или два 64-битных целых числа, или четыре 32-битных, или восемь 16-битных коротких целых чисел, или шестнадцать 8-битных байтов или символов.</text:span><text:span text:style-name="T50"/></text:p>
        </text:list-item>
        <text:list-item>
          <text:p text:style-name="P93" loext:marker-style-name="T50"><text:span text:style-name="T50">AVX (Advanced Vector Extensions) — 256-битные регистры, поддерживающие более сложные операции. В архитектуре x86-64 AVX поддерживает шестнадцать 256-битных регистров YMM. Каждый регистр YMM может хранить и выполнять одновременные операции над:</text:span><text:span text:style-name="T50"/></text:p>
          <text:list>
            <text:list-item>
              <text:p text:style-name="P93" loext:marker-style-name="T50"><text:span text:style-name="T50">восемью 32-битными числами с плавающей запятой одинарной точности;</text:span><text:span text:style-name="T50"/></text:p>
            </text:list-item>
            <text:list-item>
              <text:p text:style-name="P93" loext:marker-style-name="T50"><text:span text:style-name="T50">четырьмя 64-битными числами с плавающей запятой двойной точности.</text:span><text:span text:style-name="T50"/></text:p>
            </text:list-item>
          </text:list>
        </text:list-item>
        <text:list-item>
          <text:p text:style-name="P93" loext:marker-style-name="T50"><text:soft-page-break/><text:span text:style-name="T50">AVX-512 — расширение с увеличенным размером векторных регистров, которое увеличивает размер каждого регистра до 512 бит, что, очевидно, позволяет обрабатывать больше данных за одну операцию.</text:span><text:span text:style-name="T50"/></text:p>
        </text:list-item>
      </text:list>
      <text:p text:style-name="_30_3_5f_Текст_20_ИТММ" loext:marker-style-name="T50"><text:span text:style-name="T50">Автоматическую векторизацию некоторым образом обеспечивают компиляторы. Современные представители, GCC, Clang, MSVC, могут анализировать код и заменять скалярные инструкции на векторные с использованием SIMD-инструкций.</text:span><text:span text:style-name="T50"/></text:p>
      <text:p text:style-name="_30_3_5f_Текст_20_ИТММ" loext:marker-style-name="T50"><text:span text:style-name="T50">Также компилятору с помощью директив можно указать принудительное использование simd-инструкций. #pragma simd для компиляторов Intel C/C++ позволяет указать, что компилятор должен явно векторизовать цикл, а #pragma omp simd — директива для той же цели из стандарта OpenMP.</text:span><text:span text:style-name="T50"/></text:p>
      <text:p text:style-name="_30_3_5f_Текст_20_ИТММ" loext:marker-style-name="T50"><text:span text:style-name="T50">Кроме того, можно использовать так называемые intrinsic’и, встроенные функции для работы с SIMD-инструкциями. Они позволяют использовать команды расширений с синтаксисом, похожим на вызов С-подобных функций, при этом компилятор сам выполнит оптимизацию кода.</text:span><text:span text:style-name="T50"/></text:p>
      <text:p text:style-name="_30_3_5f_Текст_20_ИТММ" loext:marker-style-name="T50"><text:span text:style-name="T50">Для векторизации кода и использования simd матрицы Q и R будем хранить в ленточном виде, записав в одномерный массив матрицы по строкам (матрица Q снова будет храниться транспонированной).</text:span><text:span text:style-name="T50"/></text:p>
      <text:p text:style-name="_30_3_5f_Текст_20_ИТММ" loext:marker-style-name="T50"><text:span text:style-name="T50">Ожидается, что SIMD-версия даст значительный прирост к производительности алгоритма, уменьшив время исполнения программы, так как она обеспечивает лучшее использование аппаратных возможностей современных процессоров.</text:span><text:span text:style-name="T50"/></text:p>
      <text:p text:style-name="P94" loext:marker-style-name="T145"><text:span text:style-name="T145">Для векторных вычислений можно использовать встроенную в </text:span><text:span text:style-name="T146">OpenMP </text:span><text:span text:style-name="T145">векторизацию или использовать </text:span><text:span text:style-name="T146">AVX-</text:span><text:span text:style-name="T145">интринсики.</text:span></text:p>
      <text:p text:style-name="_30_3_5f_Текст_20_ИТММ" loext:marker-style-name="T50"><text:span text:style-name="T50">Использование #pragma omp simd перед циклом даст явно знать компилятору, что этот цикл может быть векторизован. Директива указывает, что итерации цикла независимы и могут быть выполнены параллельно с использованием векторных инструкций процессора. Циклы вращения строк матриц Q и R из базовой версии могут без изменения быть использованы в SIMD-версии.</text:span><text:span text:style-name="T50"/></text:p>
      <text:p text:style-name="_30_3_5f_Текст_20_ИТММ"><text:span text:style-name="T145">Для </text:span><text:span text:style-name="T146">#pragma openmp simd </text:span><text:span text:style-name="T145">есть клауза </text:span><text:span text:style-name="T146">aligned, </text:span><text:span text:style-name="T145">помечающая, что память, над которой производятся вычисления, выровнена по границе размера типа (64-кратные адреса для 64-битных чисел с плавающей точкой двойной точности и 32-кратные адреса для 32-битных чисел с плавающей точкой одинарной точности). Для ещё более лучшего обращения к памяти следует выровнять строки матриц </text:span><text:span text:style-name="T146">Q </text:span><text:span text:style-name="T145">и </text:span><text:span text:style-name="T146">R </text:span><text:span text:style-name="T145">по границам 64 или 32, в зависимости от типа.</text:span></text:p>
      <text:p text:style-name="_30_3_5f_Текст_20_ИТММ"><text:soft-page-break/><text:span text:style-name="T145">Векторную обработку также можно добавить с помощью интринсиков, используя специальные функции, которые самостоятельно производят работу с памятью и регистрами. Идея их использования та же: при вращении строк матриц </text:span><text:span text:style-name="T146">Q</text:span><text:span text:style-name="T164"> </text:span><text:span text:style-name="T165">и </text:span><text:span text:style-name="T164">R, </text:span><text:span text:style-name="T165">производя одновременно вычисления четырёх (при работе с вещественными числами двойной точности) или восьми (при работе с вещественными числами одинарной точности) значений в двух строках одновременно.</text:span></text:p>
      <text:p text:style-name="_30_3_5f_Текст_20_ИТММ">__m256d (256 бит для хранения 8-байтных вещественных чисел двойной точности) и __m256 (256 бит для хранения 4-байтных вещественных чисел одинарной точности) — это типы данных, позволяющие работать с AVX-интринсиками. Функции с префиксом _mm256_* позволяют загружать и читать данные из регистра, производить над ними математические операции сложения, умножения и др.</text:p>
      <text:p text:style-name="_30_3_5f_Текст_20_ИТММ">Эта операция выполняется одновременно для стольких чисел, сколько помещается в 256-битном регистре, оставшийся «хвост» обрабатывается старым способом, без векторизации<text:span text:style-name="T60">.</text:span></text:p>
      <text:p text:style-name="_30_3_5f_Текст_20_ИТММ"><text:span text:style-name="T145">Точно тот же подход выполняется для восстановления с помощью матриц вращения матрицы </text:span><text:span text:style-name="T146">Q.</text:span></text:p>
      <text:p text:style-name="_30_3_5f_Текст_20_ИТММ" loext:marker-style-name="T50"><text:span text:style-name="T50">К сожалению, мне не удалось заставить мой компилятор использовать #pragma openmp simd с клаузой aligned, при компиляции появлялось предупреждение о том, что она игнорируется. Тем не менее, использование simd от OpenMP показало лучший результат по сравнению с предыдущими реализациями QR разложения на основе вращений Гивенса. Однако незначительный разрыв по времени есть, между использованием интринсиков и simd прагмы есть небольшая разница. Лучшее время всё-таки показала реализация с интринсиками.</text:span><text:span text:style-name="T50"/></text:p>
      <text:p text:style-name="_30_3_5f_Текст_20_ИТММ" loext:marker-style-name="T51"><text:span text:style-name="Internet_20_link"><text:span text:style-name="T139">Замеры для типа данных double (вещественное число двойной точности) на разном количестве потоков дали следующие результаты:</text:span></text:span><text:span text:style-name="T166"/></text:p>
      <text:p text:style-name="P65" loext:marker-style-name="T19"/>
      <text:p text:style-name="P55"><text:span text:style-name="T19">Схема 7</text:span> – Замеры времени работы программы на разных размерах матрицы <text:span text:style-name="T18">A</text:span></text:p>
      <text:p text:style-name="_30_3_5f_Текст_20_ИТММ"><draw:frame draw:style-name="fr3" draw:name="Объект164" text:anchor-type="char" svg:y="-0.012cm" svg:width="15.91cm" svg:height="20.72cm" draw:z-index="6"><draw:object xlink:href="./Object 171" xlink:type="simple" xlink:show="embed" xlink:actuate="onLoad"/><draw:image xlink:href="./ObjectReplacements/Object 171" xlink:type="simple" xlink:show="embed" xlink:actuate="onLoad"/><svg:desc>диаграмма</svg:desc></draw:frame><text:span text:style-name="Internet_20_link"><text:span text:style-name="T6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77">Таблица <text:span text:style-name="T158">7</text:span> – Данные об ускорении для первой реализации<text:line-break/><text:span text:style-name="T18">QR-</text:span><text:span text:style-name="T19">разложения с помощью вращений Гивенса в зависимости</text:span> от количества потоков</text:p>
      <table:table table:name="Таблица7" table:style-name="Таблица7">
        <table:table-column table:style-name="Таблица7.A" table:number-columns-repeated="3"/>
        <table:table-column table:style-name="Таблица7.D"/>
        <table:table-column table:style-name="Таблица7.E"/>
        <table:table-row table:style-name="Таблица7.1">
          <table:table-cell table:style-name="Таблица7.A1" table:number-rows-spanned="2" office:value-type="string">
            <text:p text:style-name="P57" loext:marker-style-name="T102"><text:span text:style-name="T102">Размер данных, </text:span><text:span text:style-name="T103">NxN</text:span></text:p>
          </table:table-cell>
          <table:table-cell table:style-name="Таблица7.A1" table:number-rows-spanned="2" office:value-type="string">
            <text:p text:style-name="P57" loext:marker-style-name="T102"><text:span text:style-name="T102">Время работы последовательной версии</text:span><text:span text:style-name="T102"/></text:p>
          </table:table-cell>
          <table:table-cell table:style-name="Таблица7.C1" table:number-columns-spanned="3" office:value-type="string">
            <text:p text:style-name="P57" loext:marker-style-name="T102"><text:span text:style-name="T102">Ускорение относительно последовательной версии</text:span><text:span text:style-name="T102"/></text:p>
          </table:table-cell>
          <table:covered-table-cell/>
          <table:covered-table-cell/>
        </table:table-row>
        <table:table-row table:style-name="Таблица7.1">
          <table:covered-table-cell table:style-name="Таблица7.A2"/>
          <table:covered-table-cell table:style-name="Таблица7.A2"/>
          <table:table-cell table:style-name="Таблица7.A2" office:value-type="string">
            <text:p text:style-name="P57" loext:marker-style-name="T102"><text:span text:style-name="T102">2 потока</text:span><text:span text:style-name="T102"/></text:p>
          </table:table-cell>
          <table:table-cell table:style-name="Таблица7.A2" office:value-type="string">
            <text:p text:style-name="P57" loext:marker-style-name="T102"><text:span text:style-name="T102">4 потока</text:span><text:span text:style-name="T102"/></text:p>
          </table:table-cell>
          <table:table-cell table:style-name="Таблица7.E2" office:value-type="string">
            <text:p text:style-name="P57" loext:marker-style-name="T102"><text:span text:style-name="T102">8 потоков</text:span><text:span text:style-name="T102"/></text:p>
          </table:table-cell>
        </table:table-row>
        <table:table-row table:style-name="Таблица7.1">
          <table:table-cell table:style-name="Таблица7.E2" office:value-type="string">
            <text:p text:style-name="P58"><text:span text:style-name="Internet_20_link"><text:span text:style-name="T104">100</text:span></text:span></text:p>
          </table:table-cell>
          <table:table-cell table:style-name="Таблица7.A2" office:value-type="string">
            <text:p text:style-name="P59" loext:marker-style-name="T105"><text:span text:style-name="Internet_20_link"><text:span text:style-name="T105">0,0004123</text:span></text:span><text:span text:style-name="T105"/></text:p>
          </table:table-cell>
          <table:table-cell table:style-name="Таблица7.A2" office:value-type="string">
            <text:p text:style-name="P59" loext:marker-style-name="T105"><text:span text:style-name="Internet_20_link"><text:span text:style-name="T105">1,14</text:span></text:span><text:span text:style-name="T105"/></text:p>
          </table:table-cell>
          <table:table-cell table:style-name="Таблица7.A2" office:value-type="string">
            <text:p text:style-name="P59" loext:marker-style-name="T105"><text:span text:style-name="Internet_20_link"><text:span text:style-name="T105">1,09</text:span></text:span><text:span text:style-name="T105"/></text:p>
          </table:table-cell>
          <table:table-cell table:style-name="Таблица7.E2" office:value-type="string">
            <text:p text:style-name="P59" loext:marker-style-name="T105"><text:span text:style-name="Internet_20_link"><text:span text:style-name="T105">1,09</text:span></text:span><text:span text:style-name="T105"/></text:p>
          </table:table-cell>
        </table:table-row>
        <table:table-row table:style-name="Таблица7.1">
          <table:table-cell table:style-name="Таблица7.E2" office:value-type="string">
            <text:p text:style-name="P58"><text:span text:style-name="Internet_20_link"><text:span text:style-name="T104">200</text:span></text:span></text:p>
          </table:table-cell>
          <table:table-cell table:style-name="Таблица7.A2" office:value-type="string">
            <text:p text:style-name="P59" loext:marker-style-name="T105"><text:span text:style-name="Internet_20_link"><text:span text:style-name="T105">0,00258</text:span></text:span><text:span text:style-name="T105"/></text:p>
          </table:table-cell>
          <table:table-cell table:style-name="Таблица7.A2" office:value-type="string">
            <text:p text:style-name="P59" loext:marker-style-name="T105"><text:span text:style-name="Internet_20_link"><text:span text:style-name="T105">0,83</text:span></text:span><text:span text:style-name="T105"/></text:p>
          </table:table-cell>
          <table:table-cell table:style-name="Таблица7.A2" office:value-type="string">
            <text:p text:style-name="P59" loext:marker-style-name="T105"><text:span text:style-name="Internet_20_link"><text:span text:style-name="T105">1,04</text:span></text:span><text:span text:style-name="T105"/></text:p>
          </table:table-cell>
          <table:table-cell table:style-name="Таблица7.E2" office:value-type="string">
            <text:p text:style-name="P59" loext:marker-style-name="T105"><text:span text:style-name="Internet_20_link"><text:span text:style-name="T105">1,04</text:span></text:span><text:span text:style-name="T105"/></text:p>
          </table:table-cell>
        </table:table-row>
        <table:table-row table:style-name="Таблица7.1">
          <table:table-cell table:style-name="Таблица7.E2" office:value-type="string">
            <text:p text:style-name="P58"><text:span text:style-name="Internet_20_link"><text:span text:style-name="T104">300</text:span></text:span></text:p>
          </table:table-cell>
          <table:table-cell table:style-name="Таблица7.A2" office:value-type="string">
            <text:p text:style-name="P59" loext:marker-style-name="T105"><text:span text:style-name="Internet_20_link"><text:span text:style-name="T105">0,0058212</text:span></text:span><text:span text:style-name="T105"/></text:p>
          </table:table-cell>
          <table:table-cell table:style-name="Таблица7.A2" office:value-type="string">
            <text:p text:style-name="P59" loext:marker-style-name="T105"><text:span text:style-name="Internet_20_link"><text:span text:style-name="T105">0,69</text:span></text:span><text:span text:style-name="T105"/></text:p>
          </table:table-cell>
          <table:table-cell table:style-name="Таблица7.A2" office:value-type="string">
            <text:p text:style-name="P59" loext:marker-style-name="T105"><text:span text:style-name="Internet_20_link"><text:span text:style-name="T105">0,67</text:span></text:span><text:span text:style-name="T105"/></text:p>
          </table:table-cell>
          <table:table-cell table:style-name="Таблица7.E2" office:value-type="string">
            <text:p text:style-name="P59" loext:marker-style-name="T105"><text:span text:style-name="Internet_20_link"><text:span text:style-name="T105">0,81</text:span></text:span><text:span text:style-name="T105"/></text:p>
          </table:table-cell>
        </table:table-row>
        <table:table-row table:style-name="Таблица7.1">
          <table:table-cell table:style-name="Таблица7.E2" office:value-type="string">
            <text:p text:style-name="P58"><text:span text:style-name="Internet_20_link"><text:span text:style-name="T104">400</text:span></text:span></text:p>
          </table:table-cell>
          <table:table-cell table:style-name="Таблица7.A2" office:value-type="string">
            <text:p text:style-name="P59" loext:marker-style-name="T105"><text:span text:style-name="Internet_20_link"><text:span text:style-name="T105">0,0133668</text:span></text:span><text:span text:style-name="T105"/></text:p>
          </table:table-cell>
          <table:table-cell table:style-name="Таблица7.A2" office:value-type="string">
            <text:p text:style-name="P59" loext:marker-style-name="T105"><text:span text:style-name="Internet_20_link"><text:span text:style-name="T105">0,74</text:span></text:span><text:span text:style-name="T105"/></text:p>
          </table:table-cell>
          <table:table-cell table:style-name="Таблица7.A2" office:value-type="string">
            <text:p text:style-name="P59" loext:marker-style-name="T105"><text:span text:style-name="Internet_20_link"><text:span text:style-name="T105">0,94</text:span></text:span><text:span text:style-name="T105"/></text:p>
          </table:table-cell>
          <table:table-cell table:style-name="Таблица7.E2" office:value-type="string">
            <text:p text:style-name="P59" loext:marker-style-name="T105"><text:span text:style-name="Internet_20_link"><text:span text:style-name="T105">0,91</text:span></text:span><text:span text:style-name="T105"/></text:p>
          </table:table-cell>
        </table:table-row>
        <table:table-row table:style-name="Таблица7.1">
          <table:table-cell table:style-name="Таблица7.E2" office:value-type="string">
            <text:p text:style-name="P58"><text:span text:style-name="Internet_20_link"><text:span text:style-name="T104">500</text:span></text:span></text:p>
          </table:table-cell>
          <table:table-cell table:style-name="Таблица7.A2" office:value-type="string">
            <text:p text:style-name="P59" loext:marker-style-name="T105"><text:span text:style-name="Internet_20_link"><text:span text:style-name="T105">0,0326057</text:span></text:span><text:span text:style-name="T105"/></text:p>
          </table:table-cell>
          <table:table-cell table:style-name="Таблица7.A2" office:value-type="string">
            <text:p text:style-name="P59" loext:marker-style-name="T105"><text:span text:style-name="Internet_20_link"><text:span text:style-name="T105">0,94</text:span></text:span><text:span text:style-name="T105"/></text:p>
          </table:table-cell>
          <table:table-cell table:style-name="Таблица7.A2" office:value-type="string">
            <text:p text:style-name="P59" loext:marker-style-name="T105"><text:span text:style-name="Internet_20_link"><text:span text:style-name="T105">1,09</text:span></text:span><text:span text:style-name="T105"/></text:p>
          </table:table-cell>
          <table:table-cell table:style-name="Таблица7.E2" office:value-type="string">
            <text:p text:style-name="P59" loext:marker-style-name="T105"><text:span text:style-name="Internet_20_link"><text:span text:style-name="T105">1,13</text:span></text:span><text:span text:style-name="T105"/></text:p>
          </table:table-cell>
        </table:table-row>
        <table:table-row table:style-name="Таблица7.1">
          <table:table-cell table:style-name="Таблица7.E2" office:value-type="string">
            <text:p text:style-name="P58"><text:span text:style-name="Internet_20_link"><text:span text:style-name="T104">1000</text:span></text:span></text:p>
          </table:table-cell>
          <table:table-cell table:style-name="Таблица7.A2" office:value-type="string">
            <text:p text:style-name="P59" loext:marker-style-name="T105"><text:span text:style-name="Internet_20_link"><text:span text:style-name="T105">0,496281</text:span></text:span><text:span text:style-name="T105"/></text:p>
          </table:table-cell>
          <table:table-cell table:style-name="Таблица7.A2" office:value-type="string">
            <text:p text:style-name="P59" loext:marker-style-name="T105"><text:span text:style-name="Internet_20_link"><text:span text:style-name="T105">1,06</text:span></text:span><text:span text:style-name="T105"/></text:p>
          </table:table-cell>
          <table:table-cell table:style-name="Таблица7.A2" office:value-type="string">
            <text:p text:style-name="P59" loext:marker-style-name="T105"><text:span text:style-name="Internet_20_link"><text:span text:style-name="T105">1,32</text:span></text:span><text:span text:style-name="T105"/></text:p>
          </table:table-cell>
          <table:table-cell table:style-name="Таблица7.E2" office:value-type="string">
            <text:p text:style-name="P59" loext:marker-style-name="T105"><text:span text:style-name="Internet_20_link"><text:span text:style-name="T105">1,2</text:span></text:span><text:span text:style-name="T105"/></text:p>
          </table:table-cell>
        </table:table-row>
        <table:table-row table:style-name="Таблица7.1">
          <table:table-cell table:style-name="Таблица7.E2" office:value-type="string">
            <text:p text:style-name="P58"><text:span text:style-name="Internet_20_link"><text:span text:style-name="T104">1500</text:span></text:span></text:p>
          </table:table-cell>
          <table:table-cell table:style-name="Таблица7.A2" office:value-type="string">
            <text:p text:style-name="P59" loext:marker-style-name="T105"><text:span text:style-name="Internet_20_link"><text:span text:style-name="T105">1,60407</text:span></text:span><text:span text:style-name="T105"/></text:p>
          </table:table-cell>
          <table:table-cell table:style-name="Таблица7.A2" office:value-type="string">
            <text:p text:style-name="P59" loext:marker-style-name="T105"><text:span text:style-name="Internet_20_link"><text:span text:style-name="T105">1,05</text:span></text:span><text:span text:style-name="T105"/></text:p>
          </table:table-cell>
          <table:table-cell table:style-name="Таблица7.A2" office:value-type="string">
            <text:p text:style-name="P59" loext:marker-style-name="T105"><text:span text:style-name="Internet_20_link"><text:span text:style-name="T105">0,98</text:span></text:span><text:span text:style-name="T105"/></text:p>
          </table:table-cell>
          <table:table-cell table:style-name="Таблица7.E2" office:value-type="string">
            <text:p text:style-name="P59" loext:marker-style-name="T105"><text:span text:style-name="Internet_20_link"><text:span text:style-name="T105">0,95</text:span></text:span><text:span text:style-name="T105"/></text:p>
          </table:table-cell>
        </table:table-row>
        <table:table-row table:style-name="Таблица7.1">
          <table:table-cell table:style-name="Таблица7.E2" office:value-type="string">
            <text:p text:style-name="P58"><text:span text:style-name="Internet_20_link"><text:span text:style-name="T104">2000</text:span></text:span></text:p>
          </table:table-cell>
          <table:table-cell table:style-name="Таблица7.A2" office:value-type="string">
            <text:p text:style-name="P59" loext:marker-style-name="T105"><text:span text:style-name="Internet_20_link"><text:span text:style-name="T105">3,55704</text:span></text:span><text:span text:style-name="T105"/></text:p>
          </table:table-cell>
          <table:table-cell table:style-name="Таблица7.A2" office:value-type="string">
            <text:p text:style-name="P59" loext:marker-style-name="T105"><text:span text:style-name="Internet_20_link"><text:span text:style-name="T105">0,84</text:span></text:span><text:span text:style-name="T105"/></text:p>
          </table:table-cell>
          <table:table-cell table:style-name="Таблица7.A2" office:value-type="string">
            <text:p text:style-name="P59" loext:marker-style-name="T105"><text:span text:style-name="Internet_20_link"><text:span text:style-name="T105">0,96</text:span></text:span><text:span text:style-name="T105"/></text:p>
          </table:table-cell>
          <table:table-cell table:style-name="Таблица7.E2" office:value-type="string">
            <text:p text:style-name="P59" loext:marker-style-name="T105"><text:span text:style-name="Internet_20_link"><text:span text:style-name="T105">0,97</text:span></text:span><text:span text:style-name="T105"/></text:p>
          </table:table-cell>
        </table:table-row>
        <table:table-row table:style-name="Таблица7.1">
          <table:table-cell table:style-name="Таблица7.E2" office:value-type="string">
            <text:p text:style-name="P58"><text:span text:style-name="Internet_20_link"><text:span text:style-name="T104">2500</text:span></text:span></text:p>
          </table:table-cell>
          <table:table-cell table:style-name="Таблица7.A2" office:value-type="string">
            <text:p text:style-name="P59" loext:marker-style-name="T105"><text:span text:style-name="Internet_20_link"><text:span text:style-name="T105">7,23234</text:span></text:span><text:span text:style-name="T105"/></text:p>
          </table:table-cell>
          <table:table-cell table:style-name="Таблица7.A2" office:value-type="string">
            <text:p text:style-name="P59" loext:marker-style-name="T105"><text:span text:style-name="Internet_20_link"><text:span text:style-name="T105">0,9</text:span></text:span><text:span text:style-name="T105"/></text:p>
          </table:table-cell>
          <table:table-cell table:style-name="Таблица7.A2" office:value-type="string">
            <text:p text:style-name="P59" loext:marker-style-name="T105"><text:span text:style-name="Internet_20_link"><text:span text:style-name="T105">0,99</text:span></text:span><text:span text:style-name="T105"/></text:p>
          </table:table-cell>
          <table:table-cell table:style-name="Таблица7.E2" office:value-type="string">
            <text:p text:style-name="P59" loext:marker-style-name="T105"><text:span text:style-name="Internet_20_link"><text:span text:style-name="T105">0,99</text:span></text:span><text:span text:style-name="T105"/></text:p>
          </table:table-cell>
        </table:table-row>
        <table:table-row table:style-name="Таблица7.1">
          <table:table-cell table:style-name="Таблица7.E2" office:value-type="string">
            <text:p text:style-name="P58" loext:marker-style-name="T18"><text:span text:style-name="Internet_20_link"><text:span text:style-name="T127">3000</text:span></text:span><text:span text:style-name="T106"/></text:p>
          </table:table-cell>
          <table:table-cell table:style-name="Таблица7.A2" office:value-type="string">
            <text:p text:style-name="P59" loext:marker-style-name="T105"><text:span text:style-name="Internet_20_link"><text:span text:style-name="T105">12,8809</text:span></text:span><text:span text:style-name="T105"/></text:p>
          </table:table-cell>
          <table:table-cell table:style-name="Таблица7.A2" office:value-type="string">
            <text:p text:style-name="P59" loext:marker-style-name="T105"><text:span text:style-name="Internet_20_link"><text:span text:style-name="T105">0,95</text:span></text:span><text:span text:style-name="T105"/></text:p>
          </table:table-cell>
          <table:table-cell table:style-name="Таблица7.A2" office:value-type="string">
            <text:p text:style-name="P59" loext:marker-style-name="T105"><text:span text:style-name="Internet_20_link"><text:span text:style-name="T105">1,04</text:span></text:span><text:span text:style-name="T105"/></text:p>
          </table:table-cell>
          <table:table-cell table:style-name="Таблица7.E2" office:value-type="string">
            <text:p text:style-name="P59" loext:marker-style-name="T105"><text:span text:style-name="Internet_20_link"><text:span text:style-name="T105">1,02</text:span></text:span><text:span text:style-name="T105"/></text:p>
          </table:table-cell>
        </table:table-row>
        <table:table-row table:style-name="Таблица7.1">
          <table:table-cell table:style-name="Таблица7.E2" office:value-type="string">
            <text:p text:style-name="P58" loext:marker-style-name="T19"><text:span text:style-name="T19">3500</text:span><text:span text:style-name="T19"/></text:p>
          </table:table-cell>
          <table:table-cell table:style-name="Таблица7.A2" office:value-type="string">
            <text:p text:style-name="P59" loext:marker-style-name="T105"><text:span text:style-name="Internet_20_link"><text:span text:style-name="T105">20,2517</text:span></text:span><text:span text:style-name="T105"/></text:p>
          </table:table-cell>
          <table:table-cell table:style-name="Таблица7.A2" office:value-type="string">
            <text:p text:style-name="P59" loext:marker-style-name="T105"><text:span text:style-name="Internet_20_link"><text:span text:style-name="T105">0,92</text:span></text:span><text:span text:style-name="T105"/></text:p>
          </table:table-cell>
          <table:table-cell table:style-name="Таблица7.A2" office:value-type="string">
            <text:p text:style-name="P59" loext:marker-style-name="T105"><text:span text:style-name="Internet_20_link"><text:span text:style-name="T105">1</text:span></text:span><text:span text:style-name="T105"/></text:p>
          </table:table-cell>
          <table:table-cell table:style-name="Таблица7.E2" office:value-type="string">
            <text:p text:style-name="P59" loext:marker-style-name="T105"><text:span text:style-name="Internet_20_link"><text:span text:style-name="T105">0,98</text:span></text:span><text:span text:style-name="T105"/></text:p>
          </table:table-cell>
        </table:table-row>
        <table:table-row table:style-name="Таблица7.1">
          <table:table-cell table:style-name="Таблица7.E2" office:value-type="string">
            <text:p text:style-name="P58" loext:marker-style-name="T19"><text:span text:style-name="T19">4000</text:span><text:span text:style-name="T19"/></text:p>
          </table:table-cell>
          <table:table-cell table:style-name="Таблица7.A2" office:value-type="string">
            <text:p text:style-name="P59" loext:marker-style-name="T105"><text:span text:style-name="Internet_20_link"><text:span text:style-name="T105">30,9537</text:span></text:span><text:span text:style-name="T105"/></text:p>
          </table:table-cell>
          <table:table-cell table:style-name="Таблица7.A2" office:value-type="string">
            <text:p text:style-name="P59" loext:marker-style-name="T105"><text:span text:style-name="Internet_20_link"><text:span text:style-name="T105">0,96</text:span></text:span><text:span text:style-name="T105"/></text:p>
          </table:table-cell>
          <table:table-cell table:style-name="Таблица7.A2" office:value-type="string">
            <text:p text:style-name="P59" loext:marker-style-name="T105"><text:span text:style-name="Internet_20_link"><text:span text:style-name="T105">1,02</text:span></text:span><text:span text:style-name="T105"/></text:p>
          </table:table-cell>
          <table:table-cell table:style-name="Таблица7.E2" office:value-type="string">
            <text:p text:style-name="P59" loext:marker-style-name="T105"><text:span text:style-name="Internet_20_link"><text:span text:style-name="T105">1</text:span></text:span><text:span text:style-name="T105"/></text:p>
          </table:table-cell>
        </table:table-row>
        <table:table-row table:style-name="Таблица7.1">
          <table:table-cell table:style-name="Таблица7.E2" office:value-type="string">
            <text:p text:style-name="P60" loext:marker-style-name="T107"><text:span text:style-name="T107">СРЕДНЕЕ ПОЛУЧЕННОЕ УСКОРЕНИЕ</text:span><text:span text:style-name="T107"/></text:p>
          </table:table-cell>
          <table:table-cell table:style-name="Таблица7.A2" office:value-type="string">
            <text:p text:style-name="P59"><text:span text:style-name="Internet_20_link"><text:span text:style-name="T108">-</text:span></text:span></text:p>
          </table:table-cell>
          <table:table-cell table:style-name="Таблица7.A2" office:value-type="string">
            <text:p text:style-name="P59" loext:marker-style-name="T105"><text:span text:style-name="Internet_20_link"><text:span text:style-name="T108">0,92</text:span></text:span><text:span text:style-name="T108"/></text:p>
          </table:table-cell>
          <table:table-cell table:style-name="Таблица7.A2" office:value-type="string">
            <text:p text:style-name="P59" loext:marker-style-name="T105"><text:span text:style-name="Internet_20_link"><text:span text:style-name="T108">1,01</text:span></text:span><text:span text:style-name="T108"/></text:p>
          </table:table-cell>
          <table:table-cell table:style-name="Таблица7.E2" office:value-type="string">
            <text:p text:style-name="P59" loext:marker-style-name="T105"><text:span text:style-name="Internet_20_link"><text:span text:style-name="T108">1,01</text:span></text:span><text:span text:style-name="T108"/></text:p>
          </table:table-cell>
        </table:table-row>
      </table:table>
      <text:p text:style-name="_30_3_5f_Текст_20_ИТММ" loext:marker-style-name="T19"><text:span text:style-name="Internet_20_link"><text:span text:style-name="T109">При использовании SIMD-векторизации добавление многопоточности не да</text:span></text:span><text:span text:style-name="Internet_20_link"><text:span text:style-name="T167">ло</text:span></text:span><text:span text:style-name="Internet_20_link"><text:span text:style-name="T109"> преимущества и даже ухудш</text:span></text:span><text:span text:style-name="Internet_20_link"><text:span text:style-name="T167">ило</text:span></text:span><text:span text:style-name="Internet_20_link"><text:span text:style-name="T109"> производительность. </text:span></text:span><text:span text:style-name="Internet_20_link"><text:span text:style-name="T167">Вероятно это из-за того, что потокам нужно хранить в кэше для корректного исполнения </text:span></text:span><text:span text:style-name="Internet_20_link"><text:span text:style-name="T168">SIMD </text:span></text:span><text:span text:style-name="Internet_20_link"><text:span text:style-name="T167">инструкций разные данные, происходят постоянные конфликты и промахи. Зато последовательная версия показала себя хорошо, видно, что третья реализация метода Гивенса даже при последовательном выполнении отрабатывает за лучшее, меньшее время по сравнению со второй реализацией вращений Гивенса. Для небольших данных (матриц 500x500 и меньше) этот алгоритм превосходит даже оптимизированный алгоритм на основе отражений Хаусхолдера.</text:span></text:span></text:p>
      <text:p text:style-name="_30_3_5f_Текст_20_ИТММ" loext:marker-style-name="T19"><text:span text:style-name="Internet_20_link"><text:span text:style-name="T109">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10">e-12, </text:span></text:span><text:span text:style-name="Internet_20_link"><text:span text:style-name="T109">относительная — 1e-15</text:span></text:span><text:span text:style-name="Internet_20_link"><text:span text:style-name="T110">.</text:span></text:span></text:p>
      <text:p text:style-name="P29"><text:span text:style-name="Internet_20_link"><text:span text:style-name="T163">Реализация прикреплена в Приложении 6.</text:span></text:span></text:p>
      <text:p text:style-name="P95"><text:span text:style-name="T53">Сводные данные ниже содержат сравнение всех полученных реализаций </text:span><text:span text:style-name="T52">QR-</text:span><text:span text:style-name="T53">разложения на основе вращений Гивенса с первой последовательной реализацией. Последним столбцом прикреплено время работы</text:span><text:span text:style-name="T67"> </text:span><text:span text:style-name="T66">QR-</text:span><text:span text:style-name="T67">разложения из библиотеки </text:span><text:span text:style-name="T66">Scilab. </text:span><text:span text:style-name="T67">Условия исполнения: максимально доступное количество потоков в тестируемой системе (восемь), произвольная плотная матрица</text:span><text:span text:style-name="T66"> A, </text:span><text:span text:style-name="T67">тип данных матрицы </text:span><text:span text:style-name="T66">A – double</text:span><text:span text:style-name="T67">, число с плавающей точкой двойной точности.</text:span></text:p>
      <text:p text:style-name="P67"><text:span text:style-name="T19">Схема </text:span><text:span text:style-name="T160">8</text:span> – <text:span text:style-name="T18">Сравнение версий метода Гивенса с верси</text:span><text:span text:style-name="T19">ей</text:span><text:span text:style-name="T18"> из библиотеки Scilab</text:span><draw:frame draw:style-name="fr4" draw:name="Объект170" text:anchor-type="as-char" svg:width="17.776cm" svg:height="12.776cm" draw:z-index="177"><draw:object xlink:href="./Object 179" xlink:type="simple" xlink:show="embed" xlink:actuate="onLoad"/><draw:image xlink:href="./ObjectReplacements/Object 179" xlink:type="simple" xlink:show="embed" xlink:actuate="onLoad"/></draw:frame></text:p>
      <text:p text:style-name="P67">Таблица 8 – Сравнение версий метода Гивенса с верси<text:span text:style-name="T19">ей</text:span> из библиотеки Sci<text:span text:style-name="T18">l</text:span>ab</text:p>
      <table:table table:name="Таблица8" table:style-name="Таблица8">
        <table:table-column table:style-name="Таблица8.A"/>
        <table:table-column table:style-name="Таблица8.B"/>
        <table:table-column table:style-name="Таблица8.A"/>
        <table:table-column table:style-name="Таблица8.D"/>
        <table:table-column table:style-name="Таблица8.E"/>
        <table:table-row table:style-name="Таблица8.1">
          <table:table-cell table:style-name="Таблица8.A1" office:value-type="string">
            <text:p text:style-name="P79" loext:marker-style-name="T102"><text:span text:style-name="T141">Размер данных (матрица NxN)</text:span><text:span text:style-name="T141"/></text:p>
          </table:table-cell>
          <table:table-cell table:style-name="Таблица8.A1" office:value-type="string">
            <text:p text:style-name="P57" loext:marker-style-name="T102"><text:span text:style-name="T102">Время работы первой последовательной реализации QR-разложения с вращениями Гивенса , с</text:span><text:span text:style-name="T102"/></text:p>
          </table:table-cell>
          <table:table-cell table:style-name="Таблица8.A1" office:value-type="string">
            <text:p text:style-name="P57" loext:marker-style-name="T102"><text:span text:style-name="T102">Время работы QR-разложения с вращениями Гивенса с улучшенным обращением к памяти, с</text:span><text:span text:style-name="T102"/></text:p>
          </table:table-cell>
          <table:table-cell table:style-name="Таблица8.D1" office:value-type="string">
            <text:p text:style-name="P57" loext:marker-style-name="T102"><text:span text:style-name="T102">Время работы QR-разложения с вращениями Гивенса с векторизацией, с</text:span><text:span text:style-name="T102"/></text:p>
          </table:table-cell>
          <table:table-cell table:style-name="Таблица8.A1" office:value-type="string">
            <text:p text:style-name="P57" loext:marker-style-name="T102"><text:span text:style-name="T102">Время работы QR-разложения из библиотеки Sci</text:span><text:span text:style-name="T103">l</text:span><text:span text:style-name="T102">ab, с</text:span></text:p>
          </table:table-cell>
        </table:table-row>
        <table:table-row table:style-name="Таблица8.1">
          <table:table-cell table:style-name="Таблица8.A2" office:value-type="string">
            <text:p text:style-name="P60" loext:marker-style-name="T143"><text:span text:style-name="T143">100</text:span><text:span text:style-name="T143"/></text:p>
          </table:table-cell>
          <table:table-cell table:style-name="Таблица8.A2" office:value-type="string">
            <text:p text:style-name="P59" loext:marker-style-name="T105"><text:span text:style-name="Internet_20_link"><text:span text:style-name="T105">0,0013115</text:span></text:span><text:span text:style-name="T105"/></text:p>
          </table:table-cell>
          <table:table-cell table:style-name="Таблица8.A2" office:value-type="string">
            <text:p text:style-name="P59" loext:marker-style-name="T143"><text:span text:style-name="T143">0,0013181</text:span><text:span text:style-name="T143"/></text:p>
          </table:table-cell>
          <table:table-cell table:style-name="Таблица8.D2" office:value-type="string">
            <text:p text:style-name="P59" loext:marker-style-name="T143"><text:span text:style-name="T143">0,0003797</text:span><text:span text:style-name="T143"/></text:p>
          </table:table-cell>
          <table:table-cell table:style-name="Таблица8.A2" office:value-type="string">
            <text:p text:style-name="P59" loext:marker-style-name="T143"><text:span text:style-name="T143">0,0335941</text:span><text:span text:style-name="T143"/></text:p>
          </table:table-cell>
        </table:table-row>
        <table:table-row table:style-name="Таблица8.1">
          <table:table-cell table:style-name="Таблица8.A2" office:value-type="string">
            <text:p text:style-name="P60" loext:marker-style-name="T143"><text:span text:style-name="T143">200</text:span><text:span text:style-name="T143"/></text:p>
          </table:table-cell>
          <table:table-cell table:style-name="Таблица8.A2" office:value-type="string">
            <text:p text:style-name="P59" loext:marker-style-name="T105"><text:span text:style-name="Internet_20_link"><text:span text:style-name="T105">0,0102885</text:span></text:span><text:span text:style-name="T105"/></text:p>
          </table:table-cell>
          <table:table-cell table:style-name="Таблица8.A2" office:value-type="string">
            <text:p text:style-name="P59" loext:marker-style-name="T143"><text:span text:style-name="T143">0,0099296</text:span><text:span text:style-name="T143"/></text:p>
          </table:table-cell>
          <table:table-cell table:style-name="Таблица8.D2" office:value-type="string">
            <text:p text:style-name="P59" loext:marker-style-name="T143"><text:span text:style-name="T143">0,0024847</text:span><text:span text:style-name="T143"/></text:p>
          </table:table-cell>
          <table:table-cell table:style-name="Таблица8.A2" office:value-type="string">
            <text:p text:style-name="P59" loext:marker-style-name="T143"><text:span text:style-name="T143">0,0039998</text:span><text:span text:style-name="T143"/></text:p>
          </table:table-cell>
        </table:table-row>
        <table:table-row table:style-name="Таблица8.1">
          <table:table-cell table:style-name="Таблица8.A2" office:value-type="string">
            <text:p text:style-name="P60" loext:marker-style-name="T143"><text:span text:style-name="T143">300</text:span><text:span text:style-name="T143"/></text:p>
          </table:table-cell>
          <table:table-cell table:style-name="Таблица8.A2" office:value-type="string">
            <text:p text:style-name="P59" loext:marker-style-name="T105"><text:span text:style-name="Internet_20_link"><text:span text:style-name="T105">0,0331369</text:span></text:span><text:span text:style-name="T105"/></text:p>
          </table:table-cell>
          <table:table-cell table:style-name="Таблица8.A2" office:value-type="string">
            <text:p text:style-name="P59" loext:marker-style-name="T143"><text:span text:style-name="T143">0,0318885</text:span><text:span text:style-name="T143"/></text:p>
          </table:table-cell>
          <table:table-cell table:style-name="Таблица8.D2" office:value-type="string">
            <text:p text:style-name="P59" loext:marker-style-name="T143"><text:span text:style-name="T143">0,007201</text:span><text:span text:style-name="T143"/></text:p>
          </table:table-cell>
          <table:table-cell table:style-name="Таблица8.A2" office:value-type="string">
            <text:p text:style-name="P59" loext:marker-style-name="T143"><text:span text:style-name="T143">0,0084994</text:span><text:soft-page-break/><text:span text:style-name="T143"/></text:p>
          </table:table-cell>
        </table:table-row>
        <table:table-row table:style-name="Таблица8.1">
          <table:table-cell table:style-name="Таблица8.A2" office:value-type="string">
            <text:p text:style-name="P60" loext:marker-style-name="T143"><text:span text:style-name="T143">400</text:span><text:span text:style-name="T143"/></text:p>
          </table:table-cell>
          <table:table-cell table:style-name="Таблица8.A2" office:value-type="string">
            <text:p text:style-name="P59" loext:marker-style-name="T105"><text:span text:style-name="Internet_20_link"><text:span text:style-name="T105">0,0681976</text:span></text:span><text:span text:style-name="T105"/></text:p>
          </table:table-cell>
          <table:table-cell table:style-name="Таблица8.A2" office:value-type="string">
            <text:p text:style-name="P59" loext:marker-style-name="T143"><text:span text:style-name="T143">0,0764529</text:span><text:span text:style-name="T143"/></text:p>
          </table:table-cell>
          <table:table-cell table:style-name="Таблица8.D2" office:value-type="string">
            <text:p text:style-name="P59" loext:marker-style-name="T143"><text:span text:style-name="T143">0,0146559</text:span><text:span text:style-name="T143"/></text:p>
          </table:table-cell>
          <table:table-cell table:style-name="Таблица8.A2" office:value-type="string">
            <text:p text:style-name="P59" loext:marker-style-name="T143"><text:span text:style-name="T143">0,0054738</text:span><text:span text:style-name="T143"/></text:p>
          </table:table-cell>
        </table:table-row>
        <table:table-row table:style-name="Таблица8.1">
          <table:table-cell table:style-name="Таблица8.A2" office:value-type="string">
            <text:p text:style-name="P60" loext:marker-style-name="T143"><text:span text:style-name="T143">500</text:span><text:span text:style-name="T143"/></text:p>
          </table:table-cell>
          <table:table-cell table:style-name="Таблица8.A2" office:value-type="string">
            <text:p text:style-name="P59" loext:marker-style-name="T105"><text:span text:style-name="Internet_20_link"><text:span text:style-name="T105">0,126461</text:span></text:span><text:span text:style-name="T105"/></text:p>
          </table:table-cell>
          <table:table-cell table:style-name="Таблица8.A2" office:value-type="string">
            <text:p text:style-name="P59" loext:marker-style-name="T143"><text:span text:style-name="T143">0,140105</text:span><text:span text:style-name="T143"/></text:p>
          </table:table-cell>
          <table:table-cell table:style-name="Таблица8.D2" office:value-type="string">
            <text:p text:style-name="P59" loext:marker-style-name="T143"><text:span text:style-name="T143">0,0288285</text:span><text:span text:style-name="T143"/></text:p>
          </table:table-cell>
          <table:table-cell table:style-name="Таблица8.A2" office:value-type="string">
            <text:p text:style-name="P59" loext:marker-style-name="T143"><text:span text:style-name="T143">0,0088187</text:span><text:span text:style-name="T143"/></text:p>
          </table:table-cell>
        </table:table-row>
        <table:table-row table:style-name="Таблица8.1">
          <table:table-cell table:style-name="Таблица8.A2" office:value-type="string">
            <text:p text:style-name="P60" loext:marker-style-name="T143"><text:span text:style-name="T143">1000</text:span><text:span text:style-name="T143"/></text:p>
          </table:table-cell>
          <table:table-cell table:style-name="Таблица8.A2" office:value-type="string">
            <text:p text:style-name="P59" loext:marker-style-name="T105"><text:span text:style-name="Internet_20_link"><text:span text:style-name="T105">1,03255</text:span></text:span><text:span text:style-name="T105"/></text:p>
          </table:table-cell>
          <table:table-cell table:style-name="Таблица8.A2" office:value-type="string">
            <text:p text:style-name="P59" loext:marker-style-name="T143"><text:span text:style-name="T143">1,00876</text:span><text:span text:style-name="T143"/></text:p>
          </table:table-cell>
          <table:table-cell table:style-name="Таблица8.D2" office:value-type="string">
            <text:p text:style-name="P59" loext:marker-style-name="T143"><text:span text:style-name="T143">0,412436</text:span><text:span text:style-name="T143"/></text:p>
          </table:table-cell>
          <table:table-cell table:style-name="Таблица8.A2" office:value-type="string">
            <text:p text:style-name="P59" loext:marker-style-name="T143"><text:span text:style-name="T143">0,0412016</text:span><text:span text:style-name="T143"/></text:p>
          </table:table-cell>
        </table:table-row>
        <table:table-row table:style-name="Таблица8.1">
          <table:table-cell table:style-name="Таблица8.A2" office:value-type="string">
            <text:p text:style-name="P60" loext:marker-style-name="T143"><text:span text:style-name="T143">1500</text:span><text:span text:style-name="T143"/></text:p>
          </table:table-cell>
          <table:table-cell table:style-name="Таблица8.A2" office:value-type="string">
            <text:p text:style-name="P59" loext:marker-style-name="T105"><text:span text:style-name="Internet_20_link"><text:span text:style-name="T105">4,23951</text:span></text:span><text:span text:style-name="T105"/></text:p>
          </table:table-cell>
          <table:table-cell table:style-name="Таблица8.A2" office:value-type="string">
            <text:p text:style-name="P59" loext:marker-style-name="T143"><text:span text:style-name="T143">2,55075</text:span><text:span text:style-name="T143"/></text:p>
          </table:table-cell>
          <table:table-cell table:style-name="Таблица8.D2" office:value-type="string">
            <text:p text:style-name="P59" loext:marker-style-name="T143"><text:span text:style-name="T143">1,6963</text:span><text:span text:style-name="T143"/></text:p>
          </table:table-cell>
          <table:table-cell table:style-name="Таблица8.A2" office:value-type="string">
            <text:p text:style-name="P59" loext:marker-style-name="T143"><text:span text:style-name="T143">0,0998157</text:span><text:span text:style-name="T143"/></text:p>
          </table:table-cell>
        </table:table-row>
        <table:table-row table:style-name="Таблица8.1">
          <table:table-cell table:style-name="Таблица8.A2" office:value-type="string">
            <text:p text:style-name="P60" loext:marker-style-name="T143"><text:span text:style-name="T143">2000</text:span><text:span text:style-name="T143"/></text:p>
          </table:table-cell>
          <table:table-cell table:style-name="Таблица8.A2" office:value-type="string">
            <text:p text:style-name="P59" loext:marker-style-name="T105"><text:span text:style-name="Internet_20_link"><text:span text:style-name="T105">9,38852</text:span></text:span><text:span text:style-name="T105"/></text:p>
          </table:table-cell>
          <table:table-cell table:style-name="Таблица8.A2" office:value-type="string">
            <text:p text:style-name="P59" loext:marker-style-name="T143"><text:span text:style-name="T143">5,12232</text:span><text:span text:style-name="T143"/></text:p>
          </table:table-cell>
          <table:table-cell table:style-name="Таблица8.D2" office:value-type="string">
            <text:p text:style-name="P59" loext:marker-style-name="T143"><text:span text:style-name="T143">3,66677</text:span><text:span text:style-name="T143"/></text:p>
          </table:table-cell>
          <table:table-cell table:style-name="Таблица8.A2" office:value-type="string">
            <text:p text:style-name="P59" loext:marker-style-name="T143"><text:span text:style-name="T143">0,1859652</text:span><text:span text:style-name="T143"/></text:p>
          </table:table-cell>
        </table:table-row>
        <table:table-row table:style-name="Таблица8.1">
          <table:table-cell table:style-name="Таблица8.A2" office:value-type="string">
            <text:p text:style-name="P60" loext:marker-style-name="T143"><text:span text:style-name="T143">2500</text:span><text:span text:style-name="T143"/></text:p>
          </table:table-cell>
          <table:table-cell table:style-name="Таблица8.A2" office:value-type="string">
            <text:p text:style-name="P59" loext:marker-style-name="T105"><text:span text:style-name="Internet_20_link"><text:span text:style-name="T105">18,5025</text:span></text:span><text:span text:style-name="T105"/></text:p>
          </table:table-cell>
          <table:table-cell table:style-name="Таблица8.A2" office:value-type="string">
            <text:p text:style-name="P59" loext:marker-style-name="T143"><text:span text:style-name="T143">9,40546</text:span><text:span text:style-name="T143"/></text:p>
          </table:table-cell>
          <table:table-cell table:style-name="Таблица8.D2" office:value-type="string">
            <text:p text:style-name="P59" loext:marker-style-name="T143"><text:span text:style-name="T143">7,32413</text:span><text:span text:style-name="T143"/></text:p>
          </table:table-cell>
          <table:table-cell table:style-name="Таблица8.A2" office:value-type="string">
            <text:p text:style-name="P59" loext:marker-style-name="T143"><text:span text:style-name="T143">0,3497936</text:span><text:span text:style-name="T143"/></text:p>
          </table:table-cell>
        </table:table-row>
        <table:table-row table:style-name="Таблица8.1">
          <table:table-cell table:style-name="Таблица8.A2" office:value-type="string">
            <text:p text:style-name="P60" loext:marker-style-name="T143"><text:span text:style-name="T143">3000</text:span><text:span text:style-name="T143"/></text:p>
          </table:table-cell>
          <table:table-cell table:style-name="Таблица8.A2" office:value-type="string">
            <text:p text:style-name="P59" loext:marker-style-name="T105"><text:span text:style-name="Internet_20_link"><text:span text:style-name="T105">31,8739</text:span></text:span><text:span text:style-name="T105"/></text:p>
          </table:table-cell>
          <table:table-cell table:style-name="Таблица8.A2" office:value-type="string">
            <text:p text:style-name="P59" loext:marker-style-name="T143"><text:span text:style-name="T143">15,6294</text:span><text:span text:style-name="T143"/></text:p>
          </table:table-cell>
          <table:table-cell table:style-name="Таблица8.D2" office:value-type="string">
            <text:p text:style-name="P59" loext:marker-style-name="T143"><text:span text:style-name="T143">12,6413</text:span><text:span text:style-name="T143"/></text:p>
          </table:table-cell>
          <table:table-cell table:style-name="Таблица8.A2" office:value-type="string">
            <text:p text:style-name="P59" loext:marker-style-name="T143"><text:span text:style-name="T143">0,6075179</text:span><text:span text:style-name="T143"/></text:p>
          </table:table-cell>
        </table:table-row>
        <table:table-row table:style-name="Таблица8.1">
          <table:table-cell table:style-name="Таблица8.A2" office:value-type="string">
            <text:p text:style-name="P60" loext:marker-style-name="T143"><text:span text:style-name="T143">3500</text:span><text:span text:style-name="T143"/></text:p>
          </table:table-cell>
          <table:table-cell table:style-name="Таблица8.A2" office:value-type="string">
            <text:p text:style-name="P59" loext:marker-style-name="T105"><text:span text:style-name="Internet_20_link"><text:span text:style-name="T105">50,2523</text:span></text:span><text:span text:style-name="T105"/></text:p>
          </table:table-cell>
          <table:table-cell table:style-name="Таблица8.A2" office:value-type="string">
            <text:p text:style-name="P59" loext:marker-style-name="T143"><text:span text:style-name="T143">24,0062</text:span><text:span text:style-name="T143"/></text:p>
          </table:table-cell>
          <table:table-cell table:style-name="Таблица8.D2" office:value-type="string">
            <text:p text:style-name="P59" loext:marker-style-name="T143"><text:span text:style-name="T143">20,7444</text:span><text:span text:style-name="T143"/></text:p>
          </table:table-cell>
          <table:table-cell table:style-name="Таблица8.A2" office:value-type="string">
            <text:p text:style-name="P59" loext:marker-style-name="T143"><text:span text:style-name="T143">0,9034108</text:span><text:span text:style-name="T143"/></text:p>
          </table:table-cell>
        </table:table-row>
        <table:table-row table:style-name="Таблица8.1">
          <table:table-cell table:style-name="Таблица8.A2" office:value-type="string">
            <text:p text:style-name="P60" loext:marker-style-name="T143"><text:span text:style-name="T143">4000</text:span><text:span text:style-name="T143"/></text:p>
          </table:table-cell>
          <table:table-cell table:style-name="Таблица8.A2" office:value-type="string">
            <text:p text:style-name="P59" loext:marker-style-name="T105"><text:span text:style-name="Internet_20_link"><text:span text:style-name="T105">75,3927</text:span></text:span><text:span text:style-name="T105"/></text:p>
          </table:table-cell>
          <table:table-cell table:style-name="Таблица8.A2" office:value-type="string">
            <text:p text:style-name="P59" loext:marker-style-name="T143"><text:span text:style-name="T143">35,1546</text:span><text:span text:style-name="T143"/></text:p>
          </table:table-cell>
          <table:table-cell table:style-name="Таблица8.D2" office:value-type="string">
            <text:p text:style-name="P59" loext:marker-style-name="T143"><text:span text:style-name="T143">31,001</text:span><text:span text:style-name="T143"/></text:p>
          </table:table-cell>
          <table:table-cell table:style-name="Таблица8.A2" office:value-type="string">
            <text:p text:style-name="P59" loext:marker-style-name="T143"><text:span text:style-name="T143">1,4172756</text:span><text:span text:style-name="T143"/></text:p>
          </table:table-cell>
        </table:table-row>
        <table:table-row table:style-name="Таблица8.1">
          <table:table-cell table:style-name="Таблица8.A2" office:value-type="string">
            <text:p text:style-name="P60" loext:marker-style-name="T107"><text:span text:style-name="T107">СРЕДНЕЕ УСКОРЕНИЕ</text:span><text:span text:style-name="T107"/></text:p>
            <text:p text:style-name="P60" loext:marker-style-name="T169"><text:span text:style-name="T169">ПО СРАВНЕНИЮ С ПЕРВОЙ ВЕРСИЕЙ ПО МЕТОДУ ГИВЕНСА</text:span><text:span text:style-name="T169"/></text:p>
          </table:table-cell>
          <table:table-cell table:style-name="Таблица8.A2" office:value-type="string">
            <text:p text:style-name="P59"><text:span text:style-name="Internet_20_link"><text:span text:style-name="T108">-</text:span></text:span></text:p>
          </table:table-cell>
          <table:table-cell table:style-name="Таблица8.A2" office:value-type="string">
            <text:p text:style-name="P59" loext:marker-style-name="T143"><text:span text:style-name="T143">1,4</text:span><text:span text:style-name="T170">7</text:span></text:p>
          </table:table-cell>
          <table:table-cell table:style-name="Таблица8.D2" office:value-type="string">
            <text:p text:style-name="P59" loext:marker-style-name="T143"><text:span text:style-name="T143">3,22</text:span></text:p>
          </table:table-cell>
          <table:table-cell table:style-name="Таблица8.A2" office:value-type="string">
            <text:p text:style-name="P59" loext:marker-style-name="T143"><text:span text:style-name="T143">30,46</text:span></text:p>
          </table:table-cell>
        </table:table-row>
      </table:table>
      <text:p text:style-name="_30_3_5f_Текст_20_ИТММ">Видно, что самый оптимальный и устойчивый результат показывает метод из библиотеки Sci<text:span text:style-name="T18">l</text:span>ab. В Sci<text:span text:style-name="T18">l</text:span>ab QR-разложение реализуется с использованием подпрограмм из библиотеки Lapack. Для вещественных матриц используются процедуры DGEQRF, DGEQPF и DORGQR, а для комплексных — ZGEQRF, ZGEQPF и ZORGQR.</text:p>
      <text:p text:style-name="_30_3_5f_Текст_20_ИТММ">Некоторые особенности реализации в Scilab:</text:p>
      <text:list text:style-name="WWNum11">
        <text:list-item>
          <text:p text:style-name="P96">Если матрица X имеет размер m×N и m &gt; N, то вычисляются только первые N столбцов матрицы Q и первые N строк матрицы R (так называемый «экономичный» режим).</text:p>
        </text:list-item>
        <text:list-item>
          <text:p text:style-name="P96">Если столбец матрицы X является линейной комбинацией предыдущих столбцов, то элементы матрицы R после определённого столбца будут равны нулю, и в этом случае R будет верхней трапециевидной.</text:p>
        </text:list-item>
        <text:list-item>
          <text:p text:style-name="P96">Если матрица X имеет ранг rk, то строки R(rk+1, :), R(rk+2, :) и т. д. будут нулевыми.</text:p>
        </text:list-item>
      </text:list>
      <text:p text:style-name="P97" loext:marker-style-name="T47"/>
      <text:p text:style-name="P89"><text:bookmark-start text:name="__RefHeading___Toc4779_3249338211"/><text:span text:style-name="T48">2.2.4 </text:span><text:span text:style-name="T18">QR-</text:span><text:span text:style-name="T19">разложение Хессенберговой матрицы</text:span><text:bookmark-end text:name="__RefHeading___Toc4779_3249338211"/></text:p>
      <text:p text:style-name="_30_3_5f_Текст_20_ИТММ">Верхняя матрица Хессенберга — это квадратная матрица <text:span text:style-name="T18">NxN, </text:span><text:span text:style-name="T19">у которой </text:span><draw:frame draw:style-name="fr1" draw:name="Объект161" text:anchor-type="as-char" svg:width="3.112cm" svg:height="0.534cm" draw:z-index="174"><draw:object xlink:href="./Object 172" xlink:type="simple" xlink:show="embed" xlink:actuate="onLoad"/><draw:image xlink:href="./ObjectReplacements/Object 172" xlink:type="simple" xlink:show="embed" xlink:actuate="onLoad"/></draw:frame><text:span text:style-name="T19">.</text:span></text:p>
      <text:p text:style-name="_30_3_5f_Текст_20_ИТММ"><text:span text:style-name="T19">Нижняя</text:span> матрица Хессенберга — это квадратная матрица <text:span text:style-name="T18">NxN, </text:span>у которой <draw:frame draw:style-name="fr1" draw:name="Объект166" text:anchor-type="as-char" svg:width="3.112cm" svg:height="0.534cm" draw:z-index="175"><draw:object xlink:href="./Object 173" xlink:type="simple" xlink:show="embed" xlink:actuate="onLoad"/><draw:image xlink:href="./ObjectReplacements/Object 173" xlink:type="simple" xlink:show="embed" xlink:actuate="onLoad"/></draw:frame>.</text:p>
      <text:p text:style-name="_30_3_5f_Текст_20_ИТММ">Матрица, являющаяся одновременно и верхней, и нижней матрицами Хессенберга, трёхдиагональна. </text:p>
      <text:p text:style-name="_30_3_5f_Текст_20_ИТММ"><text:span text:style-name="T171">Сводные данные ниже содержат сравнение времени решения задачи разложения верхней хессенберговой матрицы на Q и R для самых оптимальных версий QR-разложения на основе вращений Гивенса и</text:span><text:span text:style-name="T172"> отражений Хаусхолдера, а также версии из библиотеки SciLab. </text:span><text:span text:style-name="Internet_20_link"><text:span text:style-name="T173">Замеры для типа данных double (вещественное число двойной точности) на максимально доступном количестве потоков в тестируемой системе (восьми):</text:span></text:span></text:p>
      <text:p text:style-name="_30_5_5f_Таблица_20_ИТММ"><text:span text:style-name="Internet_20_link"><text:span text:style-name="T173">Схема </text:span></text:span><text:span text:style-name="Internet_20_link"><text:span text:style-name="T174">9</text:span></text:span><text:span text:style-name="Internet_20_link"><text:span text:style-name="T173"> – Сравнение скорости решения QR-разложения верхней хессенберговой матрицы методом Гивенса, методом Хаусхолдера и QR разложением из библиотеки SciLab</text:span></text:span></text:p>
      <text:p text:style-name="_30_5_5f_Таблица_20_ИТММ"><draw:frame draw:style-name="fr5" draw:name="Объект168" text:anchor-type="as-char" svg:width="17.418cm" svg:height="11.748cm" draw:z-index="15"><draw:object xlink:href="./Object 175" xlink:type="simple" xlink:show="embed" xlink:actuate="onLoad"/><draw:image xlink:href="./ObjectReplacements/Object 175" xlink:type="simple" xlink:show="embed" xlink:actuate="onLoad"/><svg:desc>диаграмма</svg:desc></draw:frame></text:p>
      <text:p text:style-name="_30_5_5f_Таблица_20_ИТММ"/>
      <text:p text:style-name="P98">Таблица <text:span text:style-name="T158">9</text:span> – Сравнение скорости решения QR-разложения верхней хессенберговой матрицы методом Гивенса, методом Хаусхолдера и QR разложением из библиотеки SciLab</text:p>
      <table:table table:name="Таблица9" table:style-name="Таблица9">
        <table:table-column table:style-name="Таблица9.A"/>
        <table:table-column table:style-name="Таблица9.B"/>
        <table:table-column table:style-name="Таблица9.C"/>
        <table:table-column table:style-name="Таблица9.B"/>
        <table:table-row table:style-name="Таблица9.1">
          <table:table-cell table:style-name="Таблица9.A1" office:value-type="string">
            <text:p text:style-name="P79" loext:marker-style-name="T102"><text:span text:style-name="T141">Размер данных (матрица NxN)</text:span><text:span text:style-name="T141"/></text:p>
          </table:table-cell>
          <table:table-cell table:style-name="Таблица9.A1" office:value-type="string">
            <text:p text:style-name="P57" loext:marker-style-name="T102"><text:span text:style-name="T102">Время работы QR-разложения с вращениями Гивенса с векторизацией, с</text:span><text:span text:style-name="T102"/></text:p>
          </table:table-cell>
          <table:table-cell table:style-name="Таблица9.A1" office:value-type="string">
            <text:p text:style-name="P57" loext:marker-style-name="T102"><text:span text:style-name="T102">Время работы QR-разложения на основе отражений Хаусхолдера, с</text:span><text:span text:style-name="T102"/></text:p>
          </table:table-cell>
          <table:table-cell table:style-name="Таблица9.A1" office:value-type="string">
            <text:p text:style-name="P57" loext:marker-style-name="T102"><text:span text:style-name="T102">Время работы QR-разложения из библиотеки SciLab, с</text:span><text:span text:style-name="T102"/></text:p>
          </table:table-cell>
        </table:table-row>
        <table:table-row table:style-name="Таблица9.1">
          <table:table-cell table:style-name="Таблица9.A2" office:value-type="string">
            <text:p text:style-name="P60" loext:marker-style-name="T143"><text:span text:style-name="T143">100</text:span><text:span text:style-name="T143"/></text:p>
          </table:table-cell>
          <table:table-cell table:style-name="Таблица9.A2" office:value-type="string">
            <text:p text:style-name="P59" loext:marker-style-name="T143"><text:span text:style-name="T143">0.0001294</text:span><text:span text:style-name="T143"/></text:p>
          </table:table-cell>
          <table:table-cell table:style-name="Таблица9.A2" office:value-type="string">
            <text:p text:style-name="P59" loext:marker-style-name="T143"><text:span text:style-name="T143">0.0009429</text:span><text:span text:style-name="T143"/></text:p>
          </table:table-cell>
          <table:table-cell table:style-name="Таблица9.A2" office:value-type="string">
            <text:p text:style-name="P59" loext:marker-style-name="T143"><text:span text:style-name="T143">0.030026</text:span><text:span text:style-name="T143"/></text:p>
          </table:table-cell>
        </table:table-row>
        <table:table-row table:style-name="Таблица9.1">
          <table:table-cell table:style-name="Таблица9.A2" office:value-type="string">
            <text:p text:style-name="P60" loext:marker-style-name="T143"><text:span text:style-name="T143">200</text:span><text:span text:style-name="T143"/></text:p>
          </table:table-cell>
          <table:table-cell table:style-name="Таблица9.A2" office:value-type="string">
            <text:p text:style-name="P59" loext:marker-style-name="T143"><text:span text:style-name="T143">0.0004733</text:span><text:span text:style-name="T143"/></text:p>
          </table:table-cell>
          <table:table-cell table:style-name="Таблица9.A2" office:value-type="string">
            <text:p text:style-name="P59" loext:marker-style-name="T143"><text:span text:style-name="T143">0.0076185</text:span><text:span text:style-name="T143"/></text:p>
          </table:table-cell>
          <table:table-cell table:style-name="Таблица9.A2" office:value-type="string">
            <text:p text:style-name="P59" loext:marker-style-name="T143"><text:span text:style-name="T143">0.003412</text:span><text:span text:style-name="T143"/></text:p>
          </table:table-cell>
        </table:table-row>
        <table:table-row table:style-name="Таблица9.1">
          <table:table-cell table:style-name="Таблица9.A2" office:value-type="string">
            <text:p text:style-name="P60" loext:marker-style-name="T143"><text:span text:style-name="T143">300</text:span><text:span text:style-name="T143"/></text:p>
          </table:table-cell>
          <table:table-cell table:style-name="Таблица9.A2" office:value-type="string">
            <text:p text:style-name="P59" loext:marker-style-name="T143"><text:span text:style-name="T143">0.0012873</text:span><text:span text:style-name="T143"/></text:p>
          </table:table-cell>
          <table:table-cell table:style-name="Таблица9.A2" office:value-type="string">
            <text:p text:style-name="P59" loext:marker-style-name="T143"><text:span text:style-name="T143">0.0222422</text:span><text:span text:style-name="T143"/></text:p>
          </table:table-cell>
          <table:table-cell table:style-name="Таблица9.A2" office:value-type="string">
            <text:p text:style-name="P59" loext:marker-style-name="T143"><text:span text:style-name="T143">0.0045437</text:span><text:span text:style-name="T143"/></text:p>
          </table:table-cell>
        </table:table-row>
        <table:table-row table:style-name="Таблица9.1">
          <table:table-cell table:style-name="Таблица9.A2" office:value-type="string">
            <text:p text:style-name="P60" loext:marker-style-name="T143"><text:span text:style-name="T143">400</text:span><text:span text:style-name="T143"/></text:p>
          </table:table-cell>
          <table:table-cell table:style-name="Таблица9.A2" office:value-type="string">
            <text:p text:style-name="P59" loext:marker-style-name="T143"><text:span text:style-name="T143">0.0014392</text:span><text:span text:style-name="T143"/></text:p>
          </table:table-cell>
          <table:table-cell table:style-name="Таблица9.A2" office:value-type="string">
            <text:p text:style-name="P59" loext:marker-style-name="T143"><text:span text:style-name="T143">0.0370319</text:span><text:span text:style-name="T143"/></text:p>
          </table:table-cell>
          <table:table-cell table:style-name="Таблица9.A2" office:value-type="string">
            <text:p text:style-name="P59" loext:marker-style-name="T143"><text:span text:style-name="T143">0.0069478</text:span><text:span text:style-name="T143"/></text:p>
          </table:table-cell>
        </table:table-row>
        <table:table-row table:style-name="Таблица9.1">
          <table:table-cell table:style-name="Таблица9.A2" office:value-type="string">
            <text:p text:style-name="P60" loext:marker-style-name="T143"><text:span text:style-name="T143">500</text:span><text:span text:style-name="T143"/></text:p>
          </table:table-cell>
          <table:table-cell table:style-name="Таблица9.A2" office:value-type="string">
            <text:p text:style-name="P59" loext:marker-style-name="T143"><text:span text:style-name="T143">0.0022636</text:span><text:span text:style-name="T143"/></text:p>
          </table:table-cell>
          <table:table-cell table:style-name="Таблица9.A2" office:value-type="string">
            <text:p text:style-name="P59" loext:marker-style-name="T143"><text:span text:style-name="T143">0.0707061</text:span><text:span text:style-name="T143"/></text:p>
          </table:table-cell>
          <table:table-cell table:style-name="Таблица9.A2" office:value-type="string">
            <text:p text:style-name="P59" loext:marker-style-name="T143"><text:span text:style-name="T143">0.0107381</text:span><text:span text:style-name="T143"/></text:p>
          </table:table-cell>
        </table:table-row>
        <table:table-row table:style-name="Таблица9.1">
          <table:table-cell table:style-name="Таблица9.A2" office:value-type="string">
            <text:p text:style-name="P60" loext:marker-style-name="T143"><text:span text:style-name="T143">1000</text:span><text:span text:style-name="T143"/></text:p>
          </table:table-cell>
          <table:table-cell table:style-name="Таблица9.A2" office:value-type="string">
            <text:p text:style-name="P59" loext:marker-style-name="T143"><text:span text:style-name="T143">0.0099787</text:span><text:span text:style-name="T143"/></text:p>
          </table:table-cell>
          <table:table-cell table:style-name="Таблица9.A2" office:value-type="string">
            <text:p text:style-name="P59" loext:marker-style-name="T143"><text:span text:style-name="T143">0.193794</text:span><text:span text:style-name="T143"/></text:p>
          </table:table-cell>
          <table:table-cell table:style-name="Таблица9.A2" office:value-type="string">
            <text:p text:style-name="P59" loext:marker-style-name="T143"><text:span text:style-name="T143">0.0422846</text:span><text:span text:style-name="T143"/></text:p>
          </table:table-cell>
        </table:table-row>
        <table:table-row table:style-name="Таблица9.1">
          <table:table-cell table:style-name="Таблица9.A2" office:value-type="string">
            <text:p text:style-name="P60" loext:marker-style-name="T143"><text:span text:style-name="T143">1500</text:span><text:span text:style-name="T143"/></text:p>
          </table:table-cell>
          <table:table-cell table:style-name="Таблица9.A2" office:value-type="string">
            <text:p text:style-name="P59" loext:marker-style-name="T143"><text:span text:style-name="T143">0.0244809</text:span><text:span text:style-name="T143"/></text:p>
          </table:table-cell>
          <table:table-cell table:style-name="Таблица9.A2" office:value-type="string">
            <text:p text:style-name="P59" loext:marker-style-name="T143"><text:span text:style-name="T143">1.14657</text:span><text:span text:style-name="T143"/></text:p>
          </table:table-cell>
          <table:table-cell table:style-name="Таблица9.A2" office:value-type="string">
            <text:p text:style-name="P59" loext:marker-style-name="T143"><text:span text:style-name="T143">0.07312</text:span><text:span text:style-name="T143"/></text:p>
          </table:table-cell>
        </table:table-row>
        <table:table-row table:style-name="Таблица9.1">
          <table:table-cell table:style-name="Таблица9.A2" office:value-type="string">
            <text:p text:style-name="P60" loext:marker-style-name="T143"><text:span text:style-name="T143">2000</text:span><text:span text:style-name="T143"/></text:p>
          </table:table-cell>
          <table:table-cell table:style-name="Таблица9.A2" office:value-type="string">
            <text:p text:style-name="P59" loext:marker-style-name="T143"><text:span text:style-name="T143">0.049296</text:span><text:span text:style-name="T143"/></text:p>
          </table:table-cell>
          <table:table-cell table:style-name="Таблица9.A2" office:value-type="string">
            <text:p text:style-name="P59" loext:marker-style-name="T143"><text:span text:style-name="T143">6.44008</text:span><text:span text:style-name="T143"/></text:p>
          </table:table-cell>
          <table:table-cell table:style-name="Таблица9.A2" office:value-type="string">
            <text:p text:style-name="P59" loext:marker-style-name="T143"><text:span text:style-name="T143">0.1638567</text:span><text:span text:style-name="T143"/></text:p>
          </table:table-cell>
        </table:table-row>
        <table:table-row table:style-name="Таблица9.1">
          <table:table-cell table:style-name="Таблица9.A2" office:value-type="string">
            <text:p text:style-name="P60" loext:marker-style-name="T143"><text:span text:style-name="T143">2500</text:span><text:span text:style-name="T143"/></text:p>
          </table:table-cell>
          <table:table-cell table:style-name="Таблица9.A2" office:value-type="string">
            <text:p text:style-name="P59" loext:marker-style-name="T143"><text:span text:style-name="T143">0.070357</text:span><text:span text:style-name="T143"/></text:p>
          </table:table-cell>
          <table:table-cell table:style-name="Таблица9.A2" office:value-type="string">
            <text:p text:style-name="P59" loext:marker-style-name="T143"><text:span text:style-name="T143">16.1027</text:span><text:span text:style-name="T143"/></text:p>
          </table:table-cell>
          <table:table-cell table:style-name="Таблица9.A2" office:value-type="string">
            <text:p text:style-name="P59" loext:marker-style-name="T143"><text:span text:style-name="T143">0.3190695</text:span><text:span text:style-name="T143"/></text:p>
          </table:table-cell>
        </table:table-row>
        <table:table-row table:style-name="Таблица9.1">
          <table:table-cell table:style-name="Таблица9.A2" office:value-type="string">
            <text:p text:style-name="P60" loext:marker-style-name="T143"><text:span text:style-name="T143">3000</text:span><text:span text:style-name="T143"/></text:p>
          </table:table-cell>
          <table:table-cell table:style-name="Таблица9.A2" office:value-type="string">
            <text:p text:style-name="P59" loext:marker-style-name="T143"><text:span text:style-name="T143">0.111763</text:span><text:span text:style-name="T143"/></text:p>
          </table:table-cell>
          <table:table-cell table:style-name="Таблица9.A2" office:value-type="string">
            <text:p text:style-name="P59" loext:marker-style-name="T143"><text:span text:style-name="T143">28.8915</text:span><text:span text:style-name="T143"/></text:p>
          </table:table-cell>
          <table:table-cell table:style-name="Таблица9.A2" office:value-type="string">
            <text:p text:style-name="P59" loext:marker-style-name="T143"><text:span text:style-name="T143">0.533518</text:span><text:span text:style-name="T143"/></text:p>
          </table:table-cell>
        </table:table-row>
        <table:table-row table:style-name="Таблица9.1">
          <table:table-cell table:style-name="Таблица9.A2" office:value-type="string">
            <text:p text:style-name="P60" loext:marker-style-name="T143"><text:span text:style-name="T143">3500</text:span><text:span text:style-name="T143"/></text:p>
          </table:table-cell>
          <table:table-cell table:style-name="Таблица9.A2" office:value-type="string">
            <text:p text:style-name="P59" loext:marker-style-name="T143"><text:span text:style-name="T143">0.165066</text:span><text:span text:style-name="T143"/></text:p>
          </table:table-cell>
          <table:table-cell table:style-name="Таблица9.A2" office:value-type="string">
            <text:p text:style-name="P59" loext:marker-style-name="T143"><text:span text:style-name="T143">42.731</text:span><text:span text:style-name="T143"/></text:p>
          </table:table-cell>
          <table:table-cell table:style-name="Таблица9.A2" office:value-type="string">
            <text:p text:style-name="P59" loext:marker-style-name="T143"><text:span text:style-name="T143">0.7996886</text:span><text:span text:style-name="T143"/></text:p>
          </table:table-cell>
        </table:table-row>
        <table:table-row table:style-name="Таблица9.1">
          <table:table-cell table:style-name="Таблица9.A2" office:value-type="string">
            <text:p text:style-name="P60" loext:marker-style-name="T143"><text:span text:style-name="T143">4000</text:span><text:span text:style-name="T143"/></text:p>
          </table:table-cell>
          <table:table-cell table:style-name="Таблица9.A2" office:value-type="string">
            <text:p text:style-name="P59" loext:marker-style-name="T143"><text:span text:style-name="T143">0.226181</text:span><text:span text:style-name="T143"/></text:p>
          </table:table-cell>
          <table:table-cell table:style-name="Таблица9.A2" office:value-type="string">
            <text:p text:style-name="P59" loext:marker-style-name="T143"><text:span text:style-name="T143">67.3722</text:span><text:span text:style-name="T143"/></text:p>
          </table:table-cell>
          <table:table-cell table:style-name="Таблица9.A2" office:value-type="string">
            <text:p text:style-name="P59" loext:marker-style-name="T143"><text:span text:style-name="T143">1.7190395</text:span><text:span text:style-name="T143"/></text:p>
          </table:table-cell>
        </table:table-row>
      </table:table>
      <text:p text:style-name="_30_3_5f_Текст_20_ИТММ"><text:span text:style-name="T171">Видно, что моя реализация </text:span><text:span text:style-name="T175">QR-</text:span><text:span text:style-name="T171">разложения методом вращений Гивенса решила задачу </text:span><text:span text:style-name="T175">QR-</text:span><text:span text:style-name="T171">разложения верхней хессенберговой матрицы быстрее, так как, по-видимому, </text:span><text:span text:style-name="T175">SciLab </text:span><text:span text:style-name="T171">использует метод отражений Хаусхолдера, который не может игнорировать отдельно стоящие пустые значения в столбцах, а вынужден производить отражение и занулять весь столбец целиком, даже не смотря на то, что в нём всего один значащий элемент.</text:span></text:p>
      <text:p text:style-name="_30_3_5f_Текст_20_ИТММ"><text:span text:style-name="T171">Сводные данные ниже содержат сравнение времени решения задачи разложения нижней хессенберговой матрицы на Q и R для самых оптимальных версий QR-разложения на основе вращений Гивенса и</text:span><text:span text:style-name="T172"> отражений Хаусхолдера, а также версии из библиотеки SciLab. </text:span><text:span text:style-name="Internet_20_link"><text:span text:style-name="T173">Замеры для типа данных double (вещественное число двойной точности) на максимально доступном количестве потоков в тестируемой системе (восьми):</text:span></text:span></text:p>
      <text:p text:style-name="P77"><text:span text:style-name="Internet_20_link"><text:span text:style-name="T173">Схема </text:span></text:span><text:span text:style-name="Internet_20_link"><text:span text:style-name="T174">10</text:span></text:span><text:span text:style-name="Internet_20_link"><text:span text:style-name="T173"> – Сравнение скорости решения QR-разложения нижней хессенберговой матрицы методом Гивенса, методом Хаусхолдера и QR разложением из библиотеки SciLab</text:span></text:span></text:p>
      <text:p text:style-name="P39"><draw:frame draw:style-name="fr6" draw:name="Объект169" text:anchor-type="as-char" svg:y="-22.537cm" svg:width="17.321cm" svg:height="14.751cm" draw:z-index="16"><draw:object xlink:href="./Object 177" xlink:type="simple" xlink:show="embed" xlink:actuate="onLoad"/><draw:image xlink:href="./ObjectReplacements/Object 177" xlink:type="simple" xlink:show="embed" xlink:actuate="onLoad"/><svg:desc>диаграмма</svg:desc></draw:frame></text:p>
      <text:p text:style-name="_30_5_5f_Таблица_20_ИТММ"/>
      <text:p text:style-name="P77">Таблица <text:span text:style-name="T158">10</text:span> – Сравнение скорости решения QR-разложения нижней хессенберговой матрицы методом Гивенса, методом Хаусхолдера и QR разложением из библиотеки SciLab</text:p>
      <table:table table:name="Таблица10" table:style-name="Таблица10">
        <table:table-column table:style-name="Таблица10.A"/>
        <table:table-column table:style-name="Таблица10.B"/>
        <table:table-column table:style-name="Таблица10.C"/>
        <table:table-column table:style-name="Таблица10.B"/>
        <table:table-row table:style-name="Таблица10.1">
          <table:table-cell table:style-name="Таблица10.A1" office:value-type="string">
            <text:p text:style-name="P79" loext:marker-style-name="T102"><text:span text:style-name="T141">Размер данных (матрица NxN)</text:span><text:span text:style-name="T141"/></text:p>
          </table:table-cell>
          <table:table-cell table:style-name="Таблица10.A1" office:value-type="string">
            <text:p text:style-name="P57" loext:marker-style-name="T102"><text:span text:style-name="T102">Время работы QR-разложения с вращениями Гивенса с векторизацией, с</text:span><text:span text:style-name="T102"/></text:p>
          </table:table-cell>
          <table:table-cell table:style-name="Таблица10.A1" office:value-type="string">
            <text:p text:style-name="P57" loext:marker-style-name="T102"><text:span text:style-name="T102">Время работы QR-разложения на основе отражений Хаусхолдера, с</text:span><text:span text:style-name="T102"/></text:p>
          </table:table-cell>
          <table:table-cell table:style-name="Таблица10.A1" office:value-type="string">
            <text:p text:style-name="P57" loext:marker-style-name="T102"><text:span text:style-name="T102">Время работы QR-разложения из библиотеки SciLab, с</text:span><text:span text:style-name="T102"/></text:p>
          </table:table-cell>
        </table:table-row>
        <table:table-row table:style-name="Таблица10.1">
          <table:table-cell table:style-name="Таблица10.A2" office:value-type="string">
            <text:p text:style-name="P60" loext:marker-style-name="T143"><text:span text:style-name="T143">100</text:span><text:span text:style-name="T143"/></text:p>
          </table:table-cell>
          <table:table-cell table:style-name="Таблица10.A2" office:value-type="string">
            <text:p text:style-name="P59" loext:marker-style-name="T143"><text:span text:style-name="T143">0.0003957</text:span><text:span text:style-name="T143"/></text:p>
          </table:table-cell>
          <table:table-cell table:style-name="Таблица10.A2" office:value-type="string">
            <text:p text:style-name="P59" loext:marker-style-name="T143"><text:span text:style-name="T143">0.0013103</text:span><text:span text:style-name="T143"/></text:p>
          </table:table-cell>
          <table:table-cell table:style-name="Таблица10.A2" office:value-type="string">
            <text:p text:style-name="P59" loext:marker-style-name="T143"><text:span text:style-name="T143">0.0179448</text:span><text:span text:style-name="T143"/></text:p>
          </table:table-cell>
        </table:table-row>
        <table:table-row table:style-name="Таблица10.1">
          <table:table-cell table:style-name="Таблица10.A2" office:value-type="string">
            <text:p text:style-name="P60" loext:marker-style-name="T143"><text:span text:style-name="T143">200</text:span><text:span text:style-name="T143"/></text:p>
          </table:table-cell>
          <table:table-cell table:style-name="Таблица10.A2" office:value-type="string">
            <text:p text:style-name="P59" loext:marker-style-name="T143"><text:span text:style-name="T143">0.0023856</text:span><text:span text:style-name="T143"/></text:p>
          </table:table-cell>
          <table:table-cell table:style-name="Таблица10.A2" office:value-type="string">
            <text:p text:style-name="P59" loext:marker-style-name="T143"><text:span text:style-name="T143">0.0069098</text:span><text:span text:style-name="T143"/></text:p>
          </table:table-cell>
          <table:table-cell table:style-name="Таблица10.A2" office:value-type="string">
            <text:p text:style-name="P59" loext:marker-style-name="T143"><text:span text:style-name="T143">0.0065019</text:span><text:span text:style-name="T143"/></text:p>
          </table:table-cell>
        </table:table-row>
        <table:table-row table:style-name="Таблица10.1">
          <table:table-cell table:style-name="Таблица10.A2" office:value-type="string">
            <text:p text:style-name="P60" loext:marker-style-name="T143"><text:span text:style-name="T143">300</text:span><text:span text:style-name="T143"/></text:p>
          </table:table-cell>
          <table:table-cell table:style-name="Таблица10.A2" office:value-type="string">
            <text:p text:style-name="P59" loext:marker-style-name="T143"><text:span text:style-name="T143">0.0092742</text:span><text:span text:style-name="T143"/></text:p>
          </table:table-cell>
          <table:table-cell table:style-name="Таблица10.A2" office:value-type="string">
            <text:p text:style-name="P59" loext:marker-style-name="T143"><text:span text:style-name="T143">0.018879</text:span><text:span text:style-name="T143"/></text:p>
          </table:table-cell>
          <table:table-cell table:style-name="Таблица10.A2" office:value-type="string">
            <text:p text:style-name="P59" loext:marker-style-name="T143"><text:span text:style-name="T143">0.0073951</text:span><text:span text:style-name="T143"/></text:p>
          </table:table-cell>
        </table:table-row>
        <table:table-row table:style-name="Таблица10.1">
          <table:table-cell table:style-name="Таблица10.A2" office:value-type="string">
            <text:p text:style-name="P60" loext:marker-style-name="T143"><text:span text:style-name="T143">400</text:span><text:span text:style-name="T143"/></text:p>
          </table:table-cell>
          <table:table-cell table:style-name="Таблица10.A2" office:value-type="string">
            <text:p text:style-name="P59" loext:marker-style-name="T143"><text:span text:style-name="T143">0.0168637</text:span><text:span text:style-name="T143"/></text:p>
          </table:table-cell>
          <table:table-cell table:style-name="Таблица10.A2" office:value-type="string">
            <text:p text:style-name="P59" loext:marker-style-name="T143"><text:span text:style-name="T143">0.0363722</text:span><text:span text:style-name="T143"/></text:p>
          </table:table-cell>
          <table:table-cell table:style-name="Таблица10.A2" office:value-type="string">
            <text:p text:style-name="P59" loext:marker-style-name="T143"><text:span text:style-name="T143">0.0080666</text:span><text:span text:style-name="T143"/></text:p>
          </table:table-cell>
        </table:table-row>
        <table:table-row table:style-name="Таблица10.1">
          <table:table-cell table:style-name="Таблица10.A2" office:value-type="string">
            <text:p text:style-name="P60" loext:marker-style-name="T143"><text:span text:style-name="T143">500</text:span><text:span text:style-name="T143"/></text:p>
          </table:table-cell>
          <table:table-cell table:style-name="Таблица10.A2" office:value-type="string">
            <text:p text:style-name="P59" loext:marker-style-name="T143"><text:span text:style-name="T143">0.0427091</text:span><text:span text:style-name="T143"/></text:p>
          </table:table-cell>
          <table:table-cell table:style-name="Таблица10.A2" office:value-type="string">
            <text:p text:style-name="P59" loext:marker-style-name="T143"><text:span text:style-name="T143">0.0720739</text:span><text:span text:style-name="T143"/></text:p>
          </table:table-cell>
          <table:table-cell table:style-name="Таблица10.A2" office:value-type="string">
            <text:p text:style-name="P59" loext:marker-style-name="T143"><text:span text:style-name="T143">0.0111006</text:span><text:span text:style-name="T143"/></text:p>
          </table:table-cell>
        </table:table-row>
        <table:table-row table:style-name="Таблица10.1">
          <table:table-cell table:style-name="Таблица10.A2" office:value-type="string">
            <text:p text:style-name="P60" loext:marker-style-name="T143"><text:span text:style-name="T143">1000</text:span><text:span text:style-name="T143"/></text:p>
          </table:table-cell>
          <table:table-cell table:style-name="Таблица10.A2" office:value-type="string">
            <text:p text:style-name="P59" loext:marker-style-name="T143"><text:span text:style-name="T143">0.510321</text:span><text:span text:style-name="T143"/></text:p>
          </table:table-cell>
          <table:table-cell table:style-name="Таблица10.A2" office:value-type="string">
            <text:p text:style-name="P59" loext:marker-style-name="T143"><text:span text:style-name="T143">0.173632</text:span><text:span text:style-name="T143"/></text:p>
          </table:table-cell>
          <table:table-cell table:style-name="Таблица10.A2" office:value-type="string">
            <text:p text:style-name="P59" loext:marker-style-name="T143"><text:span text:style-name="T143">0.0324745</text:span><text:span text:style-name="T143"/></text:p>
          </table:table-cell>
        </table:table-row>
        <table:table-row table:style-name="Таблица10.1">
          <table:table-cell table:style-name="Таблица10.A2" office:value-type="string">
            <text:p text:style-name="P60" loext:marker-style-name="T143"><text:span text:style-name="T143">1500</text:span><text:span text:style-name="T143"/></text:p>
          </table:table-cell>
          <table:table-cell table:style-name="Таблица10.A2" office:value-type="string">
            <text:p text:style-name="P59" loext:marker-style-name="T143"><text:span text:style-name="T143">1.63854</text:span><text:span text:style-name="T143"/></text:p>
          </table:table-cell>
          <table:table-cell table:style-name="Таблица10.A2" office:value-type="string">
            <text:p text:style-name="P59" loext:marker-style-name="T143"><text:span text:style-name="T143">0.643838</text:span><text:span text:style-name="T143"/></text:p>
          </table:table-cell>
          <table:table-cell table:style-name="Таблица10.A2" office:value-type="string">
            <text:p text:style-name="P59" loext:marker-style-name="T143"><text:span text:style-name="T143">0.0849378</text:span><text:span text:style-name="T143"/></text:p>
          </table:table-cell>
        </table:table-row>
        <table:table-row table:style-name="Таблица10.1">
          <table:table-cell table:style-name="Таблица10.A2" office:value-type="string">
            <text:p text:style-name="P60" loext:marker-style-name="T143"><text:span text:style-name="T143">2000</text:span><text:span text:style-name="T143"/></text:p>
          </table:table-cell>
          <table:table-cell table:style-name="Таблица10.A2" office:value-type="string">
            <text:p text:style-name="P59" loext:marker-style-name="T143"><text:span text:style-name="T143">3.54986</text:span><text:span text:style-name="T143"/></text:p>
          </table:table-cell>
          <table:table-cell table:style-name="Таблица10.A2" office:value-type="string">
            <text:p text:style-name="P59" loext:marker-style-name="T143"><text:span text:style-name="T143">2.10122</text:span><text:span text:style-name="T143"/></text:p>
          </table:table-cell>
          <table:table-cell table:style-name="Таблица10.A2" office:value-type="string">
            <text:p text:style-name="P59" loext:marker-style-name="T143"><text:span text:style-name="T143">0.1808189</text:span><text:span text:style-name="T143"/></text:p>
          </table:table-cell>
        </table:table-row>
        <table:table-row table:style-name="Таблица10.1">
          <table:table-cell table:style-name="Таблица10.A2" office:value-type="string">
            <text:p text:style-name="P60" loext:marker-style-name="T143"><text:span text:style-name="T143">2500</text:span><text:span text:style-name="T143"/></text:p>
          </table:table-cell>
          <table:table-cell table:style-name="Таблица10.A2" office:value-type="string">
            <text:p text:style-name="P59" loext:marker-style-name="T143"><text:span text:style-name="T143">7.19002</text:span><text:span text:style-name="T143"/></text:p>
          </table:table-cell>
          <table:table-cell table:style-name="Таблица10.A2" office:value-type="string">
            <text:p text:style-name="P59" loext:marker-style-name="T143"><text:span text:style-name="T143">5.00486</text:span><text:span text:style-name="T143"/></text:p>
          </table:table-cell>
          <table:table-cell table:style-name="Таблица10.A2" office:value-type="string">
            <text:p text:style-name="P59" loext:marker-style-name="T143"><text:span text:style-name="T143">0.3221421</text:span><text:span text:style-name="T143"/></text:p>
          </table:table-cell>
        </table:table-row>
        <table:table-row table:style-name="Таблица10.1">
          <table:table-cell table:style-name="Таблица10.A2" office:value-type="string">
            <text:p text:style-name="P60" loext:marker-style-name="T143"><text:span text:style-name="T143">3000</text:span><text:span text:style-name="T143"/></text:p>
          </table:table-cell>
          <table:table-cell table:style-name="Таблица10.A2" office:value-type="string">
            <text:p text:style-name="P59" loext:marker-style-name="T143"><text:span text:style-name="T143">12.8882</text:span><text:span text:style-name="T143"/></text:p>
          </table:table-cell>
          <table:table-cell table:style-name="Таблица10.A2" office:value-type="string">
            <text:p text:style-name="P59" loext:marker-style-name="T143"><text:span text:style-name="T143">9.74322</text:span><text:span text:style-name="T143"/></text:p>
          </table:table-cell>
          <table:table-cell table:style-name="Таблица10.A2" office:value-type="string">
            <text:p text:style-name="P59" loext:marker-style-name="T143"><text:span text:style-name="T143">0.4588081</text:span><text:span text:style-name="T143"/></text:p>
          </table:table-cell>
        </table:table-row>
        <table:table-row table:style-name="Таблица10.1">
          <table:table-cell table:style-name="Таблица10.A2" office:value-type="string">
            <text:p text:style-name="P60" loext:marker-style-name="T143"><text:span text:style-name="T143">3500</text:span><text:span text:style-name="T143"/></text:p>
          </table:table-cell>
          <table:table-cell table:style-name="Таблица10.A2" office:value-type="string">
            <text:p text:style-name="P59" loext:marker-style-name="T143"><text:span text:style-name="T143">20.7162</text:span><text:span text:style-name="T143"/></text:p>
          </table:table-cell>
          <table:table-cell table:style-name="Таблица10.A2" office:value-type="string">
            <text:p text:style-name="P59" loext:marker-style-name="T143"><text:span text:style-name="T143">16.1714</text:span><text:span text:style-name="T143"/></text:p>
          </table:table-cell>
          <table:table-cell table:style-name="Таблица10.A2" office:value-type="string">
            <text:p text:style-name="P59" loext:marker-style-name="T143"><text:span text:style-name="T143">0.7511698</text:span><text:span text:style-name="T143"/></text:p>
          </table:table-cell>
        </table:table-row>
        <table:table-row table:style-name="Таблица10.1">
          <table:table-cell table:style-name="Таблица10.A2" office:value-type="string">
            <text:p text:style-name="P60" loext:marker-style-name="T143"><text:span text:style-name="T143">4000</text:span><text:span text:style-name="T143"/></text:p>
          </table:table-cell>
          <table:table-cell table:style-name="Таблица10.A2" office:value-type="string">
            <text:p text:style-name="P59" loext:marker-style-name="T143"><text:span text:style-name="T143">31.2464</text:span><text:span text:style-name="T143"/></text:p>
          </table:table-cell>
          <table:table-cell table:style-name="Таблица10.A2" office:value-type="string">
            <text:p text:style-name="P59" loext:marker-style-name="T143"><text:span text:style-name="T143">24.6837</text:span><text:span text:style-name="T143"/></text:p>
          </table:table-cell>
          <table:table-cell table:style-name="Таблица10.A2" office:value-type="string">
            <text:p text:style-name="P59" loext:marker-style-name="T143"><text:span text:style-name="T143">1.093605</text:span><text:span text:style-name="T143"/></text:p>
          </table:table-cell>
        </table:table-row>
      </table:table>
      <text:p text:style-name="_30_3_5f_Текст_20_ИТММ"><text:span text:style-name="T144">Видно, что моя реализация </text:span><text:span text:style-name="T176">QR-</text:span><text:span text:style-name="T144">разложения методом вращений Гивенса справилась с решением задачи</text:span><text:span text:style-name="T176"> QR-</text:span><text:span text:style-name="T144">разложения нижней хессенберговой матрицы</text:span><text:span text:style-name="T176"> </text:span><text:span text:style-name="T144">хуже, опять по той же причине, что </text:span><text:span text:style-name="T176">Scilab </text:span><text:span text:style-name="T144">использует метод отражений Хаусхолдера, который быстрее зануляет целые столбцы.</text:span></text:p>
      <text:p text:style-name="_30_1_5f_Заголовок_20_1_20_ИТММ"><text:bookmark-start text:name="__RefHeading___Toc2661_713544485"/><text:bookmark-start text:name="_Toc194842673"/>Заключение<text:bookmark-end text:name="__RefHeading___Toc2661_713544485"/><text:bookmark-end text:name="_Toc194842673"/></text:p>
      <text:p text:style-name="_30_3_5f_Текст_20_ИТММ">В заключение хотелось бы подытожить полученные результаты.</text:p>
      <text:p text:style-name="_30_3_5f_Текст_20_ИТММ">Первая версия <text:span text:style-name="T18">QR-</text:span><text:span text:style-name="T19">разложения по методу Хаусхолдера показала плохие результаты за счёт двух громоздких </text:span><text:span text:style-name="T18">NxN </text:span><text:span text:style-name="T19">матричных умножений на каждой из </text:span><text:span text:style-name="T18">(N-1) </text:span><text:span text:style-name="T19">итераций, а также из-за явного хранения </text:span><text:span text:style-name="T18">NxN </text:span><text:span text:style-name="T19">матрицы отражения </text:span><text:span text:style-name="T18">H </text:span><text:span text:style-name="T19">на каждом шаге</text:span><text:span text:style-name="T18">. </text:span><text:span text:style-name="T19">Зато эта версия получило отличный ускорение в 4 раза при увеличении потоков до восьми.</text:span></text:p>
      <text:p text:style-name="_30_3_5f_Текст_20_ИТММ">Вторая версия метода Хаусхолдера без матричных умножений очевидно быстрее за счёт устранения ключевого узкого места. Вместо явных умножений реализация использует прямое применение отражений через скалярные произведения. Эта версия распараллеливается хуже первой, прирост производительности в среднем в 2,5 раза на 8 потоках.</text:p>
      <text:p text:style-name="_30_3_5f_Текст_20_ИТММ"><text:span text:style-name="T53">Третья версия метода Хаусхолдера с</text:span><text:span text:style-name="T52"> in-place</text:span><text:span text:style-name="T53"> хранением векторов Хаусхолдера оказалась ещё быстрее, за счёт полного исключения отдельного хранилища для векторов Хаусхолдера </text:span><text:span text:style-name="T52">v</text:span><text:span text:style-name="T57">k</text:span><text:span text:style-name="T52">, </text:span><draw:frame draw:style-name="fr1" draw:name="Объект167" text:anchor-type="as-char" svg:width="2.268cm" svg:height="0.52cm" draw:z-index="176"><draw:object xlink:href="./Object 178" xlink:type="simple" xlink:show="embed" xlink:actuate="onLoad"/><draw:image xlink:href="./ObjectReplacements/Object 178" xlink:type="simple" xlink:show="embed" xlink:actuate="onLoad"/></draw:frame><text:span text:style-name="T53"><text:s/>и максимального использования in-place вычислений, что сократило число обращений к памяти и улучшило локальность данных при последовательном доступе как для сохранения, так и для извлечения векторов отражений. Эта версия также при увеличении числа потоков до восьми получила прирост производительности в среднем только в 2,5 раза.</text:span></text:p>
      <text:p text:style-name="_30_3_5f_Текст_20_ИТММ">Первая версия метода вращений Гивенса благодаря своей простоте показала неплохую производительность, лишь на больших данных и показала почти замедление при увеличении количества потоков. Вероятно, это произошло в виду следующих причин:</text:p>
      <text:list text:style-name="WWNum21">
        <text:list-item>
          <text:p text:style-name="P99">Слишком маленькая работа внутри параллельных секций не дала ожидаемого прироста;</text:p>
        </text:list-item>
        <text:list-item>
          <text:p text:style-name="P99">Отсутствие порога параллелизации для малых N: увеличение накладных расходов не даёт прироста на данных меньше 1000x1000 элементов;</text:p>
        </text:list-item>
        <text:list-item>
          <text:p text:style-name="P99">Row-major доступ к матрицам и плохая локальность.</text:p>
        </text:list-item>
      </text:list>
      <text:p text:style-name="_30_3_5f_Текст_20_ИТММ">Вторая версия не сильно превосходит первую для малых<text:span text:style-name="T18"> N,</text:span><text:span text:style-name="T19"> существенно обходя её по эффекивности лишь для данных более</text:span><text:span text:style-name="T18"> 2000x2000</text:span><text:span text:style-name="T19"> элементов. </text:span></text:p>
      <text:p text:style-name="_30_3_5f_Текст_20_ИТММ">Видно, что третья реализация метода Гивенса даже выполняясь последовательно отрабатывает за лучшее, меньшее время по сравнению со второй реализацией QR-разложения на основе вращений Гивенса. Для небольших данных (матриц 500x500 и меньше) этот алгоритм превосходит даже оптимизированный алгоритм на основе отражений <text:soft-page-break/>Хаусхолдера. Однако на данных больше 1000x1000 элементов всё ещё лучшим показывает себя QR-разложение на основе отражений Хаусхолдера.</text:p>
      <text:p text:style-name="_30_3_5f_Текст_20_ИТММ">Не смотря на оптимизацию хранения данных, можно заметить, что реализация метода Гивенса существенно проигрывает реализации по методу Хаусхолдера в скорости из-за необходимости последовательной обработки всех поддиагональных элементов, тогда как Хаусхолдер обнуляет целый столбец за одно преобразование. Даже при использовании единого контейнера QRMatrix и единого цикла метод не даёт на плотных матрицах более значительных результатов.</text:p>
      <text:p text:style-name="_30_3_5f_Текст_20_ИТММ"><text:span text:style-name="T53">Различные версии алгоритма </text:span><text:span text:style-name="T52">QR-</text:span><text:span text:style-name="T53">разложения на основе вращений Гивенса в целом работают быстрее чем, </text:span><text:span text:style-name="T52">QR-</text:span><text:span text:style-name="T53">разложение на основе отражений Хаусхолдера, на небольших данных (&lt; </text:span><text:span text:style-name="T52">1000x1000 </text:span><text:span text:style-name="T53">элементов</text:span><text:span text:style-name="T52">)</text:span><text:span text:style-name="T53">, однако всё ещё проигрывает по скорости на больших (&gt;&gt; </text:span><text:span text:style-name="T52">1000x1000 </text:span><text:span text:style-name="T53">элементов</text:span><text:span text:style-name="T52">).</text:span></text:p>
      <text:p text:style-name="_30_3_5f_Текст_20_ИТММ"><text:span text:style-name="T53">Дело в ограниченной применимости метода. В виду его особенности обнуления отдельных элементов вместо целых столбцов под диагональю, как в методе Хаусхолдера, этот метод даст лучший результат при применении его к разреженным матрицам. Игнорирование нулевых отдельно стоящих значений позволит выполнить </text:span><text:span text:style-name="T52">QR </text:span><text:span text:style-name="T53">разложение быстрее. Так работают, например, открытые известные реализации: при работе с плотными матрицами используется метод Хаусхолдера, а при работе с разреженными матрицами — метод Гивенса.</text:span></text:p>
      <text:p text:style-name="_30_3_5f_Текст_20_ИТММ">Также можно попробовать реализовать блочный алгоритм для дальнейшего нивелирования эффекта от обращений к памяти во время выполнения вращений Гивенса. Потребуется использовать согласованную общую память, разделяемую отдельными потоками, отвечающими за разные блоки. Для этого больше подойдёт <text:span text:style-name="T18">MPI-</text:span><text:span text:style-name="T19">параллелизм на уровне процессов. Это позволит приблизиться к версии из библиотеки </text:span><text:span text:style-name="T18">Scilab, </text:span><text:span text:style-name="T19">ведь, как уже </text:span><text:span text:style-name="T177">было сказано выше, в Scilab QR-разложение реализуется с использованием подпрограмм из библиотеки Lapack — библиотеку, написанную на Fortran с:</text:span></text:p>
      <text:list text:style-name="WWNum22">
        <text:list-item>
          <text:p text:style-name="P100">Блочными алгоритмами (более оптимальное использование кэша),</text:p>
        </text:list-item>
        <text:list-item>
          <text:p text:style-name="P100">Высокооптимизированными многопоточными BLAS — Basic Linear Algebra Subprograms (Intel MKL/OpenBLAS),</text:p>
        </text:list-item>
        <text:list-item>
          <text:p text:style-name="P100">Ручной векторизацией и ассемблерными вставками.</text:p>
        </text:list-item>
      </text:list>
      <text:p text:style-name="P22">Полный код работы можно посмотреть по ссылке <text:a xlink:type="simple" xlink:href="https://github.com/wellcome2AD/QR-decomposition" text:style-name="Internet_20_link" text:visited-style-name="Visited_20_Internet_20_Link"><text:span text:style-name="Internet_20_link">https://github.com/wellcome2AD/QR-decomposition</text:span></text:a>.</text:p>
      <text:p text:style-name="_30_1_5f_Заголовок_20_1_20_ИТММ"><text:bookmark-start text:name="__RefHeading___Toc2659_713544485"/><text:bookmark-start text:name="_Toc194842674"/>Список литературы<text:bookmark-end text:name="__RefHeading___Toc2659_713544485"/><text:bookmark-end text:name="_Toc194842674"/></text:p>
      <text:list text:style-name="WWNum2">
        <text:list-item>
          <text:p text:style-name="P101"><text:span text:style-name="T177">Horn, R. A., Johnson C. R. Matrix analysis: Textbook / Roger A. Horn, Charles R. Johnson. – 2nd ed. — Cambridge University Press, 2012. — 561 p. —URL: </text:span><text:a xlink:type="simple" xlink:href="https://doi.org/10.1017/CBO9780511810817" office:target-frame-name="_blank" xlink:show="new" text:style-name="Internet_20_link" text:visited-style-name="Visited_20_Internet_20_Link"><text:span text:style-name="Internet_20_link"><text:span text:style-name="T177">https://doi.org/10.1017/CBO9780511810817</text:span></text:span></text:a><text:span text:style-name="T177"> (дата обращения: 14.12.2024).</text:span></text:p>
        </text:list-item>
        <text:list-item>
          <text:p text:style-name="P102"><text:span text:style-name="T177">Белов, С.А., Золотых Н.Ю. Численные методы линейное алгебры. Лабораторный практикум. / С.А. Белов, Н.Ю. Золотых — Нижний Новгород: Изд-во Нижегородского госуниверситета им. Н.И. Лобачевского, 2005. — 264 с.</text:span></text:p>
        </text:list-item>
        <text:list-item>
          <text:p text:style-name="P102"><text:span text:style-name="T177">Agullo, E. Exploiting a Parametrized Task Graph model for the parallelization of a sparse direct multifrontal solver // Euro-Par 2016: Parallel Processing Workshops, 2017. – P. 175–186. – URL: </text:span><text:a xlink:type="simple" xlink:href="https://doi.org/10.1007/978-3-319-58943-5_14" text:style-name="Internet_20_link" text:visited-style-name="Visited_20_Internet_20_Link"><text:span text:style-name="Internet_20_link"><text:span text:style-name="T177">https://doi.org/10.1007/978-3-319-58943-5_14</text:span></text:span></text:a><text:span text:style-name="T177"> (дата обращения: 14.12.2024).</text:span></text:p>
        </text:list-item>
        <text:list-item>
          <text:p text:style-name="P102"><text:span text:style-name="T177">Davis, T. A. Algorithm 915, SuiteSparseQR: Multifrontal multithreaded rank-revealing sparse QR factorization / T. A. Davis // ACM Transactions on Mathematical Software, Vol. 38, No. 1, Article 8, 2011. – P. 1-22. – URL: </text:span><text:a xlink:type="simple" xlink:href="https://doi.org/10.1145/2049662.2049670" office:target-frame-name="_blank" xlink:show="new" text:style-name="Internet_20_link" text:visited-style-name="Visited_20_Internet_20_Link"><text:span text:style-name="Internet_20_link"><text:span text:style-name="T177">https://doi.org/10.1145/2049662.2049670</text:span></text:span></text:a><text:span text:style-name="T177"> (дата обращения: 14.12.2024).</text:span></text:p>
        </text:list-item>
        <text:list-item>
          <text:p text:style-name="P102"><text:span text:style-name="T177">Новак, А. Е. Параллельный алгоритм построения QR-разложения разреженных матриц для систем с общей памятью / А. Е. Новак, С. А. Лебедев // Суперкомпьютерные дни в России : Труды международной конференции, Москва, 24–25 сентября 2018 года / Суперкомпьютерный консорциум университетов России, Российская академия наук. – Москва: Московский государственный университет имени М.В. Ломоносова" Издательский Дом (типография), 2018. – С. 841-847. – URL: </text:span><text:a xlink:type="simple" xlink:href="https://2018.russianscdays.org/files/pdf18/841.pdf" text:style-name="Internet_20_link" text:visited-style-name="Visited_20_Internet_20_Link"><text:span text:style-name="Internet_20_link"><text:span text:style-name="T177">https://2018.russianscdays.org/files/pdf18/841.pdf</text:span></text:span></text:a><text:span text:style-name="T177"> (дата обращения: 14.12.2025). </text:span></text:p>
        </text:list-item>
        <text:list-item>
          <text:p text:style-name="P102"><text:span text:style-name="T177">Soliverez, C. E. Orthonormalization on the plane: a geometric approach / C. E. Soliverez, E. Gagliano // Revista Mexicana de Física., 1985. – P. 743–758. – URL: </text:span><text:a xlink:type="simple" xlink:href="https://www.researchgate.net/publication/267471614_Orthonormalization_on_the_plane_a_geometric_approach" text:style-name="Internet_20_link" text:visited-style-name="Visited_20_Internet_20_Link"><text:span text:style-name="Internet_20_link"><text:span text:style-name="T177">https://www.researchgate.net/publication/267471614_Orthonormalization_on_the_plane_a_geometric_approach</text:span></text:span></text:a><text:span text:style-name="T177"> (дата обращения: 14.12.2024).</text:span></text:p>
        </text:list-item>
        <text:list-item>
          <text:p text:style-name="P102"><text:span text:style-name="T177">Вержбицкий, В. М. Численные методы. Линейная алгебра и нелинейные уравнения : Учебник / В. М. Вержбицкий. – Москва : Высшая школа, 2005. – 432 с.</text:span></text:p>
        </text:list-item>
        <text:list-item>
          <text:p text:style-name="P102"><text:span text:style-name="T177">Фролов, А. В. Сопоставление разных методов решения одной задачи по методике проекта Algowiki / А. В. Фролов, А. С. Антонов, Вл. В. Воеводин, А. М. Теплов // Параллельные вычислительные технологии (ПаВТ'2016), 2016 – С. 347–360. – URL: </text:span><text:a xlink:type="simple" xlink:href="https://ceur-ws.org/Vol-1576/062.pdf" text:style-name="Internet_20_link" text:visited-style-name="Visited_20_Internet_20_Link"><text:span text:style-name="Internet_20_link"><text:span text:style-name="T177">https://ceur-ws.org/Vol-1576/062.pdf</text:span></text:span></text:a><text:span text:style-name="T177"> (дата обращения: 14.12.2024).</text:span></text:p>
        </text:list-item>
      </text:list>
      <text:p text:style-name="_30_1_5f_Заголовок_20_1_20_ИТММ"><text:bookmark-start text:name="__RefHeading___Toc2657_713544485"/><text:bookmark-start text:name="_Toc194842675"/>Приложение <text:bookmark-end text:name="_Toc194842675"/>1. <text:span text:style-name="T18">QR-</text:span><text:span text:style-name="T19">разложение с использованием отражений Хаусхолдера, первая реализация</text:span><text:bookmark-end text:name="__RefHeading___Toc2657_713544485"/></text:p>
      <text:p text:style-name="P53" loext:marker-style-name="T121"><text:span text:style-name="T121">// </text:span><text:span text:style-name="T178">QR-decomposition\src\HouseholderMethod\HouseholderBasic.h</text:span></text:p>
      <text:p text:style-name="P53" loext:marker-style-name="T179"><text:span text:style-name="T179">#pragma once</text:span><text:span text:style-name="T179"/></text:p>
      <text:p text:style-name="P103" loext:marker-style-name="T180"/>
      <text:p text:style-name="P53"><text:span text:style-name="T179">#include</text:span><text:span text:style-name="T180"> </text:span><text:span text:style-name="T181">&lt;vector&gt;</text:span></text:p>
      <text:p text:style-name="P103" loext:marker-style-name="T180"/>
      <text:p text:style-name="P53"><text:span text:style-name="T179">#include</text:span><text:span text:style-name="T180"> </text:span><text:span text:style-name="T181">"../IQRSolver.h"</text:span></text:p>
      <text:p text:style-name="P53"><text:span text:style-name="T179">#include</text:span><text:span text:style-name="T180"> </text:span><text:span text:style-name="T181">"Matrix/MatrixOperations.h"</text:span></text:p>
      <text:p text:style-name="P103" loext:marker-style-name="T180"/>
      <text:p text:style-name="P53"><text:span text:style-name="T182">template</text:span><text:span text:style-name="T180"> &lt;</text:span><text:span text:style-name="T182">typename</text:span><text:span text:style-name="T180"> </text:span><text:span text:style-name="T183">T</text:span><text:span text:style-name="T180">&gt;</text:span></text:p>
      <text:p text:style-name="P53"><text:span text:style-name="T182">class</text:span><text:span text:style-name="T180"> </text:span><text:span text:style-name="T183">HouseholderMethodBasic</text:span><text:span text:style-name="T180"> : </text:span><text:span text:style-name="T182">public</text:span><text:span text:style-name="T180"> </text:span><text:span text:style-name="T183">IQRSolver</text:span><text:span text:style-name="T180">&lt;</text:span><text:span text:style-name="T183">T</text:span><text:span text:style-name="T180">&gt; {</text:span></text:p>
      <text:p text:style-name="P53"><text:span text:style-name="T180"><text:tab/></text:span><text:span text:style-name="T121">// первая, самая неоптимальная версия. на каждом шаге алгоритма выполняется два матричных умножения,</text:span></text:p>
      <text:p text:style-name="P53"><text:span text:style-name="T180"><text:tab/></text:span><text:span text:style-name="T121">// используется много лишней памяти</text:span></text:p>
      <text:p text:style-name="P53"><text:span text:style-name="T182">public</text:span><text:span text:style-name="T180">:</text:span></text:p>
      <text:p text:style-name="P53"><text:span text:style-name="T180"><text:tab/></text:span><text:span text:style-name="T182">virtual</text:span><text:span text:style-name="T180"> </text:span><text:span text:style-name="T182">void</text:span><text:span text:style-name="T180"> QR_decomposition(</text:span><text:span text:style-name="T182">const</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A</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Q</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R</text:span><text:span text:style-name="T180">) </text:span><text:span text:style-name="T182">override</text:span></text:p>
      <text:p text:style-name="P53"><text:span text:style-name="T180"><text:tab/>{</text:span></text:p>
      <text:p text:style-name="P53"><text:span text:style-name="T180"><text:tab/><text:tab/></text:span><text:span text:style-name="T182">const</text:span><text:span text:style-name="T180"> </text:span><text:span text:style-name="T183">ptrdiff_t</text:span><text:span text:style-name="T180"> N = </text:span><text:span text:style-name="T179">A</text:span><text:span text:style-name="T180">.size();</text:span></text:p>
      <text:p text:style-name="P53"><text:span text:style-name="T180"><text:tab/><text:tab/></text:span><text:span text:style-name="T179">R</text:span><text:span text:style-name="T180"> = </text:span><text:span text:style-name="T179">A</text:span><text:span text:style-name="T180">;</text:span></text:p>
      <text:p text:style-name="P53"><text:span text:style-name="T180"><text:tab/><text:tab/></text:span><text:span text:style-name="T179">Q</text:span><text:span text:style-name="T180"> = std::</text:span><text:span text:style-name="T183">vector</text:span><text:span text:style-name="T180">&lt;std::</text:span><text:span text:style-name="T183">vector</text:span><text:span text:style-name="T180">&lt;</text:span><text:span text:style-name="T183">T</text:span><text:span text:style-name="T180">&gt;&gt;(N, std::</text:span><text:span text:style-name="T183">vector</text:span><text:span text:style-name="T180">&lt;</text:span><text:span text:style-name="T183">T</text:span><text:span text:style-name="T180">&gt;(N, 0));</text:span></text:p>
      <text:p text:style-name="P53"><text:span text:style-name="T180"><text:tab/><text:tab/></text:span><text:span text:style-name="T182">for</text:span><text:span text:style-name="T180"> (</text:span><text:span text:style-name="T182">int</text:span><text:span text:style-name="T180"> i = 0; i &lt; N; ++i) {</text:span></text:p>
      <text:p text:style-name="P53"><text:span text:style-name="T180"><text:tab/><text:tab/><text:tab/></text:span><text:span text:style-name="T179">Q</text:span><text:span text:style-name="T180">[i][i] = 1.0;</text:span></text:p>
      <text:p text:style-name="P53"><text:span text:style-name="T180"><text:tab/><text:tab/>}</text:span></text:p>
      <text:p text:style-name="P103" loext:marker-style-name="T180"/>
      <text:p text:style-name="P53"><text:span text:style-name="T180"><text:tab/><text:tab/></text:span><text:span text:style-name="T182">for</text:span><text:span text:style-name="T180"> (</text:span><text:span text:style-name="T183">ptrdiff_t</text:span><text:span text:style-name="T180"> k = 0; k &lt; N - 1; ++k) {</text:span></text:p>
      <text:p text:style-name="P53"><text:span text:style-name="T180"><text:tab/><text:tab/><text:tab/></text:span><text:span text:style-name="T121">// count beta</text:span></text:p>
      <text:p text:style-name="P53"><text:span text:style-name="T180"><text:tab/><text:tab/><text:tab/></text:span><text:span text:style-name="T182">double</text:span><text:span text:style-name="T180"> sum = 0.0;</text:span></text:p>
      <text:p text:style-name="P53"><text:span text:style-name="T179">#pragma</text:span><text:span text:style-name="T180"> omp parallel </text:span><text:span text:style-name="T182">for</text:span><text:span text:style-name="T180"> num_threads(thread_num) reduction(+:sum)</text:span></text:p>
      <text:p text:style-name="P53"><text:span text:style-name="T180"><text:tab/><text:tab/><text:tab/></text:span><text:span text:style-name="T182">for</text:span><text:span text:style-name="T180"> (</text:span><text:span text:style-name="T183">ptrdiff_t</text:span><text:span text:style-name="T180"> i = k; i &lt; N; ++i) {</text:span></text:p>
      <text:p text:style-name="P53"><text:span text:style-name="T180"><text:tab/><text:tab/><text:tab/><text:tab/>sum += </text:span><text:span text:style-name="T179">R</text:span><text:span text:style-name="T180">[i][k] * </text:span><text:span text:style-name="T179">R</text:span><text:span text:style-name="T180">[i][k];</text:span></text:p>
      <text:p text:style-name="P53"><text:span text:style-name="T180"><text:tab/><text:tab/><text:tab/>}</text:span></text:p>
      <text:p text:style-name="P53"><text:span text:style-name="T180"><text:tab/><text:tab/><text:tab/></text:span><text:span text:style-name="T182">double</text:span><text:span text:style-name="T180"> beta = sign(-</text:span><text:span text:style-name="T179">R</text:span><text:span text:style-name="T180">[k][k]) * sqrt(sum);</text:span></text:p>
      <text:p text:style-name="P103" loext:marker-style-name="T180"/>
      <text:p text:style-name="P53"><text:span text:style-name="T180"><text:tab/><text:tab/><text:tab/></text:span><text:span text:style-name="T121">// count mu</text:span></text:p>
      <text:p text:style-name="P53"><text:span text:style-name="T180"><text:tab/><text:tab/><text:tab/></text:span><text:span text:style-name="T182">double</text:span><text:span text:style-name="T180"> mu = 1.0 / sqrt(2.0 * beta * (beta - </text:span><text:span text:style-name="T179">R</text:span><text:span text:style-name="T180">[k][k]));</text:span></text:p>
      <text:p text:style-name="P103" loext:marker-style-name="T180"/>
      <text:p text:style-name="P53"><text:span text:style-name="T180"><text:tab/><text:tab/><text:tab/></text:span><text:span text:style-name="T121">// count v</text:span></text:p>
      <text:p text:style-name="P53"><text:span text:style-name="T180"><text:tab/><text:tab/><text:tab/>std::</text:span><text:span text:style-name="T183">vector</text:span><text:span text:style-name="T180">&lt;</text:span><text:span text:style-name="T182">double</text:span><text:span text:style-name="T180">&gt; v(N, 0);</text:span></text:p>
      <text:p text:style-name="P53"><text:span text:style-name="T179">#pragma</text:span><text:span text:style-name="T180"> omp parallel </text:span><text:span text:style-name="T182">for</text:span><text:span text:style-name="T180"> num_threads(thread_num)</text:span></text:p>
      <text:p text:style-name="P53"><text:span text:style-name="T180"><text:tab/><text:tab/><text:tab/></text:span><text:span text:style-name="T182">for</text:span><text:span text:style-name="T180"> (</text:span><text:span text:style-name="T182">int</text:span><text:span text:style-name="T180"> i = k; i &lt; N; ++i) {</text:span></text:p>
      <text:p text:style-name="P53"><text:span text:style-name="T180"><text:tab/><text:tab/><text:tab/><text:tab/>v</text:span><text:span text:style-name="T184">[</text:span><text:span text:style-name="T180">i</text:span><text:span text:style-name="T184">]</text:span><text:span text:style-name="T180"> = </text:span><text:span text:style-name="T179">R</text:span><text:span text:style-name="T180">[i][k] * mu;</text:span></text:p>
      <text:p text:style-name="P53"><text:span text:style-name="T180"><text:tab/><text:tab/><text:tab/>}</text:span></text:p>
      <text:p text:style-name="P53"><text:span text:style-name="T180"><text:tab/><text:tab/><text:tab/>v</text:span><text:span text:style-name="T184">[</text:span><text:span text:style-name="T180">k</text:span><text:span text:style-name="T184">]</text:span><text:span text:style-name="T180"> -= beta * mu;</text:span></text:p>
      <text:p text:style-name="P103" loext:marker-style-name="T180"/>
      <text:p text:style-name="P53"><text:span text:style-name="T180"><text:tab/><text:tab/><text:tab/></text:span><text:span text:style-name="T121">// count H</text:span></text:p>
      <text:p text:style-name="P53"><text:span text:style-name="T180"><text:tab/><text:tab/><text:tab/>std::</text:span><text:span text:style-name="T183">vector</text:span><text:span text:style-name="T180">&lt;std::</text:span><text:span text:style-name="T183">vector</text:span><text:span text:style-name="T180">&lt;</text:span><text:span text:style-name="T183">T</text:span><text:span text:style-name="T180">&gt;&gt; H(N, std::</text:span><text:span text:style-name="T183">vector</text:span><text:span text:style-name="T180">&lt;</text:span><text:span text:style-name="T183">T</text:span><text:span text:style-name="T180">&gt;(N, 0));</text:span></text:p>
      <text:p text:style-name="P53"><text:span text:style-name="T179">#pragma</text:span><text:span text:style-name="T180"> omp parallel </text:span><text:span text:style-name="T182">for</text:span><text:span text:style-name="T180"> num_threads(thread_num)</text:span></text:p>
      <text:p text:style-name="P53"><text:span text:style-name="T180"><text:tab/><text:tab/><text:tab/></text:span><text:span text:style-name="T182">for</text:span><text:span text:style-name="T180"> (</text:span><text:span text:style-name="T182">int</text:span><text:span text:style-name="T180"> i = 0; i &lt; N; ++i) {</text:span></text:p>
      <text:p text:style-name="P53"><text:span text:style-name="T180"><text:tab/><text:tab/><text:tab/><text:tab/>H[i][i] = 1.0;</text:span></text:p>
      <text:p text:style-name="P53"><text:span text:style-name="T180"><text:tab/><text:tab/><text:tab/><text:tab/></text:span><text:span text:style-name="T182">for</text:span><text:span text:style-name="T180"> (</text:span><text:span text:style-name="T182">int</text:span><text:span text:style-name="T180"> j = 0; j &lt; N; ++j) {</text:span></text:p>
      <text:p text:style-name="P53"><text:span text:style-name="T180"><text:tab/><text:tab/><text:tab/><text:tab/><text:tab/>H[i][j] -= v</text:span><text:span text:style-name="T184">[</text:span><text:span text:style-name="T180">i</text:span><text:span text:style-name="T184">]</text:span><text:span text:style-name="T180"> * v</text:span><text:span text:style-name="T184">[</text:span><text:span text:style-name="T180">j</text:span><text:span text:style-name="T184">]</text:span><text:span text:style-name="T180"> * 2.0;</text:span></text:p>
      <text:p text:style-name="P53"><text:span text:style-name="T180"><text:tab/><text:tab/><text:tab/><text:tab/>}</text:span></text:p>
      <text:p text:style-name="P53"><text:span text:style-name="T180"><text:tab/><text:tab/><text:tab/>}</text:span></text:p>
      <text:p text:style-name="P103" loext:marker-style-name="T180"/>
      <text:p text:style-name="P53"><text:span text:style-name="T180"><text:tab/><text:tab/><text:tab/></text:span><text:span text:style-name="T179">R</text:span><text:span text:style-name="T180"> = multiplyMatrix(H, </text:span><text:span text:style-name="T179">R</text:span><text:span text:style-name="T180">);</text:span></text:p>
      <text:p text:style-name="P53"><text:span text:style-name="T180"><text:tab/><text:tab/><text:tab/></text:span><text:span text:style-name="T179">Q</text:span><text:span text:style-name="T180"> = multiplyMatrix(</text:span><text:span text:style-name="T179">Q</text:span><text:span text:style-name="T180">, H);</text:span></text:p>
      <text:p text:style-name="P53"><text:span text:style-name="T180"><text:tab/><text:tab/>}</text:span></text:p>
      <text:p text:style-name="P53"><text:span text:style-name="T180"><text:tab/>}</text:span></text:p>
      <text:p text:style-name="P103" loext:marker-style-name="T180"><text:soft-page-break/></text:p>
      <text:p text:style-name="P53"><text:span text:style-name="T182">private</text:span><text:span text:style-name="T180">:</text:span></text:p>
      <text:p text:style-name="P53"><text:span text:style-name="T180"><text:tab/></text:span><text:span text:style-name="T182">static</text:span><text:span text:style-name="T180"> </text:span><text:span text:style-name="T182">double</text:span><text:span text:style-name="T180"> sign(</text:span><text:span text:style-name="T182">double</text:span><text:span text:style-name="T180"> </text:span><text:span text:style-name="T179">x</text:span><text:span text:style-name="T180">)</text:span></text:p>
      <text:p text:style-name="P53"><text:span text:style-name="T180"><text:tab/>{</text:span></text:p>
      <text:p text:style-name="P53"><text:span text:style-name="T180"><text:tab/><text:tab/></text:span><text:span text:style-name="T182">if</text:span><text:span text:style-name="T180"> (</text:span><text:span text:style-name="T179">x</text:span><text:span text:style-name="T180"> &gt; 0.0)</text:span></text:p>
      <text:p text:style-name="P53"><text:span text:style-name="T180"><text:tab/><text:tab/><text:tab/></text:span><text:span text:style-name="T182">return</text:span><text:span text:style-name="T180"> 1.0;</text:span></text:p>
      <text:p text:style-name="P53"><text:span text:style-name="T180"><text:tab/><text:tab/></text:span><text:span text:style-name="T182">if</text:span><text:span text:style-name="T180"> (</text:span><text:span text:style-name="T179">x</text:span><text:span text:style-name="T180"> &lt; 0.0)</text:span></text:p>
      <text:p text:style-name="P53"><text:span text:style-name="T180"><text:tab/><text:tab/><text:tab/></text:span><text:span text:style-name="T182">return</text:span><text:span text:style-name="T180"> -1.0;</text:span></text:p>
      <text:p text:style-name="P53"><text:span text:style-name="T180"><text:tab/><text:tab/></text:span><text:span text:style-name="T182">return</text:span><text:span text:style-name="T180"> 1.0;</text:span></text:p>
      <text:p text:style-name="P53"><text:span text:style-name="T180"><text:tab/>}</text:span></text:p>
      <text:p text:style-name="P53"><text:span text:style-name="T180">};</text:span></text:p>
      <text:p text:style-name="P104"/>
      <text:p text:style-name="P53" loext:marker-style-name="T121"><text:span text:style-name="T121">// </text:span><text:span text:style-name="T178">QR-decomposition\src\Matrix\MatrixOperations.h</text:span></text:p>
      <text:p text:style-name="P53"><text:span text:style-name="T179">#pragma</text:span><text:span text:style-name="T180"> </text:span><text:span text:style-name="T179">once</text:span></text:p>
      <text:p text:style-name="P103" loext:marker-style-name="T180"/>
      <text:p text:style-name="P53"><text:span text:style-name="T179">#include</text:span><text:span text:style-name="T180"> </text:span><text:span text:style-name="T181">&lt;iomanip&gt;</text:span></text:p>
      <text:p text:style-name="P53"><text:span text:style-name="T179">#include</text:span><text:span text:style-name="T180"> </text:span><text:span text:style-name="T181">&lt;vector&gt;</text:span></text:p>
      <text:p text:style-name="P53"><text:span text:style-name="T179">#include</text:span><text:span text:style-name="T180"> </text:span><text:span text:style-name="T181">&lt;string&gt;</text:span></text:p>
      <text:p text:style-name="P53"><text:span text:style-name="T179">#include</text:span><text:span text:style-name="T180"> </text:span><text:span text:style-name="T181">&lt;cassert&gt;</text:span></text:p>
      <text:p text:style-name="P53"><text:span text:style-name="T179">#include</text:span><text:span text:style-name="T180"> </text:span><text:span text:style-name="T181">&lt;random&gt;</text:span></text:p>
      <text:p text:style-name="P53"><text:span text:style-name="T179">#include</text:span><text:span text:style-name="T180"> </text:span><text:span text:style-name="T181">&lt;algorithm&gt;</text:span></text:p>
      <text:p text:style-name="P105" loext:marker-style-name="T178"/>
      <text:p text:style-name="P53" loext:marker-style-name="T178"><text:span text:style-name="T178">/*</text:span><text:span text:style-name="T185">остальная часть кода библиотеки</text:span><text:span text:style-name="T178">*/</text:span></text:p>
      <text:p text:style-name="P106" loext:marker-style-name="T182"/>
      <text:p text:style-name="P53"><text:span text:style-name="T182">template</text:span><text:span text:style-name="T180"> &lt;</text:span><text:span text:style-name="T182">typename</text:span><text:span text:style-name="T180"> </text:span><text:span text:style-name="T183">T</text:span><text:span text:style-name="T180">&gt;</text:span></text:p>
      <text:p text:style-name="P53"><text:span text:style-name="T182">inline</text:span><text:span text:style-name="T180"> std::</text:span><text:span text:style-name="T183">vector</text:span><text:span text:style-name="T180">&lt;std::</text:span><text:span text:style-name="T183">vector</text:span><text:span text:style-name="T180">&lt;</text:span><text:span text:style-name="T183">T</text:span><text:span text:style-name="T180">&gt;&gt; multiplyMatrix(</text:span><text:span text:style-name="T182">const</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m1</text:span><text:span text:style-name="T180">, </text:span><text:span text:style-name="T182">const</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m2</text:span><text:span text:style-name="T180">, </text:span><text:span text:style-name="T182">int</text:span><text:span text:style-name="T180"> </text:span><text:span text:style-name="T179">block_size</text:span><text:span text:style-name="T180">=50) {</text:span></text:p>
      <text:p text:style-name="P53"><text:span text:style-name="T180"><text:tab/></text:span><text:span text:style-name="T186">assert</text:span><text:span text:style-name="T180">(m1.size() == m2[0].size());</text:span></text:p>
      <text:p text:style-name="P53"><text:span text:style-name="T180"><text:tab/></text:span><text:span text:style-name="T182">auto</text:span><text:span text:style-name="T180"> N = </text:span><text:span text:style-name="T179">m1</text:span><text:span text:style-name="T180">.size();</text:span></text:p>
      <text:p text:style-name="P53"><text:span text:style-name="T180"><text:tab/>std::</text:span><text:span text:style-name="T183">vector</text:span><text:span text:style-name="T180">&lt;std::</text:span><text:span text:style-name="T183">vector</text:span><text:span text:style-name="T180">&lt;</text:span><text:span text:style-name="T183">T</text:span><text:span text:style-name="T180">&gt;&gt; res(N, std::</text:span><text:span text:style-name="T183">vector</text:span><text:span text:style-name="T180">&lt;</text:span><text:span text:style-name="T183">T</text:span><text:span text:style-name="T180">&gt;(N, 0));</text:span></text:p>
      <text:p text:style-name="P53"><text:span text:style-name="T179">#pragma</text:span><text:span text:style-name="T180"> omp parallel </text:span><text:span text:style-name="T182">for</text:span><text:span text:style-name="T180"> num_threads(thread_num)</text:span></text:p>
      <text:p text:style-name="P53"><text:span text:style-name="T180"><text:tab/></text:span><text:span text:style-name="T182">for</text:span><text:span text:style-name="T180"> (</text:span><text:span text:style-name="T182">int</text:span><text:span text:style-name="T180"> i = 0; i &lt; N; i++) {</text:span></text:p>
      <text:p text:style-name="P53"><text:span text:style-name="T180"><text:tab/><text:tab/></text:span><text:span text:style-name="T182">for</text:span><text:span text:style-name="T180"> (</text:span><text:span text:style-name="T182">int</text:span><text:span text:style-name="T180"> jj = 0; jj &lt; N; jj += </text:span><text:span text:style-name="T179">block_size</text:span><text:span text:style-name="T180">) {</text:span></text:p>
      <text:p text:style-name="P53"><text:span text:style-name="T180"><text:tab/><text:tab/><text:tab/></text:span><text:span text:style-name="T182">for</text:span><text:span text:style-name="T180"> (</text:span><text:span text:style-name="T182">int</text:span><text:span text:style-name="T180"> kk = 0; kk &lt; N; kk += </text:span><text:span text:style-name="T179">block_size</text:span><text:span text:style-name="T180">) {</text:span></text:p>
      <text:p text:style-name="P53"><text:span text:style-name="T180"><text:tab/><text:tab/><text:tab/><text:tab/></text:span><text:span text:style-name="T182">for</text:span><text:span text:style-name="T180"> (</text:span><text:span text:style-name="T182">int</text:span><text:span text:style-name="T180"> j = jj; j &lt; ((jj + </text:span><text:span text:style-name="T179">block_size</text:span><text:span text:style-name="T180">) &gt; N ? N : (jj + </text:span><text:span text:style-name="T179">block_size</text:span><text:span text:style-name="T180">)); j++) {</text:span></text:p>
      <text:p text:style-name="P53"><text:span text:style-name="T180"><text:tab/><text:tab/><text:tab/><text:tab/><text:tab/></text:span><text:span text:style-name="T182">double</text:span><text:span text:style-name="T180"> temp = 0.0;</text:span></text:p>
      <text:p text:style-name="P53"><text:span text:style-name="T180"><text:tab/><text:tab/><text:tab/><text:tab/><text:tab/></text:span><text:span text:style-name="T182">for</text:span><text:span text:style-name="T180"> (</text:span><text:span text:style-name="T182">int</text:span><text:span text:style-name="T180"> k = kk; k &lt; ((kk + </text:span><text:span text:style-name="T179">block_size</text:span><text:span text:style-name="T180">) &gt; N ? N : (kk + </text:span><text:span text:style-name="T179">block_size</text:span><text:span text:style-name="T180">)); k++) {</text:span></text:p>
      <text:p text:style-name="P53"><text:span text:style-name="T180"><text:tab/><text:tab/><text:tab/><text:tab/><text:tab/><text:tab/>temp += </text:span><text:span text:style-name="T182">static_cast</text:span><text:span text:style-name="T180">&lt;</text:span><text:span text:style-name="T182">double</text:span><text:span text:style-name="T180">&gt;(</text:span><text:span text:style-name="T179">m1</text:span><text:span text:style-name="T180">[i][k]) * </text:span><text:span text:style-name="T182">static_cast</text:span><text:span text:style-name="T180">&lt;</text:span><text:span text:style-name="T182">double</text:span><text:span text:style-name="T180">&gt;(</text:span><text:span text:style-name="T179">m2</text:span><text:span text:style-name="T180">[k][j]);</text:span></text:p>
      <text:p text:style-name="P53"><text:span text:style-name="T180"><text:tab/><text:tab/><text:tab/><text:tab/><text:tab/>}</text:span></text:p>
      <text:p text:style-name="P53"><text:span text:style-name="T180"><text:tab/><text:tab/><text:tab/><text:tab/><text:tab/>res[i][j] += </text:span><text:span text:style-name="T182">static_cast</text:span><text:span text:style-name="T180">&lt;</text:span><text:span text:style-name="T183">T</text:span><text:span text:style-name="T180">&gt;(temp);</text:span></text:p>
      <text:p text:style-name="P53"><text:span text:style-name="T180"><text:tab/><text:tab/><text:tab/><text:tab/>}</text:span></text:p>
      <text:p text:style-name="P53"><text:span text:style-name="T180"><text:tab/><text:tab/><text:tab/>}</text:span></text:p>
      <text:p text:style-name="P53"><text:span text:style-name="T180"><text:tab/><text:tab/>}</text:span></text:p>
      <text:p text:style-name="P53"><text:span text:style-name="T180"><text:tab/>}</text:span></text:p>
      <text:p text:style-name="P53"><text:span text:style-name="T180"><text:tab/></text:span><text:span text:style-name="T182">return</text:span><text:span text:style-name="T180"> res;</text:span></text:p>
      <text:p text:style-name="P53"><text:span text:style-name="T180">}</text:span></text:p>
      <text:p text:style-name="P107"><text:bookmark-start text:name="__RefHeading___Toc2657_713544485_Копия_1"/><text:bookmark-start text:name="_Toc194842675_Копия_1"/>Приложение <text:bookmark-end text:name="_Toc194842675_Копия_1"/>2. <text:span text:style-name="T18">QR-</text:span><text:span text:style-name="T19">разложение с использованием отражений Хаусхолдера, реализация без матричных умножений</text:span><text:bookmark-end text:name="__RefHeading___Toc2657_713544485_Копия_1"/></text:p>
      <text:p text:style-name="P53"><text:span text:style-name="T179">#pragma</text:span><text:span text:style-name="T180"> </text:span><text:span text:style-name="T179">once</text:span></text:p>
      <text:p text:style-name="P103" loext:marker-style-name="T180"/>
      <text:p text:style-name="P53"><text:span text:style-name="T179">#include</text:span><text:span text:style-name="T180"> </text:span><text:span text:style-name="T181">&lt;vector&gt;</text:span></text:p>
      <text:p text:style-name="P103" loext:marker-style-name="T180"/>
      <text:p text:style-name="P53"><text:span text:style-name="T179">#include</text:span><text:span text:style-name="T180"> </text:span><text:span text:style-name="T181">"../IQRSolver.h"</text:span></text:p>
      <text:p text:style-name="P103" loext:marker-style-name="T180"/>
      <text:p text:style-name="P53"><text:span text:style-name="T182">template</text:span><text:span text:style-name="T180"> &lt;</text:span><text:span text:style-name="T182">typename</text:span><text:span text:style-name="T180"> </text:span><text:span text:style-name="T183">T</text:span><text:span text:style-name="T180">&gt;</text:span></text:p>
      <text:p text:style-name="P53"><text:span text:style-name="T182">class</text:span><text:span text:style-name="T180"> </text:span><text:span text:style-name="T183">HouseholderMethodWithoutMatrixMults</text:span><text:span text:style-name="T180"> : </text:span><text:span text:style-name="T182">public</text:span><text:span text:style-name="T180"> </text:span><text:span text:style-name="T183">IQRSolver</text:span><text:span text:style-name="T180">&lt;</text:span><text:span text:style-name="T183">T</text:span><text:span text:style-name="T180">&gt; {</text:span></text:p>
      <text:p text:style-name="P53"><text:span text:style-name="T182">public</text:span><text:span text:style-name="T180">:</text:span></text:p>
      <text:p text:style-name="P53"><text:span text:style-name="T180"><text:tab/></text:span><text:span text:style-name="T121">// вторая версия, избавлена от недостатка первой -- двух матричных умножений на каждой итерации</text:span></text:p>
      <text:p text:style-name="P53"><text:span text:style-name="T180"><text:tab/></text:span><text:span text:style-name="T182">virtual</text:span><text:span text:style-name="T180"> </text:span><text:span text:style-name="T182">void</text:span><text:span text:style-name="T180"> QR_decomposition(</text:span><text:span text:style-name="T182">const</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A</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Q</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R</text:span><text:span text:style-name="T180">) </text:span><text:span text:style-name="T182">override</text:span></text:p>
      <text:p text:style-name="P53"><text:span text:style-name="T180"><text:tab/>{</text:span></text:p>
      <text:p text:style-name="P53"><text:span text:style-name="T180"><text:tab/><text:tab/></text:span><text:span text:style-name="T182">const</text:span><text:span text:style-name="T180"> </text:span><text:span text:style-name="T183">size_t</text:span><text:span text:style-name="T180"> N = </text:span><text:span text:style-name="T179">A</text:span><text:span text:style-name="T180">.size();</text:span></text:p>
      <text:p text:style-name="P53"><text:span text:style-name="T180"><text:tab/><text:tab/></text:span><text:span text:style-name="T121">// Конвертируем входные данные в плоские массивы</text:span></text:p>
      <text:p text:style-name="P53"><text:span text:style-name="T180"><text:tab/><text:tab/>std::</text:span><text:span text:style-name="T183">vector</text:span><text:span text:style-name="T180">&lt;</text:span><text:span text:style-name="T183">T</text:span><text:span text:style-name="T180">&gt; A_flat(N * N), Q_flat;</text:span></text:p>
      <text:p text:style-name="P53"><text:span text:style-name="T180"><text:tab/><text:tab/></text:span><text:span text:style-name="T182">for</text:span><text:span text:style-name="T180"> (</text:span><text:span text:style-name="T183">ptrdiff_t</text:span><text:span text:style-name="T180"> j = 0; j &lt; N; ++j) {</text:span></text:p>
      <text:p text:style-name="P53"><text:span text:style-name="T180"><text:tab/><text:tab/><text:tab/></text:span><text:span text:style-name="T182">for</text:span><text:span text:style-name="T180"> (</text:span><text:span text:style-name="T183">ptrdiff_t</text:span><text:span text:style-name="T180"> i = 0; i &lt; N; ++i) {</text:span></text:p>
      <text:p text:style-name="P53"><text:span text:style-name="T180"><text:tab/><text:tab/><text:tab/><text:tab/>A_flat[i * N + j] = </text:span><text:span text:style-name="T179">A</text:span><text:span text:style-name="T180">[i][j];</text:span></text:p>
      <text:p text:style-name="P53"><text:span text:style-name="T180"><text:tab/><text:tab/><text:tab/>}</text:span></text:p>
      <text:p text:style-name="P53"><text:span text:style-name="T180"><text:tab/><text:tab/>}</text:span></text:p>
      <text:p text:style-name="P103" loext:marker-style-name="T180"/>
      <text:p text:style-name="P53"><text:span text:style-name="T180"><text:tab/><text:tab/></text:span><text:span text:style-name="T182">auto</text:span><text:span text:style-name="T180"> R_flat = A_flat;</text:span></text:p>
      <text:p text:style-name="P53"><text:span text:style-name="T180"><text:tab/><text:tab/>std::</text:span><text:span text:style-name="T183">vector</text:span><text:span text:style-name="T180">&lt;</text:span><text:span text:style-name="T183">T</text:span><text:span text:style-name="T180">&gt; all_v(N * (N - 1), 0.0); </text:span><text:span text:style-name="T121">// все вектора Хаусхолдера будут хранится в одной матрице подряд, без незначащих нулей</text:span></text:p>
      <text:p text:style-name="P103" loext:marker-style-name="T180"/>
      <text:p text:style-name="P53"><text:span text:style-name="T180"><text:tab/><text:tab/></text:span><text:span text:style-name="T121">// вычисление R</text:span></text:p>
      <text:p text:style-name="P53"><text:span text:style-name="T180"><text:tab/><text:tab/></text:span><text:span text:style-name="T121">// H * R = (I - 2 * v * v^T) * R = R - 2 * v * (v^T * R)</text:span></text:p>
      <text:p text:style-name="P53"><text:span text:style-name="T180"><text:tab/><text:tab/></text:span><text:span text:style-name="T182">for</text:span><text:span text:style-name="T180"> (</text:span><text:span text:style-name="T183">ptrdiff_t</text:span><text:span text:style-name="T180"> k = 0; k &lt; N - 1; ++k)</text:span></text:p>
      <text:p text:style-name="P53"><text:span text:style-name="T180"><text:tab/><text:tab/>{</text:span></text:p>
      <text:p text:style-name="P53"><text:span text:style-name="T180"><text:tab/><text:tab/><text:tab/></text:span><text:span text:style-name="T183">T</text:span><text:span text:style-name="T180">* v_k = &amp;all_v[k * N]; </text:span><text:span text:style-name="T121">// часть матрицы с вектором vk</text:span></text:p>
      <text:p text:style-name="P53"><text:span text:style-name="T180"><text:tab/><text:tab/><text:tab/></text:span><text:span text:style-name="T183">ptrdiff_t</text:span><text:span text:style-name="T180"> v_length = N - k; </text:span><text:span text:style-name="T121">// длина вектора vk</text:span></text:p>
      <text:p text:style-name="P53"><text:span text:style-name="T180"><text:tab/><text:tab/><text:tab/></text:span><text:span text:style-name="T183">ptrdiff_t</text:span><text:span text:style-name="T180"> kN = k * N; </text:span><text:span text:style-name="T121">// предвычисленное смещение для k строки</text:span></text:p>
      <text:p text:style-name="P103" loext:marker-style-name="T180"/>
      <text:p text:style-name="P53"><text:span text:style-name="T180"><text:tab/><text:tab/><text:tab/></text:span><text:span text:style-name="T183">T</text:span><text:span text:style-name="T180">* R_col_k = &amp;R_flat[kN + k]; </text:span><text:span text:style-name="T121">// 0 элемент k столбца матрицы R, чтобы получить следующий -- прибавить строку</text:span></text:p>
      <text:p text:style-name="P103" loext:marker-style-name="T180"/>
      <text:p text:style-name="P53"><text:span text:style-name="T180"><text:tab/><text:tab/><text:tab/></text:span><text:span text:style-name="T182">double</text:span><text:span text:style-name="T180"> beta = 0.0;</text:span></text:p>
      <text:p text:style-name="P53"><text:span text:style-name="T180"><text:tab/><text:tab/><text:tab/></text:span><text:span text:style-name="T121">// count beta</text:span></text:p>
      <text:p text:style-name="P53"><text:span text:style-name="T180"><text:tab/><text:tab/><text:tab/></text:span><text:span text:style-name="T182">double</text:span><text:span text:style-name="T180"> sum = 0.0;</text:span></text:p>
      <text:p text:style-name="P53"><text:span text:style-name="T179">#pragma</text:span><text:span text:style-name="T180"> omp parallel </text:span><text:span text:style-name="T182">for</text:span><text:span text:style-name="T180"> num_threads(thread_num) reduction(+:sum)</text:span></text:p>
      <text:p text:style-name="P53"><text:span text:style-name="T180"><text:tab/><text:tab/><text:tab/></text:span><text:span text:style-name="T182">for</text:span><text:span text:style-name="T180"> (</text:span><text:span text:style-name="T182">int</text:span><text:span text:style-name="T180"> i = 0; i &lt; v_length; ++i) {</text:span></text:p>
      <text:p text:style-name="P53"><text:span text:style-name="T180"><text:tab/><text:tab/><text:tab/><text:tab/>sum += R_col_k[i * N] * R_col_k[i * N];</text:span></text:p>
      <text:p text:style-name="P53"><text:span text:style-name="T180"><text:tab/><text:tab/><text:tab/>}</text:span></text:p>
      <text:p text:style-name="P53"><text:span text:style-name="T180"><text:tab/><text:tab/><text:tab/></text:span><text:span text:style-name="T182">if</text:span><text:span text:style-name="T180"> (fabs(sum) &lt; std::</text:span><text:span text:style-name="T183">numeric_limits</text:span><text:span text:style-name="T180">&lt;</text:span><text:span text:style-name="T183">T</text:span><text:span text:style-name="T180">&gt;::epsilon()) </text:span><text:span text:style-name="T121">// eсли знаменатель близок к 0, вектор отражения не нужен</text:span></text:p>
      <text:p text:style-name="P53"><text:span text:style-name="T180"><text:tab/><text:tab/><text:tab/>{</text:span></text:p>
      <text:p text:style-name="P53"><text:span text:style-name="T180"><text:tab/><text:tab/><text:tab/><text:tab/></text:span><text:span text:style-name="T182">continue</text:span><text:span text:style-name="T180">;</text:span></text:p>
      <text:p text:style-name="P53"><text:span text:style-name="T180"><text:tab/><text:tab/><text:tab/>}</text:span></text:p>
      <text:p text:style-name="P53"><text:span text:style-name="T180"><text:tab/><text:tab/><text:tab/></text:span><text:span text:style-name="T182">double</text:span><text:span text:style-name="T180"> norm_x = sqrt(sum);</text:span></text:p>
      <text:p text:style-name="P53"><text:span text:style-name="T180"><text:tab/><text:tab/><text:tab/>beta = (R_flat[kN + k] &gt;= 0.0) ? -norm_x : norm_x;</text:span></text:p>
      <text:p text:style-name="P103" loext:marker-style-name="T180"/>
      <text:p text:style-name="P53"><text:span text:style-name="T180"><text:tab/><text:tab/><text:tab/></text:span><text:span text:style-name="T182">double</text:span><text:span text:style-name="T180"> mu = 0.0;</text:span></text:p>
      <text:p text:style-name="P53"><text:span text:style-name="T180"><text:tab/><text:tab/><text:tab/></text:span><text:span text:style-name="T121">// count mu</text:span></text:p>
      <text:p text:style-name="P53"><text:span text:style-name="T180"><text:tab/><text:tab/><text:tab/></text:span><text:span text:style-name="T182">double</text:span><text:span text:style-name="T180"> denominator = 2.0 * beta * (beta - R_flat[kN + k]);</text:span></text:p>
      <text:p text:style-name="P53"><text:span text:style-name="T180"><text:tab/><text:tab/><text:tab/></text:span><text:span text:style-name="T182">if</text:span><text:span text:style-name="T180"> (fabs(denominator) &lt; std::</text:span><text:span text:style-name="T183">numeric_limits</text:span><text:span text:style-name="T180">&lt;</text:span><text:span text:style-name="T183">T</text:span><text:span text:style-name="T180">&gt;::epsilon()) </text:span><text:span text:style-name="T121">// eсли знаменатель близок к 0, вектор отражения не нужен</text:span></text:p>
      <text:p text:style-name="P53"><text:span text:style-name="T180"><text:tab/><text:tab/><text:tab/>{</text:span></text:p>
      <text:p text:style-name="P53"><text:span text:style-name="T180"><text:tab/><text:tab/><text:tab/><text:tab/></text:span><text:span text:style-name="T182">continue</text:span><text:span text:style-name="T180">;</text:span></text:p>
      <text:p text:style-name="P53"><text:soft-page-break/><text:span text:style-name="T180"><text:tab/><text:tab/><text:tab/>}</text:span></text:p>
      <text:p text:style-name="P53"><text:span text:style-name="T180"><text:tab/><text:tab/><text:tab/>mu = 1.0 / sqrt(denominator);</text:span></text:p>
      <text:p text:style-name="P103" loext:marker-style-name="T180"/>
      <text:p text:style-name="P53"><text:span text:style-name="T180"><text:tab/><text:tab/><text:tab/></text:span><text:span text:style-name="T121">// count v</text:span></text:p>
      <text:p text:style-name="P53"><text:span text:style-name="T179">#pragma</text:span><text:span text:style-name="T180"> omp parallel </text:span><text:span text:style-name="T182">for</text:span><text:span text:style-name="T180"> num_threads(thread_num)</text:span></text:p>
      <text:p text:style-name="P53"><text:span text:style-name="T180"><text:tab/><text:tab/><text:tab/></text:span><text:span text:style-name="T182">for</text:span><text:span text:style-name="T180"> (</text:span><text:span text:style-name="T182">int</text:span><text:span text:style-name="T180"> i = 0; i &lt; v_length; ++i) {</text:span></text:p>
      <text:p text:style-name="P53"><text:span text:style-name="T180"><text:tab/><text:tab/><text:tab/><text:tab/>v_k[i] = R_col_k[i * N] * mu;</text:span></text:p>
      <text:p text:style-name="P53"><text:span text:style-name="T180"><text:tab/><text:tab/><text:tab/>}</text:span></text:p>
      <text:p text:style-name="P53"><text:span text:style-name="T180"><text:tab/><text:tab/><text:tab/>v_k[0] -= beta * mu;</text:span></text:p>
      <text:p text:style-name="P103" loext:marker-style-name="T180"/>
      <text:p text:style-name="P53"><text:span text:style-name="T180"><text:tab/><text:tab/><text:tab/></text:span><text:span text:style-name="T121">// отражение</text:span></text:p>
      <text:p text:style-name="P53"><text:span text:style-name="T180"><text:tab/><text:tab/><text:tab/></text:span><text:span text:style-name="T121">// R - 2 * v * (v^T * R)</text:span></text:p>
      <text:p text:style-name="P53"><text:span text:style-name="T180"><text:tab/><text:tab/><text:tab/>std::</text:span><text:span text:style-name="T183">vector</text:span><text:span text:style-name="T180">&lt;</text:span><text:span text:style-name="T182">double</text:span><text:span text:style-name="T180">&gt; _2vTR(N - k); </text:span><text:span text:style-name="T121">// предварительно вычисляем v^TR для каждого столбца</text:span></text:p>
      <text:p text:style-name="P53"><text:span text:style-name="T179">#pragma</text:span><text:span text:style-name="T180"> omp parallel </text:span><text:span text:style-name="T182">for</text:span><text:span text:style-name="T180"> num_threads(thread_num)</text:span></text:p>
      <text:p text:style-name="P53"><text:span text:style-name="T180"><text:tab/><text:tab/><text:tab/></text:span><text:span text:style-name="T182">for</text:span><text:span text:style-name="T180"> (</text:span><text:span text:style-name="T183">ptrdiff_t</text:span><text:span text:style-name="T180"> j = k; j &lt; N; ++j) {</text:span></text:p>
      <text:p text:style-name="P53"><text:span text:style-name="T180"><text:tab/><text:tab/><text:tab/><text:tab/></text:span><text:span text:style-name="T183">T</text:span><text:span text:style-name="T180">* R_col_j = &amp;R_flat[kN + j]; </text:span><text:span text:style-name="T121">// начальный элемент для умножения из j-ого столбца R, прибавить строку</text:span></text:p>
      <text:p text:style-name="P53"><text:span text:style-name="T180"><text:tab/><text:tab/><text:tab/><text:tab/></text:span><text:span text:style-name="T182">double</text:span><text:span text:style-name="T180"> vTR = 0.0;</text:span></text:p>
      <text:p text:style-name="P53"><text:span text:style-name="T180"><text:tab/><text:tab/><text:tab/><text:tab/></text:span><text:span text:style-name="T182">for</text:span><text:span text:style-name="T180"> (</text:span><text:span text:style-name="T182">int</text:span><text:span text:style-name="T180"> i = 0; i &lt; v_length; ++i) {</text:span></text:p>
      <text:p text:style-name="P53"><text:span text:style-name="T180"><text:tab/><text:tab/><text:tab/><text:tab/><text:tab/>vTR += v_k[i] * R_col_j[i * N];</text:span></text:p>
      <text:p text:style-name="P53"><text:span text:style-name="T180"><text:tab/><text:tab/><text:tab/><text:tab/>}</text:span></text:p>
      <text:p text:style-name="P53"><text:span text:style-name="T180"><text:tab/><text:tab/><text:tab/><text:tab/>_2vTR</text:span><text:span text:style-name="T184">[</text:span><text:span text:style-name="T180">j - k</text:span><text:span text:style-name="T184">]</text:span><text:span text:style-name="T180"> = 2.0 * vTR;</text:span></text:p>
      <text:p text:style-name="P53"><text:span text:style-name="T180"><text:tab/><text:tab/><text:tab/>}</text:span></text:p>
      <text:p text:style-name="P103" loext:marker-style-name="T180"/>
      <text:p text:style-name="P53"><text:span text:style-name="T180"><text:tab/><text:tab/><text:tab/></text:span><text:span text:style-name="T121">// обновление R</text:span></text:p>
      <text:p text:style-name="P53"><text:span text:style-name="T180"><text:tab/><text:tab/><text:tab/></text:span><text:span text:style-name="T121">// R - v * 2v^TR</text:span></text:p>
      <text:p text:style-name="P53"><text:span text:style-name="T179">#pragma</text:span><text:span text:style-name="T180"> omp parallel </text:span><text:span text:style-name="T182">for</text:span><text:span text:style-name="T180"> num_threads(thread_num)</text:span></text:p>
      <text:p text:style-name="P53"><text:span text:style-name="T180"><text:tab/><text:tab/><text:tab/></text:span><text:span text:style-name="T182">for</text:span><text:span text:style-name="T180"> (</text:span><text:span text:style-name="T183">ptrdiff_t</text:span><text:span text:style-name="T180"> j = k; j &lt; N; ++j) {</text:span></text:p>
      <text:p text:style-name="P53"><text:span text:style-name="T180"><text:tab/><text:tab/><text:tab/><text:tab/></text:span><text:span text:style-name="T182">for</text:span><text:span text:style-name="T180"> (</text:span><text:span text:style-name="T182">int</text:span><text:span text:style-name="T180"> i = 0; i &lt; v_length; ++i) {</text:span></text:p>
      <text:p text:style-name="P53"><text:span text:style-name="T180"><text:tab/><text:tab/><text:tab/><text:tab/><text:tab/></text:span><text:span text:style-name="T183">T</text:span><text:span text:style-name="T180">* R_col_j = &amp;R_flat[kN + j];</text:span></text:p>
      <text:p text:style-name="P53"><text:span text:style-name="T180"><text:tab/><text:tab/><text:tab/><text:tab/><text:tab/>R_col_j[i * N] -= v_k[i] * _2vTR</text:span><text:span text:style-name="T184">[</text:span><text:span text:style-name="T180">j - k</text:span><text:span text:style-name="T184">]</text:span><text:span text:style-name="T180">;</text:span></text:p>
      <text:p text:style-name="P53"><text:span text:style-name="T180"><text:tab/><text:tab/><text:tab/><text:tab/>}</text:span></text:p>
      <text:p text:style-name="P53"><text:span text:style-name="T180"><text:tab/><text:tab/><text:tab/>}</text:span></text:p>
      <text:p text:style-name="P53"><text:span text:style-name="T180"><text:tab/><text:tab/>}</text:span></text:p>
      <text:p text:style-name="P103" loext:marker-style-name="T180"/>
      <text:p text:style-name="P53"><text:span text:style-name="T180"><text:tab/><text:tab/></text:span><text:span text:style-name="T121">// вычисление Q</text:span></text:p>
      <text:p text:style-name="P53"><text:span text:style-name="T180"><text:tab/><text:tab/></text:span><text:span text:style-name="T121">// начать с Q_{N-1} = H_{N-2} * I = I - 2 * v_{N-2} * (v_{N-2}^T * I) и домножать слева на матрицы отражения</text:span></text:p>
      <text:p text:style-name="P53"><text:span text:style-name="T180"><text:tab/><text:tab/></text:span><text:span text:style-name="T121">// Q = H_{1} * ... * (H_{k} * Q_{k-1} ) = H_{1} * ... * (Q_{k-1} - 2 * v_{k} * (v_{k}^T * Q_{k-1})</text:span></text:p>
      <text:p text:style-name="P53"><text:span text:style-name="T180"><text:tab/><text:tab/>Q_flat.assign(N * N, 0.0); </text:span><text:span text:style-name="T121">// создание единичной матрицы</text:span></text:p>
      <text:p text:style-name="P53"><text:span text:style-name="T179">#pragma</text:span><text:span text:style-name="T180"> omp parallel </text:span><text:span text:style-name="T182">for</text:span><text:span text:style-name="T180"> num_threads(thread_num)</text:span></text:p>
      <text:p text:style-name="P53"><text:span text:style-name="T180"><text:tab/><text:tab/></text:span><text:span text:style-name="T182">for</text:span><text:span text:style-name="T180"> (</text:span><text:span text:style-name="T183">ptrdiff_t</text:span><text:span text:style-name="T180"> i = 0; i &lt; N; ++i) {</text:span></text:p>
      <text:p text:style-name="P53"><text:span text:style-name="T180"><text:tab/><text:tab/><text:tab/>Q_flat[i * N + i] = 1.0;</text:span></text:p>
      <text:p text:style-name="P53"><text:span text:style-name="T180"><text:tab/><text:tab/>}</text:span></text:p>
      <text:p text:style-name="P103" loext:marker-style-name="T180"/>
      <text:p text:style-name="P53"><text:span text:style-name="T180"><text:tab/><text:tab/>std::</text:span><text:span text:style-name="T183">vector</text:span><text:span text:style-name="T180">&lt;</text:span><text:span text:style-name="T183">T</text:span><text:span text:style-name="T180">&gt; _2vTQ(N, 0.0);</text:span></text:p>
      <text:p text:style-name="P53"><text:span text:style-name="T180"><text:tab/><text:tab/></text:span><text:span text:style-name="T182">for</text:span><text:span text:style-name="T180"> (</text:span><text:span text:style-name="T183">ptrdiff_t</text:span><text:span text:style-name="T180"> k = N - 2; k &gt;= 0; --k)</text:span></text:p>
      <text:p text:style-name="P53"><text:span text:style-name="T180"><text:tab/><text:tab/>{</text:span></text:p>
      <text:p text:style-name="P53"><text:span text:style-name="T180"><text:tab/><text:tab/><text:tab/></text:span><text:span text:style-name="T183">T</text:span><text:span text:style-name="T180">* v_k = &amp;all_v[k * N]; </text:span><text:span text:style-name="T121">// взятие вектора vk</text:span></text:p>
      <text:p text:style-name="P53"><text:span text:style-name="T180"><text:tab/><text:tab/><text:tab/></text:span><text:span text:style-name="T183">ptrdiff_t</text:span><text:span text:style-name="T180"> v_length = N - k; </text:span><text:span text:style-name="T121">// длина вектора vk</text:span></text:p>
      <text:p text:style-name="P103" loext:marker-style-name="T180"/>
      <text:p text:style-name="P53"><text:span text:style-name="T180"><text:tab/><text:tab/><text:tab/></text:span><text:span text:style-name="T121">// 2v^TQ параллельно по столбцам</text:span></text:p>
      <text:p text:style-name="P53"><text:span text:style-name="T179">#pragma</text:span><text:span text:style-name="T180"> omp parallel </text:span><text:span text:style-name="T182">for</text:span><text:span text:style-name="T180"> num_threads(thread_num)</text:span></text:p>
      <text:p text:style-name="P53"><text:span text:style-name="T180"><text:tab/><text:tab/><text:tab/></text:span><text:span text:style-name="T182">for</text:span><text:span text:style-name="T180"> (</text:span><text:span text:style-name="T183">ptrdiff_t</text:span><text:span text:style-name="T180"> j = 0; j &lt; N; ++j) {</text:span></text:p>
      <text:p text:style-name="P53"><text:span text:style-name="T180"><text:tab/><text:tab/><text:tab/><text:tab/></text:span><text:span text:style-name="T182">double</text:span><text:span text:style-name="T180"> sum = 0.0;</text:span></text:p>
      <text:p text:style-name="P53"><text:span text:style-name="T180"><text:tab/><text:tab/><text:tab/><text:tab/></text:span><text:span text:style-name="T182">for</text:span><text:span text:style-name="T180"> (</text:span><text:span text:style-name="T182">int</text:span><text:span text:style-name="T180"> i = 0; i &lt; v_length; ++i) {</text:span></text:p>
      <text:p text:style-name="P53"><text:span text:style-name="T180"><text:tab/><text:tab/><text:tab/><text:tab/><text:tab/></text:span><text:span text:style-name="T183">ptrdiff_t</text:span><text:span text:style-name="T180"> row = k + i;</text:span></text:p>
      <text:p text:style-name="P53"><text:span text:style-name="T180"><text:tab/><text:tab/><text:tab/><text:tab/><text:tab/>sum += v_k[i] * Q_flat[row * N + j];</text:span></text:p>
      <text:p text:style-name="P53"><text:span text:style-name="T180"><text:tab/><text:tab/><text:tab/><text:tab/>}</text:span></text:p>
      <text:p text:style-name="P53"><text:span text:style-name="T180"><text:tab/><text:tab/><text:tab/><text:tab/>_2vTQ[j] = 2.0 * sum;</text:span></text:p>
      <text:p text:style-name="P53"><text:span text:style-name="T180"><text:tab/><text:tab/><text:tab/>}</text:span></text:p>
      <text:p text:style-name="P103" loext:marker-style-name="T180"/>
      <text:p text:style-name="P53"><text:soft-page-break/><text:span text:style-name="T180"><text:tab/><text:tab/><text:tab/></text:span><text:span text:style-name="T121">// Q - v * 2v^TQ параллельно по строкам</text:span></text:p>
      <text:p text:style-name="P53"><text:span text:style-name="T179">#pragma</text:span><text:span text:style-name="T180"> omp parallel </text:span><text:span text:style-name="T182">for</text:span><text:span text:style-name="T180"> num_threads(thread_num)</text:span></text:p>
      <text:p text:style-name="P53"><text:span text:style-name="T180"><text:tab/><text:tab/><text:tab/></text:span><text:span text:style-name="T182">for</text:span><text:span text:style-name="T180"> (</text:span><text:span text:style-name="T182">int</text:span><text:span text:style-name="T180"> i = 0; i &lt; v_length; ++i) {</text:span></text:p>
      <text:p text:style-name="P53"><text:span text:style-name="T180"><text:tab/><text:tab/><text:tab/><text:tab/></text:span><text:span text:style-name="T183">ptrdiff_t</text:span><text:span text:style-name="T180"> row = k + i;</text:span></text:p>
      <text:p text:style-name="P53"><text:span text:style-name="T180"><text:tab/><text:tab/><text:tab/><text:tab/></text:span><text:span text:style-name="T182">double</text:span><text:span text:style-name="T180"> vi = v_k[i];</text:span></text:p>
      <text:p text:style-name="P53"><text:span text:style-name="T180"><text:tab/><text:tab/><text:tab/><text:tab/></text:span><text:span text:style-name="T183">T</text:span><text:span text:style-name="T180">* Q_row = &amp;Q_flat[row * N];</text:span></text:p>
      <text:p text:style-name="P103" loext:marker-style-name="T180"/>
      <text:p text:style-name="P53"><text:span text:style-name="T180"><text:tab/><text:tab/><text:tab/><text:tab/></text:span><text:span text:style-name="T182">for</text:span><text:span text:style-name="T180"> (</text:span><text:span text:style-name="T183">ptrdiff_t</text:span><text:span text:style-name="T180"> j = 0; j &lt; N; ++j) {</text:span></text:p>
      <text:p text:style-name="P53"><text:span text:style-name="T180"><text:tab/><text:tab/><text:tab/><text:tab/><text:tab/>Q_row[j] -= vi * _2vTQ[j];</text:span></text:p>
      <text:p text:style-name="P53"><text:span text:style-name="T180"><text:tab/><text:tab/><text:tab/><text:tab/>}</text:span></text:p>
      <text:p text:style-name="P53"><text:span text:style-name="T180"><text:tab/><text:tab/><text:tab/>}</text:span></text:p>
      <text:p text:style-name="P53"><text:span text:style-name="T180"><text:tab/><text:tab/>}</text:span></text:p>
      <text:p text:style-name="P103" loext:marker-style-name="T180"/>
      <text:p text:style-name="P53"><text:span text:style-name="T179">#pragma</text:span><text:span text:style-name="T180"> omp parallel </text:span><text:span text:style-name="T182">for</text:span><text:span text:style-name="T180"> num_threads(thread_num) collapse(2)</text:span></text:p>
      <text:p text:style-name="P53"><text:span text:style-name="T180"><text:tab/><text:tab/></text:span><text:span text:style-name="T182">for</text:span><text:span text:style-name="T180"> (</text:span><text:span text:style-name="T183">ptrdiff_t</text:span><text:span text:style-name="T180"> i = 0; i &lt; N; ++i) {</text:span></text:p>
      <text:p text:style-name="P53"><text:span text:style-name="T180"><text:tab/><text:tab/><text:tab/></text:span><text:span text:style-name="T182">for</text:span><text:span text:style-name="T180"> (</text:span><text:span text:style-name="T183">ptrdiff_t</text:span><text:span text:style-name="T180"> j = 0; j &lt; N; ++j) {</text:span></text:p>
      <text:p text:style-name="P53"><text:span text:style-name="T180"><text:tab/><text:tab/><text:tab/><text:tab/></text:span><text:span text:style-name="T179">R</text:span><text:span text:style-name="T180">[i][j] = R_flat[i * N + j];</text:span></text:p>
      <text:p text:style-name="P53"><text:span text:style-name="T180"><text:tab/><text:tab/><text:tab/><text:tab/></text:span><text:span text:style-name="T179">Q</text:span><text:span text:style-name="T180">[i][j] = Q_flat[i * N + j];</text:span></text:p>
      <text:p text:style-name="P53"><text:span text:style-name="T180"><text:tab/><text:tab/><text:tab/>}</text:span></text:p>
      <text:p text:style-name="P53"><text:span text:style-name="T180"><text:tab/><text:tab/>}</text:span></text:p>
      <text:p text:style-name="P53"><text:span text:style-name="T180"><text:tab/>}</text:span></text:p>
      <text:p text:style-name="P53"><text:span text:style-name="T180">};</text:span></text:p>
      <text:p text:style-name="P108" loext:marker-style-name="T187"/>
      <text:p text:style-name="P107"><text:bookmark-start text:name="__RefHeading___Toc2657_713544485_Копия_2"/><text:bookmark-start text:name="_Toc194842675_Копия_1_Копия_1"/>Приложение <text:bookmark-end text:name="_Toc194842675_Копия_1_Копия_1"/>3. <text:span text:style-name="T18">QR-</text:span>разложение с использованием отражений Хаусхолдера, реализация <text:span text:style-name="T18">in-place </text:span><text:span text:style-name="T19">алгоритма</text:span><text:bookmark-end text:name="__RefHeading___Toc2657_713544485_Копия_2"/></text:p>
      <text:p text:style-name="P53"><text:span text:style-name="T179">#pragma</text:span><text:span text:style-name="T180"> </text:span><text:span text:style-name="T179">once</text:span></text:p>
      <text:p text:style-name="P103" loext:marker-style-name="T180"/>
      <text:p text:style-name="P53"><text:span text:style-name="T179">#include</text:span><text:span text:style-name="T180"> </text:span><text:span text:style-name="T181">&lt;vector&gt;</text:span></text:p>
      <text:p text:style-name="P103" loext:marker-style-name="T180"/>
      <text:p text:style-name="P53"><text:span text:style-name="T179">#include</text:span><text:span text:style-name="T180"> </text:span><text:span text:style-name="T181">"../IQRSolver.h"</text:span></text:p>
      <text:p text:style-name="P53"><text:span text:style-name="T179">#include</text:span><text:span text:style-name="T180"> </text:span><text:span text:style-name="T181">"../Matrix/TransposedMatrix.h"</text:span></text:p>
      <text:p text:style-name="P103" loext:marker-style-name="T180"/>
      <text:p text:style-name="P53"><text:span text:style-name="T182">template</text:span><text:span text:style-name="T180"> &lt;</text:span><text:span text:style-name="T182">typename</text:span><text:span text:style-name="T180"> </text:span><text:span text:style-name="T183">T</text:span><text:span text:style-name="T180">&gt;</text:span></text:p>
      <text:p text:style-name="P53"><text:span text:style-name="T182">class</text:span><text:span text:style-name="T180"> </text:span><text:span text:style-name="T183">HouseholderWithNormVInplace</text:span><text:span text:style-name="T180"> : </text:span><text:span text:style-name="T182">public</text:span><text:span text:style-name="T180"> </text:span><text:span text:style-name="T183">IQRSolver</text:span><text:span text:style-name="T180">&lt;</text:span><text:span text:style-name="T183">T</text:span><text:span text:style-name="T180">&gt; {</text:span></text:p>
      <text:p text:style-name="P53"><text:span text:style-name="T182">public</text:span><text:span text:style-name="T180">:</text:span></text:p>
      <text:p text:style-name="P53"><text:span text:style-name="T180"><text:tab/></text:span><text:span text:style-name="T121">// третья версия, на основе второй. v вычисляется проще для уменьшения роста ошибки, нормированный v сохраняется в R</text:span></text:p>
      <text:p text:style-name="P53"><text:span text:style-name="T180"><text:tab/></text:span><text:span text:style-name="T182">virtual</text:span><text:span text:style-name="T180"> </text:span><text:span text:style-name="T182">void</text:span><text:span text:style-name="T180"> QR_decomposition(</text:span></text:p>
      <text:p text:style-name="P53"><text:span text:style-name="T180"><text:tab/><text:tab/></text:span><text:span text:style-name="T182">const</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A</text:span><text:span text:style-name="T180">,</text:span></text:p>
      <text:p text:style-name="P53"><text:span text:style-name="T180"><text:tab/><text:tab/>std::</text:span><text:span text:style-name="T183">vector</text:span><text:span text:style-name="T180">&lt;std::</text:span><text:span text:style-name="T183">vector</text:span><text:span text:style-name="T180">&lt;</text:span><text:span text:style-name="T183">T</text:span><text:span text:style-name="T180">&gt;&gt;&amp; </text:span><text:span text:style-name="T179">Q</text:span><text:span text:style-name="T180">,</text:span></text:p>
      <text:p text:style-name="P53"><text:span text:style-name="T180"><text:tab/><text:tab/>std::</text:span><text:span text:style-name="T183">vector</text:span><text:span text:style-name="T180">&lt;std::</text:span><text:span text:style-name="T183">vector</text:span><text:span text:style-name="T180">&lt;</text:span><text:span text:style-name="T183">T</text:span><text:span text:style-name="T180">&gt;&gt;&amp; </text:span><text:span text:style-name="T179">R</text:span><text:span text:style-name="T180">) </text:span><text:span text:style-name="T182">override</text:span></text:p>
      <text:p text:style-name="P53"><text:span text:style-name="T180"><text:tab/>{</text:span></text:p>
      <text:p text:style-name="P53"><text:span text:style-name="T180"><text:tab/><text:tab/></text:span><text:span text:style-name="T182">const</text:span><text:span text:style-name="T180"> </text:span><text:span text:style-name="T183">size_t</text:span><text:span text:style-name="T180"> N = </text:span><text:span text:style-name="T179">A</text:span><text:span text:style-name="T180">.size();</text:span></text:p>
      <text:p text:style-name="P53"><text:span text:style-name="T180"><text:tab/><text:tab/></text:span><text:span text:style-name="T183">TransposedMatrix</text:span><text:span text:style-name="T180">&lt;</text:span><text:span text:style-name="T183">T</text:span><text:span text:style-name="T180">&gt; A_T(</text:span><text:span text:style-name="T179">A</text:span><text:span text:style-name="T180">), R_T(</text:span><text:span text:style-name="T179">A</text:span><text:span text:style-name="T180">);</text:span></text:p>
      <text:p text:style-name="P53"><text:span text:style-name="T180"><text:tab/><text:tab/></text:span><text:span text:style-name="T183">TransposedMatrix</text:span><text:span text:style-name="T180">&lt;</text:span><text:span text:style-name="T183">T</text:span><text:span text:style-name="T180">&gt; Q_T(N, N, 0.0);</text:span></text:p>
      <text:p text:style-name="P103" loext:marker-style-name="T180"/>
      <text:p text:style-name="P53"><text:span text:style-name="T180"><text:tab/><text:tab/></text:span><text:span text:style-name="T121">// вычисление R</text:span></text:p>
      <text:p text:style-name="P53"><text:span text:style-name="T180"><text:tab/><text:tab/></text:span><text:span text:style-name="T182">for</text:span><text:span text:style-name="T180"> (</text:span><text:span text:style-name="T183">ptrdiff_t</text:span><text:span text:style-name="T180"> k = 0; k &lt; N - 1; ++k) {</text:span></text:p>
      <text:p text:style-name="P53"><text:span text:style-name="T180"><text:tab/><text:tab/><text:tab/></text:span><text:span text:style-name="T182">double</text:span><text:span text:style-name="T180"> tau = 0.0, sigma = 0.0;</text:span></text:p>
      <text:p text:style-name="P103" loext:marker-style-name="T180"/>
      <text:p text:style-name="P53"><text:span text:style-name="T180"><text:tab/><text:tab/><text:tab/></text:span><text:span text:style-name="T121">// вычисление v, tau, sigma</text:span></text:p>
      <text:p text:style-name="P53"><text:span text:style-name="T180"><text:tab/><text:tab/><text:tab/></text:span><text:span text:style-name="T121">// sigma = -sign(Akk) * ||Ak||</text:span></text:p>
      <text:p text:style-name="P53"><text:span text:style-name="T180"><text:tab/><text:tab/><text:tab/></text:span><text:span text:style-name="T121">// v = Ak - sigma*(1,0...0)</text:span></text:p>
      <text:p text:style-name="P53"><text:span text:style-name="T180"><text:tab/><text:tab/><text:tab/></text:span><text:span text:style-name="T121">// tau = 2 / (vTv)</text:span></text:p>
      <text:p text:style-name="P103" loext:marker-style-name="T180"/>
      <text:p text:style-name="P53"><text:span text:style-name="T180"><text:tab/><text:tab/><text:tab/></text:span><text:span text:style-name="T182">double</text:span><text:span text:style-name="T180"> sum = 0.0;</text:span></text:p>
      <text:p text:style-name="P53"><text:span text:style-name="T179">#pragma</text:span><text:span text:style-name="T180"> omp parallel </text:span><text:span text:style-name="T182">for</text:span><text:span text:style-name="T180"> num_threads(thread_num) reduction(+:sum)</text:span></text:p>
      <text:p text:style-name="P53"><text:span text:style-name="T180"><text:tab/><text:tab/><text:tab/></text:span><text:span text:style-name="T182">for</text:span><text:span text:style-name="T180"> (</text:span><text:span text:style-name="T183">ptrdiff_t</text:span><text:span text:style-name="T180"> i = k; i &lt; N; ++i) {</text:span></text:p>
      <text:p text:style-name="P53"><text:span text:style-name="T180"><text:tab/><text:tab/><text:tab/><text:tab/>sum += R_T.At(i, k) * R_T.At(i, k);</text:span></text:p>
      <text:p text:style-name="P53"><text:span text:style-name="T180"><text:tab/><text:tab/><text:tab/>}</text:span></text:p>
      <text:p text:style-name="P53"><text:span text:style-name="T180"><text:tab/><text:tab/><text:tab/></text:span><text:span text:style-name="T182">double</text:span><text:span text:style-name="T180"> norm = sqrt(sum);</text:span></text:p>
      <text:p text:style-name="P53"><text:span text:style-name="T180"><text:tab/><text:tab/><text:tab/>sigma = -sign(R_T.At(k, k)) * norm;</text:span></text:p>
      <text:p text:style-name="P103" loext:marker-style-name="T180"/>
      <text:p text:style-name="P53"><text:span text:style-name="T180"><text:tab/><text:tab/><text:tab/></text:span><text:span text:style-name="T121">// вычисляем v, храним без k нулей в начале</text:span></text:p>
      <text:p text:style-name="P53"><text:span text:style-name="T180"><text:tab/><text:tab/><text:tab/>std::</text:span><text:span text:style-name="T183">vector</text:span><text:span text:style-name="T180">&lt;</text:span><text:span text:style-name="T183">T</text:span><text:span text:style-name="T180">&gt; v(N - k);</text:span></text:p>
      <text:p text:style-name="P53"><text:span text:style-name="T180"><text:tab/><text:tab/><text:tab/></text:span><text:span text:style-name="T182">for</text:span><text:span text:style-name="T180"> (</text:span><text:span text:style-name="T183">ptrdiff_t</text:span><text:span text:style-name="T180"> i = 1; i &lt; N - k; ++i) {</text:span></text:p>
      <text:p text:style-name="P53"><text:span text:style-name="T180"><text:tab/><text:tab/><text:tab/><text:tab/></text:span><text:span text:style-name="T183">ptrdiff_t</text:span><text:span text:style-name="T180"> row = k + i;</text:span></text:p>
      <text:p text:style-name="P53"><text:span text:style-name="T180"><text:tab/><text:tab/><text:tab/><text:tab/>v[i] = R_T.At(row, k);</text:span></text:p>
      <text:p text:style-name="P53"><text:span text:style-name="T180"><text:tab/><text:tab/><text:tab/>}</text:span></text:p>
      <text:p text:style-name="P53"><text:span text:style-name="T180"><text:tab/><text:tab/><text:tab/>v[0] = R_T.At(k, k) - sigma;</text:span></text:p>
      <text:p text:style-name="P103" loext:marker-style-name="T180"/>
      <text:p text:style-name="P53"><text:span text:style-name="T180"><text:tab/><text:tab/><text:tab/></text:span><text:span text:style-name="T182">double</text:span><text:span text:style-name="T180"> denominator = 0.0;</text:span></text:p>
      <text:p text:style-name="P53"><text:span text:style-name="T179">#pragma</text:span><text:span text:style-name="T180"> omp parallel </text:span><text:span text:style-name="T182">for</text:span><text:span text:style-name="T180"> num_threads(thread_num) reduction(+:denominator)</text:span></text:p>
      <text:p text:style-name="P53"><text:span text:style-name="T180"><text:tab/><text:tab/><text:tab/></text:span><text:span text:style-name="T182">for</text:span><text:span text:style-name="T180"> (</text:span><text:span text:style-name="T183">ptrdiff_t</text:span><text:span text:style-name="T180"> i = 0; i &lt; N - k; ++i) {</text:span></text:p>
      <text:p text:style-name="P53"><text:span text:style-name="T180"><text:tab/><text:tab/><text:tab/><text:tab/>denominator += v[i] * v[i];</text:span></text:p>
      <text:p text:style-name="P53"><text:span text:style-name="T180"><text:tab/><text:tab/><text:tab/>}</text:span></text:p>
      <text:p text:style-name="P103" loext:marker-style-name="T180"/>
      <text:p text:style-name="P53"><text:span text:style-name="T180"><text:tab/><text:tab/><text:tab/></text:span><text:span text:style-name="T182">if</text:span><text:span text:style-name="T180"> (denominator != 0) {</text:span></text:p>
      <text:p text:style-name="P53"><text:span text:style-name="T180"><text:tab/><text:tab/><text:tab/><text:tab/>tau = 2.0 / denominator;</text:span></text:p>
      <text:p text:style-name="P53"><text:span text:style-name="T180"><text:tab/><text:tab/><text:tab/>}</text:span></text:p>
      <text:p text:style-name="P103" loext:marker-style-name="T180"/>
      <text:p text:style-name="P53"><text:span text:style-name="T180"><text:tab/><text:tab/><text:tab/></text:span><text:span text:style-name="T121">// сохраняем нормированный v для Q (v[0]=1) в R под диагональю</text:span></text:p>
      <text:p text:style-name="P53"><text:span text:style-name="T180"><text:tab/><text:tab/><text:tab/></text:span><text:span text:style-name="T182">if</text:span><text:span text:style-name="T180"> (v[0] != 0) {</text:span></text:p>
      <text:p text:style-name="P53"><text:span text:style-name="T180"><text:tab/><text:tab/><text:tab/><text:tab/></text:span><text:span text:style-name="T182">double</text:span><text:span text:style-name="T180"> scale = 1.0 / v[0];</text:span></text:p>
      <text:p text:style-name="P53"><text:span text:style-name="T179">#pragma</text:span><text:span text:style-name="T180"> omp parallel </text:span><text:span text:style-name="T182">for</text:span><text:span text:style-name="T180"> num_threads(thread_num)</text:span></text:p>
      <text:p text:style-name="P53"><text:soft-page-break/><text:span text:style-name="T180"><text:tab/><text:tab/><text:tab/><text:tab/></text:span><text:span text:style-name="T182">for</text:span><text:span text:style-name="T180"> (</text:span><text:span text:style-name="T183">ptrdiff_t</text:span><text:span text:style-name="T180"> i = 1; i &lt; N - k; ++i) {</text:span></text:p>
      <text:p text:style-name="P53"><text:span text:style-name="T180"><text:tab/><text:tab/><text:tab/><text:tab/><text:tab/></text:span><text:span text:style-name="T183">ptrdiff_t</text:span><text:span text:style-name="T180"> row = k + i;</text:span></text:p>
      <text:p text:style-name="P53"><text:span text:style-name="T180"><text:tab/><text:tab/><text:tab/><text:tab/><text:tab/>R_T.At(row, k) = v[i] * scale;</text:span></text:p>
      <text:p text:style-name="P53"><text:span text:style-name="T180"><text:tab/><text:tab/><text:tab/><text:tab/>}</text:span></text:p>
      <text:p text:style-name="P53"><text:span text:style-name="T180"><text:tab/><text:tab/><text:tab/>}</text:span></text:p>
      <text:p text:style-name="P53"><text:span text:style-name="T180"><text:tab/><text:tab/><text:tab/>R_T.At(k, k) = sigma;</text:span></text:p>
      <text:p text:style-name="P103" loext:marker-style-name="T180"/>
      <text:p text:style-name="P53"><text:span text:style-name="T180"><text:tab/><text:tab/><text:tab/></text:span><text:span text:style-name="T121">// применяем отражения к правой части</text:span></text:p>
      <text:p text:style-name="P53"><text:span text:style-name="T179">#pragma</text:span><text:span text:style-name="T180"> omp parallel </text:span><text:span text:style-name="T182">for</text:span><text:span text:style-name="T180"> num_threads(thread_num)</text:span></text:p>
      <text:p text:style-name="P53"><text:span text:style-name="T180"><text:tab/><text:tab/><text:tab/></text:span><text:span text:style-name="T182">for</text:span><text:span text:style-name="T180"> (</text:span><text:span text:style-name="T183">ptrdiff_t</text:span><text:span text:style-name="T180"> col = k + 1; col &lt; N; ++col) {</text:span></text:p>
      <text:p text:style-name="P53"><text:span text:style-name="T180"><text:tab/><text:tab/><text:tab/><text:tab/></text:span><text:span text:style-name="T182">double</text:span><text:span text:style-name="T180"> vTR = 0;</text:span></text:p>
      <text:p text:style-name="P53"><text:span text:style-name="T180"><text:tab/><text:tab/><text:tab/><text:tab/></text:span><text:span text:style-name="T121">// Вычисляем vTR = vT * столбец col</text:span></text:p>
      <text:p text:style-name="P53"><text:span text:style-name="T180"><text:tab/><text:tab/><text:tab/><text:tab/></text:span><text:span text:style-name="T182">for</text:span><text:span text:style-name="T180"> (</text:span><text:span text:style-name="T183">ptrdiff_t</text:span><text:span text:style-name="T180"> i = 0; i &lt; N - k; ++i) {</text:span></text:p>
      <text:p text:style-name="P53"><text:span text:style-name="T180"><text:tab/><text:tab/><text:tab/><text:tab/><text:tab/></text:span><text:span text:style-name="T183">ptrdiff_t</text:span><text:span text:style-name="T180"> row = k + i;</text:span></text:p>
      <text:p text:style-name="P53"><text:span text:style-name="T180"><text:tab/><text:tab/><text:tab/><text:tab/><text:tab/>vTR += v[i] * R_T.At(row, col);</text:span></text:p>
      <text:p text:style-name="P53"><text:span text:style-name="T180"><text:tab/><text:tab/><text:tab/><text:tab/>}</text:span></text:p>
      <text:p text:style-name="P103" loext:marker-style-name="T180"/>
      <text:p text:style-name="P53"><text:span text:style-name="T180"><text:tab/><text:tab/><text:tab/><text:tab/></text:span><text:span text:style-name="T182">double</text:span><text:span text:style-name="T180"> scale = tau * vTR;</text:span></text:p>
      <text:p text:style-name="P103" loext:marker-style-name="T180"/>
      <text:p text:style-name="P53"><text:span text:style-name="T180"><text:tab/><text:tab/><text:tab/><text:tab/></text:span><text:span text:style-name="T121">// обновляем столбец col: R[:,col] -= v * scale</text:span></text:p>
      <text:p text:style-name="P53"><text:span text:style-name="T180"><text:tab/><text:tab/><text:tab/><text:tab/></text:span><text:span text:style-name="T182">for</text:span><text:span text:style-name="T180"> (</text:span><text:span text:style-name="T183">ptrdiff_t</text:span><text:span text:style-name="T180"> i = 0; i &lt; N - k; ++i) {</text:span></text:p>
      <text:p text:style-name="P53"><text:span text:style-name="T180"><text:tab/><text:tab/><text:tab/><text:tab/><text:tab/></text:span><text:span text:style-name="T183">ptrdiff_t</text:span><text:span text:style-name="T180"> row = k + i;</text:span></text:p>
      <text:p text:style-name="P53"><text:span text:style-name="T180"><text:tab/><text:tab/><text:tab/><text:tab/><text:tab/>R_T.At(row, col) -= v[i] * scale;</text:span></text:p>
      <text:p text:style-name="P53"><text:span text:style-name="T180"><text:tab/><text:tab/><text:tab/><text:tab/>}</text:span></text:p>
      <text:p text:style-name="P53"><text:span text:style-name="T180"><text:tab/><text:tab/><text:tab/>}</text:span></text:p>
      <text:p text:style-name="P53"><text:span text:style-name="T180"><text:tab/><text:tab/>}</text:span></text:p>
      <text:p text:style-name="P103" loext:marker-style-name="T180"/>
      <text:p text:style-name="P53"><text:span text:style-name="T180"><text:tab/><text:tab/></text:span><text:span text:style-name="T121">// вычисление Q</text:span></text:p>
      <text:p text:style-name="P53"><text:span text:style-name="T180"><text:tab/><text:tab/></text:span><text:span text:style-name="T182">for</text:span><text:span text:style-name="T180"> (</text:span><text:span text:style-name="T183">ptrdiff_t</text:span><text:span text:style-name="T180"> i = 0; i &lt; N; ++i) {</text:span></text:p>
      <text:p text:style-name="P53"><text:span text:style-name="T180"><text:tab/><text:tab/><text:tab/>Q_T.At(i, i) = 1.0;</text:span></text:p>
      <text:p text:style-name="P53"><text:span text:style-name="T180"><text:tab/><text:tab/>}</text:span></text:p>
      <text:p text:style-name="P103" loext:marker-style-name="T180"/>
      <text:p text:style-name="P53"><text:span text:style-name="T180"><text:tab/><text:tab/></text:span><text:span text:style-name="T121">// применяем отражения в обратном порядке</text:span></text:p>
      <text:p text:style-name="P53"><text:span text:style-name="T180"><text:tab/><text:tab/></text:span><text:span text:style-name="T182">for</text:span><text:span text:style-name="T180"> (</text:span><text:span text:style-name="T183">ptrdiff_t</text:span><text:span text:style-name="T180"> k = N - 2; k &gt;= 0; --k) {</text:span></text:p>
      <text:p text:style-name="P53"><text:span text:style-name="T180"><text:tab/><text:tab/><text:tab/></text:span><text:span text:style-name="T121">// берём вектор v из R</text:span></text:p>
      <text:p text:style-name="P53"><text:span text:style-name="T180"><text:tab/><text:tab/><text:tab/></text:span><text:span text:style-name="T183">ptrdiff_t</text:span><text:span text:style-name="T180"> m = N - k; <text:s/></text:span><text:span text:style-name="T121">// размер v</text:span></text:p>
      <text:p text:style-name="P53"><text:span text:style-name="T180"><text:tab/><text:tab/><text:tab/>std::</text:span><text:span text:style-name="T183">vector</text:span><text:span text:style-name="T180">&lt;</text:span><text:span text:style-name="T183">T</text:span><text:span text:style-name="T180">&gt; v(m);</text:span></text:p>
      <text:p text:style-name="P53"><text:span text:style-name="T180"><text:tab/><text:tab/><text:tab/>v[0] = 1.0;</text:span></text:p>
      <text:p text:style-name="P103" loext:marker-style-name="T180"/>
      <text:p text:style-name="P53"><text:span text:style-name="T180"><text:tab/><text:tab/><text:tab/></text:span><text:span text:style-name="T182">for</text:span><text:span text:style-name="T180"> (</text:span><text:span text:style-name="T183">ptrdiff_t</text:span><text:span text:style-name="T180"> i = 1; i &lt; m; ++i) {</text:span></text:p>
      <text:p text:style-name="P53"><text:span text:style-name="T180"><text:tab/><text:tab/><text:tab/><text:tab/></text:span><text:span text:style-name="T183">ptrdiff_t</text:span><text:span text:style-name="T180"> row = k + i;</text:span></text:p>
      <text:p text:style-name="P53"><text:span text:style-name="T180"><text:tab/><text:tab/><text:tab/><text:tab/>v[i] = R_T.At(row, k);</text:span></text:p>
      <text:p text:style-name="P53"><text:span text:style-name="T180"><text:tab/><text:tab/><text:tab/><text:tab/>R_T.At(row, k) = 0; <text:s/></text:span><text:span text:style-name="T121">// очищаем</text:span></text:p>
      <text:p text:style-name="P53"><text:span text:style-name="T180"><text:tab/><text:tab/><text:tab/>}</text:span></text:p>
      <text:p text:style-name="P103" loext:marker-style-name="T180"/>
      <text:p text:style-name="P53"><text:span text:style-name="T180"><text:tab/><text:tab/><text:tab/></text:span><text:span text:style-name="T121">// tau = 2 / (vTv)</text:span></text:p>
      <text:p text:style-name="P53"><text:span text:style-name="T180"><text:tab/><text:tab/><text:tab/></text:span><text:span text:style-name="T182">double</text:span><text:span text:style-name="T180"> sum = 1.0; </text:span><text:span text:style-name="T121">// v[0] = 1</text:span></text:p>
      <text:p text:style-name="P53"><text:span text:style-name="T179">#pragma</text:span><text:span text:style-name="T180"> omp parallel </text:span><text:span text:style-name="T182">for</text:span><text:span text:style-name="T180"> num_threads(thread_num) reduction(+:sum)</text:span></text:p>
      <text:p text:style-name="P53"><text:span text:style-name="T180"><text:tab/><text:tab/><text:tab/></text:span><text:span text:style-name="T182">for</text:span><text:span text:style-name="T180"> (</text:span><text:span text:style-name="T183">ptrdiff_t</text:span><text:span text:style-name="T180"> i = 1; i &lt; m; ++i) {</text:span></text:p>
      <text:p text:style-name="P53"><text:span text:style-name="T180"><text:tab/><text:tab/><text:tab/><text:tab/>sum += v[i] * v[i];</text:span></text:p>
      <text:p text:style-name="P53"><text:span text:style-name="T180"><text:tab/><text:tab/><text:tab/>}</text:span></text:p>
      <text:p text:style-name="P53"><text:span text:style-name="T180"><text:tab/><text:tab/><text:tab/></text:span><text:span text:style-name="T182">double</text:span><text:span text:style-name="T180"> tau = 2.0 / sum;</text:span></text:p>
      <text:p text:style-name="P103" loext:marker-style-name="T180"/>
      <text:p text:style-name="P53"><text:span text:style-name="T180"><text:tab/><text:tab/><text:tab/></text:span><text:span text:style-name="T121">// H = I - tau * v * vT к Q[k:N, :]</text:span></text:p>
      <text:p text:style-name="P53"><text:span text:style-name="T179">#pragma</text:span><text:span text:style-name="T180"> omp parallel </text:span><text:span text:style-name="T182">for</text:span><text:span text:style-name="T180"> num_threads(thread_num)</text:span></text:p>
      <text:p text:style-name="P53"><text:span text:style-name="T180"><text:tab/><text:tab/><text:tab/></text:span><text:span text:style-name="T182">for</text:span><text:span text:style-name="T180"> (</text:span><text:span text:style-name="T183">ptrdiff_t</text:span><text:span text:style-name="T180"> j = 0; j &lt; N; ++j) {</text:span></text:p>
      <text:p text:style-name="P53"><text:span text:style-name="T180"><text:tab/><text:tab/><text:tab/><text:tab/></text:span><text:span text:style-name="T121">// vTQ = vT * Q[k:N, col]</text:span></text:p>
      <text:p text:style-name="P53"><text:span text:style-name="T180"><text:tab/><text:tab/><text:tab/><text:tab/></text:span><text:span text:style-name="T182">double</text:span><text:span text:style-name="T180"> vTQ = Q_T.At(k, j); </text:span><text:span text:style-name="T121">// v[0] = 1</text:span></text:p>
      <text:p text:style-name="P103" loext:marker-style-name="T180"/>
      <text:p text:style-name="P53"><text:span text:style-name="T180"><text:tab/><text:tab/><text:tab/><text:tab/></text:span><text:span text:style-name="T182">for</text:span><text:span text:style-name="T180"> (</text:span><text:span text:style-name="T183">ptrdiff_t</text:span><text:span text:style-name="T180"> i = 1; i &lt; m; ++i) {</text:span></text:p>
      <text:p text:style-name="P53"><text:span text:style-name="T180"><text:tab/><text:tab/><text:tab/><text:tab/><text:tab/></text:span><text:span text:style-name="T183">ptrdiff_t</text:span><text:span text:style-name="T180"> row = k + i;</text:span></text:p>
      <text:p text:style-name="P53"><text:span text:style-name="T180"><text:tab/><text:tab/><text:tab/><text:tab/><text:tab/>vTQ += v[i] * Q_T.At(row, j);</text:span></text:p>
      <text:p text:style-name="P53"><text:span text:style-name="T180"><text:tab/><text:tab/><text:tab/><text:tab/>}</text:span></text:p>
      <text:p text:style-name="P53"><text:span text:style-name="T180"><text:tab/><text:tab/><text:tab/><text:tab/>vTQ *= tau;</text:span></text:p>
      <text:p text:style-name="P103" loext:marker-style-name="T180"><text:soft-page-break/></text:p>
      <text:p text:style-name="P53"><text:span text:style-name="T180"><text:tab/><text:tab/><text:tab/><text:tab/></text:span><text:span text:style-name="T121">// Q[k][j] -= vTQ * v</text:span></text:p>
      <text:p text:style-name="P53"><text:span text:style-name="T180"><text:tab/><text:tab/><text:tab/><text:tab/>Q_T.At(k, j) -= vTQ; <text:s/></text:span><text:span text:style-name="T121">// v[0] = 1</text:span></text:p>
      <text:p text:style-name="P103" loext:marker-style-name="T180"/>
      <text:p text:style-name="P53"><text:span text:style-name="T180"><text:tab/><text:tab/><text:tab/><text:tab/></text:span><text:span text:style-name="T182">for</text:span><text:span text:style-name="T180"> (</text:span><text:span text:style-name="T183">ptrdiff_t</text:span><text:span text:style-name="T180"> i = 1; i &lt; m; ++i) {</text:span></text:p>
      <text:p text:style-name="P53"><text:span text:style-name="T180"><text:tab/><text:tab/><text:tab/><text:tab/><text:tab/></text:span><text:span text:style-name="T183">ptrdiff_t</text:span><text:span text:style-name="T180"> row = k + i;</text:span></text:p>
      <text:p text:style-name="P53"><text:span text:style-name="T180"><text:tab/><text:tab/><text:tab/><text:tab/><text:tab/>Q_T.At(row, j) -= vTQ * v[i];</text:span></text:p>
      <text:p text:style-name="P53"><text:span text:style-name="T180"><text:tab/><text:tab/><text:tab/><text:tab/>}</text:span></text:p>
      <text:p text:style-name="P53"><text:span text:style-name="T180"><text:tab/><text:tab/><text:tab/>}</text:span></text:p>
      <text:p text:style-name="P53"><text:span text:style-name="T180"><text:tab/><text:tab/>}</text:span></text:p>
      <text:p text:style-name="P103" loext:marker-style-name="T180"/>
      <text:p text:style-name="P53"><text:span text:style-name="T180"><text:tab/><text:tab/></text:span><text:span text:style-name="T121">// перевести в обычную матрицу</text:span></text:p>
      <text:p text:style-name="P53"><text:span text:style-name="T180"><text:tab/><text:tab/></text:span><text:span text:style-name="T179">Q</text:span><text:span text:style-name="T180"> = Q_T.Transpose();</text:span></text:p>
      <text:p text:style-name="P53"><text:span text:style-name="T180"><text:tab/><text:tab/></text:span><text:span text:style-name="T179">R</text:span><text:span text:style-name="T180"> = R_T.Transpose();</text:span></text:p>
      <text:p text:style-name="P53"><text:span text:style-name="T180"><text:tab/>}</text:span></text:p>
      <text:p text:style-name="P53"><text:span text:style-name="T182">private</text:span><text:span text:style-name="T180">:</text:span></text:p>
      <text:p text:style-name="P53"><text:span text:style-name="T180"><text:tab/></text:span><text:span text:style-name="T182">static</text:span><text:span text:style-name="T180"> </text:span><text:span text:style-name="T182">double</text:span><text:span text:style-name="T180"> sign(</text:span><text:span text:style-name="T182">double</text:span><text:span text:style-name="T180"> </text:span><text:span text:style-name="T179">x</text:span><text:span text:style-name="T180">)</text:span></text:p>
      <text:p text:style-name="P53"><text:span text:style-name="T180"><text:tab/>{</text:span></text:p>
      <text:p text:style-name="P53"><text:span text:style-name="T180"><text:tab/><text:tab/></text:span><text:span text:style-name="T182">if</text:span><text:span text:style-name="T180"> (</text:span><text:span text:style-name="T179">x</text:span><text:span text:style-name="T180"> &gt; 0.0)</text:span></text:p>
      <text:p text:style-name="P53"><text:span text:style-name="T180"><text:tab/><text:tab/><text:tab/></text:span><text:span text:style-name="T182">return</text:span><text:span text:style-name="T180"> 1.0;</text:span></text:p>
      <text:p text:style-name="P53"><text:span text:style-name="T180"><text:tab/><text:tab/></text:span><text:span text:style-name="T182">if</text:span><text:span text:style-name="T180"> (</text:span><text:span text:style-name="T179">x</text:span><text:span text:style-name="T180"> &lt; 0.0)</text:span></text:p>
      <text:p text:style-name="P53"><text:span text:style-name="T180"><text:tab/><text:tab/><text:tab/></text:span><text:span text:style-name="T182">return</text:span><text:span text:style-name="T180"> -1.0;</text:span></text:p>
      <text:p text:style-name="P53"><text:span text:style-name="T180"><text:tab/><text:tab/></text:span><text:span text:style-name="T182">return</text:span><text:span text:style-name="T180"> 1.0;</text:span></text:p>
      <text:p text:style-name="P53"><text:span text:style-name="T180"><text:tab/>}</text:span></text:p>
      <text:p text:style-name="P53"><text:span text:style-name="T180">};</text:span></text:p>
      <text:p text:style-name="P109" loext:marker-style-name="T179"/>
      <text:p text:style-name="P107"><text:bookmark-start text:name="__RefHeading___Toc2657_713544485_Копия_3"/><text:bookmark-start text:name="_Toc194842675_Копия_1_Копия_1_Копия_1"/>Приложение <text:bookmark-end text:name="_Toc194842675_Копия_1_Копия_1_Копия_1"/>4. <text:span text:style-name="T18">QR-</text:span>разложение с использованием вращений Гивенса, первая реализация<text:bookmark-end text:name="__RefHeading___Toc2657_713544485_Копия_3"/></text:p>
      <text:p text:style-name="P53"><text:span text:style-name="T179">#pragma</text:span><text:span text:style-name="T180"> </text:span><text:span text:style-name="T179">once</text:span></text:p>
      <text:p text:style-name="P103" loext:marker-style-name="T180"/>
      <text:p text:style-name="P53"><text:span text:style-name="T179">#include</text:span><text:span text:style-name="T180"> </text:span><text:span text:style-name="T181">&lt;vector&gt;</text:span></text:p>
      <text:p text:style-name="P53"><text:span text:style-name="T179">#include</text:span><text:span text:style-name="T180"> </text:span><text:span text:style-name="T181">&lt;cmath&gt;</text:span></text:p>
      <text:p text:style-name="P103" loext:marker-style-name="T180"/>
      <text:p text:style-name="P53"><text:span text:style-name="T179">#include</text:span><text:span text:style-name="T180"> </text:span><text:span text:style-name="T181">"../IQRSolver.h"</text:span></text:p>
      <text:p text:style-name="P103" loext:marker-style-name="T180"/>
      <text:p text:style-name="P53"><text:span text:style-name="T182">template</text:span><text:span text:style-name="T180"> &lt;</text:span><text:span text:style-name="T182">typename</text:span><text:span text:style-name="T180"> </text:span><text:span text:style-name="T183">T</text:span><text:span text:style-name="T180">&gt;</text:span></text:p>
      <text:p text:style-name="P53"><text:span text:style-name="T182">class</text:span><text:span text:style-name="T180"> </text:span><text:span text:style-name="T183">GivensMethodBasic</text:span><text:span text:style-name="T180"> : </text:span><text:span text:style-name="T182">public</text:span><text:span text:style-name="T180"> </text:span><text:span text:style-name="T183">IQRSolver</text:span><text:span text:style-name="T180">&lt;</text:span><text:span text:style-name="T183">T</text:span><text:span text:style-name="T180">&gt; {</text:span></text:p>
      <text:p text:style-name="P53"><text:span text:style-name="T182">public</text:span><text:span text:style-name="T180">:</text:span></text:p>
      <text:p text:style-name="P53"><text:span text:style-name="T180"><text:tab/></text:span><text:span text:style-name="T182">virtual</text:span><text:span text:style-name="T180"> </text:span><text:span text:style-name="T182">void</text:span><text:span text:style-name="T180"> QR_decomposition(</text:span><text:span text:style-name="T182">const</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A</text:span><text:span text:style-name="T180">,</text:span></text:p>
      <text:p text:style-name="P53"><text:span text:style-name="T180"><text:tab/><text:tab/>std::</text:span><text:span text:style-name="T183">vector</text:span><text:span text:style-name="T180">&lt;std::</text:span><text:span text:style-name="T183">vector</text:span><text:span text:style-name="T180">&lt;</text:span><text:span text:style-name="T183">T</text:span><text:span text:style-name="T180">&gt;&gt;&amp; </text:span><text:span text:style-name="T179">Q</text:span><text:span text:style-name="T180">,</text:span></text:p>
      <text:p text:style-name="P53"><text:span text:style-name="T180"><text:tab/><text:tab/>std::</text:span><text:span text:style-name="T183">vector</text:span><text:span text:style-name="T180">&lt;std::</text:span><text:span text:style-name="T183">vector</text:span><text:span text:style-name="T180">&lt;</text:span><text:span text:style-name="T183">T</text:span><text:span text:style-name="T180">&gt;&gt;&amp; </text:span><text:span text:style-name="T179">R</text:span><text:span text:style-name="T180">) </text:span><text:span text:style-name="T182">override</text:span></text:p>
      <text:p text:style-name="P53"><text:span text:style-name="T180"><text:tab/>{</text:span></text:p>
      <text:p text:style-name="P53"><text:span text:style-name="T180"><text:tab/><text:tab/></text:span><text:span text:style-name="T182">auto</text:span><text:span text:style-name="T180"> N = </text:span><text:span text:style-name="T179">A</text:span><text:span text:style-name="T180">.size();</text:span></text:p>
      <text:p text:style-name="P53"><text:span text:style-name="T180"><text:tab/><text:tab/></text:span><text:span text:style-name="T121">// матрица Q будет хранится транспонированной</text:span></text:p>
      <text:p text:style-name="P53"><text:span text:style-name="T180"><text:tab/><text:tab/></text:span><text:span text:style-name="T179">Q</text:span><text:span text:style-name="T180"> = std::</text:span><text:span text:style-name="T183">vector</text:span><text:span text:style-name="T180">&lt;std::</text:span><text:span text:style-name="T183">vector</text:span><text:span text:style-name="T180">&lt;</text:span><text:span text:style-name="T183">T</text:span><text:span text:style-name="T180">&gt;&gt;(N, std::</text:span><text:span text:style-name="T183">vector</text:span><text:span text:style-name="T180">&lt;</text:span><text:span text:style-name="T183">T</text:span><text:span text:style-name="T180">&gt;(N, 0));</text:span></text:p>
      <text:p text:style-name="P53"><text:span text:style-name="T180"><text:tab/><text:tab/></text:span><text:span text:style-name="T179">R</text:span><text:span text:style-name="T180"> = </text:span><text:span text:style-name="T179">A</text:span><text:span text:style-name="T180">;</text:span></text:p>
      <text:p text:style-name="P103" loext:marker-style-name="T180"/>
      <text:p text:style-name="P53"><text:span text:style-name="T180"><text:tab/><text:tab/></text:span><text:span text:style-name="T182">for</text:span><text:span text:style-name="T180"> (</text:span><text:span text:style-name="T182">int</text:span><text:span text:style-name="T180"> i = 0; i &lt; N; ++i)</text:span></text:p>
      <text:p text:style-name="P53"><text:span text:style-name="T180"><text:tab/><text:tab/><text:tab/></text:span><text:span text:style-name="T179">Q</text:span><text:span text:style-name="T180">[i][i] = </text:span><text:span text:style-name="T183">T</text:span><text:span text:style-name="T180">(1);</text:span></text:p>
      <text:p text:style-name="P103" loext:marker-style-name="T180"/>
      <text:p text:style-name="P53"><text:span text:style-name="T180"><text:tab/><text:tab/></text:span><text:span text:style-name="T182">for</text:span><text:span text:style-name="T180"> (</text:span><text:span text:style-name="T182">int</text:span><text:span text:style-name="T180"> j = 0; j &lt; N - 1; ++j) {</text:span></text:p>
      <text:p text:style-name="P53"><text:span text:style-name="T180"><text:tab/><text:tab/><text:tab/></text:span><text:span text:style-name="T182">for</text:span><text:span text:style-name="T180"> (</text:span><text:span text:style-name="T182">int</text:span><text:span text:style-name="T180"> i = j + 1; i &lt; N; ++i) {</text:span></text:p>
      <text:p text:style-name="P53"><text:span text:style-name="T180"><text:tab/><text:tab/><text:tab/><text:tab/></text:span><text:span text:style-name="T121">// приведение к double для точных проверок и вычислений</text:span></text:p>
      <text:p text:style-name="P53"><text:span text:style-name="T180"><text:tab/><text:tab/><text:tab/><text:tab/></text:span><text:span text:style-name="T182">double</text:span><text:span text:style-name="T180"> Rjj = </text:span><text:span text:style-name="T182">static_cast</text:span><text:span text:style-name="T180">&lt;</text:span><text:span text:style-name="T182">double</text:span><text:span text:style-name="T180">&gt;(</text:span><text:span text:style-name="T179">R</text:span><text:span text:style-name="T180">[j][j]);</text:span></text:p>
      <text:p text:style-name="P53"><text:span text:style-name="T180"><text:tab/><text:tab/><text:tab/><text:tab/></text:span><text:span text:style-name="T182">double</text:span><text:span text:style-name="T180"> Rij = </text:span><text:span text:style-name="T182">static_cast</text:span><text:span text:style-name="T180">&lt;</text:span><text:span text:style-name="T182">double</text:span><text:span text:style-name="T180">&gt;(</text:span><text:span text:style-name="T179">R</text:span><text:span text:style-name="T180">[i][j]);</text:span></text:p>
      <text:p text:style-name="P103" loext:marker-style-name="T180"/>
      <text:p text:style-name="P53"><text:span text:style-name="T180"><text:tab/><text:tab/><text:tab/><text:tab/></text:span><text:span text:style-name="T121">// проверки малости (пороги для double)</text:span></text:p>
      <text:p text:style-name="P53"><text:span text:style-name="T180"><text:tab/><text:tab/><text:tab/><text:tab/></text:span><text:span text:style-name="T182">if</text:span><text:span text:style-name="T180"> (std::abs(Rij) &lt; 1e-11)</text:span></text:p>
      <text:p text:style-name="P53"><text:span text:style-name="T180"><text:tab/><text:tab/><text:tab/><text:tab/><text:tab/></text:span><text:span text:style-name="T182">continue</text:span><text:span text:style-name="T180">;</text:span></text:p>
      <text:p text:style-name="P103" loext:marker-style-name="T180"/>
      <text:p text:style-name="P53"><text:span text:style-name="T180"><text:tab/><text:tab/><text:tab/><text:tab/></text:span><text:span text:style-name="T182">double</text:span><text:span text:style-name="T180"> sqrt_val = std::sqrt(Rjj * Rjj + Rij * Rij);</text:span></text:p>
      <text:p text:style-name="P53"><text:span text:style-name="T180"><text:tab/><text:tab/><text:tab/><text:tab/></text:span><text:span text:style-name="T182">if</text:span><text:span text:style-name="T180"> (std::abs(sqrt_val) &lt; 1e-11)</text:span></text:p>
      <text:p text:style-name="P53"><text:span text:style-name="T180"><text:tab/><text:tab/><text:tab/><text:tab/><text:tab/></text:span><text:span text:style-name="T182">continue</text:span><text:span text:style-name="T180">;</text:span></text:p>
      <text:p text:style-name="P103" loext:marker-style-name="T180"/>
      <text:p text:style-name="P53"><text:span text:style-name="T180"><text:tab/><text:tab/><text:tab/><text:tab/></text:span><text:span text:style-name="T182">double</text:span><text:span text:style-name="T180"> c = Rjj / sqrt_val;</text:span></text:p>
      <text:p text:style-name="P53"><text:span text:style-name="T180"><text:tab/><text:tab/><text:tab/><text:tab/></text:span><text:span text:style-name="T182">double</text:span><text:span text:style-name="T180"> s = -Rij / sqrt_val;</text:span></text:p>
      <text:p text:style-name="P103" loext:marker-style-name="T180"/>
      <text:p text:style-name="P53"><text:span text:style-name="T180"><text:tab/><text:tab/><text:tab/><text:tab/></text:span><text:span text:style-name="T121">// вычисление матрицы R путём вращения строк</text:span></text:p>
      <text:p text:style-name="P53"><text:span text:style-name="T179">#pragma</text:span><text:span text:style-name="T180"> omp parallel </text:span><text:span text:style-name="T182">for</text:span><text:span text:style-name="T180"> num_threads(thread_num) </text:span><text:span text:style-name="T182">if</text:span><text:span text:style-name="T180"> (N &gt;= 1000)</text:span></text:p>
      <text:p text:style-name="P53"><text:span text:style-name="T180"><text:tab/><text:tab/><text:tab/><text:tab/></text:span><text:span text:style-name="T182">for</text:span><text:span text:style-name="T180"> (</text:span><text:span text:style-name="T182">int</text:span><text:span text:style-name="T180"> k = j; k &lt; N; ++k) {</text:span></text:p>
      <text:p text:style-name="P53"><text:span text:style-name="T180"><text:tab/><text:tab/><text:tab/><text:tab/><text:tab/></text:span><text:span text:style-name="T183">T</text:span><text:span text:style-name="T180"> temp = </text:span><text:span text:style-name="T182">static_cast</text:span><text:span text:style-name="T180">&lt;</text:span><text:span text:style-name="T183">T</text:span><text:span text:style-name="T180">&gt;(</text:span><text:span text:style-name="T179">R</text:span><text:span text:style-name="T180">[j][k] * c - </text:span><text:span text:style-name="T179">R</text:span><text:span text:style-name="T180">[i][k] * s);</text:span></text:p>
      <text:p text:style-name="P53"><text:span text:style-name="T180"><text:tab/><text:tab/><text:tab/><text:tab/><text:tab/></text:span><text:span text:style-name="T179">R</text:span><text:span text:style-name="T180">[i][k] = </text:span><text:span text:style-name="T182">static_cast</text:span><text:span text:style-name="T180">&lt;</text:span><text:span text:style-name="T183">T</text:span><text:span text:style-name="T180">&gt;(</text:span><text:span text:style-name="T179">R</text:span><text:span text:style-name="T180">[j][k] * s + </text:span><text:span text:style-name="T179">R</text:span><text:span text:style-name="T180">[i][k] * c);</text:span></text:p>
      <text:p text:style-name="P53"><text:span text:style-name="T180"><text:tab/><text:tab/><text:tab/><text:tab/><text:tab/></text:span><text:span text:style-name="T179">R</text:span><text:span text:style-name="T180">[j][k] = temp;</text:span></text:p>
      <text:p text:style-name="P53"><text:span text:style-name="T180"><text:tab/><text:tab/><text:tab/><text:tab/>}</text:span></text:p>
      <text:p text:style-name="P103" loext:marker-style-name="T180"/>
      <text:p text:style-name="P53"><text:span text:style-name="T180"><text:tab/><text:tab/><text:tab/><text:tab/></text:span><text:span text:style-name="T121">// сохранение коэффициентов вращения</text:span></text:p>
      <text:p text:style-name="P53"><text:span text:style-name="T180"><text:tab/><text:tab/><text:tab/><text:tab/></text:span><text:span text:style-name="T182">double</text:span><text:span text:style-name="T180"> tau = s / (1.0 + c);</text:span></text:p>
      <text:p text:style-name="P53"><text:span text:style-name="T180"><text:tab/><text:tab/><text:tab/><text:tab/></text:span><text:span text:style-name="T179">R</text:span><text:span text:style-name="T180">[i][j] = </text:span><text:span text:style-name="T182">static_cast</text:span><text:span text:style-name="T180">&lt;</text:span><text:span text:style-name="T183">T</text:span><text:span text:style-name="T180">&gt;(tau);</text:span></text:p>
      <text:p text:style-name="P53"><text:span text:style-name="T180"><text:tab/><text:tab/><text:tab/>}</text:span></text:p>
      <text:p text:style-name="P53"><text:span text:style-name="T180"><text:tab/><text:tab/>}</text:span></text:p>
      <text:p text:style-name="P103" loext:marker-style-name="T180"/>
      <text:p text:style-name="P53"><text:span text:style-name="T180"><text:tab/><text:tab/></text:span><text:span text:style-name="T182">for</text:span><text:span text:style-name="T180"> (</text:span><text:span text:style-name="T182">int</text:span><text:span text:style-name="T180"> j = 0; j &lt; N - 1; ++j)</text:span></text:p>
      <text:p text:style-name="P53"><text:span text:style-name="T180"><text:tab/><text:tab/>{</text:span></text:p>
      <text:p text:style-name="P53"><text:span text:style-name="T180"><text:tab/><text:tab/><text:tab/></text:span><text:span text:style-name="T182">for</text:span><text:span text:style-name="T180"> (</text:span><text:span text:style-name="T182">int</text:span><text:span text:style-name="T180"> i = j + 1; i &lt; N; ++i)</text:span></text:p>
      <text:p text:style-name="P53"><text:span text:style-name="T180"><text:tab/><text:tab/><text:tab/>{</text:span></text:p>
      <text:p text:style-name="P53"><text:span text:style-name="T180"><text:tab/><text:tab/><text:tab/><text:tab/></text:span><text:span text:style-name="T182">if</text:span><text:span text:style-name="T180"> (std::abs(</text:span><text:span text:style-name="T179">R</text:span><text:span text:style-name="T180">[i][j]) &lt; 1e-11) </text:span><text:span text:style-name="T182">continue</text:span><text:span text:style-name="T180">;</text:span></text:p>
      <text:p text:style-name="P53"><text:span text:style-name="T180"><text:tab/><text:tab/><text:tab/><text:tab/></text:span><text:span text:style-name="T121">// восстановление коэффициентов вращения</text:span></text:p>
      <text:p text:style-name="P53"><text:span text:style-name="T180"><text:tab/><text:tab/><text:tab/><text:tab/></text:span><text:span text:style-name="T182">double</text:span><text:span text:style-name="T180"> tau = </text:span><text:span text:style-name="T182">static_cast</text:span><text:span text:style-name="T180">&lt;</text:span><text:span text:style-name="T182">double</text:span><text:span text:style-name="T180">&gt;(</text:span><text:span text:style-name="T179">R</text:span><text:span text:style-name="T180">[i][j]);</text:span></text:p>
      <text:p text:style-name="P53"><text:soft-page-break/><text:span text:style-name="T180"><text:tab/><text:tab/><text:tab/><text:tab/></text:span><text:span text:style-name="T182">double</text:span><text:span text:style-name="T180"> tau2 = tau * tau;</text:span></text:p>
      <text:p text:style-name="P53"><text:span text:style-name="T180"><text:tab/><text:tab/><text:tab/><text:tab/></text:span><text:span text:style-name="T182">double</text:span><text:span text:style-name="T180"> denom = 1.0 + tau2;</text:span></text:p>
      <text:p text:style-name="P53"><text:span text:style-name="T180"><text:tab/><text:tab/><text:tab/><text:tab/></text:span><text:span text:style-name="T182">double</text:span><text:span text:style-name="T180"> c = (1.0 - tau2) / denom;</text:span></text:p>
      <text:p text:style-name="P53"><text:span text:style-name="T180"><text:tab/><text:tab/><text:tab/><text:tab/></text:span><text:span text:style-name="T182">double</text:span><text:span text:style-name="T180"> s = 2.0 * tau / denom;</text:span></text:p>
      <text:p text:style-name="P103" loext:marker-style-name="T180"/>
      <text:p text:style-name="P53"><text:span text:style-name="T180"><text:tab/><text:tab/><text:tab/><text:tab/></text:span><text:span text:style-name="T121">// вычисление матрицы Q_T путём вращения строк</text:span></text:p>
      <text:p text:style-name="P53"><text:span text:style-name="T179">#pragma</text:span><text:span text:style-name="T180"> omp parallel </text:span><text:span text:style-name="T182">for</text:span><text:span text:style-name="T180"> num_threads(thread_num) </text:span><text:span text:style-name="T182">if</text:span><text:span text:style-name="T180"> (N &gt;= 1000)</text:span></text:p>
      <text:p text:style-name="P53"><text:span text:style-name="T180"><text:tab/><text:tab/><text:tab/><text:tab/></text:span><text:span text:style-name="T182">for</text:span><text:span text:style-name="T180"> (</text:span><text:span text:style-name="T182">int</text:span><text:span text:style-name="T180"> k = 0; k &lt; N; ++k)</text:span></text:p>
      <text:p text:style-name="P53"><text:span text:style-name="T180"><text:tab/><text:tab/><text:tab/><text:tab/>{</text:span><text:span text:style-name="T121">// обращение к элементам транспонированной матрицы Q</text:span></text:p>
      <text:p text:style-name="P53"><text:span text:style-name="T180"><text:tab/><text:tab/><text:tab/><text:tab/><text:tab/></text:span><text:span text:style-name="T183">T</text:span><text:span text:style-name="T180"> temp = </text:span><text:span text:style-name="T182">static_cast</text:span><text:span text:style-name="T180">&lt;</text:span><text:span text:style-name="T183">T</text:span><text:span text:style-name="T180">&gt;(c * </text:span><text:span text:style-name="T179">Q</text:span><text:span text:style-name="T180">[j][k] - s * </text:span><text:span text:style-name="T179">Q</text:span><text:span text:style-name="T180">[i][k]);</text:span></text:p>
      <text:p text:style-name="P53"><text:span text:style-name="T180"><text:tab/><text:tab/><text:tab/><text:tab/><text:tab/></text:span><text:span text:style-name="T179">Q</text:span><text:span text:style-name="T180">[i][k] = </text:span><text:span text:style-name="T182">static_cast</text:span><text:span text:style-name="T180">&lt;</text:span><text:span text:style-name="T183">T</text:span><text:span text:style-name="T180">&gt;(s * </text:span><text:span text:style-name="T179">Q</text:span><text:span text:style-name="T180">[j][k] + c * </text:span><text:span text:style-name="T179">Q</text:span><text:span text:style-name="T180">[i][k]);</text:span></text:p>
      <text:p text:style-name="P53"><text:span text:style-name="T180"><text:tab/><text:tab/><text:tab/><text:tab/><text:tab/></text:span><text:span text:style-name="T179">Q</text:span><text:span text:style-name="T180">[j][k] = temp;</text:span></text:p>
      <text:p text:style-name="P53"><text:span text:style-name="T180"><text:tab/><text:tab/><text:tab/><text:tab/>}</text:span></text:p>
      <text:p text:style-name="P53"><text:span text:style-name="T180"><text:tab/><text:tab/><text:tab/><text:tab/></text:span><text:span text:style-name="T179">R</text:span><text:span text:style-name="T180">[i][j] = </text:span><text:span text:style-name="T183">T</text:span><text:span text:style-name="T180">(0);</text:span></text:p>
      <text:p text:style-name="P53"><text:span text:style-name="T180"><text:tab/><text:tab/><text:tab/>}</text:span></text:p>
      <text:p text:style-name="P53"><text:span text:style-name="T180"><text:tab/><text:tab/>}</text:span></text:p>
      <text:p text:style-name="P53"><text:span text:style-name="T180"><text:tab/><text:tab/></text:span><text:span text:style-name="T121">// транспонирование</text:span></text:p>
      <text:p text:style-name="P53"><text:span text:style-name="T180"><text:tab/><text:tab/></text:span><text:span text:style-name="T182">for</text:span><text:span text:style-name="T180"> (</text:span><text:span text:style-name="T182">int</text:span><text:span text:style-name="T180"> i = 0; i &lt; N; ++i)</text:span></text:p>
      <text:p text:style-name="P53"><text:span text:style-name="T180"><text:tab/><text:tab/>{</text:span></text:p>
      <text:p text:style-name="P53"><text:span text:style-name="T180"><text:tab/><text:tab/><text:tab/></text:span><text:span text:style-name="T182">for</text:span><text:span text:style-name="T180"> (</text:span><text:span text:style-name="T182">int</text:span><text:span text:style-name="T180"> j = 0; j &lt; i; ++j)</text:span></text:p>
      <text:p text:style-name="P53"><text:span text:style-name="T180"><text:tab/><text:tab/><text:tab/><text:tab/>std::swap(</text:span><text:span text:style-name="T179">Q</text:span><text:span text:style-name="T180">[i][j], </text:span><text:span text:style-name="T179">Q</text:span><text:span text:style-name="T180">[j][i]);</text:span></text:p>
      <text:p text:style-name="P53"><text:span text:style-name="T180"><text:tab/><text:tab/>}</text:span></text:p>
      <text:p text:style-name="P53"><text:span text:style-name="T180"><text:tab/>}</text:span></text:p>
      <text:p text:style-name="P53"><text:span text:style-name="T180">};</text:span></text:p>
      <text:p text:style-name="P110"/>
      <text:p text:style-name="P107"><text:bookmark-start text:name="__RefHeading___Toc2657_713544485_Копия_4"/><text:bookmark-start text:name="_Toc194842675_Копия_1_Копия_1_Копия_1_Ко"/>Приложение <text:bookmark-end text:name="_Toc194842675_Копия_1_Копия_1_Копия_1_Ко"/>5. <text:span text:style-name="T18">QR-</text:span>разложение с использованием вращений Гивенса, <text:span text:style-name="T18">Q </text:span><text:span text:style-name="T19">и </text:span><text:span text:style-name="T18">R </text:span><text:span text:style-name="T19">в одной структуре данных</text:span><text:bookmark-end text:name="__RefHeading___Toc2657_713544485_Копия_4"/></text:p>
      <text:p text:style-name="P53"><text:span text:style-name="T179">#pragma</text:span><text:span text:style-name="T180"> </text:span><text:span text:style-name="T179">once</text:span></text:p>
      <text:p text:style-name="P103" loext:marker-style-name="T180"/>
      <text:p text:style-name="P53"><text:span text:style-name="T179">#include</text:span><text:span text:style-name="T180"> </text:span><text:span text:style-name="T181">&lt;vector&gt;</text:span></text:p>
      <text:p text:style-name="P53"><text:span text:style-name="T179">#include</text:span><text:span text:style-name="T180"> </text:span><text:span text:style-name="T181">&lt;cmath&gt;</text:span></text:p>
      <text:p text:style-name="P103" loext:marker-style-name="T180"/>
      <text:p text:style-name="P53"><text:span text:style-name="T179">#include</text:span><text:span text:style-name="T180"> </text:span><text:span text:style-name="T181">"../IQRSolver.h"</text:span></text:p>
      <text:p text:style-name="P53"><text:span text:style-name="T179">#include</text:span><text:span text:style-name="T180"> </text:span><text:span text:style-name="T181">"math.h"</text:span></text:p>
      <text:p text:style-name="P103" loext:marker-style-name="T180"/>
      <text:p text:style-name="P53"><text:span text:style-name="T182">template</text:span><text:span text:style-name="T180"> &lt;</text:span><text:span text:style-name="T182">typename</text:span><text:span text:style-name="T180"> </text:span><text:span text:style-name="T183">T</text:span><text:span text:style-name="T180">&gt;</text:span></text:p>
      <text:p text:style-name="P53"><text:span text:style-name="T182">class</text:span><text:span text:style-name="T180"> </text:span><text:span text:style-name="T183">GivensQRInOneStruct</text:span><text:span text:style-name="T180"> : </text:span><text:span text:style-name="T182">public</text:span><text:span text:style-name="T180"> </text:span><text:span text:style-name="T183">IQRSolver</text:span><text:span text:style-name="T180">&lt;</text:span><text:span text:style-name="T183">T</text:span><text:span text:style-name="T180">&gt; {</text:span></text:p>
      <text:p text:style-name="P53"><text:span text:style-name="T182">public</text:span><text:span text:style-name="T180">:</text:span></text:p>
      <text:p text:style-name="P53"><text:span text:style-name="T180"><text:tab/></text:span><text:span text:style-name="T121">// оптимизированная версия. уменьшены обращения к памяти. QR хранятся в одной структуре, каждый элемент попарно рядом в памяти. Q записана по столбцам, R -- по строкам.</text:span></text:p>
      <text:p text:style-name="P53"><text:span text:style-name="T180"><text:tab/></text:span><text:span text:style-name="T182">virtual</text:span><text:span text:style-name="T180"> </text:span><text:span text:style-name="T182">void</text:span><text:span text:style-name="T180"> QR_decomposition(</text:span><text:span text:style-name="T182">const</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A</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Q</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R</text:span><text:span text:style-name="T180">) </text:span><text:span text:style-name="T182">override</text:span></text:p>
      <text:p text:style-name="P53"><text:span text:style-name="T180"><text:tab/>{</text:span></text:p>
      <text:p text:style-name="P53"><text:span text:style-name="T180"><text:tab/><text:tab/></text:span><text:span text:style-name="T182">auto</text:span><text:span text:style-name="T180"> N = </text:span><text:span text:style-name="T179">A</text:span><text:span text:style-name="T180">.size();</text:span></text:p>
      <text:p text:style-name="P53"><text:span text:style-name="T180"><text:tab/><text:tab/></text:span><text:span text:style-name="T183">QRMatrix</text:span><text:span text:style-name="T180">&lt;</text:span><text:span text:style-name="T183">T</text:span><text:span text:style-name="T180">&gt; qr(</text:span><text:span text:style-name="T179">A</text:span><text:span text:style-name="T180">);</text:span></text:p>
      <text:p text:style-name="P103" loext:marker-style-name="T180"/>
      <text:p text:style-name="P53"><text:span text:style-name="T180"><text:tab/><text:tab/></text:span><text:span text:style-name="T182">for</text:span><text:span text:style-name="T180"> (</text:span><text:span text:style-name="T182">auto</text:span><text:span text:style-name="T180"> j = 0; j &lt; N - 1; j++)</text:span></text:p>
      <text:p text:style-name="P53"><text:span text:style-name="T180"><text:tab/><text:tab/>{ </text:span><text:span text:style-name="T121">// зануляем весь столбец j</text:span></text:p>
      <text:p text:style-name="P53"><text:span text:style-name="T180"><text:tab/><text:tab/><text:tab/></text:span><text:span text:style-name="T182">for</text:span><text:span text:style-name="T180"> (</text:span><text:span text:style-name="T182">auto</text:span><text:span text:style-name="T180"> i = j + 1; i &lt; N; i++)</text:span></text:p>
      <text:p text:style-name="P53"><text:span text:style-name="T180"><text:tab/><text:tab/><text:tab/>{ </text:span><text:span text:style-name="T121">// под главной диагональю</text:span></text:p>
      <text:p text:style-name="P53"><text:span text:style-name="T180"><text:tab/><text:tab/><text:tab/><text:tab/></text:span><text:span text:style-name="T182">double</text:span><text:span text:style-name="T180"> Rjj = qr.RAt(j, j);</text:span></text:p>
      <text:p text:style-name="P53"><text:span text:style-name="T180"><text:tab/><text:tab/><text:tab/><text:tab/></text:span><text:span text:style-name="T182">double</text:span><text:span text:style-name="T180"> Rij = qr.RAt(i, j);</text:span></text:p>
      <text:p text:style-name="P103" loext:marker-style-name="T180"/>
      <text:p text:style-name="P53"><text:span text:style-name="T180"><text:tab/><text:tab/><text:tab/><text:tab/></text:span><text:span text:style-name="T182">if</text:span><text:span text:style-name="T180"> (std::abs(Rij) &lt; 1e-11 * std::max(std::abs(Rjj), 1.0)) {</text:span></text:p>
      <text:p text:style-name="P53"><text:span text:style-name="T180"><text:tab/><text:tab/><text:tab/><text:tab/><text:tab/></text:span><text:span text:style-name="T182">continue</text:span><text:span text:style-name="T180">; </text:span><text:span text:style-name="T121">// относительные чисал</text:span></text:p>
      <text:p text:style-name="P53"><text:span text:style-name="T180"><text:tab/><text:tab/><text:tab/><text:tab/>}</text:span></text:p>
      <text:p text:style-name="P103" loext:marker-style-name="T180"/>
      <text:p text:style-name="P53"><text:span text:style-name="T180"><text:tab/><text:tab/><text:tab/><text:tab/></text:span><text:span text:style-name="T182">if</text:span><text:span text:style-name="T180"> (std::abs(Rij) &lt; 1e-11 * std::abs(Rjj)) { </text:span><text:span text:style-name="T121">// R[i][j] пренебрежимо мал по сравнению с R[j][j]<text:tab/><text:tab/><text:tab/><text:tab/><text:tab/></text:span></text:p>
      <text:p text:style-name="P53"><text:span text:style-name="T180"><text:tab/><text:tab/><text:tab/><text:tab/><text:tab/></text:span><text:span text:style-name="T182">continue</text:span><text:span text:style-name="T180">;</text:span></text:p>
      <text:p text:style-name="P53"><text:span text:style-name="T180"><text:tab/><text:tab/><text:tab/><text:tab/>}</text:span></text:p>
      <text:p text:style-name="P103" loext:marker-style-name="T180"/>
      <text:p text:style-name="P53"><text:span text:style-name="T180"><text:tab/><text:tab/><text:tab/><text:tab/></text:span><text:span text:style-name="T182">if</text:span><text:span text:style-name="T180"> (std::abs(Rij) &lt; 1e-11) { </text:span><text:span text:style-name="T121">// уже 0</text:span></text:p>
      <text:p text:style-name="P53"><text:span text:style-name="T180"><text:tab/><text:tab/><text:tab/><text:tab/><text:tab/></text:span><text:span text:style-name="T182">continue</text:span><text:span text:style-name="T180">;</text:span></text:p>
      <text:p text:style-name="P53"><text:span text:style-name="T180"><text:tab/><text:tab/><text:tab/><text:tab/>}</text:span></text:p>
      <text:p text:style-name="P103" loext:marker-style-name="T180"/>
      <text:p text:style-name="P53"><text:span text:style-name="T180"><text:tab/><text:tab/><text:tab/><text:tab/></text:span><text:span text:style-name="T182">auto</text:span><text:span text:style-name="T180"> sqrt = std::sqrt(Rjj * Rjj + Rij * Rij);</text:span></text:p>
      <text:p text:style-name="P53"><text:span text:style-name="T180"><text:tab/><text:tab/><text:tab/><text:tab/></text:span><text:span text:style-name="T182">if</text:span><text:span text:style-name="T180"> (std::abs(sqrt) &lt; 1e-11) { </text:span><text:span text:style-name="T121">// для корректировки ошибки игнорируется малый знаменатель</text:span></text:p>
      <text:p text:style-name="P53"><text:span text:style-name="T180"><text:tab/><text:tab/><text:tab/><text:tab/><text:tab/></text:span><text:span text:style-name="T182">continue</text:span><text:span text:style-name="T180">;</text:span></text:p>
      <text:p text:style-name="P53"><text:span text:style-name="T180"><text:tab/><text:tab/><text:tab/><text:tab/>}</text:span></text:p>
      <text:p text:style-name="P53"><text:span text:style-name="T180"><text:tab/><text:tab/><text:tab/><text:tab/></text:span><text:span text:style-name="T182">double</text:span><text:span text:style-name="T180"> c = Rjj / sqrt, s = -Rij / sqrt;</text:span></text:p>
      <text:p text:style-name="P103" loext:marker-style-name="T180"/>
      <text:p text:style-name="P53"><text:span text:style-name="T179">#pragma</text:span><text:span text:style-name="T180"> omp parallel </text:span><text:span text:style-name="T182">for</text:span><text:span text:style-name="T180"> num_threads(thread_num) </text:span><text:span text:style-name="T182">if</text:span><text:span text:style-name="T180"> (N &gt;= 1000)</text:span></text:p>
      <text:p text:style-name="P53"><text:span text:style-name="T180"><text:tab/><text:tab/><text:tab/><text:tab/></text:span><text:span text:style-name="T182">for</text:span><text:span text:style-name="T180"> (</text:span><text:span text:style-name="T182">auto</text:span><text:span text:style-name="T180"> k = 0; k &lt; N; k++)</text:span></text:p>
      <text:p text:style-name="P53"><text:span text:style-name="T180"><text:tab/><text:tab/><text:tab/><text:tab/>{</text:span></text:p>
      <text:p text:style-name="P53"><text:span text:style-name="T180"><text:tab/><text:tab/><text:tab/><text:tab/><text:tab/></text:span><text:span text:style-name="T182">if</text:span><text:span text:style-name="T180"> (k &gt;= j)</text:span></text:p>
      <text:p text:style-name="P53"><text:span text:style-name="T180"><text:tab/><text:tab/><text:tab/><text:tab/><text:tab/>{</text:span><text:span text:style-name="T121">// меняются только две строки -- i и j</text:span></text:p>
      <text:p text:style-name="P53"><text:span text:style-name="T180"><text:tab/><text:tab/><text:tab/><text:tab/><text:tab/><text:tab/></text:span><text:span text:style-name="T182">auto</text:span><text:span text:style-name="T180"> temp = qr.RAt(j, k) * c - qr.RAt(i, k) * s;</text:span></text:p>
      <text:p text:style-name="P53"><text:span text:style-name="T180"><text:tab/><text:tab/><text:tab/><text:tab/><text:tab/><text:tab/>qr.RAt(i, k) = qr.RAt(j, k) * s + qr.RAt(i, k) * c;</text:span></text:p>
      <text:p text:style-name="P53"><text:span text:style-name="T180"><text:tab/><text:tab/><text:tab/><text:tab/><text:tab/><text:tab/>qr.RAt(j, k) = temp;</text:span></text:p>
      <text:p text:style-name="P53"><text:span text:style-name="T180"><text:tab/><text:tab/><text:tab/><text:tab/><text:tab/>}</text:span></text:p>
      <text:p text:style-name="P103" loext:marker-style-name="T180"/>
      <text:p text:style-name="P53"><text:span text:style-name="T180"><text:tab/><text:tab/><text:tab/><text:tab/><text:tab/></text:span><text:span text:style-name="T121">// меняются только два столбца -- i и j</text:span></text:p>
      <text:p text:style-name="P53"><text:span text:style-name="T180"><text:tab/><text:tab/><text:tab/><text:tab/><text:tab/></text:span><text:span text:style-name="T182">auto</text:span><text:span text:style-name="T180"> temp = c * qr.QAt(k, j) - s * qr.QAt(k, i);</text:span></text:p>
      <text:p text:style-name="P53"><text:soft-page-break/><text:span text:style-name="T180"><text:tab/><text:tab/><text:tab/><text:tab/><text:tab/>qr.QAt(k, i) = s * qr.QAt(k, j) + c * qr.QAt(k, i);</text:span></text:p>
      <text:p text:style-name="P53"><text:span text:style-name="T180"><text:tab/><text:tab/><text:tab/><text:tab/><text:tab/>qr.QAt(k, j) = temp;</text:span></text:p>
      <text:p text:style-name="P53"><text:span text:style-name="T180"><text:tab/><text:tab/><text:tab/><text:tab/>}</text:span></text:p>
      <text:p text:style-name="P53"><text:span text:style-name="T180"><text:tab/><text:tab/><text:tab/>}</text:span></text:p>
      <text:p text:style-name="P53"><text:span text:style-name="T180"><text:tab/><text:tab/>}</text:span></text:p>
      <text:p text:style-name="P103" loext:marker-style-name="T180"/>
      <text:p text:style-name="P53"><text:span text:style-name="T180"><text:tab/><text:tab/></text:span><text:span text:style-name="T179">R</text:span><text:span text:style-name="T180"> = </text:span><text:span text:style-name="T179">Q</text:span><text:span text:style-name="T180"> = std::</text:span><text:span text:style-name="T183">vector</text:span><text:span text:style-name="T180">&lt;std::</text:span><text:span text:style-name="T183">vector</text:span><text:span text:style-name="T180">&lt;</text:span><text:span text:style-name="T183">T</text:span><text:span text:style-name="T180">&gt;&gt;(N, std::</text:span><text:span text:style-name="T183">vector</text:span><text:span text:style-name="T180">&lt;</text:span><text:span text:style-name="T183">T</text:span><text:span text:style-name="T180">&gt;(N));</text:span></text:p>
      <text:p text:style-name="P53"><text:span text:style-name="T179">#pragma</text:span><text:span text:style-name="T180"> omp parallel </text:span><text:span text:style-name="T182">for</text:span><text:span text:style-name="T180"> num_threads(thread_num) </text:span><text:span text:style-name="T182">if</text:span><text:span text:style-name="T180"> (N &gt;= 1000)</text:span></text:p>
      <text:p text:style-name="P53"><text:span text:style-name="T180"><text:tab/><text:tab/></text:span><text:span text:style-name="T182">for</text:span><text:span text:style-name="T180"> (</text:span><text:span text:style-name="T182">int</text:span><text:span text:style-name="T180"> i = 0; i &lt; N; ++i)</text:span></text:p>
      <text:p text:style-name="P53"><text:span text:style-name="T180"><text:tab/><text:tab/>{</text:span></text:p>
      <text:p text:style-name="P53"><text:span text:style-name="T180"><text:tab/><text:tab/><text:tab/></text:span><text:span text:style-name="T182">for</text:span><text:span text:style-name="T180"> (</text:span><text:span text:style-name="T182">int</text:span><text:span text:style-name="T180"> j = 0; j &lt; N; ++j)</text:span></text:p>
      <text:p text:style-name="P53"><text:span text:style-name="T180"><text:tab/><text:tab/><text:tab/>{</text:span></text:p>
      <text:p text:style-name="P53"><text:span text:style-name="T180"><text:tab/><text:tab/><text:tab/><text:tab/></text:span><text:span text:style-name="T179">R</text:span><text:span text:style-name="T180">[i][j] = qr.RAt(i, j);</text:span></text:p>
      <text:p text:style-name="P53"><text:span text:style-name="T180"><text:tab/><text:tab/><text:tab/><text:tab/></text:span><text:span text:style-name="T179">Q</text:span><text:span text:style-name="T180">[i][j] = qr.QAt(i, j);</text:span></text:p>
      <text:p text:style-name="P53"><text:span text:style-name="T180"><text:tab/><text:tab/><text:tab/>}</text:span></text:p>
      <text:p text:style-name="P53"><text:span text:style-name="T180"><text:tab/><text:tab/>}</text:span></text:p>
      <text:p text:style-name="P53"><text:span text:style-name="T180"><text:tab/>}</text:span></text:p>
      <text:p text:style-name="P103" loext:marker-style-name="T180"/>
      <text:p text:style-name="P53"><text:span text:style-name="T182">private</text:span><text:span text:style-name="T180">:</text:span></text:p>
      <text:p text:style-name="P53"><text:span text:style-name="T180"><text:tab/></text:span><text:span text:style-name="T182">template</text:span><text:span text:style-name="T180"> &lt;</text:span><text:span text:style-name="T182">class</text:span><text:span text:style-name="T180"> </text:span><text:span text:style-name="T183">T</text:span><text:span text:style-name="T180">&gt;</text:span></text:p>
      <text:p text:style-name="P53"><text:span text:style-name="T180"><text:tab/></text:span><text:span text:style-name="T182">class</text:span><text:span text:style-name="T180"> </text:span><text:span text:style-name="T183">QRMatrix</text:span></text:p>
      <text:p text:style-name="P53"><text:span text:style-name="T180"><text:tab/>{</text:span></text:p>
      <text:p text:style-name="P53"><text:span text:style-name="T180"><text:tab/></text:span><text:span text:style-name="T182">public</text:span><text:span text:style-name="T180">:</text:span></text:p>
      <text:p text:style-name="P53"><text:span text:style-name="T180"><text:tab/><text:tab/>QRMatrix(</text:span><text:span text:style-name="T182">const</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A</text:span><text:span text:style-name="T180">)</text:span></text:p>
      <text:p text:style-name="P53"><text:span text:style-name="T180"><text:tab/><text:tab/><text:tab/>: _data(</text:span><text:span text:style-name="T179">A</text:span><text:span text:style-name="T180">.size()* </text:span><text:span text:style-name="T179">A</text:span><text:span text:style-name="T180">.size())</text:span></text:p>
      <text:p text:style-name="P53"><text:span text:style-name="T180"><text:tab/><text:tab/><text:tab/>, N(</text:span><text:span text:style-name="T179">A</text:span><text:span text:style-name="T180">.size())</text:span></text:p>
      <text:p text:style-name="P53"><text:span text:style-name="T180"><text:tab/><text:tab/>{</text:span></text:p>
      <text:p text:style-name="P53"><text:span text:style-name="T179">#pragma</text:span><text:span text:style-name="T180"> omp parallel </text:span><text:span text:style-name="T182">for</text:span><text:span text:style-name="T180"> num_threads(thread_num) </text:span><text:span text:style-name="T182">if</text:span><text:span text:style-name="T180"> (N &gt;= 1000)</text:span></text:p>
      <text:p text:style-name="P53"><text:span text:style-name="T180"><text:tab/><text:tab/><text:tab/></text:span><text:span text:style-name="T182">for</text:span><text:span text:style-name="T180"> (</text:span><text:span text:style-name="T182">int</text:span><text:span text:style-name="T180"> i = 0; i &lt; N; ++i)</text:span></text:p>
      <text:p text:style-name="P53"><text:span text:style-name="T180"><text:tab/><text:tab/><text:tab/>{</text:span></text:p>
      <text:p text:style-name="P53"><text:span text:style-name="T180"><text:tab/><text:tab/><text:tab/><text:tab/>QAt(i, i) = 1.0;</text:span></text:p>
      <text:p text:style-name="P53"><text:span text:style-name="T180"><text:tab/><text:tab/><text:tab/><text:tab/></text:span><text:span text:style-name="T182">for</text:span><text:span text:style-name="T180"> (</text:span><text:span text:style-name="T182">int</text:span><text:span text:style-name="T180"> j = 0; j &lt; N; ++j)</text:span></text:p>
      <text:p text:style-name="P53"><text:span text:style-name="T180"><text:tab/><text:tab/><text:tab/><text:tab/>{</text:span></text:p>
      <text:p text:style-name="P53"><text:span text:style-name="T180"><text:tab/><text:tab/><text:tab/><text:tab/><text:tab/>RAt(i, j) = </text:span><text:span text:style-name="T179">A</text:span><text:span text:style-name="T180">[i][j];</text:span></text:p>
      <text:p text:style-name="P53"><text:span text:style-name="T180"><text:tab/><text:tab/><text:tab/><text:tab/>}</text:span></text:p>
      <text:p text:style-name="P53"><text:span text:style-name="T180"><text:tab/><text:tab/><text:tab/>}</text:span></text:p>
      <text:p text:style-name="P53"><text:span text:style-name="T180"><text:tab/><text:tab/>}</text:span></text:p>
      <text:p text:style-name="P103" loext:marker-style-name="T180"/>
      <text:p text:style-name="P53"><text:span text:style-name="T180"><text:tab/><text:tab/></text:span><text:span text:style-name="T183">T</text:span><text:span text:style-name="T180">&amp; RAt(</text:span><text:span text:style-name="T183">size_t</text:span><text:span text:style-name="T180"> </text:span><text:span text:style-name="T179">row</text:span><text:span text:style-name="T180">, </text:span><text:span text:style-name="T183">size_t</text:span><text:span text:style-name="T180"> </text:span><text:span text:style-name="T179">col</text:span><text:span text:style-name="T180">)</text:span></text:p>
      <text:p text:style-name="P53"><text:span text:style-name="T180"><text:tab/><text:tab/>{</text:span></text:p>
      <text:p text:style-name="P53"><text:span text:style-name="T180"><text:tab/><text:tab/><text:tab/></text:span><text:span text:style-name="T182">return</text:span><text:span text:style-name="T180"> _data[</text:span><text:span text:style-name="T179">row</text:span><text:span text:style-name="T180"> * N + </text:span><text:span text:style-name="T179">col</text:span><text:span text:style-name="T180">].r;</text:span></text:p>
      <text:p text:style-name="P53"><text:span text:style-name="T180"><text:tab/><text:tab/>}</text:span></text:p>
      <text:p text:style-name="P53"><text:span text:style-name="T180"><text:tab/><text:tab/></text:span><text:span text:style-name="T183">T</text:span><text:span text:style-name="T180">&amp; QAt(</text:span><text:span text:style-name="T183">size_t</text:span><text:span text:style-name="T180"> </text:span><text:span text:style-name="T179">row</text:span><text:span text:style-name="T180">, </text:span><text:span text:style-name="T183">size_t</text:span><text:span text:style-name="T180"> </text:span><text:span text:style-name="T179">col</text:span><text:span text:style-name="T180">) {</text:span></text:p>
      <text:p text:style-name="P53"><text:span text:style-name="T180"><text:tab/><text:tab/><text:tab/></text:span><text:span text:style-name="T182">return</text:span><text:span text:style-name="T180"> _data[</text:span><text:span text:style-name="T179">col</text:span><text:span text:style-name="T180"> * N + </text:span><text:span text:style-name="T179">row</text:span><text:span text:style-name="T180">].q;</text:span></text:p>
      <text:p text:style-name="P53"><text:span text:style-name="T180"><text:tab/><text:tab/>}</text:span></text:p>
      <text:p text:style-name="P103" loext:marker-style-name="T180"/>
      <text:p text:style-name="P53"><text:span text:style-name="T180"><text:tab/></text:span><text:span text:style-name="T182">private</text:span><text:span text:style-name="T180">:</text:span></text:p>
      <text:p text:style-name="P53"><text:span text:style-name="T180"><text:tab/><text:tab/></text:span><text:span text:style-name="T182">struct</text:span><text:span text:style-name="T180"> </text:span><text:span text:style-name="T183">QRElement</text:span><text:span text:style-name="T180"> {</text:span></text:p>
      <text:p text:style-name="P53"><text:span text:style-name="T180"><text:tab/><text:tab/><text:tab/></text:span><text:span text:style-name="T183">T</text:span><text:span text:style-name="T180"> q;</text:span></text:p>
      <text:p text:style-name="P53"><text:span text:style-name="T180"><text:tab/><text:tab/><text:tab/></text:span><text:span text:style-name="T183">T</text:span><text:span text:style-name="T180"> r;</text:span></text:p>
      <text:p text:style-name="P53"><text:span text:style-name="T180"><text:tab/><text:tab/>};</text:span></text:p>
      <text:p text:style-name="P53"><text:span text:style-name="T180"><text:tab/><text:tab/>std::</text:span><text:span text:style-name="T183">vector</text:span><text:span text:style-name="T180">&lt;</text:span><text:span text:style-name="T183">QRElement</text:span><text:span text:style-name="T180">&gt; _data;</text:span></text:p>
      <text:p text:style-name="P53"><text:span text:style-name="T180"><text:tab/><text:tab/></text:span><text:span text:style-name="T183">size_t</text:span><text:span text:style-name="T180"> N;</text:span></text:p>
      <text:p text:style-name="P53"><text:span text:style-name="T180"><text:tab/>};</text:span></text:p>
      <text:p text:style-name="P53"><text:span text:style-name="T180">};</text:span></text:p>
      <text:p text:style-name="P111" loext:marker-style-name="T19"/>
      <text:p text:style-name="P107"><text:bookmark-start text:name="__RefHeading___Toc2657_713544485_Копия_5"/><text:bookmark-start text:name="_Toc194842675_Копия_1_Копия_1_Копия_1_К1"/>Приложение <text:bookmark-end text:name="_Toc194842675_Копия_1_Копия_1_Копия_1_К1"/>6. <text:span text:style-name="T18">QR-</text:span>разложение с использованием вращений Гивенса, <text:span text:style-name="T19">векторизованные вычисления</text:span><text:bookmark-end text:name="__RefHeading___Toc2657_713544485_Копия_5"/></text:p>
      <text:p text:style-name="P53"><text:span text:style-name="T179">#pragma</text:span><text:span text:style-name="T180"> </text:span><text:span text:style-name="T179">once</text:span></text:p>
      <text:p text:style-name="P103" loext:marker-style-name="T180"/>
      <text:p text:style-name="P53"><text:span text:style-name="T179">#include</text:span><text:span text:style-name="T180"> </text:span><text:span text:style-name="T181">&lt;vector&gt;</text:span></text:p>
      <text:p text:style-name="P53"><text:span text:style-name="T179">#include</text:span><text:span text:style-name="T180"> </text:span><text:span text:style-name="T181">&lt;cmath&gt;</text:span></text:p>
      <text:p text:style-name="P53"><text:span text:style-name="T179">#include</text:span><text:span text:style-name="T180"> </text:span><text:span text:style-name="T181">&lt;memory&gt;</text:span></text:p>
      <text:p text:style-name="P53"><text:span text:style-name="T179">#include</text:span><text:span text:style-name="T180"> </text:span><text:span text:style-name="T181">&lt;immintrin.h&gt;</text:span></text:p>
      <text:p text:style-name="P53"><text:span text:style-name="T179">#include</text:span><text:span text:style-name="T180"> </text:span><text:span text:style-name="T181">&lt;type_traits&gt;</text:span></text:p>
      <text:p text:style-name="P103" loext:marker-style-name="T180"/>
      <text:p text:style-name="P53"><text:span text:style-name="T179">#include</text:span><text:span text:style-name="T180"> </text:span><text:span text:style-name="T181">"../IQRSolver.h"</text:span></text:p>
      <text:p text:style-name="P103" loext:marker-style-name="T180"/>
      <text:p text:style-name="P53"><text:span text:style-name="T182">template</text:span><text:span text:style-name="T180"> &lt;</text:span><text:span text:style-name="T182">typename</text:span><text:span text:style-name="T180"> </text:span><text:span text:style-name="T183">T</text:span><text:span text:style-name="T180">&gt;</text:span></text:p>
      <text:p text:style-name="P53"><text:span text:style-name="T182">class</text:span><text:span text:style-name="T180"> </text:span><text:span text:style-name="T183">GivensVectorized</text:span><text:span text:style-name="T180"> : </text:span><text:span text:style-name="T182">public</text:span><text:span text:style-name="T180"> </text:span><text:span text:style-name="T183">IQRSolver</text:span><text:span text:style-name="T180">&lt;</text:span><text:span text:style-name="T183">T</text:span><text:span text:style-name="T180">&gt; {</text:span></text:p>
      <text:p text:style-name="P53"><text:span text:style-name="T182">public</text:span><text:span text:style-name="T180">:</text:span></text:p>
      <text:p text:style-name="P53"><text:span text:style-name="T180"><text:s text:c="4"/></text:span><text:span text:style-name="T182">virtual</text:span><text:span text:style-name="T180"> </text:span><text:span text:style-name="T182">void</text:span><text:span text:style-name="T180"> QR_decomposition(</text:span><text:span text:style-name="T182">const</text:span><text:span text:style-name="T180"> std::</text:span><text:span text:style-name="T183">vector</text:span><text:span text:style-name="T180">&lt;std::</text:span><text:span text:style-name="T183">vector</text:span><text:span text:style-name="T180">&lt;</text:span><text:span text:style-name="T183">T</text:span><text:span text:style-name="T180">&gt;&gt;&amp; </text:span><text:span text:style-name="T179">A</text:span><text:span text:style-name="T180">,</text:span></text:p>
      <text:p text:style-name="P53"><text:span text:style-name="T180"><text:s text:c="8"/>std::</text:span><text:span text:style-name="T183">vector</text:span><text:span text:style-name="T180">&lt;std::</text:span><text:span text:style-name="T183">vector</text:span><text:span text:style-name="T180">&lt;</text:span><text:span text:style-name="T183">T</text:span><text:span text:style-name="T180">&gt;&gt;&amp; </text:span><text:span text:style-name="T179">Q</text:span><text:span text:style-name="T180">,</text:span></text:p>
      <text:p text:style-name="P53"><text:span text:style-name="T180"><text:s text:c="8"/>std::</text:span><text:span text:style-name="T183">vector</text:span><text:span text:style-name="T180">&lt;std::</text:span><text:span text:style-name="T183">vector</text:span><text:span text:style-name="T180">&lt;</text:span><text:span text:style-name="T183">T</text:span><text:span text:style-name="T180">&gt;&gt;&amp; </text:span><text:span text:style-name="T179">R</text:span><text:span text:style-name="T180">) </text:span><text:span text:style-name="T182">override</text:span></text:p>
      <text:p text:style-name="P53"><text:span text:style-name="T180"><text:s text:c="4"/>{</text:span></text:p>
      <text:p text:style-name="P53"><text:span text:style-name="T180"><text:s text:c="8"/></text:span><text:span text:style-name="T182">const</text:span><text:span text:style-name="T180"> </text:span><text:span text:style-name="T182">int</text:span><text:span text:style-name="T180"> N = </text:span><text:span text:style-name="T179">A</text:span><text:span text:style-name="T180">.size();</text:span></text:p>
      <text:p text:style-name="P53"><text:span text:style-name="T180"><text:s text:c="8"/></text:span><text:span text:style-name="T182">if</text:span><text:span text:style-name="T180"> (N == 0) </text:span><text:span text:style-name="T182">return</text:span><text:span text:style-name="T180">;</text:span></text:p>
      <text:p text:style-name="P103" loext:marker-style-name="T180"/>
      <text:p text:style-name="P53"><text:span text:style-name="T180"><text:s text:c="8"/></text:span><text:span text:style-name="T183">size_t</text:span><text:span text:style-name="T180"> total = </text:span><text:span text:style-name="T182">static_cast</text:span><text:span text:style-name="T180">&lt;</text:span><text:span text:style-name="T183">size_t</text:span><text:span text:style-name="T180">&gt;(N) * N;</text:span></text:p>
      <text:p text:style-name="P53"><text:span text:style-name="T180"><text:s text:c="8"/></text:span><text:span text:style-name="T182">auto</text:span><text:span text:style-name="T180"> R_data = std::make_unique&lt;</text:span><text:span text:style-name="T183">T</text:span><text:span text:style-name="T180">[]&gt;(total);</text:span></text:p>
      <text:p text:style-name="P53"><text:span text:style-name="T180"><text:s text:c="8"/></text:span><text:span text:style-name="T182">auto</text:span><text:span text:style-name="T180"> Q_data = std::make_unique&lt;</text:span><text:span text:style-name="T183">T</text:span><text:span text:style-name="T180">[]&gt;(total); <text:s text:c="2"/></text:span><text:span text:style-name="T121">// Q_T</text:span></text:p>
      <text:p text:style-name="P103" loext:marker-style-name="T180"/>
      <text:p text:style-name="P53"><text:span text:style-name="T180"><text:s text:c="8"/></text:span><text:span text:style-name="T121">// инициализация: R = A, Q = E</text:span></text:p>
      <text:p text:style-name="P53"><text:span text:style-name="T179">#pragma</text:span><text:span text:style-name="T180"> omp parallel </text:span><text:span text:style-name="T182">for</text:span><text:span text:style-name="T180"> num_threads(thread_num) </text:span><text:span text:style-name="T182">if</text:span><text:span text:style-name="T180"> (N &gt;= 1000)</text:span></text:p>
      <text:p text:style-name="P53"><text:span text:style-name="T180"><text:s text:c="8"/></text:span><text:span text:style-name="T182">for</text:span><text:span text:style-name="T180"> (</text:span><text:span text:style-name="T182">int</text:span><text:span text:style-name="T180"> i = 0; i &lt; N; ++i) {</text:span></text:p>
      <text:p text:style-name="P53"><text:span text:style-name="T180"><text:s text:c="12"/></text:span><text:span text:style-name="T182">for</text:span><text:span text:style-name="T180"> (</text:span><text:span text:style-name="T182">int</text:span><text:span text:style-name="T180"> j = 0; j &lt; N; ++j) {</text:span></text:p>
      <text:p text:style-name="P53"><text:span text:style-name="T180"><text:s text:c="16"/>R_data[i * N + j] = </text:span><text:span text:style-name="T179">A</text:span><text:span text:style-name="T180">[i][j];</text:span></text:p>
      <text:p text:style-name="P53"><text:span text:style-name="T180"><text:s text:c="16"/>Q_data[i * N + j] = (i == j) ? </text:span><text:span text:style-name="T183">T</text:span><text:span text:style-name="T180">(1) : </text:span><text:span text:style-name="T183">T</text:span><text:span text:style-name="T180">(0);</text:span></text:p>
      <text:p text:style-name="P53"><text:span text:style-name="T180"><text:s text:c="12"/>}</text:span></text:p>
      <text:p text:style-name="P53"><text:span text:style-name="T180"><text:s text:c="8"/>}</text:span></text:p>
      <text:p text:style-name="P103" loext:marker-style-name="T180"/>
      <text:p text:style-name="P53"><text:span text:style-name="T180"><text:s text:c="8"/></text:span><text:span text:style-name="T121">// прямой ход: вычисление R</text:span></text:p>
      <text:p text:style-name="P53"><text:span text:style-name="T180"><text:s text:c="8"/></text:span><text:span text:style-name="T182">for</text:span><text:span text:style-name="T180"> (</text:span><text:span text:style-name="T182">int</text:span><text:span text:style-name="T180"> j = 0; j &lt; N - 1; ++j) {</text:span></text:p>
      <text:p text:style-name="P53"><text:span text:style-name="T180"><text:s text:c="12"/></text:span><text:span text:style-name="T182">for</text:span><text:span text:style-name="T180"> (</text:span><text:span text:style-name="T182">int</text:span><text:span text:style-name="T180"> i = j + 1; i &lt; N; ++i) {</text:span></text:p>
      <text:p text:style-name="P53"><text:span text:style-name="T180"><text:s text:c="16"/></text:span><text:span text:style-name="T182">const</text:span><text:span text:style-name="T180"> </text:span><text:span text:style-name="T182">double</text:span><text:span text:style-name="T180"> Rjj = R_data[j * N + j];</text:span></text:p>
      <text:p text:style-name="P53"><text:span text:style-name="T180"><text:s text:c="16"/></text:span><text:span text:style-name="T182">const</text:span><text:span text:style-name="T180"> </text:span><text:span text:style-name="T182">double</text:span><text:span text:style-name="T180"> Rij = R_data[i * N + j];</text:span></text:p>
      <text:p text:style-name="P103" loext:marker-style-name="T180"/>
      <text:p text:style-name="P53"><text:span text:style-name="T180"><text:s text:c="16"/></text:span><text:span text:style-name="T182">if</text:span><text:span text:style-name="T180"> (std::abs(Rij) &lt; 1e-11)</text:span></text:p>
      <text:p text:style-name="P53"><text:span text:style-name="T180"><text:s text:c="20"/></text:span><text:span text:style-name="T182">continue</text:span><text:span text:style-name="T180">;</text:span></text:p>
      <text:p text:style-name="P103" loext:marker-style-name="T180"/>
      <text:p text:style-name="P53"><text:span text:style-name="T180"><text:s text:c="16"/></text:span><text:span text:style-name="T182">const</text:span><text:span text:style-name="T180"> </text:span><text:span text:style-name="T182">double</text:span><text:span text:style-name="T180"> sqrt_val = std::sqrt(Rjj * Rjj + Rij * Rij);</text:span></text:p>
      <text:p text:style-name="P53"><text:span text:style-name="T180"><text:s text:c="16"/></text:span><text:span text:style-name="T182">if</text:span><text:span text:style-name="T180"> (std::abs(sqrt_val) &lt; 1e-11)</text:span></text:p>
      <text:p text:style-name="P53"><text:span text:style-name="T180"><text:s text:c="20"/></text:span><text:span text:style-name="T182">continue</text:span><text:span text:style-name="T180">;</text:span></text:p>
      <text:p text:style-name="P103" loext:marker-style-name="T180"/>
      <text:p text:style-name="P53"><text:span text:style-name="T180"><text:s text:c="16"/></text:span><text:span text:style-name="T182">const</text:span><text:span text:style-name="T180"> </text:span><text:span text:style-name="T182">double</text:span><text:span text:style-name="T180"> c = Rjj / sqrt_val;</text:span></text:p>
      <text:p text:style-name="P53"><text:span text:style-name="T180"><text:s text:c="16"/></text:span><text:span text:style-name="T182">const</text:span><text:span text:style-name="T180"> </text:span><text:span text:style-name="T182">double</text:span><text:span text:style-name="T180"> s = -Rij / sqrt_val;</text:span></text:p>
      <text:p text:style-name="P103" loext:marker-style-name="T180"/>
      <text:p text:style-name="P53"><text:span text:style-name="T180"><text:s text:c="16"/></text:span><text:span text:style-name="T183">T</text:span><text:span text:style-name="T180">* Rj_ptr = &amp;R_data[j * N];</text:span></text:p>
      <text:p text:style-name="P53"><text:span text:style-name="T180"><text:s text:c="16"/></text:span><text:span text:style-name="T183">T</text:span><text:span text:style-name="T180">* Ri_ptr = &amp;R_data[i * N];</text:span></text:p>
      <text:p text:style-name="P103" loext:marker-style-name="T180"/>
      <text:p text:style-name="P53"><text:span text:style-name="T180"><text:s text:c="16"/></text:span><text:span text:style-name="T121">// векторизованное вращение строк R (ненулевые значения только в столбцах правее j)</text:span></text:p>
      <text:p text:style-name="P53"><text:span text:style-name="T180"><text:s text:c="16"/></text:span><text:span text:style-name="T182">if</text:span><text:span text:style-name="T180"> </text:span><text:span text:style-name="T182">constexpr</text:span><text:span text:style-name="T180"> (std::is_same_v&lt;</text:span><text:span text:style-name="T183">T</text:span><text:span text:style-name="T180">, </text:span><text:span text:style-name="T182">double</text:span><text:span text:style-name="T180">&gt;) {</text:span></text:p>
      <text:p text:style-name="P53"><text:span text:style-name="T180"><text:s text:c="20"/></text:span><text:span text:style-name="T183">size_t</text:span><text:span text:style-name="T180"> k = j;</text:span></text:p>
      <text:p text:style-name="P53"><text:span text:style-name="T180"><text:s text:c="20"/></text:span><text:span text:style-name="T182">for</text:span><text:span text:style-name="T180"> (; k + 3 &lt; N; k += 4) {</text:span></text:p>
      <text:p text:style-name="P53"><text:span text:style-name="T180"><text:s text:c="24"/></text:span><text:span text:style-name="T183">__m256d</text:span><text:span text:style-name="T180"> Rj = _mm256_loadu_pd(&amp;Rj_ptr[k]);</text:span></text:p>
      <text:p text:style-name="P53"><text:span text:style-name="T180"><text:s text:c="24"/></text:span><text:span text:style-name="T183">__m256d</text:span><text:span text:style-name="T180"> Ri = _mm256_loadu_pd(&amp;Ri_ptr[k]);</text:span></text:p>
      <text:p text:style-name="P103" loext:marker-style-name="T180"/>
      <text:p text:style-name="P53"><text:soft-page-break/><text:span text:style-name="T180"><text:s text:c="24"/></text:span><text:span text:style-name="T183">__m256d</text:span><text:span text:style-name="T180"> c_vec = _mm256_set1_pd(c);</text:span></text:p>
      <text:p text:style-name="P53"><text:span text:style-name="T180"><text:s text:c="24"/></text:span><text:span text:style-name="T183">__m256d</text:span><text:span text:style-name="T180"> s_vec = _mm256_set1_pd(s);</text:span></text:p>
      <text:p text:style-name="P103" loext:marker-style-name="T180"/>
      <text:p text:style-name="P53"><text:span text:style-name="T180"><text:s text:c="24"/></text:span><text:span text:style-name="T183">__m256d</text:span><text:span text:style-name="T180"> new_Rj = _mm256_fmsub_pd(Rj, c_vec, _mm256_mul_pd(Ri, s_vec));</text:span></text:p>
      <text:p text:style-name="P53"><text:span text:style-name="T180"><text:s text:c="24"/></text:span><text:span text:style-name="T183">__m256d</text:span><text:span text:style-name="T180"> new_Ri = _mm256_fmadd_pd(Rj, s_vec, _mm256_mul_pd(Ri, c_vec));</text:span></text:p>
      <text:p text:style-name="P103" loext:marker-style-name="T180"/>
      <text:p text:style-name="P53"><text:span text:style-name="T180"><text:s text:c="24"/>_mm256_storeu_pd(&amp;Rj_ptr[k], new_Rj);</text:span></text:p>
      <text:p text:style-name="P53"><text:span text:style-name="T180"><text:s text:c="24"/>_mm256_storeu_pd(&amp;Ri_ptr[k], new_Ri);</text:span></text:p>
      <text:p text:style-name="P53"><text:span text:style-name="T180"><text:s text:c="20"/>}</text:span></text:p>
      <text:p text:style-name="P53"><text:span text:style-name="T180"><text:s text:c="20"/></text:span><text:span text:style-name="T182">for</text:span><text:span text:style-name="T180"> (; k &lt; N; ++k) {</text:span></text:p>
      <text:p text:style-name="P53"><text:span text:style-name="T180"><text:s text:c="24"/></text:span><text:span text:style-name="T183">T</text:span><text:span text:style-name="T180"> Rj = Rj_ptr[k], Ri = Ri_ptr[k];</text:span></text:p>
      <text:p text:style-name="P53"><text:span text:style-name="T180"><text:s text:c="24"/>Rj_ptr[k] = Rj * c - Ri * s;</text:span></text:p>
      <text:p text:style-name="P53"><text:span text:style-name="T180"><text:s text:c="24"/>Ri_ptr[k] = Rj * s + Ri * c;</text:span></text:p>
      <text:p text:style-name="P53"><text:span text:style-name="T180"><text:s text:c="20"/>}</text:span></text:p>
      <text:p text:style-name="P53"><text:span text:style-name="T180"><text:s text:c="16"/>}</text:span></text:p>
      <text:p text:style-name="P53"><text:span text:style-name="T180"><text:s text:c="16"/></text:span><text:span text:style-name="T182">else</text:span><text:span text:style-name="T180"> </text:span><text:span text:style-name="T182">if</text:span><text:span text:style-name="T180"> </text:span><text:span text:style-name="T182">constexpr</text:span><text:span text:style-name="T180"> (std::is_same_v&lt;</text:span><text:span text:style-name="T183">T</text:span><text:span text:style-name="T180">, </text:span><text:span text:style-name="T182">float</text:span><text:span text:style-name="T180">&gt;) {</text:span></text:p>
      <text:p text:style-name="P53"><text:span text:style-name="T180"><text:s text:c="20"/></text:span><text:span text:style-name="T183">size_t</text:span><text:span text:style-name="T180"> k = j;</text:span></text:p>
      <text:p text:style-name="P53"><text:span text:style-name="T180"><text:s text:c="20"/></text:span><text:span text:style-name="T182">for</text:span><text:span text:style-name="T180"> (; k + 7 &lt; N; k += 8) {</text:span></text:p>
      <text:p text:style-name="P53"><text:span text:style-name="T180"><text:s text:c="24"/></text:span><text:span text:style-name="T183">__m256</text:span><text:span text:style-name="T180"> Rj = _mm256_loadu_ps(&amp;Rj_ptr[k]);</text:span></text:p>
      <text:p text:style-name="P53"><text:span text:style-name="T180"><text:s text:c="24"/></text:span><text:span text:style-name="T183">__m256</text:span><text:span text:style-name="T180"> Ri = _mm256_loadu_ps(&amp;Ri_ptr[k]);</text:span></text:p>
      <text:p text:style-name="P103" loext:marker-style-name="T180"/>
      <text:p text:style-name="P53"><text:span text:style-name="T180"><text:s text:c="24"/></text:span><text:span text:style-name="T183">__m256</text:span><text:span text:style-name="T180"> c_vec = _mm256_set1_ps(c);</text:span></text:p>
      <text:p text:style-name="P53"><text:span text:style-name="T180"><text:s text:c="24"/></text:span><text:span text:style-name="T183">__m256</text:span><text:span text:style-name="T180"> s_vec = _mm256_set1_ps(s);</text:span></text:p>
      <text:p text:style-name="P103" loext:marker-style-name="T180"/>
      <text:p text:style-name="P53"><text:span text:style-name="T180"><text:s text:c="24"/></text:span><text:span text:style-name="T183">__m256</text:span><text:span text:style-name="T180"> new_Rj = _mm256_fmsub_ps(Rj, c_vec, _mm256_mul_ps(Ri, s_vec));</text:span></text:p>
      <text:p text:style-name="P53"><text:span text:style-name="T180"><text:s text:c="24"/></text:span><text:span text:style-name="T183">__m256</text:span><text:span text:style-name="T180"> new_Ri = _mm256_fmadd_ps(Rj, s_vec, _mm256_mul_ps(Ri, c_vec));</text:span></text:p>
      <text:p text:style-name="P103" loext:marker-style-name="T180"/>
      <text:p text:style-name="P53"><text:span text:style-name="T180"><text:s text:c="24"/>_mm256_storeu_ps(&amp;Rj_ptr[k], new_Rj);</text:span></text:p>
      <text:p text:style-name="P53"><text:span text:style-name="T180"><text:s text:c="24"/>_mm256_storeu_ps(&amp;Ri_ptr[k], new_Ri);</text:span></text:p>
      <text:p text:style-name="P53"><text:span text:style-name="T180"><text:s text:c="20"/>}</text:span></text:p>
      <text:p text:style-name="P53"><text:span text:style-name="T180"><text:s text:c="20"/></text:span><text:span text:style-name="T182">for</text:span><text:span text:style-name="T180"> (; k &lt; N; ++k) {</text:span></text:p>
      <text:p text:style-name="P53"><text:span text:style-name="T180"><text:s text:c="24"/></text:span><text:span text:style-name="T183">T</text:span><text:span text:style-name="T180"> Rj = Rj_ptr[k], Ri = Ri_ptr[k];</text:span></text:p>
      <text:p text:style-name="P53"><text:span text:style-name="T180"><text:s text:c="24"/>Rj_ptr[k] = Rj * c - Ri * s;</text:span></text:p>
      <text:p text:style-name="P53"><text:span text:style-name="T180"><text:s text:c="24"/>Ri_ptr[k] = Rj * s + Ri * c;</text:span></text:p>
      <text:p text:style-name="P53"><text:span text:style-name="T180"><text:s text:c="20"/>}</text:span></text:p>
      <text:p text:style-name="P53"><text:span text:style-name="T180"><text:s text:c="16"/>}</text:span></text:p>
      <text:p text:style-name="P103" loext:marker-style-name="T180"/>
      <text:p text:style-name="P53"><text:span text:style-name="T180"><text:s text:c="16"/></text:span><text:span text:style-name="T121">// сохраняем c и s в виде tau</text:span></text:p>
      <text:p text:style-name="P53"><text:span text:style-name="T180"><text:s text:c="16"/></text:span><text:span text:style-name="T182">double</text:span><text:span text:style-name="T180"> tau = s / (1.0 + c);</text:span></text:p>
      <text:p text:style-name="P53"><text:span text:style-name="T180"><text:s text:c="16"/>R_data[i * N + j] = </text:span><text:span text:style-name="T182">static_cast</text:span><text:span text:style-name="T180">&lt;</text:span><text:span text:style-name="T183">T</text:span><text:span text:style-name="T180">&gt;(tau);</text:span></text:p>
      <text:p text:style-name="P53"><text:span text:style-name="T180"><text:s text:c="12"/>}</text:span></text:p>
      <text:p text:style-name="P53"><text:span text:style-name="T180"><text:s text:c="8"/>}</text:span></text:p>
      <text:p text:style-name="P103" loext:marker-style-name="T180"/>
      <text:p text:style-name="P53"><text:span text:style-name="T180"><text:s text:c="8"/></text:span><text:span text:style-name="T121">// обратный ход: построение Q_T по сохранённым tau</text:span></text:p>
      <text:p text:style-name="P53"><text:span text:style-name="T180"><text:s text:c="8"/></text:span><text:span text:style-name="T182">for</text:span><text:span text:style-name="T180"> (</text:span><text:span text:style-name="T182">int</text:span><text:span text:style-name="T180"> j = 0; j &lt; N - 1; ++j) {</text:span></text:p>
      <text:p text:style-name="P53"><text:span text:style-name="T180"><text:s text:c="12"/></text:span><text:span text:style-name="T182">for</text:span><text:span text:style-name="T180"> (</text:span><text:span text:style-name="T182">int</text:span><text:span text:style-name="T180"> i = j + 1; i &lt; N; ++i) {</text:span></text:p>
      <text:p text:style-name="P53"><text:span text:style-name="T180"><text:s text:c="16"/></text:span><text:span text:style-name="T182">if</text:span><text:span text:style-name="T180"> (std::abs(R_data[i * N + j]) &lt; 1e-11) </text:span><text:span text:style-name="T182">continue</text:span><text:span text:style-name="T180">;</text:span></text:p>
      <text:p text:style-name="P103" loext:marker-style-name="T180"/>
      <text:p text:style-name="P53"><text:span text:style-name="T180"><text:s text:c="16"/></text:span><text:span text:style-name="T182">double</text:span><text:span text:style-name="T180"> tau = </text:span><text:span text:style-name="T182">static_cast</text:span><text:span text:style-name="T180">&lt;</text:span><text:span text:style-name="T182">double</text:span><text:span text:style-name="T180">&gt;(R_data[i * N + j]);</text:span></text:p>
      <text:p text:style-name="P53"><text:span text:style-name="T180"><text:s text:c="16"/></text:span><text:span text:style-name="T182">double</text:span><text:span text:style-name="T180"> tau2 = tau * tau;</text:span></text:p>
      <text:p text:style-name="P53"><text:span text:style-name="T180"><text:s text:c="16"/></text:span><text:span text:style-name="T182">double</text:span><text:span text:style-name="T180"> denom = 1.0 + tau2;</text:span></text:p>
      <text:p text:style-name="P53"><text:span text:style-name="T180"><text:s text:c="16"/></text:span><text:span text:style-name="T182">double</text:span><text:span text:style-name="T180"> c = (1.0 - tau2) / denom;</text:span></text:p>
      <text:p text:style-name="P53"><text:span text:style-name="T180"><text:s text:c="16"/></text:span><text:span text:style-name="T182">double</text:span><text:span text:style-name="T180"> s = 2.0 * tau / denom; <text:s text:c="2"/></text:span><text:span text:style-name="T121">// восстанавливаем c и s</text:span></text:p>
      <text:p text:style-name="P103" loext:marker-style-name="T180"/>
      <text:p text:style-name="P53"><text:span text:style-name="T180"><text:s text:c="16"/></text:span><text:span text:style-name="T183">T</text:span><text:span text:style-name="T180">* Qj_ptr = &amp;Q_data[j * N];</text:span></text:p>
      <text:p text:style-name="P53"><text:span text:style-name="T180"><text:s text:c="16"/></text:span><text:span text:style-name="T183">T</text:span><text:span text:style-name="T180">* Qi_ptr = &amp;Q_data[i * N];</text:span></text:p>
      <text:p text:style-name="P103" loext:marker-style-name="T180"/>
      <text:p text:style-name="P53"><text:span text:style-name="T180"><text:s text:c="16"/></text:span><text:span text:style-name="T121">// применяем вращение строк Q_T</text:span></text:p>
      <text:p text:style-name="P53"><text:span text:style-name="T180"><text:s text:c="16"/></text:span><text:span text:style-name="T182">if</text:span><text:span text:style-name="T180"> </text:span><text:span text:style-name="T182">constexpr</text:span><text:span text:style-name="T180"> (std::is_same_v&lt;</text:span><text:span text:style-name="T183">T</text:span><text:span text:style-name="T180">, </text:span><text:span text:style-name="T182">double</text:span><text:span text:style-name="T180">&gt;) {</text:span></text:p>
      <text:p text:style-name="P53"><text:span text:style-name="T180"><text:s text:c="20"/></text:span><text:span text:style-name="T183">size_t</text:span><text:span text:style-name="T180"> k = 0;</text:span></text:p>
      <text:p text:style-name="P53"><text:soft-page-break/><text:span text:style-name="T180"><text:s text:c="20"/></text:span><text:span text:style-name="T182">for</text:span><text:span text:style-name="T180"> (; k + 3 &lt; N; k += 4) {</text:span></text:p>
      <text:p text:style-name="P53"><text:span text:style-name="T180"><text:s text:c="24"/></text:span><text:span text:style-name="T183">__m256d</text:span><text:span text:style-name="T180"> Qj = _mm256_loadu_pd(&amp;Qj_ptr[k]);</text:span></text:p>
      <text:p text:style-name="P53"><text:span text:style-name="T180"><text:s text:c="24"/></text:span><text:span text:style-name="T183">__m256d</text:span><text:span text:style-name="T180"> Qi = _mm256_loadu_pd(&amp;Qi_ptr[k]);</text:span></text:p>
      <text:p text:style-name="P103" loext:marker-style-name="T180"/>
      <text:p text:style-name="P53"><text:span text:style-name="T180"><text:s text:c="24"/></text:span><text:span text:style-name="T183">__m256d</text:span><text:span text:style-name="T180"> c_vec = _mm256_set1_pd(c);</text:span></text:p>
      <text:p text:style-name="P53"><text:span text:style-name="T180"><text:s text:c="24"/></text:span><text:span text:style-name="T183">__m256d</text:span><text:span text:style-name="T180"> s_vec = _mm256_set1_pd(s);</text:span></text:p>
      <text:p text:style-name="P103" loext:marker-style-name="T180"/>
      <text:p text:style-name="P53"><text:span text:style-name="T180"><text:s text:c="24"/></text:span><text:span text:style-name="T183">__m256d</text:span><text:span text:style-name="T180"> new_Qj = _mm256_fmsub_pd(Qj, c_vec, _mm256_mul_pd(Qi, s_vec));</text:span></text:p>
      <text:p text:style-name="P53"><text:span text:style-name="T180"><text:s text:c="24"/></text:span><text:span text:style-name="T183">__m256d</text:span><text:span text:style-name="T180"> new_Qi = _mm256_fmadd_pd(Qj, s_vec, _mm256_mul_pd(Qi, c_vec));</text:span></text:p>
      <text:p text:style-name="P103" loext:marker-style-name="T180"/>
      <text:p text:style-name="P53"><text:span text:style-name="T180"><text:s text:c="24"/>_mm256_storeu_pd(&amp;Qj_ptr[k], new_Qj);</text:span></text:p>
      <text:p text:style-name="P53"><text:span text:style-name="T180"><text:s text:c="24"/>_mm256_storeu_pd(&amp;Qi_ptr[k], new_Qi);</text:span></text:p>
      <text:p text:style-name="P53"><text:span text:style-name="T180"><text:s text:c="20"/>}</text:span></text:p>
      <text:p text:style-name="P53"><text:span text:style-name="T180"><text:s text:c="20"/></text:span><text:span text:style-name="T182">for</text:span><text:span text:style-name="T180"> (; k &lt; N; ++k) {</text:span></text:p>
      <text:p text:style-name="P53"><text:span text:style-name="T180"><text:s text:c="24"/></text:span><text:span text:style-name="T183">T</text:span><text:span text:style-name="T180"> Qj = Qj_ptr[k], Qi = Qi_ptr[k];</text:span></text:p>
      <text:p text:style-name="P53"><text:span text:style-name="T180"><text:s text:c="24"/>Qj_ptr[k] = Qj * c - Qi * s;</text:span></text:p>
      <text:p text:style-name="P53"><text:span text:style-name="T180"><text:s text:c="24"/>Qi_ptr[k] = Qj * s + Qi * c;</text:span></text:p>
      <text:p text:style-name="P53"><text:span text:style-name="T180"><text:s text:c="20"/>}</text:span></text:p>
      <text:p text:style-name="P53"><text:span text:style-name="T180"><text:s text:c="16"/>}</text:span></text:p>
      <text:p text:style-name="P53"><text:span text:style-name="T180"><text:s text:c="16"/></text:span><text:span text:style-name="T182">else</text:span><text:span text:style-name="T180"> </text:span><text:span text:style-name="T182">if</text:span><text:span text:style-name="T180"> </text:span><text:span text:style-name="T182">constexpr</text:span><text:span text:style-name="T180"> (std::is_same_v&lt;</text:span><text:span text:style-name="T183">T</text:span><text:span text:style-name="T180">, </text:span><text:span text:style-name="T182">float</text:span><text:span text:style-name="T180">&gt;) {</text:span></text:p>
      <text:p text:style-name="P53"><text:span text:style-name="T180"><text:s text:c="20"/></text:span><text:span text:style-name="T183">size_t</text:span><text:span text:style-name="T180"> k = 0;</text:span></text:p>
      <text:p text:style-name="P53"><text:span text:style-name="T180"><text:s text:c="20"/></text:span><text:span text:style-name="T182">for</text:span><text:span text:style-name="T180"> (; k + 7 &lt; N; k += 8) {</text:span></text:p>
      <text:p text:style-name="P53"><text:span text:style-name="T180"><text:s text:c="24"/></text:span><text:span text:style-name="T183">__m256</text:span><text:span text:style-name="T180"> Qj = _mm256_loadu_ps(&amp;Qj_ptr[k]);</text:span></text:p>
      <text:p text:style-name="P53"><text:span text:style-name="T180"><text:s text:c="24"/></text:span><text:span text:style-name="T183">__m256</text:span><text:span text:style-name="T180"> Qi = _mm256_loadu_ps(&amp;Qi_ptr[k]);</text:span></text:p>
      <text:p text:style-name="P103" loext:marker-style-name="T180"/>
      <text:p text:style-name="P53"><text:span text:style-name="T180"><text:s text:c="24"/></text:span><text:span text:style-name="T183">__m256</text:span><text:span text:style-name="T180"> c_vec = _mm256_set1_ps(c);</text:span></text:p>
      <text:p text:style-name="P53"><text:span text:style-name="T180"><text:s text:c="24"/></text:span><text:span text:style-name="T183">__m256</text:span><text:span text:style-name="T180"> s_vec = _mm256_set1_ps(s);</text:span></text:p>
      <text:p text:style-name="P103" loext:marker-style-name="T180"/>
      <text:p text:style-name="P53"><text:span text:style-name="T180"><text:s text:c="24"/></text:span><text:span text:style-name="T183">__m256</text:span><text:span text:style-name="T180"> new_Qj = _mm256_fmsub_ps(Qj, c_vec, _mm256_mul_ps(Qi, s_vec));</text:span></text:p>
      <text:p text:style-name="P53"><text:span text:style-name="T180"><text:s text:c="24"/></text:span><text:span text:style-name="T183">__m256</text:span><text:span text:style-name="T180"> new_Qi = _mm256_fmadd_ps(Qj, s_vec, _mm256_mul_ps(Qi, c_vec));</text:span></text:p>
      <text:p text:style-name="P103" loext:marker-style-name="T180"/>
      <text:p text:style-name="P53"><text:span text:style-name="T180"><text:s text:c="24"/>_mm256_storeu_ps(&amp;Qj_ptr[k], new_Qj);</text:span></text:p>
      <text:p text:style-name="P53"><text:span text:style-name="T180"><text:s text:c="24"/>_mm256_storeu_ps(&amp;Qi_ptr[k], new_Qi);</text:span></text:p>
      <text:p text:style-name="P53"><text:span text:style-name="T180"><text:s text:c="20"/>}</text:span></text:p>
      <text:p text:style-name="P53"><text:span text:style-name="T180"><text:s text:c="20"/></text:span><text:span text:style-name="T182">for</text:span><text:span text:style-name="T180"> (; k &lt; N; ++k) {</text:span></text:p>
      <text:p text:style-name="P53"><text:span text:style-name="T180"><text:s text:c="24"/></text:span><text:span text:style-name="T183">T</text:span><text:span text:style-name="T180"> Qj = Qj_ptr[k], Qi = Qi_ptr[k];</text:span></text:p>
      <text:p text:style-name="P53"><text:span text:style-name="T180"><text:s text:c="24"/>Qj_ptr[k] = Qj * c - Qi * s;</text:span></text:p>
      <text:p text:style-name="P53"><text:span text:style-name="T180"><text:s text:c="24"/>Qi_ptr[k] = Qj * s + Qi * c;</text:span></text:p>
      <text:p text:style-name="P53"><text:span text:style-name="T180"><text:s text:c="20"/>}</text:span></text:p>
      <text:p text:style-name="P53"><text:span text:style-name="T180"><text:s text:c="16"/>}</text:span></text:p>
      <text:p text:style-name="P103" loext:marker-style-name="T180"/>
      <text:p text:style-name="P53"><text:span text:style-name="T180"><text:s text:c="16"/>R_data[i * N + j] = </text:span><text:span text:style-name="T183">T</text:span><text:span text:style-name="T180">(0); <text:s text:c="2"/></text:span><text:span text:style-name="T121">// восстанавливаем чистый ноль</text:span></text:p>
      <text:p text:style-name="P53"><text:span text:style-name="T180"><text:s text:c="12"/>}</text:span></text:p>
      <text:p text:style-name="P53"><text:span text:style-name="T180"><text:s text:c="8"/>}</text:span></text:p>
      <text:p text:style-name="P103" loext:marker-style-name="T180"/>
      <text:p text:style-name="P53"><text:span text:style-name="T180"><text:s text:c="8"/></text:span><text:span text:style-name="T121">// копирование в выходные матрицы</text:span></text:p>
      <text:p text:style-name="P53"><text:span text:style-name="T180"><text:s text:c="8"/></text:span><text:span text:style-name="T179">Q</text:span><text:span text:style-name="T180">.assign(N, std::</text:span><text:span text:style-name="T183">vector</text:span><text:span text:style-name="T180">&lt;</text:span><text:span text:style-name="T183">T</text:span><text:span text:style-name="T180">&gt;(N));</text:span></text:p>
      <text:p text:style-name="P53"><text:span text:style-name="T180"><text:s text:c="8"/></text:span><text:span text:style-name="T179">R</text:span><text:span text:style-name="T180">.assign(N, std::</text:span><text:span text:style-name="T183">vector</text:span><text:span text:style-name="T180">&lt;</text:span><text:span text:style-name="T183">T</text:span><text:span text:style-name="T180">&gt;(N));</text:span></text:p>
      <text:p text:style-name="P53"><text:span text:style-name="T179">#pragma</text:span><text:span text:style-name="T180"> omp parallel </text:span><text:span text:style-name="T182">for</text:span><text:span text:style-name="T180"> num_threads(thread_num) </text:span><text:span text:style-name="T182">if</text:span><text:span text:style-name="T180"> (N &gt;= 1000)</text:span></text:p>
      <text:p text:style-name="P53"><text:span text:style-name="T180"><text:s text:c="8"/></text:span><text:span text:style-name="T182">for</text:span><text:span text:style-name="T180"> (</text:span><text:span text:style-name="T182">int</text:span><text:span text:style-name="T180"> i = 0; i &lt; N; ++i) {</text:span></text:p>
      <text:p text:style-name="P53"><text:span text:style-name="T180"><text:s text:c="12"/></text:span><text:span text:style-name="T182">for</text:span><text:span text:style-name="T180"> (</text:span><text:span text:style-name="T182">int</text:span><text:span text:style-name="T180"> j = 0; j &lt; N; ++j) {</text:span></text:p>
      <text:p text:style-name="P53"><text:span text:style-name="T180"><text:s text:c="16"/></text:span><text:span text:style-name="T179">R</text:span><text:span text:style-name="T180">[i][j] = R_data[i * N + j];</text:span></text:p>
      <text:p text:style-name="P53"><text:span text:style-name="T180"><text:s text:c="16"/></text:span><text:span text:style-name="T179">Q</text:span><text:span text:style-name="T180">[i][j] = Q_data[j * N + i]; </text:span><text:span text:style-name="T121">// транспонирование</text:span></text:p>
      <text:p text:style-name="P53"><text:span text:style-name="T180"><text:s text:c="12"/>}</text:span></text:p>
      <text:p text:style-name="P53"><text:span text:style-name="T180"><text:s text:c="8"/>}</text:span></text:p>
      <text:p text:style-name="P53"><text:span text:style-name="T180"><text:s text:c="4"/>}</text:span></text:p>
      <text:p text:style-name="P53"><text:span text:style-name="T180">};</text:span></text:p>
      <text:p text:style-name="P111" loext:marker-style-name="T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scadia Mono" svg:font-family="'Cascadia Mono'" style:font-family-generic="swiss"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swiss"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mily-generic="roman"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0pt" fo:language="ru" fo:country="RU" style:letter-kerning="false" style:font-name-asian="Calibri2"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0pt" fo:language="ru" fo:country="RU" style:letter-kerning="false" style:font-name-asian="Calibri2"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line-height-at-least="0.353cm" fo:text-align="start" style:justify-single-word="false" fo:orphans="2" fo:widows="2" fo:hyphenation-ladder-count="no-limit" fo:hyphenation-keep="page" loext:hyphenation-keep-type="column" style:writing-mode="lr-tb"/>
      <style:text-properties fo:font-variant="normal" fo:text-transform="none" style:use-window-font-color="true" loext:opacity="0%" style:text-outline="false" style:text-line-through-style="none" style:text-line-through-type="none" style:font-name="Arial" fo:font-family="Arial" style:font-family-generic="swiss" style:font-pitch="variable" fo:font-size="18pt" fo:language="ru" fo:country="RU" fo:font-style="normal" fo:text-shadow="none" style:text-underline-style="none" fo:font-weight="normal" style:letter-kerning="true" style:font-name-asian="Tahoma" style:font-family-asian="Tahoma" style:font-family-generic-asian="system" style:font-pitch-asian="variable" style:font-size-asian="18pt" style:language-asian="ru" style:country-asian="RU" style:font-style-asian="normal" style:font-weight-asian="normal" style:font-name-complex="Calibri2" style:font-family-complex="Calibri" style:font-family-generic-complex="system" style:font-pitch-complex="variable" style:font-size-complex="12pt" style:language-complex="ar" style:country-complex="SA" style:text-emphasize="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left="0cm" fo:margin-right="0cm" fo:margin-top="0cm" fo:margin-bottom="0.353cm" style:contextual-spacing="false" fo:line-height="179%" fo:text-align="justify" style:justify-single-word="false" fo:orphans="2" fo:widows="2" fo:hyphenation-ladder-count="no-limit" fo:hyphenation-keep="auto" loext:hyphenation-keep-type="column" fo:text-indent="0.847cm" style:auto-text-indent="false" style:writing-mode="lr-tb"/>
      <style:text-properties style:font-name="Times New Roman" fo:font-family="'Times New Roman'" style:font-family-generic="roman" style:font-pitch="variable" fo:font-size="14pt" style:letter-kerning="false" style:font-name-asian="Times New Roman1" style:font-family-asian="'Times New Roman'" style:font-family-generic-asian="system" style:font-pitch-asian="variable" style:font-size-asian="14pt" style:font-size-complex="14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635cm" fo:margin-bottom="0.141cm" style:contextual-spacing="false" fo:keep-together="always" fo:text-indent="0.847cm" style:auto-text-indent="false" fo:keep-with-next="always"/>
      <style:text-properties fo:color="#2f5496" loext:opacity="100%" style:font-name="Calibri Light" fo:font-family="'Calibri Light'" style:font-family-generic="swiss" style:font-pitch="variable" fo:font-size="20pt" style:font-name-asian="Times New Roman1" style:font-family-asian="'Times New Roman'" style:font-family-generic-asian="system" style:font-pitch-asian="variable" style:font-size-asian="20pt"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282cm" fo:margin-bottom="0.141cm" style:contextual-spacing="false" fo:keep-together="always" fo:text-indent="0.847cm" style:auto-text-indent="false" fo:keep-with-next="always"/>
      <style:text-properties fo:color="#2f5496" loext:opacity="100%" style:font-name="Calibri Light" fo:font-family="'Calibri Light'" style:font-family-generic="swiss" style:font-pitch="variable" fo:font-size="16pt" style:font-name-asian="Times New Roman1" style:font-family-asian="'Times New Roman'" style:font-family-generic-asian="system" style:font-pitch-asian="variable" style:font-size-asian="16pt" style:font-size-complex="16pt"/>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282cm" fo:margin-bottom="0.141cm" style:contextual-spacing="false" fo:keep-together="always" fo:text-indent="0.847cm" style:auto-text-indent="false" fo:keep-with-next="always"/>
      <style:text-properties fo:color="#2f5496" loext:opacity="100%" fo:font-size="14pt" style:font-name-asian="Times New Roman1" style:font-family-asian="'Times New Roman'" style:font-family-generic-asian="system" style:font-pitch-asian="variable" style:font-size-asian="14pt" style:font-size-complex="14pt"/>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top="0.141cm" fo:margin-bottom="0.071cm" style:contextual-spacing="false" fo:keep-together="always" fo:text-indent="0.847cm" style:auto-text-indent="false" fo:keep-with-next="always"/>
      <style:text-properties fo:color="#2f5496" loext:opacity="100%" fo:font-style="italic" style:font-name-asian="Times New Roman1" style:font-family-asian="'Times New Roman'" style:font-family-generic-asian="system" style:font-pitch-asian="variable" style:font-style-asian="italic" style:font-style-complex="italic"/>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141cm" fo:margin-bottom="0.071cm" style:contextual-spacing="false" fo:keep-together="always" fo:text-indent="0.847cm" style:auto-text-indent="false" fo:keep-with-next="always"/>
      <style:text-properties fo:color="#2f5496" loext:opacity="100%" style:font-name-asian="Times New Roman1" style:font-family-asian="'Times New Roman'" style:font-family-generic-asian="system" style:font-pitch-asian="variable"/>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margin-top="0.071cm" fo:margin-bottom="0cm" style:contextual-spacing="false" fo:keep-together="always" fo:text-indent="0.847cm" style:auto-text-indent="false" fo:keep-with-next="always"/>
      <style:text-properties fo:color="#595959" loext:opacity="100%" fo:font-style="italic" style:font-name-asian="Times New Roman1" style:font-family-asian="'Times New Roman'" style:font-family-generic-asian="system" style:font-pitch-asian="variable" style:font-style-asian="italic" style:font-style-complex="italic"/>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071cm" fo:margin-bottom="0cm" style:contextual-spacing="false" fo:keep-together="always" fo:text-indent="0.847cm" style:auto-text-indent="false" fo:keep-with-next="always"/>
      <style:text-properties fo:color="#595959" loext:opacity="100%" style:font-name-asian="Times New Roman1" style:font-family-asian="'Times New Roman'" style:font-family-generic-asian="system" style:font-pitch-asian="variable"/>
    </style:style>
    <style:style style:name="Heading_20_8" style:display-name="Heading 8" style:family="paragraph" style:parent-style-name="Standard" style:next-style-name="Standard" loext:linked-style-name="Заголовок_20_8_20_Знак" style:default-outline-level="8" style:list-style-name="" style:class="chapter">
      <style:paragraph-properties fo:margin-top="0cm" fo:margin-bottom="0cm" style:contextual-spacing="false" fo:keep-together="always" fo:text-indent="0.847cm" style:auto-text-indent="false" fo:keep-with-next="always"/>
      <style:text-properties fo:color="#272727" loext:opacity="100%" fo:font-style="italic" style:font-name-asian="Times New Roman1" style:font-family-asian="'Times New Roman'" style:font-family-generic-asian="system" style:font-pitch-asian="variable" style:font-style-asian="italic"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chapter">
      <style:paragraph-properties fo:margin-top="0cm" fo:margin-bottom="0cm" style:contextual-spacing="false" fo:keep-together="always" fo:text-indent="0.847cm" style:auto-text-indent="false" fo:keep-with-next="always"/>
      <style:text-properties fo:color="#272727" loext:opacity="100%" style:font-name-asian="Times New Roman1" style:font-family-asian="'Times New Roman'" style:font-family-generic-asian="system" style:font-pitch-asian="variable"/>
    </style:style>
    <style:style style:name="Заголовок"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Указатель" style:family="paragraph" style:parent-style-name="Standard">
      <style:paragraph-properties text:number-lines="false" text:line-number="0"/>
      <style:text-properties style:font-name-complex="Arial1" style:font-family-complex="Arial" style:font-family-generic-complex="system" style:font-pitch-complex="variable"/>
    </style:style>
    <style:style style:name="Title" style:family="paragraph" style:parent-style-name="Standard" style:next-style-name="Standard" loext:linked-style-name="Заголовок_20_Знак" style:class="chapter">
      <style:paragraph-properties fo:margin-top="0cm" fo:margin-bottom="0.141cm" style:contextual-spacing="true" fo:line-height="100%"/>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system" style:font-pitch-asian="variable" style:font-size-asian="28pt" style:font-size-complex="28pt"/>
    </style:style>
    <style:style style:name="Subtitle" style:family="paragraph" style:parent-style-name="Standard" style:next-style-name="Standard" loext:linked-style-name="Подзаголовок_20_Знак" style:class="chapter">
      <style:text-properties fo:color="#595959" loext:opacity="100%" fo:font-size="14pt" fo:letter-spacing="0.026cm" style:font-name-asian="Times New Roman1" style:font-family-asian="'Times New Roman'" style:font-family-generic-asian="system" style:font-pitch-asian="variable" style:font-size-asian="14pt" style:font-size-complex="14pt"/>
    </style:style>
    <style:style style:name="Quote" style:family="paragraph" style:parent-style-name="Standard" style:next-style-name="Standard" loext:linked-style-name="Цитата_20_2_20_Знак">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style:style>
    <style:style style:name="Колонтитулы"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text-properties fo:font-size="12pt"/>
    </style:style>
    <style:style style:name="_30_1_5f_Заголовок_20_1_20_ИТММ" style:display-name="01_Заголовок 1 ИТММ" style:family="paragraph" style:next-style-name="_30_3_5f_Текст_20_ИТММ">
      <style:paragraph-properties fo:margin-top="0.847cm" fo:margin-bottom="0.423cm" style:contextual-spacing="false" fo:text-align="center" style:justify-single-word="false" fo:orphans="2" fo:widows="2" fo:hyphenation-ladder-count="no-limit" fo:hyphenation-keep="auto" loext:hyphenation-keep-type="column" fo:break-before="page" fo:keep-with-next="always" style:punctuation-wrap="simple" style:writing-mode="lr-tb"/>
      <style:text-properties style:use-window-font-color="true" loext:opacity="0%" style:font-name="Times New Roman" fo:font-family="'Times New Roman'" style:font-family-generic="roman" style:font-pitch="variable" fo:font-size="16pt" fo:language="ru" fo:country="RU" fo:font-weight="bold" style:letter-kerning="true" style:font-name-asian="Calibri2" style:font-family-asian="Calibri"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_30_3_5f_Текст_20_ИТММ" style:display-name="03_Текст ИТММ" style:family="paragraph">
      <style:paragraph-properties fo:margin-top="0cm" fo:margin-bottom="0cm" style:contextual-spacing="false" fo:line-height="150%" fo:text-align="justify" style:justify-single-word="false" fo:orphans="2" fo:widows="2" fo:hyphenation-ladder-count="no-limit" fo:hyphenation-keep="auto" loext:hyphenation-keep-type="column" fo:text-indent="1.251cm" style:auto-text-indent="false" style:punctuation-wrap="simple" style:writing-mode="lr-tb"/>
      <style:text-properties style:use-window-font-color="true" loext:opacity="0%" style:font-name="Times New Roman" fo:font-family="'Times New Roman'" style:font-family-generic="roman" style:font-pitch="variable" fo:font-size="12pt" fo:language="ru" fo:country="RU" style:letter-kerning="tru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_30_2_5f_Заголовок_20_2_20_ИТММ" style:display-name="02_Заголовок 2 ИТММ" style:family="paragraph" style:parent-style-name="_30_1_5f_Заголовок_20_1_20_ИТММ" style:next-style-name="_30_3_5f_Текст_20_ИТММ">
      <style:paragraph-properties fo:margin-top="0.635cm" fo:margin-bottom="0.423cm" style:contextual-spacing="false" fo:keep-together="always" fo:break-before="auto" fo:break-after="auto"/>
      <style:text-properties fo:font-size="14pt" style:font-size-asian="14pt"/>
    </style:style>
    <style:style style:name="_30_4_5f_Заголовок_20_3_20_уровня_20_ИИТММ" style:display-name="04_Заголовок 3 уровня ИИТММ" style:family="paragraph" style:parent-style-name="_30_2_5f_Заголовок_20_2_20_ИТММ" style:next-style-name="_30_3_5f_Текст_20_ИТММ">
      <style:text-properties fo:font-size="12pt" style:font-size-asian="12pt"/>
    </style:style>
    <style:style style:name="_30_4_5f_Стиль_20_подписи_20_под_20_рисунком_20_ИИТММ" style:display-name="04_Стиль подписи под рисунком ИИТММ" style:family="paragraph" style:parent-style-name="_30_3_5f_Текст_20_ИТММ" style:next-style-name="_30_3_5f_Текст_20_ИТММ">
      <style:paragraph-properties fo:margin-top="0.212cm" fo:margin-bottom="0.423cm" style:contextual-spacing="false" fo:line-height="100%" fo:text-align="center" style:justify-single-word="false" fo:text-indent="0cm" style:auto-text-indent="false"/>
      <style:text-properties fo:font-size="10pt" style:font-size-asian="10pt"/>
    </style:style>
    <style:style style:name="_30_5_5f_Таблица_20_ИТММ" style:display-name="05_Таблица ИТММ" style:family="paragraph" style:parent-style-name="_30_3_5f_Текст_20_ИТММ" style:next-style-name="_30_3_5f_Текст_20_ИТММ">
      <style:paragraph-properties fo:margin-top="0.635cm" fo:margin-bottom="0.212cm" style:contextual-spacing="false" fo:line-height="100%" fo:text-align="center" style:justify-single-word="false" fo:text-indent="0cm" style:auto-text-indent="false"/>
    </style:style>
    <style:style style:name="_30_7_5f_Список_20_нум_20_ИТММ" style:display-name="07_Список нум ИТММ" style:family="paragraph" style:parent-style-name="_30_3_5f_Текст_20_ИТММ" style:list-style-name="WWNum1" style:list-level="1"/>
    <style:style style:name="_30_6_5f_список_20_литературы_20_ИТММ" style:display-name="06_список литературы ИТММ" style:family="paragraph" style:parent-style-name="_30_3_5f_Текст_20_ИТММ" style:list-style-name="WWNum2" style:list-level="1">
      <style:paragraph-properties fo:margin-left="0cm" fo:text-indent="1.251cm" style:auto-text-indent="false">
        <style:tab-stops>
          <style:tab-stop style:position="1.752cm"/>
        </style:tab-stops>
      </style:paragraph-properties>
    </style:style>
    <style:style style:name="_30_8_5f_Список_20_маркир_20_ИТММ" style:display-name="08_Список маркир ИТММ" style:family="paragraph" style:parent-style-name="_30_3_5f_Текст_20_ИТММ" style:list-style-name="WWNum3" style:list-level="1">
      <style:paragraph-properties fo:margin-left="2cm" fo:text-indent="-0.63cm" style:auto-text-indent="false"/>
    </style:style>
    <style:style style:name="Contents_20_1" style:display-name="Contents 1" style:family="paragraph" style:parent-style-name="Standard" style:next-style-name="Standard" style:auto-update="true" style:class="index">
      <style:paragraph-properties fo:margin-top="0cm" fo:margin-bottom="0.349cm" style:contextual-spacing="false" fo:line-height="100%"/>
      <style:text-properties style:font-name="Times New Roman" fo:font-family="'Times New Roman'" style:font-family-generic="roman" style:font-pitch="variable" fo:font-size="12pt"/>
    </style:style>
    <style:style style:name="Contents_20_2" style:display-name="Contents 2" style:family="paragraph" style:parent-style-name="Standard" style:next-style-name="Standard" style:auto-update="true" style:class="index">
      <style:paragraph-properties fo:margin-top="0cm" fo:margin-bottom="0.349cm" style:contextual-spacing="false" fo:line-height="100%"/>
      <style:text-properties style:font-name="Times New Roman" fo:font-family="'Times New Roman'" style:font-family-generic="roman" style:font-pitch="variable" fo:font-size="12pt"/>
    </style:style>
    <style:style style:name="Contents_20_3" style:display-name="Contents 3" style:family="paragraph" style:parent-style-name="Standard" style:next-style-name="Standard" style:auto-update="true" style:class="index">
      <style:paragraph-properties fo:margin-left="0.847cm" fo:margin-top="0cm" fo:margin-bottom="0.349cm" style:contextual-spacing="false" fo:line-height="100%"/>
      <style:text-properties style:font-name="Times New Roman" fo:font-family="'Times New Roman'" style:font-family-generic="roman" style:font-pitch="variable" fo:font-size="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Текст_20_в_20_заданном_20_формате" style:display-name="Текст в заданном формате" style:family="paragraph" style:parent-style-name="Standard">
      <style:paragraph-properties fo:margin-top="0cm" fo:margin-bottom="0cm" style:contextual-spacing="false"/>
      <style:text-properties style:font-name="Liberation Mono" fo:font-family="'Liberation Mono'"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Базовый"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Arial" fo:font-family="Arial" style:font-family-generic="swiss"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2" style:font-family-complex="Calibri" style:font-family-generic-complex="system" style:font-pitch-complex="variable" style:font-size-complex="12pt" style:text-emphasize="none"/>
    </style:style>
    <style:style style:name="Default_20_Paragraph_20_Font" style:display-name="Default Paragraph Font" style:family="text"/>
    <style:style style:name="Заголовок_20_1_20_Знак" style:display-name="Заголовок 1 Знак" style:family="text">
      <style:text-properties fo:color="#2f5496" loext:opacity="100%" style:font-name="Calibri Light" fo:font-family="'Calibri Light'" style:font-family-generic="swiss"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Заголовок_20_2_20_Знак" style:display-name="Заголовок 2 Знак" style:family="text">
      <style:text-properties fo:color="#2f5496" loext:opacity="100%" style:font-name="Calibri Light" fo:font-family="'Calibri Light'" style:font-family-generic="swiss"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Заголовок_20_3_20_Знак" style:display-name="Заголовок 3 Знак" style:family="text">
      <style:text-properties fo:color="#2f5496" loext:opacity="100%"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Заголовок_20_4_20_Знак" style:display-name="Заголовок 4 Знак" style:family="text">
      <style:text-properties fo:color="#2f5496"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5_20_Знак" style:display-name="Заголовок 5 Знак" style:family="text">
      <style:text-properties fo:color="#2f5496"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Заголовок_20_6_20_Знак" style:display-name="Заголовок 6 Знак" style:family="text">
      <style:text-properties fo:color="#595959"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7_20_Знак" style:display-name="Заголовок 7 Знак" style:family="text">
      <style:text-properties fo:color="#595959"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Заголовок_20_8_20_Знак" style:display-name="Заголовок 8 Знак" style:family="text">
      <style:text-properties fo:color="#272727"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9_20_Знак" style:display-name="Заголовок 9 Знак" style:family="text">
      <style:text-properties fo:color="#272727"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Заголовок_20_Знак" style:display-name="Заголовок Знак" style:family="tex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Подзаголовок_20_Знак" style:display-name="Подзаголовок Знак" style:family="text">
      <style:text-properties fo:color="#595959" loext:opacity="100%" fo:font-size="14pt" fo:letter-spacing="0.026cm"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Цитата_20_2_20_Знак" style:display-name="Цитата 2 Знак" style:family="text" loext:linked-style-name="Quote">
      <style:text-properties fo:color="#404040" loext:opacity="100%" fo:font-style="italic" style:font-style-asian="italic" style:font-style-complex="italic"/>
    </style:style>
    <style:style style:name="Intense_20_Emphasis" style:display-name="Intense Emphasis" style:family="text">
      <style:text-properties fo:color="#2f5496" loext:opacity="100%" fo:font-style="italic" style:font-style-asian="italic" style:font-style-complex="italic"/>
    </style:style>
    <style:style style:name="Выделенная_20_цитата_20_Знак" style:display-name="Выделенная цитата Знак" style:family="text" loext:linked-style-name="Intense_20_Quote">
      <style:text-properties fo:color="#2f5496" loext:opacity="100%" fo:font-style="italic" style:font-style-asian="italic" style:font-style-complex="italic"/>
    </style:style>
    <style:style style:name="Intense_20_Reference" style:display-name="Intense Reference" style:family="text">
      <style:text-properties fo:font-variant="small-caps" fo:color="#2f5496" loext:opacity="100%" fo:letter-spacing="0.009cm" fo:font-weight="bold" style:font-weight-asian="bold" style:font-weight-complex="bold"/>
    </style:style>
    <style:style style:name="Верхний_20_колонтитул_20_Знак" style:display-name="Верхний колонтитул Знак" style:family="text">
      <style:text-properties fo:font-size="12pt" style:letter-kerning="true" style:font-size-asian="12pt" style:language-asian="en" style:country-asian="US" style:font-size-complex="12pt"/>
    </style:style>
    <style:style style:name="Нижний_20_колонтитул_20_Знак" style:display-name="Нижний колонтитул Знак" style:family="text">
      <style:text-properties fo:font-size="12pt" style:letter-kerning="true" style:font-size-asian="12pt" style:language-asian="en" style:country-asian="US" style:font-size-complex="12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Ссылка_20_указателя" style:display-name="Ссылка указателя" style:family="text"/>
    <style:style style:name="Index_20_Link" style:display-name="Index Link" style:family="text"/>
    <style:style style:name="Bullet_20_Symbols" style:display-name="Bullet Symbols" style:family="text">
      <style:text-properties style:font-name="OpenSymbol" fo:font-family="OpenSymbol"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Unresolved_20_Mention" style:display-name="Unresolved Mention" style:family="text">
      <style:text-properties fo:color="#605e5c" loext:opacity="100%" fo:background-color="#e1dfdd"/>
    </style:style>
    <style:style style:name="Символ_20_сноски" style:display-name="Символ сноски" style:family="text"/>
    <style:style style:name="Символ_20_концевой_20_сноски" style:display-name="Символ концевой сноски" style:family="text"/>
    <style:style style:name="Numbering_20_Symbols" style:display-name="Numbering Symbols" style:family="text"/>
    <style:style style:name="Символ_20_нумерации" style:display-name="Символ нумерации"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Footnote_20_Symbol" style:display-name="Footnote Symbol" style:family="text"/>
    <style:style style:name="Маркеры" style:family="text">
      <style:text-properties style:font-name="OpenSymbol" fo:font-family="OpenSymbol"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7" style:display-name="ListLabel 37" style:family="text">
      <style:text-properties style:font-name="Calibri" fo:font-family="Calibri" style:font-family-generic="roman" style:font-pitch="variable" fo:language="en" fo:country="US" style:font-name-complex="Symbol" style:font-family-complex="Symbol" style:font-family-generic-complex="system" style:font-pitch-complex="variable"/>
    </style:style>
    <style:style style:name="ListLabel_20_38" style:display-name="ListLabel 3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3" style:display-name="ListLabel 9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4" style:display-name="ListLabel 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6" style:display-name="ListLabel 9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7" style:display-name="ListLabel 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9" style:display-name="ListLabel 9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0" style:display-name="ListLabel 10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7" style:display-name="ListLabel 12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6" style:display-name="ListLabel 13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Calibri1" fo:font-family="Calibri" style:font-family-generic="swiss"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9" style:display-name="ListLabel 13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1" style:display-name="ListLabel 14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2" style:display-name="ListLabel 14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4" style:display-name="ListLabel 14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5" style:display-name="ListLabel 16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6" style:display-name="ListLabel 16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8" style:display-name="ListLabel 16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69" style:display-name="ListLabel 16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1" style:display-name="ListLabel 17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2" style:display-name="ListLabel 17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4" style:display-name="ListLabel 17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5" style:display-name="ListLabel 17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7" style:display-name="ListLabel 17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8" style:display-name="ListLabel 17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0" style:display-name="ListLabel 18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1" style:display-name="ListLabel 18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3" style:display-name="ListLabel 18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4" style:display-name="ListLabel 18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6" style:display-name="ListLabel 18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7" style:display-name="ListLabel 18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9" style:display-name="ListLabel 18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0" style:display-name="ListLabel 19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1" style:display-name="ListLabel 1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2" style:display-name="ListLabel 19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3" style:display-name="ListLabel 19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4" style:display-name="ListLabel 1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5" style:display-name="ListLabel 19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6" style:display-name="ListLabel 19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7" style:display-name="ListLabel 1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8" style:display-name="ListLabel 19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style:use-window-font-color="true" loext:opacity="0%" fo:font-size="12pt" fo:language="ru" fo:country="RU" style:letter-kerning="tru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Без_20_списка" style:display-name="Без списка">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style:num-format="">
        <style:list-level-properties text:list-level-position-and-space-mode="label-alignment">
          <style:list-level-label-alignment text:label-followed-by="nothing"/>
        </style:list-level-properties>
      </text:list-level-style-number>
      <text:list-level-style-number text:level="2" text:style-name="ListLabel_20_200" style:num-format="">
        <style:list-level-properties text:list-level-position-and-space-mode="label-alignment">
          <style:list-level-label-alignment text:label-followed-by="nothing"/>
        </style:list-level-properties>
      </text:list-level-style-number>
      <text:list-level-style-number text:level="3" text:style-name="ListLabel_20_201" style:num-format="">
        <style:list-level-properties text:list-level-position-and-space-mode="label-alignment">
          <style:list-level-label-alignment text:label-followed-by="nothing"/>
        </style:list-level-properties>
      </text:list-level-style-number>
      <text:list-level-style-number text:level="4" text:style-name="ListLabel_20_202" style:num-format="">
        <style:list-level-properties text:list-level-position-and-space-mode="label-alignment">
          <style:list-level-label-alignment text:label-followed-by="nothing"/>
        </style:list-level-properties>
      </text:list-level-style-number>
      <text:list-level-style-number text:level="5" text:style-name="ListLabel_20_203" style:num-format="">
        <style:list-level-properties text:list-level-position-and-space-mode="label-alignment">
          <style:list-level-label-alignment text:label-followed-by="nothing"/>
        </style:list-level-properties>
      </text:list-level-style-number>
      <text:list-level-style-number text:level="6" text:style-name="ListLabel_20_204" style:num-format="">
        <style:list-level-properties text:list-level-position-and-space-mode="label-alignment">
          <style:list-level-label-alignment text:label-followed-by="nothing"/>
        </style:list-level-properties>
      </text:list-level-style-number>
      <text:list-level-style-number text:level="7" text:style-name="ListLabel_20_205" style:num-format="">
        <style:list-level-properties text:list-level-position-and-space-mode="label-alignment">
          <style:list-level-label-alignment text:label-followed-by="nothing"/>
        </style:list-level-properties>
      </text:list-level-style-number>
      <text:list-level-style-number text:level="8" text:style-name="ListLabel_20_206" style:num-format="">
        <style:list-level-properties text:list-level-position-and-space-mode="label-alignment">
          <style:list-level-label-alignment text:label-followed-by="nothing"/>
        </style:list-level-properties>
      </text:list-level-style-number>
      <text:list-level-style-number text:level="9" text:style-name="ListLabel_20_20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text-properties fo:font-size="12pt" style:font-size-asian="12pt" style:font-size-complex="12pt"/>
    </style:style>
    <style:style style:name="MP2" style:family="paragraph" style:parent-style-name="Footer">
      <style:paragraph-properties fo:margin-top="0cm" fo:margin-bottom="0.282cm" style:contextual-spacing="false"/>
    </style:style>
    <style:style style:name="MP3" style:family="paragraph" style:parent-style-name="Footer">
      <style:paragraph-properties fo:text-align="center" style:justify-single-word="false"/>
    </style:style>
    <style:style style:name="MT1" style:family="text">
      <style:text-properties style:font-name="Times New Roman"/>
    </style:style>
    <style:page-layout style:name="Mpm1">
      <style:page-layout-properties fo:page-width="21.001cm" fo:page-height="29.7cm" style:num-format="1" style:print-orientation="portrait" fo:margin-top="2cm" fo:margin-bottom="0.938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62cm" fo:margin-left="0cm" fo:margin-right="0cm" fo:margin-top="0.961cm" style:dynamic-spacing="true"/>
      </style:footer-style>
    </style:page-layout>
    <style:page-layout style:name="Mpm2">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2</text:page-number></text:span></text:p>
        <text:p text:style-name="MP2"/>
      </style:footer>
      <style:footer-first>
        <text:p text:style-name="MP3"/>
        <text:p text:style-name="MP2"/>
      </style:footer-first>
    </style:master-page>
    <style:master-page style:name="Converted1" style:page-layout-name="Mpm2" draw:style-name="Mdp1">
      <style:footer>
        <text:p text:style-name="MP3" loext:marker-style-name="MT1"><text:page-number text:select-page="current">63</text:page-number></text:p>
        <text:p text:style-name="MP2"/>
      </style:footer>
      <style:footer-first>
        <text:p text:style-name="MP3" loext:marker-style-name="MT1"><text:page-number text:select-page="current">2</text:page-number></text:p>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Galina Kuz</meta:initial-creator>
    <dc:language>ru-RU</dc:language>
    <dc:date>2026-05-27T00:44:21.112104100</dc:date>
    <meta:editing-cycles>651</meta:editing-cycles>
    <meta:editing-duration>P1DT2H41M50S</meta:editing-duration>
    <meta:generator>LibreOffice/25.2.7.2$Windows_X86_64 LibreOffice_project/5cbfd1ab6520636bb5f7b99185aa69bd7456825d</meta:generator>
    <meta:document-statistic meta:table-count="10" meta:image-count="8" meta:object-count="170" meta:page-count="77" meta:paragraph-count="1943" meta:word-count="13752" meta:character-count="96216" meta:non-whitespace-character-count="79481"/>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i mathvariant="italic">QRx</mi>
      <mo stretchy="false">=</mo>
      <mi>b</mi>
    </mrow>
    <annotation encoding="StarMath 5.0">QRx = b</annotation>
  </semantics>
</math>
</file>

<file path=Object 10/content.xml><?xml version="1.0" encoding="utf-8"?>
<math xmlns="http://www.w3.org/1998/Math/MathML" display="block">
  <semantics>
    <mi>v</mi>
    <annotation encoding="StarMath 5.0">v</annotation>
  </semantics>
</math>
</file>

<file path=Object 100/content.xml><?xml version="1.0" encoding="utf-8"?>
<math xmlns="http://www.w3.org/1998/Math/MathML" display="block">
  <semantics>
    <mrow>
      <mrow>
        <msub>
          <mi>H</mi>
          <mi>k</mi>
        </msub>
        <mo stretchy="false">=</mo>
        <mi>E</mi>
      </mrow>
      <mi>−</mi>
      <mn>2</mn>
      <msub>
        <mi>v</mi>
        <mi>k</mi>
      </msub>
      <msubsup>
        <mi>v</mi>
        <mi>k</mi>
        <mi>T</mi>
      </msubsup>
    </mrow>
    <annotation encoding="StarMath 5.0">{H} rsub {k} = E − 2 {v} rsub {k} {v} rsub {k} rsup {T}</annotation>
  </semantics>
</math>
</file>

<file path=Object 101/content.xml><?xml version="1.0" encoding="utf-8"?>
<math xmlns="http://www.w3.org/1998/Math/MathML" display="block">
  <semantics>
    <mrow>
      <mrow>
        <msub>
          <mover accent="true">
            <mi>A</mi>
            <mo stretchy="true">~</mo>
          </mover>
          <mi>k</mi>
        </msub>
        <mo stretchy="false">=</mo>
        <msub>
          <mi>H</mi>
          <mrow>
            <mi>k</mi>
            <mi>−</mi>
            <mn>1</mn>
          </mrow>
        </msub>
      </mrow>
      <mi>…</mi>
      <msub>
        <mi>H</mi>
        <mn>1</mn>
      </msub>
      <mi>A</mi>
    </mrow>
    <annotation encoding="StarMath 5.0">{widetilde {A}} rsub {k} = {H} rsub {k − 1} … {H} rsub {1} A</annotation>
  </semantics>
</math>
</file>

<file path=Object 102/content.xml><?xml version="1.0" encoding="utf-8"?>
<math xmlns="http://www.w3.org/1998/Math/MathML" display="block">
  <semantics>
    <msub>
      <mover accent="true">
        <mi>A</mi>
        <mo stretchy="true">~</mo>
      </mover>
      <mi>k</mi>
    </msub>
    <annotation encoding="StarMath 5.0">{widetilde {A}} rsub {k}</annotation>
  </semantics>
</math>
</file>

<file path=Object 103/content.xml><?xml version="1.0" encoding="utf-8"?>
<math xmlns="http://www.w3.org/1998/Math/MathML" display="block">
  <semantics>
    <mrow>
      <mrow>
        <mi>R</mi>
        <mo stretchy="false">=</mo>
        <msub>
          <mi>H</mi>
          <mrow>
            <mi>n</mi>
            <mi>−</mi>
            <mn>1</mn>
          </mrow>
        </msub>
      </mrow>
      <mi>…</mi>
      <msub>
        <mi>H</mi>
        <mn>1</mn>
      </msub>
      <mi>A</mi>
    </mrow>
    <annotation encoding="StarMath 5.0">R = {H} rsub {n − 1} … {H} rsub {1} A</annotation>
  </semantics>
</math>
</file>

<file path=Object 104/content.xml><?xml version="1.0" encoding="utf-8"?>
<math xmlns="http://www.w3.org/1998/Math/MathML" display="block">
  <semantics>
    <mrow>
      <mrow>
        <msub>
          <mi>Q</mi>
          <mi>k</mi>
        </msub>
        <mo stretchy="false">=</mo>
        <msub>
          <mi>H</mi>
          <mn>1</mn>
        </msub>
      </mrow>
      <mi>…</mi>
      <msub>
        <mi>H</mi>
        <mi>k</mi>
      </msub>
    </mrow>
    <annotation encoding="StarMath 5.0">{Q} rsub {k} = {H} rsub {1} … {H} rsub {k}</annotation>
  </semantics>
</math>
</file>

<file path=Object 105/content.xml><?xml version="1.0" encoding="utf-8"?>
<math xmlns="http://www.w3.org/1998/Math/MathML" display="block">
  <semantics>
    <mrow>
      <mrow>
        <mi>Q</mi>
        <mo stretchy="false">=</mo>
        <msub>
          <mi>H</mi>
          <mn>1</mn>
        </msub>
      </mrow>
      <mi>…</mi>
      <msub>
        <mi>H</mi>
        <mrow>
          <mi>n</mi>
          <mi>−</mi>
          <mn>1</mn>
        </mrow>
      </msub>
    </mrow>
    <annotation encoding="StarMath 5.0">Q = {H} rsub {1} … {H} rsub {n − 1}</annotation>
  </semantics>
</math>
</file>

<file path=Object 106/content.xml><?xml version="1.0" encoding="utf-8"?>
<math xmlns="http://www.w3.org/1998/Math/MathML" display="block">
  <semantics>
    <mrow>
      <mrow>
        <mi>H</mi>
        <mo stretchy="false">=</mo>
        <mi>E</mi>
      </mrow>
      <mi>−</mi>
      <mfrac>
        <msup>
          <mi mathvariant="italic">vv</mi>
          <mi>T</mi>
        </msup>
        <mrow>
          <msup>
            <mi>v</mi>
            <mi>T</mi>
          </msup>
          <mi>v</mi>
        </mrow>
      </mfrac>
    </mrow>
    <annotation encoding="StarMath 5.0">H = E − {{vv} ^ {T}} over {{v} ^ {T} v}</annotation>
  </semantics>
</math>
</file>

<file path=Object 107/content.xml><?xml version="1.0" encoding="utf-8"?>
<math xmlns="http://www.w3.org/1998/Math/MathML" display="block">
  <semantics>
    <mrow>
      <mrow>
        <msub>
          <mi>A</mi>
          <mi>k</mi>
        </msub>
        <mo stretchy="false">=</mo>
        <msub>
          <mi>H</mi>
          <mrow>
            <mi>k</mi>
            <mi>−</mi>
            <mn>1</mn>
          </mrow>
        </msub>
      </mrow>
      <mn>...</mn>
      <msub>
        <mi>H</mi>
        <mn>1</mn>
      </msub>
      <mi>A</mi>
    </mrow>
    <annotation encoding="StarMath 5.0">{A} rsub {k} = {H} rsub {k − 1} ... {H} rsub {1} A</annotation>
  </semantics>
</math>
</file>

<file path=Object 108/content.xml><?xml version="1.0" encoding="utf-8"?>
<math xmlns="http://www.w3.org/1998/Math/MathML" display="block">
  <semantics>
    <mrow>
      <mrow>
        <mi>R</mi>
        <mo stretchy="false">=</mo>
        <msub>
          <mi>H</mi>
          <mrow>
            <mi>n</mi>
            <mi>−</mi>
            <mn>1</mn>
          </mrow>
        </msub>
      </mrow>
      <mn>...</mn>
      <msub>
        <mi>H</mi>
        <mn>1</mn>
      </msub>
      <mi>A</mi>
    </mrow>
    <annotation encoding="StarMath 5.0">R = {H} rsub {n − 1} ... {H} rsub {1} A</annotation>
  </semantics>
</math>
</file>

<file path=Object 109/content.xml><?xml version="1.0" encoding="utf-8"?>
<math xmlns="http://www.w3.org/1998/Math/MathML" display="block">
  <semantics>
    <mrow>
      <mrow>
        <mi>Q</mi>
        <mo stretchy="false">=</mo>
        <msub>
          <mi>H</mi>
          <mn>1</mn>
        </msub>
      </mrow>
      <mn>...</mn>
      <msub>
        <mi>H</mi>
        <mrow>
          <mi>n</mi>
          <mi>−</mi>
          <mn>1</mn>
        </mrow>
      </msub>
    </mrow>
    <annotation encoding="StarMath 5.0">Q = {H} rsub {1} ... {H} rsub {n − 1}</annotation>
  </semantics>
</math>
</file>

<file path=Object 11/content.xml><?xml version="1.0" encoding="utf-8"?>
<math xmlns="http://www.w3.org/1998/Math/MathML" display="block">
  <semantics>
    <mrow>
      <mi>x</mi>
      <mi>≠</mi>
      <mn>0</mn>
    </mrow>
    <annotation encoding="StarMath 5.0">x ≠ 0</annotation>
  </semantics>
</math>
</file>

<file path=Object 110/content.xml><?xml version="1.0" encoding="utf-8"?>
<math xmlns="http://www.w3.org/1998/Math/MathML" display="block">
  <semantics>
    <mrow>
      <mi>β</mi>
      <mi>,</mi>
      <mi>μ</mi>
      <mi>,</mi>
      <mi>v</mi>
      <mi>и</mi>
      <mi>H</mi>
    </mrow>
    <annotation encoding="StarMath 5.0">β , μ , v и H</annotation>
  </semantics>
</math>
</file>

<file path=Object 111/content.xml><?xml version="1.0" encoding="utf-8"?>
<math xmlns="http://www.w3.org/1998/Math/MathML" display="block">
  <semantics>
    <mrow>
      <mrow>
        <msub>
          <mi>v</mi>
          <mi>k</mi>
        </msub>
        <mo stretchy="false">=</mo>
        <msub>
          <mi>μ</mi>
          <mi>k</mi>
        </msub>
      </mrow>
      <mrow>
        <mo fence="true" form="prefix" stretchy="true">(</mo>
        <mrow>
          <mrow>
            <mn>0</mn>
            <mi>;</mi>
            <mi>…</mi>
            <mi>;</mi>
            <mn>0</mn>
            <mi>;</mi>
            <msub>
              <mover accent="true">
                <mi>a</mi>
                <mo stretchy="true">~</mo>
              </mover>
              <mi mathvariant="italic">kk</mi>
            </msub>
            <mi>−</mi>
            <msub>
              <mi>β</mi>
              <mi>k</mi>
            </msub>
            <mi>;</mi>
            <msub>
              <mover accent="true">
                <mi>a</mi>
                <mo stretchy="true">~</mo>
              </mover>
              <mrow>
                <mrow>
                  <mo fence="true" form="prefix" stretchy="true">(</mo>
                  <mrow>
                    <mrow>
                      <mi>k</mi>
                      <mo stretchy="false">+</mo>
                      <mn>1</mn>
                    </mrow>
                  </mrow>
                  <mo fence="true" form="postfix" stretchy="true">)</mo>
                </mrow>
                <mi>k</mi>
              </mrow>
            </msub>
            <mi>;</mi>
            <msub>
              <mrow>
                <mi>…</mi>
                <mi>;</mi>
                <mover accent="true">
                  <mi>a</mi>
                  <mo stretchy="true">~</mo>
                </mover>
              </mrow>
              <mi mathvariant="italic">nk</mi>
            </msub>
          </mrow>
        </mrow>
        <mo fence="true" form="postfix" stretchy="true">)</mo>
      </mrow>
    </mrow>
    <annotation encoding="StarMath 5.0">{v} rsub {k} = {μ} rsub {k} left (0 ; … ; 0 ; {widetilde {a}} rsub {kk} − {β} rsub {k} ; {widetilde {a}} rsub {left (k + 1 right ) k} ; {… ; widetilde {a}} rsub {nk} right )</annotation>
  </semantics>
</math>
</file>

<file path=Object 112/content.xml><?xml version="1.0" encoding="utf-8"?>
<math xmlns="http://www.w3.org/1998/Math/MathML" display="block">
  <semantics>
    <mrow>
      <mrow>
        <mi>H</mi>
        <mo stretchy="false">=</mo>
        <mi>E</mi>
      </mrow>
      <mi>−</mi>
      <mfrac>
        <msup>
          <mi mathvariant="italic">vv</mi>
          <mi>T</mi>
        </msup>
        <mrow>
          <msup>
            <mi>v</mi>
            <mi>T</mi>
          </msup>
          <mi>v</mi>
        </mrow>
      </mfrac>
    </mrow>
    <annotation encoding="StarMath 5.0">H = E − {{vv} ^ {T}} over {{v} ^ {T} v}</annotation>
  </semantics>
</math>
</file>

<file path=Object 113/content.xml><?xml version="1.0" encoding="utf-8"?>
<math xmlns="http://www.w3.org/1998/Math/MathML" display="block">
  <semantics>
    <mrow>
      <mrow>
        <msub>
          <mi>β</mi>
          <mi>k</mi>
        </msub>
        <mo stretchy="false">=</mo>
        <mi mathvariant="italic">sign</mi>
      </mrow>
      <mrow>
        <mo fence="true" form="prefix" stretchy="true">(</mo>
        <mrow>
          <mrow>
            <mi>−</mi>
            <msub>
              <mover accent="true">
                <mi>a</mi>
                <mo stretchy="true">~</mo>
              </mover>
              <mi mathvariant="italic">kk</mi>
            </msub>
          </mrow>
        </mrow>
        <mo fence="true" form="postfix" stretchy="true">)</mo>
      </mrow>
      <msqrt>
        <mrow>
          <munderover>
            <mo stretchy="false">∑</mo>
            <mrow>
              <mi>i</mi>
              <mo stretchy="false">=</mo>
              <mi>k</mi>
            </mrow>
            <mi>n</mi>
          </munderover>
          <msubsup>
            <mover accent="true">
              <mi>a</mi>
              <mo stretchy="true">~</mo>
            </mover>
            <mi mathvariant="italic">ik</mi>
            <mn>2</mn>
          </msubsup>
        </mrow>
      </msqrt>
    </mrow>
    <annotation encoding="StarMath 5.0">{β} rsub {k} = sign left (− {widetilde {a}} rsub {kk} right ) sqrt {sum from {i = k} to {n} {{widetilde {a}} rsub {ik} rsup {2}}}</annotation>
  </semantics>
</math>
</file>

<file path=Object 11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chart:data-label-number="value" chart:data-label-text="false" chart:data-label-symbol="false" chart:data-label-series="false"/>
    </style:style>
    <style:style style:name="ch4"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7.857cm" svg:height="11.8cm" xlink:href="." xlink:type="simple" chart:class="chart:line" chart:style-name="ch1">
        <chart:legend chart:legend-position="end" svg:x="14.975cm" svg:y="4.854cm" style:legend-expansion="high" chart:style-name="ch2"/>
        <chart:plot-area chart:style-name="ch3" svg:x="0.349cm" svg:y="0.035cm" svg:width="14.8cm" svg:height="11.467cm">
          <chart:coordinate-region svg:x="1.556cm" svg:y="0.234cm" svg:width="13.21cm" svg:height="10.621cm"/>
          <chart:axis chart:dimension="x" chart:name="primary-x" chart:style-name="ch4" chartooo:axis-type="auto">
            <chartooo:date-scale/>
            <chart:title svg:x="6.148cm" svg:y="11.24cm" chart:style-name="ch5">
              <text:p><text:span text:style-name="T1">Размер данных, NxN</text:span></text:p>
            </chart:title>
            <chart:categories table:cell-range-address="local-table.$A$2:.$A$11"/>
          </chart:axis>
          <chart:axis chart:dimension="y" chart:name="primary-y" chart:style-name="ch6">
            <chart:title svg:x="0cm" svg:y="7.057cm" chart:style-name="ch7">
              <text:p><text:span text:style-name="T1">Время работы, с</text:span></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series chart:style-name="ch12" chart:values-cell-range-address="local-table.$E$2:.$E$11" chart:label-cell-address="local-table.$E$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154983">
                <text:p>0.154983</text:p>
              </table:table-cell>
              <table:table-cell office:value-type="float" office:value="0.0967101">
                <text:p>0.0967101</text:p>
              </table:table-cell>
              <table:table-cell office:value-type="float" office:value="0.0707805">
                <text:p>0.0707805</text:p>
              </table:table-cell>
              <table:table-cell office:value-type="float" office:value="0.0489507">
                <text:p>0.0489507</text:p>
              </table:table-cell>
            </table:table-row>
            <table:table-row>
              <table:table-cell office:value-type="string">
                <text:p>200</text:p>
              </table:table-cell>
              <table:table-cell office:value-type="float" office:value="2.53974">
                <text:p>2.53974</text:p>
              </table:table-cell>
              <table:table-cell office:value-type="float" office:value="1.41556">
                <text:p>1.41556</text:p>
              </table:table-cell>
              <table:table-cell office:value-type="float" office:value="0.996186">
                <text:p>0.996186</text:p>
              </table:table-cell>
              <table:table-cell office:value-type="float" office:value="0.590008">
                <text:p>0.590008</text:p>
              </table:table-cell>
            </table:table-row>
            <table:table-row>
              <table:table-cell office:value-type="string">
                <text:p>300</text:p>
              </table:table-cell>
              <table:table-cell office:value-type="float" office:value="11.855">
                <text:p>11.855</text:p>
              </table:table-cell>
              <table:table-cell office:value-type="float" office:value="6.37681">
                <text:p>6.37681</text:p>
              </table:table-cell>
              <table:table-cell office:value-type="float" office:value="4.7699">
                <text:p>4.7699</text:p>
              </table:table-cell>
              <table:table-cell office:value-type="float" office:value="2.97088">
                <text:p>2.97088</text:p>
              </table:table-cell>
            </table:table-row>
            <table:table-row>
              <table:table-cell office:value-type="string">
                <text:p>400</text:p>
              </table:table-cell>
              <table:table-cell office:value-type="float" office:value="36.759">
                <text:p>36.759</text:p>
              </table:table-cell>
              <table:table-cell office:value-type="float" office:value="19.0374">
                <text:p>19.0374</text:p>
              </table:table-cell>
              <table:table-cell office:value-type="float" office:value="12.0464">
                <text:p>12.0464</text:p>
              </table:table-cell>
              <table:table-cell office:value-type="float" office:value="9.34946">
                <text:p>9.34946</text:p>
              </table:table-cell>
            </table:table-row>
            <table:table-row>
              <table:table-cell office:value-type="string">
                <text:p>500</text:p>
              </table:table-cell>
              <table:table-cell office:value-type="float" office:value="100.427">
                <text:p>100.427</text:p>
              </table:table-cell>
              <table:table-cell office:value-type="float" office:value="52.1356">
                <text:p>52.1356</text:p>
              </table:table-cell>
              <table:table-cell office:value-type="float" office:value="31.9608">
                <text:p>31.9608</text:p>
              </table:table-cell>
              <table:table-cell office:value-type="float" office:value="24.0397">
                <text:p>24.0397</text:p>
              </table:table-cell>
            </table:table-row>
            <table:table-row>
              <table:table-cell office:value-type="string">
                <text:p>600</text:p>
              </table:table-cell>
              <table:table-cell office:value-type="float" office:value="210.789">
                <text:p>210.789</text:p>
              </table:table-cell>
              <table:table-cell office:value-type="float" office:value="111.767">
                <text:p>111.767</text:p>
              </table:table-cell>
              <table:table-cell office:value-type="float" office:value="79.8645">
                <text:p>79.8645</text:p>
              </table:table-cell>
              <table:table-cell office:value-type="float" office:value="54.1162">
                <text:p>54.1162</text:p>
              </table:table-cell>
            </table:table-row>
            <table:table-row>
              <table:table-cell office:value-type="string">
                <text:p>700</text:p>
              </table:table-cell>
              <table:table-cell office:value-type="float" office:value="410">
                <text:p>410</text:p>
              </table:table-cell>
              <table:table-cell office:value-type="float" office:value="208">
                <text:p>208</text:p>
              </table:table-cell>
              <table:table-cell office:value-type="float" office:value="140">
                <text:p>140</text:p>
              </table:table-cell>
              <table:table-cell office:value-type="float" office:value="97.9165">
                <text:p>97.9165</text:p>
              </table:table-cell>
            </table:table-row>
            <table:table-row>
              <table:table-cell office:value-type="string">
                <text:p>800</text:p>
              </table:table-cell>
              <table:table-cell office:value-type="float" office:value="720">
                <text:p>720</text:p>
              </table:table-cell>
              <table:table-cell office:value-type="float" office:value="365">
                <text:p>365</text:p>
              </table:table-cell>
              <table:table-cell office:value-type="float" office:value="245">
                <text:p>245</text:p>
              </table:table-cell>
              <table:table-cell office:value-type="float" office:value="175.203">
                <text:p>175.203</text:p>
              </table:table-cell>
            </table:table-row>
            <table:table-row>
              <table:table-cell office:value-type="string">
                <text:p>900</text:p>
              </table:table-cell>
              <table:table-cell office:value-type="float" office:value="1190">
                <text:p>1190</text:p>
              </table:table-cell>
              <table:table-cell office:value-type="float" office:value="600">
                <text:p>600</text:p>
              </table:table-cell>
              <table:table-cell office:value-type="float" office:value="400">
                <text:p>400</text:p>
              </table:table-cell>
              <table:table-cell office:value-type="float" office:value="327">
                <text:p>327</text:p>
              </table:table-cell>
            </table:table-row>
            <table:table-row>
              <table:table-cell office:value-type="string">
                <text:p>1000</text:p>
              </table:table-cell>
              <table:table-cell office:value-type="float" office:value="1850">
                <text:p>1850</text:p>
              </table:table-cell>
              <table:table-cell office:value-type="float" office:value="930">
                <text:p>930</text:p>
              </table:table-cell>
              <table:table-cell office:value-type="float" office:value="620">
                <text:p>620</text:p>
              </table:table-cell>
              <table:table-cell office:value-type="float" office:value="545">
                <text:p>545</text:p>
              </table:table-cell>
            </table:table-row>
          </table:table-rows>
        </table:table>
      </chart:chart>
    </office:chart>
  </office:body>
</office:document-content>
</file>

<file path=Object 11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1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16/content.xml><?xml version="1.0" encoding="utf-8"?>
<math xmlns="http://www.w3.org/1998/Math/MathML" display="block">
  <semantics>
    <mrow>
      <msub>
        <mi>H</mi>
        <mi>k</mi>
      </msub>
      <msub>
        <mi>A</mi>
        <mi>k</mi>
      </msub>
    </mrow>
    <annotation encoding="StarMath 5.0">{H} rsub {k} {A} rsub {k}</annotation>
  </semantics>
</math>
</file>

<file path=Object 117/content.xml><?xml version="1.0" encoding="utf-8"?>
<math xmlns="http://www.w3.org/1998/Math/MathML" display="block">
  <semantics>
    <mrow>
      <msub>
        <mi>H</mi>
        <mi>k</mi>
      </msub>
      <mrow>
        <msub>
          <mi>A</mi>
          <mi>k</mi>
        </msub>
        <mo stretchy="false">=</mo>
        <mrow>
          <mo fence="true" form="prefix" stretchy="true">(</mo>
          <mrow>
            <mrow>
              <mi>I</mi>
              <mi>−</mi>
              <mn>2</mn>
              <msup>
                <mi mathvariant="italic">vv</mi>
                <mi>T</mi>
              </msup>
            </mrow>
          </mrow>
          <mo fence="true" form="postfix" stretchy="true">)</mo>
        </mrow>
      </mrow>
      <mrow>
        <msub>
          <mi>A</mi>
          <mi>k</mi>
        </msub>
        <mo stretchy="false">=</mo>
        <msub>
          <mi>A</mi>
          <mi>k</mi>
        </msub>
      </mrow>
      <mi>−</mi>
      <mn>2</mn>
      <mi>v</mi>
      <mrow>
        <mo fence="true" form="prefix" stretchy="true">(</mo>
        <mrow>
          <mrow>
            <msup>
              <mi>v</mi>
              <mi>T</mi>
            </msup>
            <msub>
              <mi>A</mi>
              <mi>k</mi>
            </msub>
          </mrow>
        </mrow>
        <mo fence="true" form="postfix" stretchy="true">)</mo>
      </mrow>
    </mrow>
    <annotation encoding="StarMath 5.0">{H} rsub {k} {A} rsub {k} = left (I − 2 {vv} ^ {T} right ) {A} rsub {k} = {A} rsub {k} − 2 v left ({v} ^ {T} {A} rsub {k} right )</annotation>
  </semantics>
</math>
</file>

<file path=Object 118/content.xml><?xml version="1.0" encoding="utf-8"?>
<math xmlns="http://www.w3.org/1998/Math/MathML" display="block">
  <semantics>
    <mrow>
      <msub>
        <mi>Q</mi>
        <mrow>
          <mi>n</mi>
          <mi>−</mi>
          <mn>1</mn>
        </mrow>
      </msub>
      <mo stretchy="false">=</mo>
      <mi>I</mi>
    </mrow>
    <annotation encoding="StarMath 5.0">{Q} rsub {n − 1} = I</annotation>
  </semantics>
</math>
</file>

<file path=Object 119/content.xml><?xml version="1.0" encoding="utf-8"?>
<math xmlns="http://www.w3.org/1998/Math/MathML" display="block">
  <semantics>
    <mrow>
      <mrow>
        <msub>
          <mi>Q</mi>
          <mi>k</mi>
        </msub>
        <mo stretchy="false">=</mo>
        <msub>
          <mi>H</mi>
          <mi>k</mi>
        </msub>
      </mrow>
      <mrow>
        <msub>
          <mi>Q</mi>
          <mrow>
            <mi>k</mi>
            <mi>−</mi>
            <mn>1</mn>
          </mrow>
        </msub>
        <mo stretchy="false">=</mo>
        <msub>
          <mi>Q</mi>
          <mrow>
            <mi>k</mi>
            <mi>−</mi>
            <mn>1</mn>
          </mrow>
        </msub>
      </mrow>
      <mi>−</mi>
      <mn>2</mn>
      <msub>
        <mi>v</mi>
        <mi>k</mi>
      </msub>
      <mrow>
        <mo fence="true" form="prefix" stretchy="true">(</mo>
        <mrow>
          <mrow>
            <msubsup>
              <mi>v</mi>
              <mi>k</mi>
              <mi>T</mi>
            </msubsup>
            <msub>
              <mi>Q</mi>
              <mrow>
                <mi>k</mi>
                <mi>−</mi>
                <mn>1</mn>
              </mrow>
            </msub>
          </mrow>
        </mrow>
        <mo fence="true" form="postfix" stretchy="true">)</mo>
      </mrow>
      <mi>,</mi>
      <mrow>
        <mi>k</mi>
        <mo stretchy="false">=</mo>
        <mi>n</mi>
      </mrow>
      <mi>−</mi>
      <mn>2</mn>
      <mi>,</mi>
      <mn>...</mn>
      <mn>,0</mn>
    </mrow>
    <annotation encoding="StarMath 5.0">{Q} rsub {k} = {H} rsub {k} {Q} rsub {k − 1} = {Q} rsub {k − 1} − 2 {v} rsub {k} left ({v} rsub {k} rsup {T} {Q} rsub {k − 1} right ) , k = n − 2 , ... ,0</annotation>
  </semantics>
</math>
</file>

<file path=Object 12/content.xml><?xml version="1.0" encoding="utf-8"?>
<math xmlns="http://www.w3.org/1998/Math/MathML" display="block">
  <semantics>
    <mrow>
      <mrow>
        <mi mathvariant="italic">Hx</mi>
        <mo stretchy="false">=</mo>
        <mi>α</mi>
      </mrow>
      <msub>
        <mi>e</mi>
        <mn>1</mn>
      </msub>
    </mrow>
    <annotation encoding="StarMath 5.0">Hx = α {e} rsub {1}</annotation>
  </semantics>
</math>
</file>

<file path=Object 120/content.xml><?xml version="1.0" encoding="utf-8"?>
<math xmlns="http://www.w3.org/1998/Math/MathML" display="block">
  <semantics>
    <mrow>
      <mi>Q</mi>
      <mo stretchy="false">=</mo>
      <msub>
        <mi>Q</mi>
        <mn>0</mn>
      </msub>
    </mrow>
    <annotation encoding="StarMath 5.0">Q = {Q} rsub {0}</annotation>
  </semantics>
</math>
</file>

<file path=Object 121/content.xml><?xml version="1.0" encoding="utf-8"?>
<math xmlns="http://www.w3.org/1998/Math/MathML" display="block">
  <semantics>
    <mrow>
      <mi>β</mi>
      <mi>,</mi>
      <mi>μ</mi>
      <mi>,</mi>
      <mi>v</mi>
      <mi>и</mi>
      <mi>H</mi>
    </mrow>
    <annotation encoding="StarMath 5.0">β , μ , v и H</annotation>
  </semantics>
</math>
</file>

<file path=Object 122/content.xml><?xml version="1.0" encoding="utf-8"?>
<math xmlns="http://www.w3.org/1998/Math/MathML" display="block">
  <semantics>
    <mrow>
      <mi>β</mi>
      <mi>,</mi>
      <mi>μ</mi>
    </mrow>
    <annotation encoding="StarMath 5.0">β , μ</annotation>
  </semantics>
</math>
</file>

<file path=Object 12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chart:data-label-number="value" chart:data-label-text="false" chart:data-label-symbol="false" chart:data-label-series="false"/>
    </style:style>
    <style:style style:name="ch4"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155cm" svg:height="20.164cm" xlink:href="." xlink:type="simple" chart:class="chart:line" chart:style-name="ch1">
        <chart:legend chart:legend-position="end" svg:x="13.273cm" svg:y="9.036cm" style:legend-expansion="high" chart:style-name="ch2"/>
        <chart:plot-area chart:style-name="ch3" svg:x="0.299cm" svg:y="0.208cm" svg:width="12.511cm" svg:height="19.403cm">
          <chart:coordinate-region svg:x="1.411cm" svg:y="0.407cm" svg:width="11.015cm" svg:height="18.557cm"/>
          <chart:axis chart:dimension="x" chart:name="primary-x" chart:style-name="ch4" chartooo:axis-type="auto">
            <chartooo:date-scale/>
            <chart:title svg:x="4.953cm" svg:y="19.604cm" chart:style-name="ch5">
              <text:p><text:span text:style-name="T1">Размер данных, NxN</text:span></text:p>
            </chart:title>
            <chart:categories table:cell-range-address="local-table.$A$2:.$A$13"/>
          </chart:axis>
          <chart:axis chart:dimension="y" chart:name="primary-y" chart:style-name="ch6">
            <chart:title svg:x="0cm" svg:y="11.198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series chart:style-name="ch12" chart:values-cell-range-address="local-table.$E$2:.$E$13" chart:label-cell-address="local-table.$E$1" chart:class="chart:line">
            <chart:data-point chart:repeated="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14857">
                <text:p>0.0014857</text:p>
              </table:table-cell>
              <table:table-cell office:value-type="float" office:value="0.0017873">
                <text:p>0.0017873</text:p>
              </table:table-cell>
              <table:table-cell office:value-type="float" office:value="0.0020656">
                <text:p>0.0020656</text:p>
              </table:table-cell>
              <table:table-cell office:value-type="float" office:value="0.0037046">
                <text:p>0.0037046</text:p>
              </table:table-cell>
            </table:table-row>
            <table:table-row>
              <table:table-cell office:value-type="string">
                <text:p>200</text:p>
              </table:table-cell>
              <table:table-cell office:value-type="float" office:value="0.0066652">
                <text:p>0.0066652</text:p>
              </table:table-cell>
              <table:table-cell office:value-type="float" office:value="0.0073782">
                <text:p>0.0073782</text:p>
              </table:table-cell>
              <table:table-cell office:value-type="float" office:value="0.0055102">
                <text:p>0.0055102</text:p>
              </table:table-cell>
              <table:table-cell office:value-type="float" office:value="0.0087853">
                <text:p>0.0087853</text:p>
              </table:table-cell>
            </table:table-row>
            <table:table-row>
              <table:table-cell office:value-type="string">
                <text:p>300</text:p>
              </table:table-cell>
              <table:table-cell office:value-type="float" office:value="0.022568">
                <text:p>0.022568</text:p>
              </table:table-cell>
              <table:table-cell office:value-type="float" office:value="0.0197478">
                <text:p>0.0197478</text:p>
              </table:table-cell>
              <table:table-cell office:value-type="float" office:value="0.0163442">
                <text:p>0.0163442</text:p>
              </table:table-cell>
              <table:table-cell office:value-type="float" office:value="0.0192567">
                <text:p>0.0192567</text:p>
              </table:table-cell>
            </table:table-row>
            <table:table-row>
              <table:table-cell office:value-type="string">
                <text:p>400</text:p>
              </table:table-cell>
              <table:table-cell office:value-type="float" office:value="0.0631678">
                <text:p>0.0631678</text:p>
              </table:table-cell>
              <table:table-cell office:value-type="float" office:value="0.0459981">
                <text:p>0.0459981</text:p>
              </table:table-cell>
              <table:table-cell office:value-type="float" office:value="0.0371249">
                <text:p>0.0371249</text:p>
              </table:table-cell>
              <table:table-cell office:value-type="float" office:value="0.0449681">
                <text:p>0.0449681</text:p>
              </table:table-cell>
            </table:table-row>
            <table:table-row>
              <table:table-cell office:value-type="string">
                <text:p>500</text:p>
              </table:table-cell>
              <table:table-cell office:value-type="float" office:value="0.106889">
                <text:p>0.106889</text:p>
              </table:table-cell>
              <table:table-cell office:value-type="float" office:value="0.0775788">
                <text:p>0.0775788</text:p>
              </table:table-cell>
              <table:table-cell office:value-type="float" office:value="0.0595577">
                <text:p>0.0595577</text:p>
              </table:table-cell>
              <table:table-cell office:value-type="float" office:value="0.0484657">
                <text:p>0.0484657</text:p>
              </table:table-cell>
            </table:table-row>
            <table:table-row>
              <table:table-cell office:value-type="string">
                <text:p>1000</text:p>
              </table:table-cell>
              <table:table-cell office:value-type="float" office:value="1.1182">
                <text:p>1.1182</text:p>
              </table:table-cell>
              <table:table-cell office:value-type="float" office:value="0.596462">
                <text:p>0.596462</text:p>
              </table:table-cell>
              <table:table-cell office:value-type="float" office:value="0.435711">
                <text:p>0.435711</text:p>
              </table:table-cell>
              <table:table-cell office:value-type="float" office:value="0.493081">
                <text:p>0.493081</text:p>
              </table:table-cell>
            </table:table-row>
            <table:table-row>
              <table:table-cell office:value-type="string">
                <text:p>1500</text:p>
              </table:table-cell>
              <table:table-cell office:value-type="float" office:value="4.92117">
                <text:p>4.92117</text:p>
              </table:table-cell>
              <table:table-cell office:value-type="float" office:value="2.9467">
                <text:p>2.9467</text:p>
              </table:table-cell>
              <table:table-cell office:value-type="float" office:value="2.3082">
                <text:p>2.3082</text:p>
              </table:table-cell>
              <table:table-cell office:value-type="float" office:value="2.74045">
                <text:p>2.74045</text:p>
              </table:table-cell>
            </table:table-row>
            <table:table-row>
              <table:table-cell office:value-type="string">
                <text:p>2000</text:p>
              </table:table-cell>
              <table:table-cell office:value-type="float" office:value="21.0609">
                <text:p>21.0609</text:p>
              </table:table-cell>
              <table:table-cell office:value-type="float" office:value="10.7521">
                <text:p>10.7521</text:p>
              </table:table-cell>
              <table:table-cell office:value-type="float" office:value="8.48206">
                <text:p>8.48206</text:p>
              </table:table-cell>
              <table:table-cell office:value-type="float" office:value="9.7409">
                <text:p>9.7409</text:p>
              </table:table-cell>
            </table:table-row>
            <table:table-row>
              <table:table-cell office:value-type="string">
                <text:p>2500</text:p>
              </table:table-cell>
              <table:table-cell office:value-type="float" office:value="40.5992">
                <text:p>40.5992</text:p>
              </table:table-cell>
              <table:table-cell office:value-type="float" office:value="22.2834">
                <text:p>22.2834</text:p>
              </table:table-cell>
              <table:table-cell office:value-type="float" office:value="15.5626">
                <text:p>15.5626</text:p>
              </table:table-cell>
              <table:table-cell office:value-type="float" office:value="19.7588">
                <text:p>19.7588</text:p>
              </table:table-cell>
            </table:table-row>
            <table:table-row>
              <table:table-cell office:value-type="string">
                <text:p>3000</text:p>
              </table:table-cell>
              <table:table-cell office:value-type="float" office:value="99.9885">
                <text:p>99.9885</text:p>
              </table:table-cell>
              <table:table-cell office:value-type="float" office:value="53.6512">
                <text:p>53.6512</text:p>
              </table:table-cell>
              <table:table-cell office:value-type="float" office:value="34.9535">
                <text:p>34.9535</text:p>
              </table:table-cell>
              <table:table-cell office:value-type="float" office:value="39.3139">
                <text:p>39.3139</text:p>
              </table:table-cell>
            </table:table-row>
            <table:table-row>
              <table:table-cell office:value-type="string">
                <text:p>3500</text:p>
              </table:table-cell>
              <table:table-cell office:value-type="float" office:value="196.143">
                <text:p>196.143</text:p>
              </table:table-cell>
              <table:table-cell office:value-type="float" office:value="104.616">
                <text:p>104.616</text:p>
              </table:table-cell>
              <table:table-cell office:value-type="float" office:value="76.4264">
                <text:p>76.4264</text:p>
              </table:table-cell>
              <table:table-cell office:value-type="float" office:value="63.9547">
                <text:p>63.9547</text:p>
              </table:table-cell>
            </table:table-row>
            <table:table-row>
              <table:table-cell office:value-type="string">
                <text:p>4000</text:p>
              </table:table-cell>
              <table:table-cell office:value-type="float" office:value="400.319">
                <text:p>400.319</text:p>
              </table:table-cell>
              <table:table-cell office:value-type="float" office:value="211.219">
                <text:p>211.219</text:p>
              </table:table-cell>
              <table:table-cell office:value-type="float" office:value="130.615">
                <text:p>130.615</text:p>
              </table:table-cell>
              <table:table-cell office:value-type="float" office:value="117.753">
                <text:p>117.753</text:p>
              </table:table-cell>
            </table:table-row>
          </table:table-rows>
        </table:table>
      </chart:chart>
    </office:chart>
  </office:body>
</office:document-content>
</file>

<file path=Object 12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2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25/content.xml><?xml version="1.0" encoding="utf-8"?>
<math xmlns="http://www.w3.org/1998/Math/MathML" display="block">
  <semantics>
    <mrow>
      <mrow>
        <mi>σ</mi>
        <mo stretchy="false">=</mo>
        <mi>−</mi>
      </mrow>
      <mi mathvariant="italic">sign</mi>
      <mrow>
        <mo fence="true" form="prefix" stretchy="true">(</mo>
        <mrow>
          <mrow>
            <msub>
              <mi>a</mi>
              <mi>k</mi>
            </msub>
            <mrow>
              <mo fence="true" form="prefix" stretchy="true">[</mo>
              <mrow>
                <mn>0</mn>
              </mrow>
              <mo fence="true" form="postfix" stretchy="true">]</mo>
            </mrow>
          </mrow>
        </mrow>
        <mo fence="true" form="postfix" stretchy="true">)</mo>
      </mrow>
      <mrow>
        <mo fence="true" form="prefix" stretchy="true">‖</mo>
        <mrow>
          <msub>
            <mi>a</mi>
            <mi>k</mi>
          </msub>
        </mrow>
        <mo fence="true" form="postfix" stretchy="true">‖</mo>
      </mrow>
    </mrow>
    <annotation encoding="StarMath 5.0">σ = − sign left ({a} rsub {k} left [0 right ] right ) left ldline {a} rsub {k} right rdline</annotation>
  </semantics>
</math>
</file>

<file path=Object 126/content.xml><?xml version="1.0" encoding="utf-8"?>
<math xmlns="http://www.w3.org/1998/Math/MathML" display="block">
  <semantics>
    <mrow>
      <mrow>
        <msub>
          <mi>v</mi>
          <mi>k</mi>
        </msub>
        <mo stretchy="false">=</mo>
        <msub>
          <mi>a</mi>
          <mi>k</mi>
        </msub>
      </mrow>
      <mi>−</mi>
      <mi>σ</mi>
      <mrow>
        <msub>
          <mi>e</mi>
          <mi>k</mi>
        </msub>
        <mo stretchy="false">=</mo>
        <mrow>
          <mo fence="true" form="prefix" stretchy="true">[</mo>
          <mrow>
            <mrow>
              <munder>
                <munder>
                  <mrow>
                    <mn>0</mn>
                    <mi>;</mi>
                    <mn>...</mn>
                    <mi>;</mi>
                    <mn>0</mn>
                    <mi>;</mi>
                  </mrow>
                  <mo stretchy="true">⏟</mo>
                </munder>
                <mrow>
                  <mi>k</mi>
                  <mi>−</mi>
                  <mn>1</mn>
                </mrow>
              </munder>
              <msub>
                <mi>a</mi>
                <mi mathvariant="italic">kk</mi>
              </msub>
              <mi>−</mi>
              <mi>σ</mi>
              <mi>;</mi>
              <msub>
                <mi>a</mi>
                <mrow>
                  <mi>k</mi>
                  <mi>,</mi>
                  <mrow>
                    <mi>k</mi>
                    <mo stretchy="false">+</mo>
                    <mn>1</mn>
                  </mrow>
                </mrow>
              </msub>
              <mi>;</mi>
              <mn>...</mn>
              <mi>;</mi>
              <msub>
                <mi>a</mi>
                <mrow>
                  <mi>k</mi>
                  <mi>,</mi>
                  <mi>n</mi>
                </mrow>
              </msub>
            </mrow>
          </mrow>
          <mo fence="true" form="postfix" stretchy="true">]</mo>
        </mrow>
      </mrow>
    </mrow>
    <annotation encoding="StarMath 5.0">{v} rsub {k} = {a} rsub {k} − σ {e} rsub {k} = left [{0 ; ... ; 0 ;} underbrace {k − 1} {a} rsub {kk} − σ ; {a} rsub {k , k + 1} ; ... ; {a} rsub {k , n} right ]</annotation>
  </semantics>
</math>
</file>

<file path=Object 127/content.xml><?xml version="1.0" encoding="utf-8"?>
<math xmlns="http://www.w3.org/1998/Math/MathML" display="block">
  <semantics>
    <mrow>
      <mrow>
        <mi>H</mi>
        <mo stretchy="false">=</mo>
        <mi>I</mi>
      </mrow>
      <mi>−</mi>
      <mi>τ</mi>
      <mi>∗</mi>
      <mrow>
        <mo fence="true" form="prefix" stretchy="true">(</mo>
        <mrow>
          <mrow>
            <mi>v</mi>
            <msup>
              <mi>v</mi>
              <mi>T</mi>
            </msup>
          </mrow>
        </mrow>
        <mo fence="true" form="postfix" stretchy="true">)</mo>
      </mrow>
      <mi>,</mi>
      <mi mathvariant="italic">где</mi>
      <mrow>
        <mi>τ</mi>
        <mo stretchy="false">=</mo>
        <mfrac>
          <mn>2</mn>
          <mrow>
            <msup>
              <mi>v</mi>
              <mi>T</mi>
            </msup>
            <mi>v</mi>
          </mrow>
        </mfrac>
      </mrow>
    </mrow>
    <annotation encoding="StarMath 5.0">H = I − τ ∗ left (v {v} ^ {T} right ) , где τ = {2} over {{v} ^ {T} v}</annotation>
  </semantics>
</math>
</file>

<file path=Object 128/content.xml><?xml version="1.0" encoding="utf-8"?>
<math xmlns="http://www.w3.org/1998/Math/MathML" display="block">
  <semantics>
    <mrow>
      <msub>
        <mi>H</mi>
        <mi>k</mi>
      </msub>
      <mrow>
        <msub>
          <mi>A</mi>
          <mi>k</mi>
        </msub>
        <mo stretchy="false">=</mo>
        <mrow>
          <mo fence="true" form="prefix" stretchy="true">(</mo>
          <mrow>
            <mrow>
              <mi>I</mi>
              <mi>−</mi>
              <mi>τ</mi>
              <mi>v</mi>
              <msup>
                <mi>v</mi>
                <mi>T</mi>
              </msup>
            </mrow>
          </mrow>
          <mo fence="true" form="postfix" stretchy="true">)</mo>
        </mrow>
      </mrow>
      <mrow>
        <msub>
          <mi>A</mi>
          <mi>k</mi>
        </msub>
        <mo stretchy="false">=</mo>
        <msub>
          <mi>A</mi>
          <mi>k</mi>
        </msub>
      </mrow>
      <mi>−</mi>
      <mi>τ</mi>
      <mi>v</mi>
      <mrow>
        <mo fence="true" form="prefix" stretchy="true">(</mo>
        <mrow>
          <mrow>
            <msup>
              <mi>v</mi>
              <mi>T</mi>
            </msup>
            <msub>
              <mi>A</mi>
              <mi>k</mi>
            </msub>
          </mrow>
        </mrow>
        <mo fence="true" form="postfix" stretchy="true">)</mo>
      </mrow>
    </mrow>
    <annotation encoding="StarMath 5.0">{H} rsub {k} {A} rsub {k} = left (I − τ v {v} ^ {T} right ) {A} rsub {k} = {A} rsub {k} − τ v left ({v} ^ {T} {A} rsub {k} right )</annotation>
  </semantics>
</math>
</file>

<file path=Object 129/content.xml><?xml version="1.0" encoding="utf-8"?>
<math xmlns="http://www.w3.org/1998/Math/MathML" display="block">
  <semantics>
    <mrow>
      <msub>
        <mi>H</mi>
        <mn>1</mn>
      </msub>
      <mrow>
        <mi>A</mi>
        <mo stretchy="false">=</mo>
        <msub>
          <mi>A</mi>
          <mn>1</mn>
        </msub>
        <mo stretchy="false">=</mo>
        <mrow>
          <mo fence="true" form="prefix" stretchy="true">[</mo>
          <mrow>
            <mtable>
              <mtr>
                <mtd>
                  <msub>
                    <mi>σ</mi>
                    <mn>1</mn>
                  </msub>
                </mtd>
                <mtd>
                  <mover accent="true">
                    <msub>
                      <mi>A</mi>
                      <mn>12</mn>
                    </msub>
                    <mo stretchy="true">~</mo>
                  </mover>
                </mtd>
                <mtd>
                  <mi>⋯</mi>
                </mtd>
                <mtd>
                  <mover accent="true">
                    <msub>
                      <mi>A</mi>
                      <mrow>
                        <mn>1</mn>
                        <mi>n</mi>
                      </mrow>
                    </msub>
                    <mo stretchy="true">~</mo>
                  </mover>
                </mtd>
              </mtr>
              <mtr>
                <mtd>
                  <mrow>
                    <msub>
                      <mi>v</mi>
                      <mn>11</mn>
                    </msub>
                    <mo stretchy="false">/</mo>
                    <msub>
                      <mi>v</mi>
                      <mn>10</mn>
                    </msub>
                  </mrow>
                </mtd>
                <mtd>
                  <mover accent="true">
                    <msub>
                      <mi>A</mi>
                      <mn>22</mn>
                    </msub>
                    <mo stretchy="true">~</mo>
                  </mover>
                </mtd>
                <mtd>
                  <mi>⋯</mi>
                </mtd>
                <mtd>
                  <msub>
                    <mi>A</mi>
                    <mrow>
                      <mn>2</mn>
                      <mi>n</mi>
                    </mrow>
                  </msub>
                </mtd>
              </mtr>
              <mtr>
                <mtd>
                  <mi>⋯</mi>
                </mtd>
                <mtd>
                  <mi>⋯</mi>
                </mtd>
                <mtd>
                  <mi>⋯</mi>
                </mtd>
                <mtd>
                  <mi>⋯</mi>
                </mtd>
              </mtr>
              <mtr>
                <mtd>
                  <mrow>
                    <msub>
                      <mi>v</mi>
                      <mrow>
                        <mn>1</mn>
                        <mi>k</mi>
                      </mrow>
                    </msub>
                    <mo stretchy="false">/</mo>
                    <msub>
                      <mi>v</mi>
                      <mn>10</mn>
                    </msub>
                  </mrow>
                </mtd>
                <mtd>
                  <mover accent="true">
                    <msub>
                      <mi>A</mi>
                      <mrow>
                        <mi>k</mi>
                        <mn>2</mn>
                      </mrow>
                    </msub>
                    <mo stretchy="true">~</mo>
                  </mover>
                </mtd>
                <mtd>
                  <mi>⋯</mi>
                </mtd>
                <mtd>
                  <mover accent="true">
                    <msub>
                      <mi>A</mi>
                      <mi mathvariant="italic">kn</mi>
                    </msub>
                    <mo stretchy="true">~</mo>
                  </mover>
                </mtd>
              </mtr>
              <mtr>
                <mtd>
                  <mrow>
                    <msub>
                      <mi>v</mi>
                      <mrow>
                        <mn>1</mn>
                        <mi>,</mi>
                        <mrow>
                          <mi>k</mi>
                          <mo stretchy="false">+</mo>
                          <mn>1</mn>
                        </mrow>
                      </mrow>
                    </msub>
                    <mo stretchy="false">/</mo>
                    <msub>
                      <mi>v</mi>
                      <mn>10</mn>
                    </msub>
                  </mrow>
                </mtd>
                <mtd>
                  <mover accent="true">
                    <msub>
                      <mi>A</mi>
                      <mrow>
                        <mi>k</mi>
                        <mo stretchy="false">+</mo>
                        <mn>1,2</mn>
                      </mrow>
                    </msub>
                    <mo stretchy="true">~</mo>
                  </mover>
                </mtd>
                <mtd>
                  <mi>⋯</mi>
                </mtd>
                <mtd>
                  <mover accent="true">
                    <msub>
                      <mi>A</mi>
                      <mrow>
                        <mrow>
                          <mi>k</mi>
                          <mo stretchy="false">+</mo>
                          <mn>1</mn>
                        </mrow>
                        <mi>,</mi>
                        <mi>n</mi>
                      </mrow>
                    </msub>
                    <mo stretchy="true">~</mo>
                  </mover>
                </mtd>
              </mtr>
              <mtr>
                <mtd>
                  <mi>⋯</mi>
                </mtd>
                <mtd>
                  <mi>⋯</mi>
                </mtd>
                <mtd>
                  <mi>⋯</mi>
                </mtd>
                <mtd>
                  <mi>⋯</mi>
                </mtd>
              </mtr>
              <mtr>
                <mtd>
                  <mrow>
                    <msub>
                      <mi>v</mi>
                      <mrow>
                        <mn>1</mn>
                        <mi>n</mi>
                      </mrow>
                    </msub>
                    <mo stretchy="false">/</mo>
                    <msub>
                      <mi>v</mi>
                      <mn>10</mn>
                    </msub>
                  </mrow>
                </mtd>
                <mtd>
                  <mover accent="true">
                    <msub>
                      <mi>A</mi>
                      <mrow>
                        <mi>n</mi>
                        <mn>2</mn>
                      </mrow>
                    </msub>
                    <mo stretchy="true">~</mo>
                  </mover>
                </mtd>
                <mtd>
                  <mi>⋯</mi>
                </mtd>
                <mtd>
                  <mover accent="true">
                    <msub>
                      <mi>A</mi>
                      <mrow>
                        <mi>n</mi>
                        <mi>,</mi>
                        <mi>n</mi>
                      </mrow>
                    </msub>
                    <mo stretchy="true">~</mo>
                  </mover>
                </mtd>
              </mtr>
            </mtable>
          </mrow>
          <mo fence="true" form="postfix" stretchy="true">]</mo>
        </mrow>
      </mrow>
    </mrow>
    <annotation encoding="StarMath 5.0">{H} rsub {1} A = {A} rsub {1} = left [matrix {{σ} rsub {1} # widetilde {{A} rsub {12}} # ⋯ # widetilde {{A} rsub {1 n}} ## {{v} rsub {11}} / {{v} rsub {10}} # widetilde {{A} rsub {22}} # ⋯ # {A} rsub {2 n} ## ⋯ # ⋯ # ⋯ # ⋯ ## {{v} rsub {1 k}} / {{v} rsub {10}} # widetilde {{A} rsub {k 2}} # ⋯ # widetilde {{A} rsub {kn}} ## {{v} rsub {1 , k + 1}} / {{v} rsub {10}} # widetilde {{A} rsub {k + 1,2}} # ⋯ # widetilde {{A} rsub {k + 1 , n}} ## ⋯ # ⋯ # ⋯ # ⋯ ## {{v} rsub {1 n}} / {{v} rsub {10}} # widetilde {{A} rsub {n 2}} # ⋯ # widetilde {{A} rsub {n , n}}} right ]</annotation>
  </semantics>
</math>
</file>

<file path=Object 13/content.xml><?xml version="1.0" encoding="utf-8"?>
<math xmlns="http://www.w3.org/1998/Math/MathML" display="block">
  <semantics>
    <mrow>
      <mrow>
        <mi mathvariant="italic">Hx</mi>
        <mo stretchy="false">=</mo>
        <mrow>
          <mo fence="true" form="prefix" stretchy="true">(</mo>
          <mrow>
            <mrow>
              <mi>E</mi>
              <mi>−</mi>
              <mfrac>
                <mrow>
                  <mn>2</mn>
                  <mi>v</mi>
                  <msup>
                    <mi>v</mi>
                    <mi>T</mi>
                  </msup>
                </mrow>
                <mrow>
                  <msup>
                    <mi>v</mi>
                    <mi>T</mi>
                  </msup>
                  <mi>v</mi>
                </mrow>
              </mfrac>
            </mrow>
          </mrow>
          <mo fence="true" form="postfix" stretchy="true">)</mo>
        </mrow>
      </mrow>
      <mrow>
        <mi>x</mi>
        <mo stretchy="false">=</mo>
        <mi>x</mi>
      </mrow>
      <mi>−</mi>
      <mrow>
        <mfrac>
          <mrow>
            <mn>2</mn>
            <mi>v</mi>
            <mrow>
              <mo fence="true" form="prefix" stretchy="true">(</mo>
              <mrow>
                <mrow>
                  <msup>
                    <mi>v</mi>
                    <mi>T</mi>
                  </msup>
                  <mi>x</mi>
                </mrow>
              </mrow>
              <mo fence="true" form="postfix" stretchy="true">)</mo>
            </mrow>
          </mrow>
          <mrow>
            <msup>
              <mi>v</mi>
              <mi>T</mi>
            </msup>
            <mi>v</mi>
          </mrow>
        </mfrac>
        <mo stretchy="false">=</mo>
        <mi>x</mi>
      </mrow>
      <mi>−</mi>
      <mfrac>
        <mrow>
          <mn>2</mn>
          <msup>
            <mi>v</mi>
            <mi>T</mi>
          </msup>
          <mi>x</mi>
        </mrow>
        <mrow>
          <msup>
            <mi>v</mi>
            <mi>T</mi>
          </msup>
          <mi>v</mi>
        </mrow>
      </mfrac>
      <mi>v</mi>
    </mrow>
    <annotation encoding="StarMath 5.0">Hx = left (E − {2 v {v} ^ {T}} over {{v} ^ {T} v} right ) x = x − {2 v left ({v} ^ {T} x right )} over {{v} ^ {T} v} = x − {2 {v} ^ {T} x} over {{v} ^ {T} v} v</annotation>
  </semantics>
</math>
</file>

<file path=Object 130/content.xml><?xml version="1.0" encoding="utf-8"?>
<math xmlns="http://www.w3.org/1998/Math/MathML" display="block">
  <semantics>
    <mrow>
      <msub>
        <mi>H</mi>
        <mn>2</mn>
      </msub>
      <mrow>
        <msub>
          <mi>A</mi>
          <mn>1</mn>
        </msub>
        <mo stretchy="false">=</mo>
        <msub>
          <mi>A</mi>
          <mn>2</mn>
        </msub>
        <mo stretchy="false">=</mo>
        <mrow>
          <mo fence="true" form="prefix" stretchy="true">[</mo>
          <mrow>
            <mtable>
              <mtr>
                <mtd>
                  <msub>
                    <mi>σ</mi>
                    <mn>1</mn>
                  </msub>
                </mtd>
                <mtd>
                  <mover accent="true">
                    <mover accent="true">
                      <msub>
                        <mi>A</mi>
                        <mn>12</mn>
                      </msub>
                      <mo stretchy="true">~</mo>
                    </mover>
                    <mo stretchy="true">~</mo>
                  </mover>
                </mtd>
                <mtd>
                  <mi>⋯</mi>
                </mtd>
                <mtd>
                  <mover accent="true">
                    <mover accent="true">
                      <msub>
                        <mi>A</mi>
                        <mrow>
                          <mn>1</mn>
                          <mi>n</mi>
                        </mrow>
                      </msub>
                      <mo stretchy="true">~</mo>
                    </mover>
                    <mo stretchy="true">~</mo>
                  </mover>
                </mtd>
              </mtr>
              <mtr>
                <mtd>
                  <mrow>
                    <msub>
                      <mi>v</mi>
                      <mn>11</mn>
                    </msub>
                    <mo stretchy="false">/</mo>
                    <msub>
                      <mi>v</mi>
                      <mn>10</mn>
                    </msub>
                  </mrow>
                </mtd>
                <mtd>
                  <msub>
                    <mi>σ</mi>
                    <mn>2</mn>
                  </msub>
                </mtd>
                <mtd>
                  <mi>⋯</mi>
                </mtd>
                <mtd>
                  <msub>
                    <mi>A</mi>
                    <mrow>
                      <mn>2</mn>
                      <mi>n</mi>
                    </mrow>
                  </msub>
                </mtd>
              </mtr>
              <mtr>
                <mtd>
                  <mrow>
                    <msub>
                      <mi>v</mi>
                      <mn>12</mn>
                    </msub>
                    <mo stretchy="false">/</mo>
                    <msub>
                      <mi>v</mi>
                      <mn>10</mn>
                    </msub>
                  </mrow>
                </mtd>
                <mtd>
                  <mrow>
                    <msub>
                      <mi>v</mi>
                      <mn>21</mn>
                    </msub>
                    <mo stretchy="false">/</mo>
                    <msub>
                      <mi>v</mi>
                      <mn>20</mn>
                    </msub>
                  </mrow>
                </mtd>
                <mtd>
                  <mi>⋯</mi>
                </mtd>
                <mtd>
                  <msub>
                    <mi>A</mi>
                    <mrow>
                      <mn>2</mn>
                      <mi>n</mi>
                    </mrow>
                  </msub>
                </mtd>
              </mtr>
              <mtr>
                <mtd>
                  <mi>⋯</mi>
                </mtd>
                <mtd>
                  <mi>⋯</mi>
                </mtd>
                <mtd>
                  <mi>⋯</mi>
                </mtd>
                <mtd>
                  <mi>⋯</mi>
                </mtd>
              </mtr>
              <mtr>
                <mtd>
                  <mrow>
                    <msub>
                      <mi>v</mi>
                      <mrow>
                        <mn>1</mn>
                        <mi>k</mi>
                      </mrow>
                    </msub>
                    <mo stretchy="false">/</mo>
                    <msub>
                      <mi>v</mi>
                      <mn>10</mn>
                    </msub>
                  </mrow>
                </mtd>
                <mtd>
                  <mrow>
                    <msub>
                      <mi>v</mi>
                      <mrow>
                        <mn>2</mn>
                        <mi>k</mi>
                      </mrow>
                    </msub>
                    <mo stretchy="false">/</mo>
                    <msub>
                      <mi>v</mi>
                      <mn>20</mn>
                    </msub>
                  </mrow>
                </mtd>
                <mtd>
                  <mi>⋯</mi>
                </mtd>
                <mtd>
                  <mover accent="true">
                    <mover accent="true">
                      <msub>
                        <mi>A</mi>
                        <mi mathvariant="italic">kn</mi>
                      </msub>
                      <mo stretchy="true">~</mo>
                    </mover>
                    <mo stretchy="true">~</mo>
                  </mover>
                </mtd>
              </mtr>
              <mtr>
                <mtd>
                  <mrow>
                    <msub>
                      <mi>v</mi>
                      <mrow>
                        <mn>1</mn>
                        <mi>,</mi>
                        <mrow>
                          <mi>k</mi>
                          <mo stretchy="false">+</mo>
                          <mn>1</mn>
                        </mrow>
                      </mrow>
                    </msub>
                    <mo stretchy="false">/</mo>
                    <msub>
                      <mi>v</mi>
                      <mn>10</mn>
                    </msub>
                  </mrow>
                </mtd>
                <mtd>
                  <mrow>
                    <msub>
                      <mi>v</mi>
                      <mrow>
                        <mn>2</mn>
                        <mi>,</mi>
                        <mrow>
                          <mi>k</mi>
                          <mo stretchy="false">+</mo>
                          <mn>1</mn>
                        </mrow>
                      </mrow>
                    </msub>
                    <mo stretchy="false">/</mo>
                    <msub>
                      <mi>v</mi>
                      <mn>20</mn>
                    </msub>
                  </mrow>
                </mtd>
                <mtd>
                  <mi>⋯</mi>
                </mtd>
                <mtd>
                  <mover accent="true">
                    <mover accent="true">
                      <msub>
                        <mi>A</mi>
                        <mrow>
                          <mrow>
                            <mi>k</mi>
                            <mo stretchy="false">+</mo>
                            <mn>1</mn>
                          </mrow>
                          <mi>,</mi>
                          <mi>n</mi>
                        </mrow>
                      </msub>
                      <mo stretchy="true">~</mo>
                    </mover>
                    <mo stretchy="true">~</mo>
                  </mover>
                </mtd>
              </mtr>
              <mtr>
                <mtd>
                  <mi>⋯</mi>
                </mtd>
                <mtd>
                  <mi>⋯</mi>
                </mtd>
                <mtd>
                  <mi>⋯</mi>
                </mtd>
                <mtd>
                  <mi>⋯</mi>
                </mtd>
              </mtr>
              <mtr>
                <mtd>
                  <mrow>
                    <msub>
                      <mi>v</mi>
                      <mrow>
                        <mn>1</mn>
                        <mi>n</mi>
                      </mrow>
                    </msub>
                    <mo stretchy="false">/</mo>
                    <msub>
                      <mi>v</mi>
                      <mn>10</mn>
                    </msub>
                  </mrow>
                </mtd>
                <mtd>
                  <mrow>
                    <msub>
                      <mi>v</mi>
                      <mrow>
                        <mn>2</mn>
                        <mi>,</mi>
                        <mi>n</mi>
                      </mrow>
                    </msub>
                    <mo stretchy="false">/</mo>
                    <msub>
                      <mi>v</mi>
                      <mn>20</mn>
                    </msub>
                  </mrow>
                </mtd>
                <mtd>
                  <mi>⋯</mi>
                </mtd>
                <mtd>
                  <mover accent="true">
                    <mover accent="true">
                      <msub>
                        <mi>A</mi>
                        <mrow>
                          <mi>n</mi>
                          <mi>,</mi>
                          <mi>n</mi>
                        </mrow>
                      </msub>
                      <mo stretchy="true">~</mo>
                    </mover>
                    <mo stretchy="true">~</mo>
                  </mover>
                </mtd>
              </mtr>
            </mtable>
          </mrow>
          <mo fence="true" form="postfix" stretchy="true">]</mo>
        </mrow>
      </mrow>
    </mrow>
    <annotation encoding="StarMath 5.0">{H} rsub {2} {A} rsub {1} = {A} rsub {2} = left [matrix {{σ} rsub {1} # widetilde {widetilde {{A} rsub {12}}} # ⋯ # widetilde {widetilde {{A} rsub {1 n}}} ## {{v} rsub {11}} / {{v} rsub {10}} # {σ} rsub {2} # ⋯ # {A} rsub {2 n} ## {{v} rsub {12}} / {{v} rsub {10}} # {{v} rsub {21}} / {{v} rsub {20}} # ⋯ # {A} rsub {2 n} ## ⋯ # ⋯ # ⋯ # ⋯ ## {{v} rsub {1 k}} / {{v} rsub {10}} # {{v} rsub {2 k}} / {{v} rsub {20}} # ⋯ # widetilde {widetilde {{A} rsub {kn}}} ## {{v} rsub {1 , k + 1}} / {{v} rsub {10}} # {{v} rsub {2 , k + 1}} / {{v} rsub {20}} # ⋯ # widetilde {widetilde {{A} rsub {k + 1 , n}}} ## ⋯ # ⋯ # ⋯ # ⋯ ## {{v} rsub {1 n}} / {{v} rsub {10}} # {{v} rsub {2 , n}} / {{v} rsub {20}} # ⋯ # widetilde {widetilde {{A} rsub {n , n}}}} right ]</annotation>
  </semantics>
</math>
</file>

<file path=Object 131/content.xml><?xml version="1.0" encoding="utf-8"?>
<math xmlns="http://www.w3.org/1998/Math/MathML" display="block">
  <semantics>
    <mrow>
      <msub>
        <mi>H</mi>
        <mi>k</mi>
      </msub>
      <mrow>
        <msub>
          <mi>A</mi>
          <mrow>
            <mi>k</mi>
            <mi>−</mi>
            <mn>1</mn>
          </mrow>
        </msub>
        <mo stretchy="false">=</mo>
        <mrow>
          <mo fence="true" form="prefix" stretchy="true">[</mo>
          <mrow>
            <mtable>
              <mtr>
                <mtd>
                  <msub>
                    <mi>σ</mi>
                    <mn>1</mn>
                  </msub>
                </mtd>
                <mtd>
                  <mover accent="true">
                    <msub>
                      <mi>A</mi>
                      <mn>12</mn>
                    </msub>
                    <mo stretchy="true">~</mo>
                  </mover>
                </mtd>
                <mtd>
                  <mi>⋯</mi>
                </mtd>
                <mtd>
                  <mover accent="true">
                    <msub>
                      <mi>A</mi>
                      <mrow>
                        <mn>1</mn>
                        <mi>k</mi>
                      </mrow>
                    </msub>
                    <mo stretchy="true">~</mo>
                  </mover>
                </mtd>
                <mtd>
                  <mi>⋯</mi>
                </mtd>
                <mtd>
                  <mi>⋯</mi>
                </mtd>
                <mtd>
                  <mover accent="true">
                    <msub>
                      <mi>A</mi>
                      <mrow>
                        <mn>1</mn>
                        <mi>n</mi>
                      </mrow>
                    </msub>
                    <mo stretchy="true">~</mo>
                  </mover>
                </mtd>
              </mtr>
              <mtr>
                <mtd>
                  <mrow>
                    <msub>
                      <mi>v</mi>
                      <mn>11</mn>
                    </msub>
                    <mo stretchy="false">/</mo>
                    <msub>
                      <mi>v</mi>
                      <mn>10</mn>
                    </msub>
                  </mrow>
                </mtd>
                <mtd>
                  <msub>
                    <mi>σ</mi>
                    <mn>2</mn>
                  </msub>
                </mtd>
                <mtd>
                  <mi>⋯</mi>
                </mtd>
                <mtd>
                  <mover accent="true">
                    <msub>
                      <mi>A</mi>
                      <mrow>
                        <mn>2</mn>
                        <mi>k</mi>
                      </mrow>
                    </msub>
                    <mo stretchy="true">~</mo>
                  </mover>
                </mtd>
                <mtd>
                  <mi>⋯</mi>
                </mtd>
                <mtd>
                  <mi>⋯</mi>
                </mtd>
                <mtd>
                  <msub>
                    <mi>A</mi>
                    <mrow>
                      <mn>2</mn>
                      <mi>n</mi>
                    </mrow>
                  </msub>
                </mtd>
              </mtr>
              <mtr>
                <mtd>
                  <mi>⋯</mi>
                </mtd>
                <mtd>
                  <mi>⋯</mi>
                </mtd>
                <mtd>
                  <mi>⋱</mi>
                </mtd>
                <mtd>
                  <mi>⋯</mi>
                </mtd>
                <mtd>
                  <mi>⋯</mi>
                </mtd>
                <mtd>
                  <mi>⋯</mi>
                </mtd>
                <mtd>
                  <mi>⋯</mi>
                </mtd>
              </mtr>
              <mtr>
                <mtd>
                  <mrow>
                    <msub>
                      <mi>v</mi>
                      <mrow>
                        <mn>1</mn>
                        <mi>k</mi>
                      </mrow>
                    </msub>
                    <mo stretchy="false">/</mo>
                    <msub>
                      <mi>v</mi>
                      <mn>10</mn>
                    </msub>
                  </mrow>
                </mtd>
                <mtd>
                  <mi>⋯</mi>
                </mtd>
                <mtd>
                  <mi>⋯</mi>
                </mtd>
                <mtd>
                  <msub>
                    <mi>σ</mi>
                    <mi>k</mi>
                  </msub>
                </mtd>
                <mtd>
                  <mi>⋯</mi>
                </mtd>
                <mtd>
                  <mi>⋯</mi>
                </mtd>
                <mtd>
                  <mover accent="true">
                    <msub>
                      <mi>A</mi>
                      <mi mathvariant="italic">kn</mi>
                    </msub>
                    <mo stretchy="true">~</mo>
                  </mover>
                </mtd>
              </mtr>
              <mtr>
                <mtd>
                  <mrow>
                    <msub>
                      <mi>v</mi>
                      <mrow>
                        <mn>1</mn>
                        <mi>,</mi>
                        <mrow>
                          <mi>k</mi>
                          <mo stretchy="false">+</mo>
                          <mn>1</mn>
                        </mrow>
                      </mrow>
                    </msub>
                    <mo stretchy="false">/</mo>
                    <msub>
                      <mi>v</mi>
                      <mn>10</mn>
                    </msub>
                  </mrow>
                </mtd>
                <mtd>
                  <mi>⋯</mi>
                </mtd>
                <mtd>
                  <mi>⋯</mi>
                </mtd>
                <mtd>
                  <mrow>
                    <msub>
                      <mi>v</mi>
                      <mrow>
                        <mi>k</mi>
                        <mn>1</mn>
                      </mrow>
                    </msub>
                    <mo stretchy="false">/</mo>
                    <msub>
                      <mi>v</mi>
                      <mrow>
                        <mi>k</mi>
                        <mn>0</mn>
                      </mrow>
                    </msub>
                  </mrow>
                </mtd>
                <mtd>
                  <mover accent="true">
                    <msub>
                      <mi>A</mi>
                      <mrow>
                        <mrow>
                          <mi>k</mi>
                          <mo stretchy="false">+</mo>
                          <mn>1</mn>
                        </mrow>
                        <mi>,</mi>
                        <mrow>
                          <mi>k</mi>
                          <mo stretchy="false">+</mo>
                          <mn>1</mn>
                        </mrow>
                      </mrow>
                    </msub>
                    <mo stretchy="true">~</mo>
                  </mover>
                </mtd>
                <mtd>
                  <mi>⋯</mi>
                </mtd>
                <mtd>
                  <mover accent="true">
                    <msub>
                      <mi>A</mi>
                      <mrow>
                        <mrow>
                          <mi>k</mi>
                          <mo stretchy="false">+</mo>
                          <mn>1</mn>
                        </mrow>
                        <mi>,</mi>
                        <mi>n</mi>
                      </mrow>
                    </msub>
                    <mo stretchy="true">~</mo>
                  </mover>
                </mtd>
              </mtr>
              <mtr>
                <mtd>
                  <mi>⋯</mi>
                </mtd>
                <mtd>
                  <mi>⋯</mi>
                </mtd>
                <mtd>
                  <mi>⋯</mi>
                </mtd>
                <mtd>
                  <mi>⋮</mi>
                </mtd>
                <mtd>
                  <mi>⋮</mi>
                </mtd>
                <mtd>
                  <mi>⋱</mi>
                </mtd>
                <mtd>
                  <mi>⋯</mi>
                </mtd>
              </mtr>
              <mtr>
                <mtd>
                  <mrow>
                    <msub>
                      <mi>v</mi>
                      <mrow>
                        <mn>1</mn>
                        <mi>n</mi>
                      </mrow>
                    </msub>
                    <mo stretchy="false">/</mo>
                    <msub>
                      <mi>v</mi>
                      <mn>10</mn>
                    </msub>
                  </mrow>
                </mtd>
                <mtd>
                  <mi>⋯</mi>
                </mtd>
                <mtd>
                  <mi>⋯</mi>
                </mtd>
                <mtd>
                  <mrow>
                    <msub>
                      <mi>v</mi>
                      <mi mathvariant="italic">kn</mi>
                    </msub>
                    <mo stretchy="false">/</mo>
                    <msub>
                      <mi>v</mi>
                      <mrow>
                        <mi>k</mi>
                        <mn>0</mn>
                      </mrow>
                    </msub>
                  </mrow>
                </mtd>
                <mtd>
                  <mover accent="true">
                    <msub>
                      <mi>A</mi>
                      <mrow>
                        <mi>n</mi>
                        <mi>,</mi>
                        <mrow>
                          <mi>k</mi>
                          <mo stretchy="false">+</mo>
                          <mn>1</mn>
                        </mrow>
                      </mrow>
                    </msub>
                    <mo stretchy="true">~</mo>
                  </mover>
                </mtd>
                <mtd>
                  <mi>⋯</mi>
                </mtd>
                <mtd>
                  <mover accent="true">
                    <msub>
                      <mi>A</mi>
                      <mrow>
                        <mi>n</mi>
                        <mi>,</mi>
                        <mi>n</mi>
                      </mrow>
                    </msub>
                    <mo stretchy="true">~</mo>
                  </mover>
                </mtd>
              </mtr>
            </mtable>
          </mrow>
          <mo fence="true" form="postfix" stretchy="true">]</mo>
        </mrow>
      </mrow>
    </mrow>
    <annotation encoding="StarMath 5.0">{H} rsub {k} {A} rsub {k − 1} = left [matrix {{σ} rsub {1} # widetilde {{A} rsub {12}} # ⋯ # widetilde {{A} rsub {1 k}} # ⋯ # ⋯ # widetilde {{A} rsub {1 n}} ## {{v} rsub {11}} / {{v} rsub {10}} # {σ} rsub {2} # ⋯ # widetilde {{A} rsub {2 k}} # ⋯ # ⋯ # {A} rsub {2 n} ## ⋯ # ⋯ # ⋱ # ⋯ # ⋯ # ⋯ # ⋯ ## {{v} rsub {1 k}} / {{v} rsub {10}} # ⋯ # ⋯ # {σ} rsub {k} # ⋯ # ⋯ # widetilde {{A} rsub {kn}} ## {{v} rsub {1 , k + 1}} / {{v} rsub {10}} # ⋯ # ⋯ # {{v} rsub {k 1}} / {{v} rsub {k 0}} # widetilde {{A} rsub {k + 1 , k + 1}} # ⋯ # widetilde {{A} rsub {k + 1 , n}} ## ⋯ # ⋯ # ⋯ # ⋮ # ⋮ # ⋱ # ⋯ ## {{v} rsub {1 n}} / {{v} rsub {10}} # ⋯ # ⋯ # {{v} rsub {kn}} / {{v} rsub {k 0}} # widetilde {{A} rsub {n , k + 1}} # ⋯ # widetilde {{A} rsub {n , n}}} right ]</annotation>
  </semantics>
</math>
</file>

<file path=Object 132/content.xml><?xml version="1.0" encoding="utf-8"?>
<math xmlns="http://www.w3.org/1998/Math/MathML" display="block">
  <semantics>
    <mrow>
      <mi>R</mi>
      <mi>−</mi>
      <mi mathvariant="italic">τv</mi>
      <mrow>
        <mo fence="true" form="prefix" stretchy="true">(</mo>
        <mrow>
          <mrow>
            <msup>
              <mi>v</mi>
              <mi>T</mi>
            </msup>
            <mi>R</mi>
          </mrow>
        </mrow>
        <mo fence="true" form="postfix" stretchy="true">)</mo>
      </mrow>
      <mi>,</mi>
    </mrow>
    <annotation encoding="StarMath 5.0">R − τv left ({v} ^ {T} R right ) ,</annotation>
  </semantics>
</math>
</file>

<file path=Object 133/content.xml><?xml version="1.0" encoding="utf-8"?>
<math xmlns="http://www.w3.org/1998/Math/MathML" display="block">
  <semantics>
    <mrow>
      <mo fence="true" form="prefix" stretchy="true">(</mo>
      <mrow>
        <mrow>
          <msup>
            <mi>v</mi>
            <mi>T</mi>
          </msup>
          <mi>R</mi>
        </mrow>
      </mrow>
      <mo fence="true" form="postfix" stretchy="true">)</mo>
    </mrow>
    <annotation encoding="StarMath 5.0">left ({v} ^ {T} R right )</annotation>
  </semantics>
</math>
</file>

<file path=Object 134/content.xml><?xml version="1.0" encoding="utf-8"?>
<math xmlns="http://www.w3.org/1998/Math/MathML" display="block">
  <semantics>
    <mrow>
      <mi>τ</mi>
      <mo stretchy="false">=</mo>
      <mfrac>
        <mn>2</mn>
        <mrow>
          <msup>
            <mi>v</mi>
            <mi>T</mi>
          </msup>
          <mi>v</mi>
        </mrow>
      </mfrac>
    </mrow>
    <annotation encoding="StarMath 5.0">τ = {2} over {{v} ^ {T} v}</annotation>
  </semantics>
</math>
</file>

<file path=Object 135/content.xml><?xml version="1.0" encoding="utf-8"?>
<math xmlns="http://www.w3.org/1998/Math/MathML" display="block">
  <semantics>
    <mrow>
      <mi>σ</mi>
      <mi>,</mi>
      <mi>v</mi>
      <mi>,</mi>
      <mi>τ</mi>
    </mrow>
    <annotation encoding="StarMath 5.0">σ , v , τ</annotation>
  </semantics>
</math>
</file>

<file path=Object 13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chart:data-label-number="value" chart:data-label-text="false" chart:data-label-symbol="false" chart:data-label-series="false"/>
    </style:style>
    <style:style style:name="ch4"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474cm" svg:height="20.72cm" xlink:href="." xlink:type="simple" chart:class="chart:line" chart:style-name="ch1">
        <chart:legend chart:legend-position="end" svg:x="13.592cm" svg:y="9.314cm" style:legend-expansion="high" chart:style-name="ch2"/>
        <chart:plot-area chart:style-name="ch3" svg:x="0.136cm" svg:y="0.22cm" svg:width="12.92cm" svg:height="19.915cm">
          <chart:coordinate-region svg:x="1.439cm" svg:y="0.419cm" svg:width="11.233cm" svg:height="19.069cm"/>
          <chart:axis chart:dimension="x" chart:name="primary-x" chart:style-name="ch4" chartooo:axis-type="auto">
            <chartooo:date-scale/>
            <chart:title svg:x="4.995cm" svg:y="20.16cm" chart:style-name="ch5">
              <text:p><text:span text:style-name="T1">Размер данных, NxN</text:span></text:p>
            </chart:title>
            <chart:categories table:cell-range-address="local-table.$A$2:.$A$13"/>
          </chart:axis>
          <chart:axis chart:dimension="y" chart:name="primary-y" chart:style-name="ch6">
            <chart:title svg:x="0cm" svg:y="11.466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series chart:style-name="ch12" chart:values-cell-range-address="local-table.$E$2:.$E$13" chart:label-cell-address="local-table.$E$1" chart:class="chart:line">
            <chart:data-point chart:repeated="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09985">
                <text:p>0.0009985</text:p>
              </table:table-cell>
              <table:table-cell office:value-type="float" office:value="0.0014776">
                <text:p>0.0014776</text:p>
              </table:table-cell>
              <table:table-cell office:value-type="float" office:value="0.001662">
                <text:p>0.001662</text:p>
              </table:table-cell>
              <table:table-cell office:value-type="float" office:value="0.0038215">
                <text:p>0.0038215</text:p>
              </table:table-cell>
            </table:table-row>
            <table:table-row>
              <table:table-cell office:value-type="string">
                <text:p>200</text:p>
              </table:table-cell>
              <table:table-cell office:value-type="float" office:value="0.0052362">
                <text:p>0.0052362</text:p>
              </table:table-cell>
              <table:table-cell office:value-type="float" office:value="0.0065799">
                <text:p>0.0065799</text:p>
              </table:table-cell>
              <table:table-cell office:value-type="float" office:value="0.003586">
                <text:p>0.003586</text:p>
              </table:table-cell>
              <table:table-cell office:value-type="float" office:value="0.0076733">
                <text:p>0.0076733</text:p>
              </table:table-cell>
            </table:table-row>
            <table:table-row>
              <table:table-cell office:value-type="string">
                <text:p>300</text:p>
              </table:table-cell>
              <table:table-cell office:value-type="float" office:value="0.0154869">
                <text:p>0.0154869</text:p>
              </table:table-cell>
              <table:table-cell office:value-type="float" office:value="0.0185867">
                <text:p>0.0185867</text:p>
              </table:table-cell>
              <table:table-cell office:value-type="float" office:value="0.0101972">
                <text:p>0.0101972</text:p>
              </table:table-cell>
              <table:table-cell office:value-type="float" office:value="0.011263">
                <text:p>0.011263</text:p>
              </table:table-cell>
            </table:table-row>
            <table:table-row>
              <table:table-cell office:value-type="string">
                <text:p>400</text:p>
              </table:table-cell>
              <table:table-cell office:value-type="float" office:value="0.0404785">
                <text:p>0.0404785</text:p>
              </table:table-cell>
              <table:table-cell office:value-type="float" office:value="0.0365071">
                <text:p>0.0365071</text:p>
              </table:table-cell>
              <table:table-cell office:value-type="float" office:value="0.015522">
                <text:p>0.015522</text:p>
              </table:table-cell>
              <table:table-cell office:value-type="float" office:value="0.0242997">
                <text:p>0.0242997</text:p>
              </table:table-cell>
            </table:table-row>
            <table:table-row>
              <table:table-cell office:value-type="string">
                <text:p>500</text:p>
              </table:table-cell>
              <table:table-cell office:value-type="float" office:value="0.0771692">
                <text:p>0.0771692</text:p>
              </table:table-cell>
              <table:table-cell office:value-type="float" office:value="0.0721955">
                <text:p>0.0721955</text:p>
              </table:table-cell>
              <table:table-cell office:value-type="float" office:value="0.0359874">
                <text:p>0.0359874</text:p>
              </table:table-cell>
              <table:table-cell office:value-type="float" office:value="0.029481">
                <text:p>0.029481</text:p>
              </table:table-cell>
            </table:table-row>
            <table:table-row>
              <table:table-cell office:value-type="string">
                <text:p>1000</text:p>
              </table:table-cell>
              <table:table-cell office:value-type="float" office:value="0.638065">
                <text:p>0.638065</text:p>
              </table:table-cell>
              <table:table-cell office:value-type="float" office:value="0.178083">
                <text:p>0.178083</text:p>
              </table:table-cell>
              <table:table-cell office:value-type="float" office:value="0.217775">
                <text:p>0.217775</text:p>
              </table:table-cell>
              <table:table-cell office:value-type="float" office:value="0.166714">
                <text:p>0.166714</text:p>
              </table:table-cell>
            </table:table-row>
            <table:table-row>
              <table:table-cell office:value-type="string">
                <text:p>1500</text:p>
              </table:table-cell>
              <table:table-cell office:value-type="float" office:value="2.3033">
                <text:p>2.3033</text:p>
              </table:table-cell>
              <table:table-cell office:value-type="float" office:value="0.792671">
                <text:p>0.792671</text:p>
              </table:table-cell>
              <table:table-cell office:value-type="float" office:value="0.847104">
                <text:p>0.847104</text:p>
              </table:table-cell>
              <table:table-cell office:value-type="float" office:value="0.662782">
                <text:p>0.662782</text:p>
              </table:table-cell>
            </table:table-row>
            <table:table-row>
              <table:table-cell office:value-type="string">
                <text:p>2000</text:p>
              </table:table-cell>
              <table:table-cell office:value-type="float" office:value="5.85005">
                <text:p>5.85005</text:p>
              </table:table-cell>
              <table:table-cell office:value-type="float" office:value="2.65518">
                <text:p>2.65518</text:p>
              </table:table-cell>
              <table:table-cell office:value-type="float" office:value="2.64621">
                <text:p>2.64621</text:p>
              </table:table-cell>
              <table:table-cell office:value-type="float" office:value="2.47128">
                <text:p>2.47128</text:p>
              </table:table-cell>
            </table:table-row>
            <table:table-row>
              <table:table-cell office:value-type="string">
                <text:p>2500</text:p>
              </table:table-cell>
              <table:table-cell office:value-type="float" office:value="11.9563">
                <text:p>11.9563</text:p>
              </table:table-cell>
              <table:table-cell office:value-type="float" office:value="5.53923">
                <text:p>5.53923</text:p>
              </table:table-cell>
              <table:table-cell office:value-type="float" office:value="5.91899">
                <text:p>5.91899</text:p>
              </table:table-cell>
              <table:table-cell office:value-type="float" office:value="5.2263">
                <text:p>5.2263</text:p>
              </table:table-cell>
            </table:table-row>
            <table:table-row>
              <table:table-cell office:value-type="string">
                <text:p>3000</text:p>
              </table:table-cell>
              <table:table-cell office:value-type="float" office:value="20.7962">
                <text:p>20.7962</text:p>
              </table:table-cell>
              <table:table-cell office:value-type="float" office:value="9.94271">
                <text:p>9.94271</text:p>
              </table:table-cell>
              <table:table-cell office:value-type="float" office:value="9.94843">
                <text:p>9.94843</text:p>
              </table:table-cell>
              <table:table-cell office:value-type="float" office:value="9.71765">
                <text:p>9.71765</text:p>
              </table:table-cell>
            </table:table-row>
            <table:table-row>
              <table:table-cell office:value-type="string">
                <text:p>3500</text:p>
              </table:table-cell>
              <table:table-cell office:value-type="float" office:value="33.538">
                <text:p>33.538</text:p>
              </table:table-cell>
              <table:table-cell office:value-type="float" office:value="16.636">
                <text:p>16.636</text:p>
              </table:table-cell>
              <table:table-cell office:value-type="float" office:value="16.0501">
                <text:p>16.0501</text:p>
              </table:table-cell>
              <table:table-cell office:value-type="float" office:value="15.6171">
                <text:p>15.6171</text:p>
              </table:table-cell>
            </table:table-row>
            <table:table-row>
              <table:table-cell office:value-type="string">
                <text:p>4000</text:p>
              </table:table-cell>
              <table:table-cell office:value-type="float" office:value="50.5261">
                <text:p>50.5261</text:p>
              </table:table-cell>
              <table:table-cell office:value-type="float" office:value="25.4186">
                <text:p>25.4186</text:p>
              </table:table-cell>
              <table:table-cell office:value-type="float" office:value="24.393">
                <text:p>24.393</text:p>
              </table:table-cell>
              <table:table-cell office:value-type="float" office:value="23.7826">
                <text:p>23.7826</text:p>
              </table:table-cell>
            </table:table-row>
          </table:table-rows>
        </table:table>
      </chart:chart>
    </office:chart>
  </office:body>
</office:document-content>
</file>

<file path=Object 13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3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3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000000" style:text-position="0% 100%" fo:font-family="Arial" fo:font-size="8pt" style:font-family-asian="'DejaVu Sans'" style:font-size-asian="8pt" style:font-family-complex="'DejaVu Sans'" style:font-size-complex="8pt"/>
    </style:style>
    <style:style style:name="ch3" style:family="chart">
      <style:chart-properties chart:symbol-type="automatic" chart:include-hidden-cells="false" chart:treat-empty-cells="ignore"/>
    </style:style>
    <style:style style:name="ch4"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maximum="140"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tru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chart-properties chart:solid-type="cuboid" chart:symbol-type="named-symbol" chart:symbol-name="diamond" chart:symbol-width="0.282cm" chart:symbol-height="0.282cm"/>
    </style:style>
    <style:style style:name="ch11" style:family="chart">
      <style:chart-properties chart:solid-type="cuboid" chart:symbol-type="named-symbol" chart:symbol-name="diamond" chart:symbol-width="0.282cm" chart:symbol-height="0.282cm" chart:link-data-style-to-source="false" chart:data-label-number="value" chart:data-label-text="false" chart:data-label-symbol="false" chart:data-label-series="false"/>
    </style:style>
    <style:style style:name="ch12"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3"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4"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top"/>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5" style:family="chart">
      <style:graphic-properties draw:stroke="solid" svg:stroke-color="#b3b3b3" draw:fill="none" draw:fill-color="#d9d9d9"/>
    </style:style>
    <style:style style:name="ch16"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455cm" svg:height="18.434cm" xlink:href="." xlink:type="simple" chart:class="chart:line" chart:style-name="ch1">
        <chart:legend chart:legend-position="end" svg:x="12.748cm" svg:y="8.317cm" style:legend-expansion="custom" svg:width="3.484cm" svg:height="3.239cm" style:legend-expansion-aspect-ratio="1.07564062982402" chart:style-name="ch2"/>
        <chart:plot-area chart:style-name="ch3" svg:x="0.133cm" svg:y="0.171cm" svg:width="12.904cm" svg:height="17.172cm">
          <chart:coordinate-region svg:x="1.436cm" svg:y="0.37cm" svg:width="11.217cm" svg:height="16.326cm"/>
          <chart:axis chart:dimension="x" chart:name="primary-x" chart:style-name="ch4" chartooo:axis-type="auto">
            <chartooo:date-scale/>
            <chart:title svg:x="4.984cm" svg:y="17.711cm" chart:style-name="ch5">
              <text:p><text:span text:style-name="T1">Размер данных, NxN</text:span></text:p>
            </chart:title>
            <chart:categories table:cell-range-address="local-table.$A$2:.$A$13"/>
          </chart:axis>
          <chart:axis chart:dimension="y" chart:name="primary-y" chart:style-name="ch6">
            <chart:title svg:x="0cm" svg:y="10.046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4"/>
            <chart:data-point chart:style-name="ch10"/>
            <chart:data-point chart:style-name="ch11"/>
            <chart:data-point chart:repeated="6"/>
          </chart:series>
          <chart:series chart:style-name="ch12" chart:values-cell-range-address="local-table.$C$2:.$C$13" chart:label-cell-address="local-table.$C$1" chart:class="chart:line">
            <chart:data-point chart:repeated="12"/>
          </chart:series>
          <chart:series chart:style-name="ch13" chart:values-cell-range-address="local-table.$D$2:.$D$13" chart:label-cell-address="local-table.$D$1" chart:class="chart:line">
            <chart:data-point chart:repeated="12"/>
          </chart:series>
          <chart:series chart:style-name="ch14" chart:values-cell-range-address="local-table.$E$2:.$E$13" chart:label-cell-address="local-table.$E$1" chart:class="chart:line">
            <chart:data-point chart:repeated="12"/>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Реализация #1</text:p>
              </table:table-cell>
              <table:table-cell office:value-type="string">
                <text:p>Реализация #2</text:p>
              </table:table-cell>
              <table:table-cell office:value-type="string">
                <text:p>Реализация #3</text:p>
              </table:table-cell>
              <table:table-cell office:value-type="string">
                <text:p>Реализация Scilab</text:p>
              </table:table-cell>
            </table:table-row>
          </table:table-header-rows>
          <table:table-rows>
            <table:table-row>
              <table:table-cell office:value-type="string">
                <text:p>100</text:p>
              </table:table-cell>
              <table:table-cell office:value-type="float" office:value="0.0489507">
                <text:p>0.0489507</text:p>
              </table:table-cell>
              <table:table-cell office:value-type="float" office:value="0.0037046">
                <text:p>0.0037046</text:p>
              </table:table-cell>
              <table:table-cell office:value-type="float" office:value="0.0038215">
                <text:p>0.0038215</text:p>
              </table:table-cell>
              <table:table-cell office:value-type="float" office:value="0.0335941">
                <text:p>0.0335941</text:p>
              </table:table-cell>
            </table:table-row>
            <table:table-row>
              <table:table-cell office:value-type="string">
                <text:p>200</text:p>
              </table:table-cell>
              <table:table-cell office:value-type="float" office:value="0.590008">
                <text:p>0.590008</text:p>
              </table:table-cell>
              <table:table-cell office:value-type="float" office:value="0.0087853">
                <text:p>0.0087853</text:p>
              </table:table-cell>
              <table:table-cell office:value-type="float" office:value="0.0076733">
                <text:p>0.0076733</text:p>
              </table:table-cell>
              <table:table-cell office:value-type="float" office:value="0.0039998">
                <text:p>0.0039998</text:p>
              </table:table-cell>
            </table:table-row>
            <table:table-row>
              <table:table-cell office:value-type="string">
                <text:p>300</text:p>
              </table:table-cell>
              <table:table-cell office:value-type="float" office:value="2.97088">
                <text:p>2.97088</text:p>
              </table:table-cell>
              <table:table-cell office:value-type="float" office:value="0.0192567">
                <text:p>0.0192567</text:p>
              </table:table-cell>
              <table:table-cell office:value-type="float" office:value="0.011263">
                <text:p>0.011263</text:p>
              </table:table-cell>
              <table:table-cell office:value-type="float" office:value="0.0084994">
                <text:p>0.0084994</text:p>
              </table:table-cell>
            </table:table-row>
            <table:table-row>
              <table:table-cell office:value-type="string">
                <text:p>400</text:p>
              </table:table-cell>
              <table:table-cell office:value-type="float" office:value="9.34946">
                <text:p>9.34946</text:p>
              </table:table-cell>
              <table:table-cell office:value-type="float" office:value="0.0449681">
                <text:p>0.0449681</text:p>
              </table:table-cell>
              <table:table-cell office:value-type="float" office:value="0.0242997">
                <text:p>0.0242997</text:p>
              </table:table-cell>
              <table:table-cell office:value-type="float" office:value="0.0054738">
                <text:p>0.0054738</text:p>
              </table:table-cell>
            </table:table-row>
            <table:table-row>
              <table:table-cell office:value-type="string">
                <text:p>500</text:p>
              </table:table-cell>
              <table:table-cell office:value-type="float" office:value="24.0397">
                <text:p>24.0397</text:p>
              </table:table-cell>
              <table:table-cell office:value-type="float" office:value="0.0484657">
                <text:p>0.0484657</text:p>
              </table:table-cell>
              <table:table-cell office:value-type="float" office:value="0.029481">
                <text:p>0.029481</text:p>
              </table:table-cell>
              <table:table-cell office:value-type="float" office:value="0.0088187">
                <text:p>0.0088187</text:p>
              </table:table-cell>
            </table:table-row>
            <table:table-row>
              <table:table-cell office:value-type="string">
                <text:p>1000</text:p>
              </table:table-cell>
              <table:table-cell office:value-type="float" office:value="141">
                <text:p>141</text:p>
              </table:table-cell>
              <table:table-cell office:value-type="float" office:value="0.493081">
                <text:p>0.493081</text:p>
              </table:table-cell>
              <table:table-cell office:value-type="float" office:value="0.166714">
                <text:p>0.166714</text:p>
              </table:table-cell>
              <table:table-cell office:value-type="float" office:value="0.0412016">
                <text:p>0.0412016</text:p>
              </table:table-cell>
            </table:table-row>
            <table:table-row>
              <table:table-cell office:value-type="string">
                <text:p>1500</text:p>
              </table:table-cell>
              <table:table-cell office:value-type="float" office:value="NaN">
                <text:p>NaN</text:p>
              </table:table-cell>
              <table:table-cell office:value-type="float" office:value="2.74045">
                <text:p>2.74045</text:p>
              </table:table-cell>
              <table:table-cell office:value-type="float" office:value="0.662782">
                <text:p>0.662782</text:p>
              </table:table-cell>
              <table:table-cell office:value-type="float" office:value="0.0998157">
                <text:p>0.0998157</text:p>
              </table:table-cell>
            </table:table-row>
            <table:table-row>
              <table:table-cell office:value-type="string">
                <text:p>2000</text:p>
              </table:table-cell>
              <table:table-cell office:value-type="float" office:value="NaN">
                <text:p>NaN</text:p>
              </table:table-cell>
              <table:table-cell office:value-type="float" office:value="9.7409">
                <text:p>9.7409</text:p>
              </table:table-cell>
              <table:table-cell office:value-type="float" office:value="2.47128">
                <text:p>2.47128</text:p>
              </table:table-cell>
              <table:table-cell office:value-type="float" office:value="0.1859652">
                <text:p>0.1859652</text:p>
              </table:table-cell>
            </table:table-row>
            <table:table-row>
              <table:table-cell office:value-type="string">
                <text:p>2500</text:p>
              </table:table-cell>
              <table:table-cell office:value-type="float" office:value="NaN">
                <text:p>NaN</text:p>
              </table:table-cell>
              <table:table-cell office:value-type="float" office:value="19.7588">
                <text:p>19.7588</text:p>
              </table:table-cell>
              <table:table-cell office:value-type="float" office:value="5.2263">
                <text:p>5.2263</text:p>
              </table:table-cell>
              <table:table-cell office:value-type="float" office:value="0.3497936">
                <text:p>0.3497936</text:p>
              </table:table-cell>
            </table:table-row>
            <table:table-row>
              <table:table-cell office:value-type="string">
                <text:p>3000</text:p>
              </table:table-cell>
              <table:table-cell office:value-type="float" office:value="NaN">
                <text:p>NaN</text:p>
              </table:table-cell>
              <table:table-cell office:value-type="float" office:value="39.3139">
                <text:p>39.3139</text:p>
              </table:table-cell>
              <table:table-cell office:value-type="float" office:value="9.71765">
                <text:p>9.71765</text:p>
              </table:table-cell>
              <table:table-cell office:value-type="float" office:value="0.6075179">
                <text:p>0.6075179</text:p>
              </table:table-cell>
            </table:table-row>
            <table:table-row>
              <table:table-cell office:value-type="string">
                <text:p>3500</text:p>
              </table:table-cell>
              <table:table-cell office:value-type="float" office:value="NaN">
                <text:p>NaN</text:p>
              </table:table-cell>
              <table:table-cell office:value-type="float" office:value="63.9547">
                <text:p>63.9547</text:p>
              </table:table-cell>
              <table:table-cell office:value-type="float" office:value="15.6171">
                <text:p>15.6171</text:p>
              </table:table-cell>
              <table:table-cell office:value-type="float" office:value="0.9034108">
                <text:p>0.9034108</text:p>
              </table:table-cell>
            </table:table-row>
            <table:table-row>
              <table:table-cell office:value-type="string">
                <text:p>4000</text:p>
              </table:table-cell>
              <table:table-cell office:value-type="float" office:value="NaN">
                <text:p>NaN</text:p>
              </table:table-cell>
              <table:table-cell office:value-type="float" office:value="117.753">
                <text:p>117.753</text:p>
              </table:table-cell>
              <table:table-cell office:value-type="float" office:value="23.7826">
                <text:p>23.7826</text:p>
              </table:table-cell>
              <table:table-cell office:value-type="float" office:value="1.4172756">
                <text:p>1.4172756</text:p>
              </table:table-cell>
            </table:table-row>
          </table:table-rows>
        </table:table>
      </chart:chart>
    </office:chart>
  </office:body>
</office:document-content>
</file>

<file path=Object 13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3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4/content.xml><?xml version="1.0" encoding="utf-8"?>
<math xmlns="http://www.w3.org/1998/Math/MathML" display="block">
  <semantics>
    <mi>v</mi>
    <annotation encoding="StarMath 5.0">v</annotation>
  </semantics>
</math>
</file>

<file path=Object 140/content.xml><?xml version="1.0" encoding="utf-8"?>
<math xmlns="http://www.w3.org/1998/Math/MathML" display="block">
  <semantics>
    <mrow>
      <mrow>
        <mi mathvariant="italic">cosθ</mi>
        <mo stretchy="false">=</mo>
        <mi>c</mi>
        <mo stretchy="false">=</mo>
        <mfrac>
          <msub>
            <mi>a</mi>
            <mi mathvariant="italic">jj</mi>
          </msub>
          <msqrt>
            <mrow>
              <msup>
                <msub>
                  <mi>a</mi>
                  <mi mathvariant="italic">jj</mi>
                </msub>
                <mn>2</mn>
              </msup>
              <mo stretchy="false">+</mo>
              <msup>
                <msub>
                  <mi>a</mi>
                  <mi mathvariant="italic">ij</mi>
                </msub>
                <mn>2</mn>
              </msup>
            </mrow>
          </msqrt>
        </mfrac>
      </mrow>
      <mi>,</mi>
      <mrow>
        <mi mathvariant="italic">sinθ</mi>
        <mo stretchy="false">=</mo>
        <mi>s</mi>
        <mo stretchy="false">=</mo>
        <mfrac>
          <mrow>
            <mi>−</mi>
            <msub>
              <mi>a</mi>
              <mi mathvariant="italic">ij</mi>
            </msub>
          </mrow>
          <msqrt>
            <mrow>
              <msup>
                <msub>
                  <mi>a</mi>
                  <mi mathvariant="italic">jj</mi>
                </msub>
                <mn>2</mn>
              </msup>
              <mo stretchy="false">+</mo>
              <msup>
                <msub>
                  <mi>a</mi>
                  <mi mathvariant="italic">ij</mi>
                </msub>
                <mn>2</mn>
              </msup>
            </mrow>
          </msqrt>
        </mfrac>
      </mrow>
    </mrow>
    <annotation encoding="StarMath 5.0">cosθ = c = {{a} rsub {jj}} over {sqrt {{{a} rsub {jj}} ^ {2} + {{a} rsub {ij}} ^ {2}}} , sinθ = s = {− {a} rsub {ij}} over {sqrt {{{a} rsub {jj}} ^ {2} + {{a} rsub {ij}} ^ {2}}}</annotation>
  </semantics>
</math>
</file>

<file path=Object 141/content.xml><?xml version="1.0" encoding="utf-8"?>
<math xmlns="http://www.w3.org/1998/Math/MathML" display="block">
  <semantics>
    <mrow>
      <msub>
        <mi>G</mi>
        <mi mathvariant="italic">ji</mi>
      </msub>
      <mn>...</mn>
      <msub>
        <mi>G</mi>
        <mn>12</mn>
      </msub>
      <mi>A</mi>
    </mrow>
    <annotation encoding="StarMath 5.0">{G} rsub {ji} ... {G} rsub {12} A</annotation>
  </semantics>
</math>
</file>

<file path=Object 142/content.xml><?xml version="1.0" encoding="utf-8"?>
<math xmlns="http://www.w3.org/1998/Math/MathML" display="block">
  <semantics>
    <mrow>
      <mi>k</mi>
      <mi>∈</mi>
      <mrow>
        <mo fence="true" form="prefix" stretchy="true">[</mo>
        <mrow>
          <mrow>
            <mi>j</mi>
            <mi>,</mi>
            <mn>...</mn>
            <mi>,</mi>
            <mi>N</mi>
          </mrow>
        </mrow>
        <mo fence="true" form="postfix" stretchy="true">]</mo>
      </mrow>
    </mrow>
    <annotation encoding="StarMath 5.0">k ∈ left [j , ... , N right ]</annotation>
  </semantics>
</math>
</file>

<file path=Object 143/content.xml><?xml version="1.0" encoding="utf-8"?>
<math xmlns="http://www.w3.org/1998/Math/MathML" display="block">
  <semantics>
    <mrow>
      <mi>k</mi>
      <mi>∈</mi>
      <mrow>
        <mo fence="true" form="prefix" stretchy="true">[</mo>
        <mrow>
          <mrow>
            <mi>j</mi>
            <mi>,</mi>
            <mn>...</mn>
            <mi>,</mi>
            <mi>N</mi>
          </mrow>
        </mrow>
        <mo fence="true" form="postfix" stretchy="true">]</mo>
      </mrow>
    </mrow>
    <annotation encoding="StarMath 5.0">k ∈ left [j , ... , N right ]</annotation>
  </semantics>
</math>
</file>

<file path=Object 144/content.xml><?xml version="1.0" encoding="utf-8"?>
<math xmlns="http://www.w3.org/1998/Math/MathML" display="block">
  <semantics>
    <mrow>
      <mrow>
        <mover accent="true">
          <msub>
            <mi>a</mi>
            <mi mathvariant="italic">ik</mi>
          </msub>
          <mo stretchy="true">~</mo>
        </mover>
        <mo stretchy="false">=</mo>
        <msub>
          <mi>a</mi>
          <mi mathvariant="italic">jk</mi>
        </msub>
      </mrow>
      <mi>⋅</mi>
      <mi>c</mi>
      <mi>−</mi>
      <msub>
        <mi>a</mi>
        <mi mathvariant="italic">ik</mi>
      </msub>
      <mi>⋅</mi>
      <mi>s</mi>
    </mrow>
    <annotation encoding="StarMath 5.0">widetilde {{a} rsub {ik}} = {a} rsub {jk} ⋅ c − {a} rsub {ik} ⋅ s</annotation>
  </semantics>
</math>
</file>

<file path=Object 145/content.xml><?xml version="1.0" encoding="utf-8"?>
<math xmlns="http://www.w3.org/1998/Math/MathML" display="block">
  <semantics>
    <mrow>
      <mrow>
        <mover accent="true">
          <msub>
            <mi>a</mi>
            <mi mathvariant="italic">jk</mi>
          </msub>
          <mo stretchy="true">~</mo>
        </mover>
        <mo stretchy="false">=</mo>
        <msub>
          <mi>a</mi>
          <mi mathvariant="italic">jk</mi>
        </msub>
      </mrow>
      <mi>⋅</mi>
      <mrow>
        <mi>s</mi>
        <mo stretchy="false">+</mo>
        <msub>
          <mi>a</mi>
          <mi mathvariant="italic">ik</mi>
        </msub>
      </mrow>
      <mi>⋅</mi>
      <mi>c</mi>
    </mrow>
    <annotation encoding="StarMath 5.0">widetilde {{a} rsub {jk}} = {a} rsub {jk} ⋅ s + {a} rsub {ik} ⋅ c</annotation>
  </semantics>
</math>
</file>

<file path=Object 146/content.xml><?xml version="1.0" encoding="utf-8"?>
<math xmlns="http://www.w3.org/1998/Math/MathML" display="block">
  <semantics>
    <mrow>
      <mrow>
        <mi>Q</mi>
        <mo stretchy="false">=</mo>
        <msubsup>
          <mi>G</mi>
          <mn>12</mn>
          <mi>T</mi>
        </msubsup>
      </mrow>
      <mn>...</mn>
      <msubsup>
        <mi>G</mi>
        <mi mathvariant="italic">ji</mi>
        <mi>T</mi>
      </msubsup>
    </mrow>
    <annotation encoding="StarMath 5.0">Q = {G} rsub {12} rsup {T} ... {G} rsub {ji} rsup {T}</annotation>
  </semantics>
</math>
</file>

<file path=Object 147/content.xml><?xml version="1.0" encoding="utf-8"?>
<math xmlns="http://www.w3.org/1998/Math/MathML" display="block">
  <semantics>
    <mrow>
      <mi>k</mi>
      <mi>∈</mi>
      <mrow>
        <mo fence="true" form="prefix" stretchy="true">[</mo>
        <mrow>
          <mrow>
            <mn>1</mn>
            <mi>,</mi>
            <mn>...</mn>
            <mi>,</mi>
            <mi>N</mi>
          </mrow>
        </mrow>
        <mo fence="true" form="postfix" stretchy="true">]</mo>
      </mrow>
    </mrow>
    <annotation encoding="StarMath 5.0">k ∈ left [1 , ... , N right ]</annotation>
  </semantics>
</math>
</file>

<file path=Object 148/content.xml><?xml version="1.0" encoding="utf-8"?>
<math xmlns="http://www.w3.org/1998/Math/MathML" display="block">
  <semantics>
    <mrow>
      <mi>k</mi>
      <mi>∈</mi>
      <mrow>
        <mo fence="true" form="prefix" stretchy="true">[</mo>
        <mrow>
          <mrow>
            <mn>1</mn>
            <mi>,</mi>
            <mn>...</mn>
            <mi>,</mi>
            <mi>N</mi>
          </mrow>
        </mrow>
        <mo fence="true" form="postfix" stretchy="true">]</mo>
      </mrow>
    </mrow>
    <annotation encoding="StarMath 5.0">k ∈ left [1 , ... , N right ]</annotation>
  </semantics>
</math>
</file>

<file path=Object 149/content.xml><?xml version="1.0" encoding="utf-8"?>
<math xmlns="http://www.w3.org/1998/Math/MathML" display="block">
  <semantics>
    <mrow>
      <mrow>
        <mover accent="true">
          <msub>
            <mi>q</mi>
            <mi mathvariant="italic">ki</mi>
          </msub>
          <mo stretchy="true">~</mo>
        </mover>
        <mo stretchy="false">=</mo>
        <msub>
          <mi>q</mi>
          <mi mathvariant="italic">kj</mi>
        </msub>
      </mrow>
      <mi>⋅</mi>
      <mrow>
        <mi>s</mi>
        <mo stretchy="false">+</mo>
        <msub>
          <mi>q</mi>
          <mi mathvariant="italic">ki</mi>
        </msub>
      </mrow>
      <mi>⋅</mi>
      <mi>c</mi>
    </mrow>
    <annotation encoding="StarMath 5.0">widetilde {{q} rsub {ki}} = {q} rsub {kj} ⋅ s + {q} rsub {ki} ⋅ c</annotation>
  </semantics>
</math>
</file>

<file path=Object 15/content.xml><?xml version="1.0" encoding="utf-8"?>
<math xmlns="http://www.w3.org/1998/Math/MathML" display="block">
  <semantics>
    <mrow>
      <mi>x</mi>
      <mi>−</mi>
      <mrow>
        <mi mathvariant="italic">Hx</mi>
        <mo stretchy="false">=</mo>
        <mi>x</mi>
      </mrow>
      <mi>−</mi>
      <mi>α</mi>
      <msub>
        <mi>e</mi>
        <mn>1</mn>
      </msub>
    </mrow>
    <annotation encoding="StarMath 5.0">x − Hx = x − α {e} rsub {1}</annotation>
  </semantics>
</math>
</file>

<file path=Object 150/content.xml><?xml version="1.0" encoding="utf-8"?>
<math xmlns="http://www.w3.org/1998/Math/MathML" display="block">
  <semantics>
    <mrow>
      <mrow>
        <mover accent="true">
          <msub>
            <mi>q</mi>
            <mi mathvariant="italic">kj</mi>
          </msub>
          <mo stretchy="true">~</mo>
        </mover>
        <mo stretchy="false">=</mo>
        <msub>
          <mi>q</mi>
          <mi mathvariant="italic">kj</mi>
        </msub>
      </mrow>
      <mi>⋅</mi>
      <mi>c</mi>
      <mi>−</mi>
      <msub>
        <mi>q</mi>
        <mi mathvariant="italic">ki</mi>
      </msub>
      <mi>⋅</mi>
      <mi>s</mi>
    </mrow>
    <annotation encoding="StarMath 5.0">widetilde {{q} rsub {kj}} = {q} rsub {kj} ⋅ c − {q} rsub {ki} ⋅ s</annotation>
  </semantics>
</math>
</file>

<file path=Object 151/content.xml><?xml version="1.0" encoding="utf-8"?>
<math xmlns="http://www.w3.org/1998/Math/MathML" display="block">
  <semantics>
    <mrow>
      <mo fence="true" form="prefix" stretchy="true">(</mo>
      <mrow>
        <mfrac>
          <mrow>
            <msup>
              <mi>N</mi>
              <mn>2</mn>
            </msup>
            <mi>−</mi>
            <mi>N</mi>
          </mrow>
          <mn>2</mn>
        </mfrac>
      </mrow>
      <mo fence="true" form="postfix" stretchy="true">)</mo>
    </mrow>
    <annotation encoding="StarMath 5.0">left ({{N} ^ {2} − N} over {2} right )</annotation>
  </semantics>
</math>
</file>

<file path=Object 152/content.xml><?xml version="1.0" encoding="utf-8"?>
<math xmlns="http://www.w3.org/1998/Math/MathML" display="block">
  <semantics>
    <mrow>
      <mi>j</mi>
      <mi>∈</mi>
      <mrow>
        <mo fence="true" form="prefix" stretchy="true">[</mo>
        <mrow>
          <mrow>
            <mn>0</mn>
            <mi>,</mi>
            <mi>N</mi>
            <mi>−</mi>
            <mn>1</mn>
          </mrow>
        </mrow>
        <mo fence="true" form="postfix" stretchy="true">)</mo>
      </mrow>
    </mrow>
    <annotation encoding="StarMath 5.0">j ∈ left [0 , N − 1 right )</annotation>
  </semantics>
</math>
</file>

<file path=Object 153/content.xml><?xml version="1.0" encoding="utf-8"?>
<math xmlns="http://www.w3.org/1998/Math/MathML" display="block">
  <semantics>
    <mrow>
      <mi>i</mi>
      <mi>∈</mi>
      <mrow>
        <mo fence="true" form="prefix" stretchy="true">[</mo>
        <mrow>
          <mrow>
            <mrow>
              <mi>j</mi>
              <mo stretchy="false">+</mo>
              <mn>10</mn>
            </mrow>
            <mi>,</mi>
            <mi>N</mi>
          </mrow>
        </mrow>
        <mo fence="true" form="postfix" stretchy="true">)</mo>
      </mrow>
    </mrow>
    <annotation encoding="StarMath 5.0">i ∈ left [j + 10 , N right )</annotation>
  </semantics>
</math>
</file>

<file path=Object 154/content.xml><?xml version="1.0" encoding="utf-8"?>
<math xmlns="http://www.w3.org/1998/Math/MathML" display="block">
  <semantics>
    <mrow>
      <mrow>
        <mi mathvariant="italic">cosθ</mi>
        <mo stretchy="false">=</mo>
        <mi>c</mi>
        <mo stretchy="false">=</mo>
        <mfrac>
          <msub>
            <mi>a</mi>
            <mi mathvariant="italic">jj</mi>
          </msub>
          <msqrt>
            <mrow>
              <msup>
                <msub>
                  <mi>a</mi>
                  <mi mathvariant="italic">jj</mi>
                </msub>
                <mn>2</mn>
              </msup>
              <mo stretchy="false">+</mo>
              <msup>
                <msub>
                  <mi>a</mi>
                  <mi mathvariant="italic">ij</mi>
                </msub>
                <mn>2</mn>
              </msup>
            </mrow>
          </msqrt>
        </mfrac>
      </mrow>
      <mi>,</mi>
      <mrow>
        <mi mathvariant="italic">sinθ</mi>
        <mo stretchy="false">=</mo>
        <mi>s</mi>
        <mo stretchy="false">=</mo>
        <mfrac>
          <mrow>
            <mi>−</mi>
            <msub>
              <mi>a</mi>
              <mi mathvariant="italic">ij</mi>
            </msub>
          </mrow>
          <msqrt>
            <mrow>
              <msup>
                <msub>
                  <mi>a</mi>
                  <mi mathvariant="italic">jj</mi>
                </msub>
                <mn>2</mn>
              </msup>
              <mo stretchy="false">+</mo>
              <msup>
                <msub>
                  <mi>a</mi>
                  <mi mathvariant="italic">ij</mi>
                </msub>
                <mn>2</mn>
              </msup>
            </mrow>
          </msqrt>
        </mfrac>
      </mrow>
    </mrow>
    <annotation encoding="StarMath 5.0">cosθ = c = {{a} rsub {jj}} over {sqrt {{{a} rsub {jj}} ^ {2} + {{a} rsub {ij}} ^ {2}}} , sinθ = s = {− {a} rsub {ij}} over {sqrt {{{a} rsub {jj}} ^ {2} + {{a} rsub {ij}} ^ {2}}}</annotation>
  </semantics>
</math>
</file>

<file path=Object 155/content.xml><?xml version="1.0" encoding="utf-8"?>
<math xmlns="http://www.w3.org/1998/Math/MathML" display="block">
  <semantics>
    <mrow>
      <mi>k</mi>
      <mi>∈</mi>
      <mrow>
        <mo fence="true" form="prefix" stretchy="true">[</mo>
        <mrow>
          <mrow>
            <mi>i</mi>
            <mi>,</mi>
            <mi>N</mi>
          </mrow>
        </mrow>
        <mo fence="true" form="postfix" stretchy="true">)</mo>
      </mrow>
    </mrow>
    <annotation encoding="StarMath 5.0">k ∈ left [i , N right )</annotation>
  </semantics>
</math>
</file>

<file path=Object 156/content.xml><?xml version="1.0" encoding="utf-8"?>
<math xmlns="http://www.w3.org/1998/Math/MathML" display="block">
  <semantics>
    <mrow>
      <mrow>
        <mover accent="true">
          <msub>
            <mi>a</mi>
            <mi mathvariant="italic">ik</mi>
          </msub>
          <mo stretchy="true">~</mo>
        </mover>
        <mo stretchy="false">=</mo>
        <msub>
          <mi>a</mi>
          <mi mathvariant="italic">jk</mi>
        </msub>
      </mrow>
      <mi>⋅</mi>
      <mi>c</mi>
      <mi>−</mi>
      <msub>
        <mi>a</mi>
        <mi mathvariant="italic">ik</mi>
      </msub>
      <mi>⋅</mi>
      <mi>s</mi>
    </mrow>
    <annotation encoding="StarMath 5.0">widetilde {{a} rsub {ik}} = {a} rsub {jk} ⋅ c − {a} rsub {ik} ⋅ s</annotation>
  </semantics>
</math>
</file>

<file path=Object 157/content.xml><?xml version="1.0" encoding="utf-8"?>
<math xmlns="http://www.w3.org/1998/Math/MathML" display="block">
  <semantics>
    <mrow>
      <mrow>
        <mover accent="true">
          <msub>
            <mi>a</mi>
            <mi mathvariant="italic">jk</mi>
          </msub>
          <mo stretchy="true">~</mo>
        </mover>
        <mo stretchy="false">=</mo>
        <msub>
          <mi>a</mi>
          <mi mathvariant="italic">jk</mi>
        </msub>
      </mrow>
      <mi>⋅</mi>
      <mrow>
        <mi>s</mi>
        <mo stretchy="false">+</mo>
        <msub>
          <mi>a</mi>
          <mi mathvariant="italic">ik</mi>
        </msub>
      </mrow>
      <mi>⋅</mi>
      <mi>c</mi>
    </mrow>
    <annotation encoding="StarMath 5.0">widetilde {{a} rsub {jk}} = {a} rsub {jk} ⋅ s + {a} rsub {ik} ⋅ c</annotation>
  </semantics>
</math>
</file>

<file path=Object 158/content.xml><?xml version="1.0" encoding="utf-8"?>
<math xmlns="http://www.w3.org/1998/Math/MathML" display="block">
  <semantics>
    <mrow>
      <mi>k</mi>
      <mi>∈</mi>
      <mrow>
        <mo fence="true" form="prefix" stretchy="true">[</mo>
        <mrow>
          <mrow>
            <mn>0</mn>
            <mi>,</mi>
            <mi>N</mi>
          </mrow>
        </mrow>
        <mo fence="true" form="postfix" stretchy="true">)</mo>
      </mrow>
    </mrow>
    <annotation encoding="StarMath 5.0">k ∈ left [0 , N right )</annotation>
  </semantics>
</math>
</file>

<file path=Object 159/content.xml><?xml version="1.0" encoding="utf-8"?>
<math xmlns="http://www.w3.org/1998/Math/MathML" display="block">
  <semantics>
    <mrow>
      <mrow>
        <mover accent="true">
          <msub>
            <mi>q</mi>
            <mi mathvariant="italic">ki</mi>
          </msub>
          <mo stretchy="true">~</mo>
        </mover>
        <mo stretchy="false">=</mo>
        <msub>
          <mi>q</mi>
          <mi mathvariant="italic">kj</mi>
        </msub>
      </mrow>
      <mi>⋅</mi>
      <mrow>
        <mi>s</mi>
        <mo stretchy="false">+</mo>
        <msub>
          <mi>q</mi>
          <mi mathvariant="italic">ki</mi>
        </msub>
      </mrow>
      <mi>⋅</mi>
      <mi>c</mi>
    </mrow>
    <annotation encoding="StarMath 5.0">widetilde {{q} rsub {ki}} = {q} rsub {kj} ⋅ s + {q} rsub {ki} ⋅ c</annotation>
  </semantics>
</math>
</file>

<file path=Object 16/content.xml><?xml version="1.0" encoding="utf-8"?>
<math xmlns="http://www.w3.org/1998/Math/MathML" display="block">
  <semantics>
    <mi>v</mi>
    <annotation encoding="StarMath 5.0">v</annotation>
  </semantics>
</math>
</file>

<file path=Object 160/content.xml><?xml version="1.0" encoding="utf-8"?>
<math xmlns="http://www.w3.org/1998/Math/MathML" display="block">
  <semantics>
    <mrow>
      <mrow>
        <mover accent="true">
          <msub>
            <mi>q</mi>
            <mi mathvariant="italic">kj</mi>
          </msub>
          <mo stretchy="true">~</mo>
        </mover>
        <mo stretchy="false">=</mo>
        <msub>
          <mi>q</mi>
          <mi mathvariant="italic">kj</mi>
        </msub>
      </mrow>
      <mi>⋅</mi>
      <mi>c</mi>
      <mi>−</mi>
      <msub>
        <mi>q</mi>
        <mi mathvariant="italic">ki</mi>
      </msub>
      <mi>⋅</mi>
      <mi>s</mi>
    </mrow>
    <annotation encoding="StarMath 5.0">widetilde {{q} rsub {kj}} = {q} rsub {kj} ⋅ c − {q} rsub {ki} ⋅ s</annotation>
  </semantics>
</math>
</file>

<file path=Object 161/content.xml><?xml version="1.0" encoding="utf-8"?>
<math xmlns="http://www.w3.org/1998/Math/MathML" display="block">
  <semantics>
    <mrow>
      <mi>τ</mi>
      <mo stretchy="false">=</mo>
      <mfrac>
        <mi>s</mi>
        <mrow>
          <mn>1</mn>
          <mo stretchy="false">+</mo>
          <mi>c</mi>
        </mrow>
      </mfrac>
    </mrow>
    <annotation encoding="StarMath 5.0">τ = {s} over {1 + c}</annotation>
  </semantics>
</math>
</file>

<file path=Object 162/content.xml><?xml version="1.0" encoding="utf-8"?>
<math xmlns="http://www.w3.org/1998/Math/MathML" display="block">
  <semantics>
    <mrow>
      <mi>c</mi>
      <mo stretchy="false">=</mo>
      <mfrac>
        <mrow>
          <mn>1</mn>
          <mi>−</mi>
          <msup>
            <mi>τ</mi>
            <mn>2</mn>
          </msup>
        </mrow>
        <mrow>
          <mn>1</mn>
          <mo stretchy="false">+</mo>
          <msup>
            <mi>τ</mi>
            <mn>2</mn>
          </msup>
        </mrow>
      </mfrac>
    </mrow>
    <annotation encoding="StarMath 5.0">c = {1 − {τ} ^ {2}} over {1 + {τ} ^ {2}}</annotation>
  </semantics>
</math>
</file>

<file path=Object 163/content.xml><?xml version="1.0" encoding="utf-8"?>
<math xmlns="http://www.w3.org/1998/Math/MathML" display="block">
  <semantics>
    <mrow>
      <mi>s</mi>
      <mo stretchy="false">=</mo>
      <mfrac>
        <mrow>
          <mn>2</mn>
          <mi>⋅</mi>
          <mi mathvariant="italic">tau</mi>
        </mrow>
        <mrow>
          <mn>1</mn>
          <mo stretchy="false">+</mo>
          <msup>
            <mi>τ</mi>
            <mn>2</mn>
          </msup>
        </mrow>
      </mfrac>
    </mrow>
    <annotation encoding="StarMath 5.0">s = {2 ⋅ tau} over {1 + {τ} ^ {2}}</annotation>
  </semantics>
</math>
</file>

<file path=Object 164/content.xml><?xml version="1.0" encoding="utf-8"?>
<math xmlns="http://www.w3.org/1998/Math/MathML" display="block">
  <semantics>
    <mrow>
      <mi>Q</mi>
      <mrow>
        <mo fence="true" form="prefix" stretchy="true">[</mo>
        <mrow>
          <mi>k</mi>
        </mrow>
        <mo fence="true" form="postfix" stretchy="true">]</mo>
      </mrow>
      <mrow>
        <mo fence="true" form="prefix" stretchy="true">[</mo>
        <mrow>
          <mi>i</mi>
        </mrow>
        <mo fence="true" form="postfix" stretchy="true">]</mo>
      </mrow>
      <mi>→</mi>
      <mi>Q</mi>
      <mrow>
        <mo fence="true" form="prefix" stretchy="true">[</mo>
        <mrow>
          <mi>i</mi>
        </mrow>
        <mo fence="true" form="postfix" stretchy="true">]</mo>
      </mrow>
      <mrow>
        <mo fence="true" form="prefix" stretchy="true">[</mo>
        <mrow>
          <mi>k</mi>
        </mrow>
        <mo fence="true" form="postfix" stretchy="true">]</mo>
      </mrow>
    </mrow>
    <annotation encoding="StarMath 5.0">Q left [k right ] left [i right ] → Q left [i right ] left [k right ]</annotation>
  </semantics>
</math>
</file>

<file path=Object 165/content.xml><?xml version="1.0" encoding="utf-8"?>
<math xmlns="http://www.w3.org/1998/Math/MathML" display="block">
  <semantics>
    <mrow>
      <mi>Q</mi>
      <mrow>
        <mo fence="true" form="prefix" stretchy="true">[</mo>
        <mrow>
          <mi>k</mi>
        </mrow>
        <mo fence="true" form="postfix" stretchy="true">]</mo>
      </mrow>
      <mrow>
        <mo fence="true" form="prefix" stretchy="true">[</mo>
        <mrow>
          <mi>j</mi>
        </mrow>
        <mo fence="true" form="postfix" stretchy="true">]</mo>
      </mrow>
      <mi>→</mi>
      <mi>Q</mi>
      <mrow>
        <mo fence="true" form="prefix" stretchy="true">[</mo>
        <mrow>
          <mi>j</mi>
        </mrow>
        <mo fence="true" form="postfix" stretchy="true">]</mo>
      </mrow>
      <mrow>
        <mo fence="true" form="prefix" stretchy="true">[</mo>
        <mrow>
          <mi>k</mi>
        </mrow>
        <mo fence="true" form="postfix" stretchy="true">]</mo>
      </mrow>
    </mrow>
    <annotation encoding="StarMath 5.0">Q left [k right ] left [j right ] → Q left [j right ] left [k right ]</annotation>
  </semantics>
</math>
</file>

<file path=Object 16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7cm" svg:height="19.3cm" xlink:href="." xlink:type="simple" chart:class="chart:line" chart:style-name="ch1">
        <chart:subtitle svg:x="0cm" svg:y="0cm" chart:style-name="ch2"/>
        <chart:legend chart:legend-position="end" svg:x="13.818cm" svg:y="8.604cm" style:legend-expansion="high" chart:style-name="ch3"/>
        <chart:plot-area chart:style-name="ch4" svg:x="0.347cm" svg:y="0.191cm" svg:width="12.883cm" svg:height="18.608cm">
          <chart:coordinate-region svg:x="1.459cm" svg:y="0.39cm" svg:width="11.387cm" svg:height="17.762cm"/>
          <chart:axis chart:dimension="x" chart:name="primary-x" chart:style-name="ch5" chartooo:axis-type="auto">
            <chartooo:date-scale/>
            <chart:title svg:x="5.187cm" svg:y="18.74cm" chart:style-name="ch2">
              <text:p><text:span text:style-name="T1">Размер данных, NxN</text:span></text:p>
            </chart:title>
            <chart:categories table:cell-range-address="local-table.$A$2:.$A$13"/>
          </chart:axis>
          <chart:axis chart:dimension="y" chart:name="primary-y" chart:style-name="ch6">
            <chart:title svg:x="0cm" svg:y="10.784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series chart:style-name="ch12" chart:values-cell-range-address="local-table.$E$2:.$E$13" chart:label-cell-address="local-table.$E$1" chart:class="chart:line">
            <chart:data-point chart:repeated="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13115">
                <text:p>0.0013115</text:p>
              </table:table-cell>
              <table:table-cell office:value-type="float" office:value="0.0014418">
                <text:p>0.0014418</text:p>
              </table:table-cell>
              <table:table-cell office:value-type="float" office:value="0.0018704">
                <text:p>0.0018704</text:p>
              </table:table-cell>
              <table:table-cell office:value-type="float" office:value="0.0012517">
                <text:p>0.0012517</text:p>
              </table:table-cell>
            </table:table-row>
            <table:table-row>
              <table:table-cell office:value-type="string">
                <text:p>200</text:p>
              </table:table-cell>
              <table:table-cell office:value-type="float" office:value="0.0102885">
                <text:p>0.0102885</text:p>
              </table:table-cell>
              <table:table-cell office:value-type="float" office:value="0.0099006">
                <text:p>0.0099006</text:p>
              </table:table-cell>
              <table:table-cell office:value-type="float" office:value="0.010183">
                <text:p>0.010183</text:p>
              </table:table-cell>
              <table:table-cell office:value-type="float" office:value="0.011072">
                <text:p>0.011072</text:p>
              </table:table-cell>
            </table:table-row>
            <table:table-row>
              <table:table-cell office:value-type="string">
                <text:p>300</text:p>
              </table:table-cell>
              <table:table-cell office:value-type="float" office:value="0.0331369">
                <text:p>0.0331369</text:p>
              </table:table-cell>
              <table:table-cell office:value-type="float" office:value="0.0315938">
                <text:p>0.0315938</text:p>
              </table:table-cell>
              <table:table-cell office:value-type="float" office:value="0.0297927">
                <text:p>0.0297927</text:p>
              </table:table-cell>
              <table:table-cell office:value-type="float" office:value="0.0314288">
                <text:p>0.0314288</text:p>
              </table:table-cell>
            </table:table-row>
            <table:table-row>
              <table:table-cell office:value-type="string">
                <text:p>400</text:p>
              </table:table-cell>
              <table:table-cell office:value-type="float" office:value="0.0681976">
                <text:p>0.0681976</text:p>
              </table:table-cell>
              <table:table-cell office:value-type="float" office:value="0.0699835">
                <text:p>0.0699835</text:p>
              </table:table-cell>
              <table:table-cell office:value-type="float" office:value="0.0673448">
                <text:p>0.0673448</text:p>
              </table:table-cell>
              <table:table-cell office:value-type="float" office:value="0.0786339">
                <text:p>0.0786339</text:p>
              </table:table-cell>
            </table:table-row>
            <table:table-row>
              <table:table-cell office:value-type="string">
                <text:p>500</text:p>
              </table:table-cell>
              <table:table-cell office:value-type="float" office:value="0.126461">
                <text:p>0.126461</text:p>
              </table:table-cell>
              <table:table-cell office:value-type="float" office:value="0.141206">
                <text:p>0.141206</text:p>
              </table:table-cell>
              <table:table-cell office:value-type="float" office:value="0.12419">
                <text:p>0.12419</text:p>
              </table:table-cell>
              <table:table-cell office:value-type="float" office:value="0.140472">
                <text:p>0.140472</text:p>
              </table:table-cell>
            </table:table-row>
            <table:table-row>
              <table:table-cell office:value-type="string">
                <text:p>1000</text:p>
              </table:table-cell>
              <table:table-cell office:value-type="float" office:value="1.03255">
                <text:p>1.03255</text:p>
              </table:table-cell>
              <table:table-cell office:value-type="float" office:value="1.2479">
                <text:p>1.2479</text:p>
              </table:table-cell>
              <table:table-cell office:value-type="float" office:value="1.31274">
                <text:p>1.31274</text:p>
              </table:table-cell>
              <table:table-cell office:value-type="float" office:value="1.39632">
                <text:p>1.39632</text:p>
              </table:table-cell>
            </table:table-row>
            <table:table-row>
              <table:table-cell office:value-type="string">
                <text:p>1500</text:p>
              </table:table-cell>
              <table:table-cell office:value-type="float" office:value="4.23951">
                <text:p>4.23951</text:p>
              </table:table-cell>
              <table:table-cell office:value-type="float" office:value="3.43991">
                <text:p>3.43991</text:p>
              </table:table-cell>
              <table:table-cell office:value-type="float" office:value="3.46123">
                <text:p>3.46123</text:p>
              </table:table-cell>
              <table:table-cell office:value-type="float" office:value="3.64677">
                <text:p>3.64677</text:p>
              </table:table-cell>
            </table:table-row>
            <table:table-row>
              <table:table-cell office:value-type="string">
                <text:p>2000</text:p>
              </table:table-cell>
              <table:table-cell office:value-type="float" office:value="9.38852">
                <text:p>9.38852</text:p>
              </table:table-cell>
              <table:table-cell office:value-type="float" office:value="6.88188">
                <text:p>6.88188</text:p>
              </table:table-cell>
              <table:table-cell office:value-type="float" office:value="6.75311">
                <text:p>6.75311</text:p>
              </table:table-cell>
              <table:table-cell office:value-type="float" office:value="7.73706">
                <text:p>7.73706</text:p>
              </table:table-cell>
            </table:table-row>
            <table:table-row>
              <table:table-cell office:value-type="string">
                <text:p>2500</text:p>
              </table:table-cell>
              <table:table-cell office:value-type="float" office:value="18.5025">
                <text:p>18.5025</text:p>
              </table:table-cell>
              <table:table-cell office:value-type="float" office:value="12.8855">
                <text:p>12.8855</text:p>
              </table:table-cell>
              <table:table-cell office:value-type="float" office:value="11.5488">
                <text:p>11.5488</text:p>
              </table:table-cell>
              <table:table-cell office:value-type="float" office:value="13.0279">
                <text:p>13.0279</text:p>
              </table:table-cell>
            </table:table-row>
            <table:table-row>
              <table:table-cell office:value-type="string">
                <text:p>3000</text:p>
              </table:table-cell>
              <table:table-cell office:value-type="float" office:value="31.8739">
                <text:p>31.8739</text:p>
              </table:table-cell>
              <table:table-cell office:value-type="float" office:value="21.6234">
                <text:p>21.6234</text:p>
              </table:table-cell>
              <table:table-cell office:value-type="float" office:value="18.634">
                <text:p>18.634</text:p>
              </table:table-cell>
              <table:table-cell office:value-type="float" office:value="20.1909">
                <text:p>20.1909</text:p>
              </table:table-cell>
            </table:table-row>
            <table:table-row>
              <table:table-cell office:value-type="string">
                <text:p>3500</text:p>
              </table:table-cell>
              <table:table-cell office:value-type="float" office:value="50.2523">
                <text:p>50.2523</text:p>
              </table:table-cell>
              <table:table-cell office:value-type="float" office:value="32.7209">
                <text:p>32.7209</text:p>
              </table:table-cell>
              <table:table-cell office:value-type="float" office:value="27.8612">
                <text:p>27.8612</text:p>
              </table:table-cell>
              <table:table-cell office:value-type="float" office:value="31.0032">
                <text:p>31.0032</text:p>
              </table:table-cell>
            </table:table-row>
            <table:table-row>
              <table:table-cell office:value-type="string">
                <text:p>4000</text:p>
              </table:table-cell>
              <table:table-cell office:value-type="float" office:value="75.3927">
                <text:p>75.3927</text:p>
              </table:table-cell>
              <table:table-cell office:value-type="float" office:value="47.5205">
                <text:p>47.5205</text:p>
              </table:table-cell>
              <table:table-cell office:value-type="float" office:value="40.1216">
                <text:p>40.1216</text:p>
              </table:table-cell>
              <table:table-cell office:value-type="float" office:value="41.6396">
                <text:p>41.6396</text:p>
              </table:table-cell>
            </table:table-row>
          </table:table-rows>
        </table:table>
      </chart:chart>
    </office:chart>
  </office:body>
</office:document-content>
</file>

<file path=Object 16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6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6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596cm" svg:height="19.995cm" xlink:href="." xlink:type="simple" chart:class="chart:line" chart:style-name="ch1">
        <chart:subtitle svg:x="0cm" svg:y="0cm" chart:style-name="ch2"/>
        <chart:legend chart:legend-position="end" svg:x="13.714cm" svg:y="8.951cm" style:legend-expansion="high" chart:style-name="ch3"/>
        <chart:plot-area chart:style-name="ch4" svg:x="0.338cm" svg:y="0.205cm" svg:width="12.812cm" svg:height="19.248cm">
          <chart:coordinate-region svg:x="1.45cm" svg:y="0.404cm" svg:width="11.316cm" svg:height="18.402cm"/>
          <chart:axis chart:dimension="x" chart:name="primary-x" chart:style-name="ch5" chartooo:axis-type="auto">
            <chartooo:date-scale/>
            <chart:title svg:x="5.143cm" svg:y="19.435cm" chart:style-name="ch2">
              <text:p><text:span text:style-name="T1">Размер данных, NxN</text:span></text:p>
            </chart:title>
            <chart:categories table:cell-range-address="local-table.$A$2:.$A$13"/>
          </chart:axis>
          <chart:axis chart:dimension="y" chart:name="primary-y" chart:style-name="ch6">
            <chart:title svg:x="0cm" svg:y="11.118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series chart:style-name="ch12" chart:values-cell-range-address="local-table.$E$2:.$E$13" chart:label-cell-address="local-table.$E$1" chart:class="chart:line">
            <chart:data-point chart:repeated="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14271">
                <text:p>0.0014271</text:p>
              </table:table-cell>
              <table:table-cell office:value-type="float" office:value="0.0019271">
                <text:p>0.0019271</text:p>
              </table:table-cell>
              <table:table-cell office:value-type="float" office:value="0.0013663">
                <text:p>0.0013663</text:p>
              </table:table-cell>
              <table:table-cell office:value-type="float" office:value="0.0013181">
                <text:p>0.0013181</text:p>
              </table:table-cell>
            </table:table-row>
            <table:table-row>
              <table:table-cell office:value-type="string">
                <text:p>200</text:p>
              </table:table-cell>
              <table:table-cell office:value-type="float" office:value="0.0100838">
                <text:p>0.0100838</text:p>
              </table:table-cell>
              <table:table-cell office:value-type="float" office:value="0.0111735">
                <text:p>0.0111735</text:p>
              </table:table-cell>
              <table:table-cell office:value-type="float" office:value="0.0131471">
                <text:p>0.0131471</text:p>
              </table:table-cell>
              <table:table-cell office:value-type="float" office:value="0.0099296">
                <text:p>0.0099296</text:p>
              </table:table-cell>
            </table:table-row>
            <table:table-row>
              <table:table-cell office:value-type="string">
                <text:p>300</text:p>
              </table:table-cell>
              <table:table-cell office:value-type="float" office:value="0.0319887">
                <text:p>0.0319887</text:p>
              </table:table-cell>
              <table:table-cell office:value-type="float" office:value="0.0312217">
                <text:p>0.0312217</text:p>
              </table:table-cell>
              <table:table-cell office:value-type="float" office:value="0.0304893">
                <text:p>0.0304893</text:p>
              </table:table-cell>
              <table:table-cell office:value-type="float" office:value="0.0318885">
                <text:p>0.0318885</text:p>
              </table:table-cell>
            </table:table-row>
            <table:table-row>
              <table:table-cell office:value-type="string">
                <text:p>400</text:p>
              </table:table-cell>
              <table:table-cell office:value-type="float" office:value="0.0708905">
                <text:p>0.0708905</text:p>
              </table:table-cell>
              <table:table-cell office:value-type="float" office:value="0.0753714">
                <text:p>0.0753714</text:p>
              </table:table-cell>
              <table:table-cell office:value-type="float" office:value="0.0724032">
                <text:p>0.0724032</text:p>
              </table:table-cell>
              <table:table-cell office:value-type="float" office:value="0.0764529">
                <text:p>0.0764529</text:p>
              </table:table-cell>
            </table:table-row>
            <table:table-row>
              <table:table-cell office:value-type="string">
                <text:p>500</text:p>
              </table:table-cell>
              <table:table-cell office:value-type="float" office:value="0.141176">
                <text:p>0.141176</text:p>
              </table:table-cell>
              <table:table-cell office:value-type="float" office:value="0.137337">
                <text:p>0.137337</text:p>
              </table:table-cell>
              <table:table-cell office:value-type="float" office:value="0.139344">
                <text:p>0.139344</text:p>
              </table:table-cell>
              <table:table-cell office:value-type="float" office:value="0.140105">
                <text:p>0.140105</text:p>
              </table:table-cell>
            </table:table-row>
            <table:table-row>
              <table:table-cell office:value-type="string">
                <text:p>1000</text:p>
              </table:table-cell>
              <table:table-cell office:value-type="float" office:value="1.18734">
                <text:p>1.18734</text:p>
              </table:table-cell>
              <table:table-cell office:value-type="float" office:value="1.02605">
                <text:p>1.02605</text:p>
              </table:table-cell>
              <table:table-cell office:value-type="float" office:value="0.91272">
                <text:p>0.91272</text:p>
              </table:table-cell>
              <table:table-cell office:value-type="float" office:value="1.00876">
                <text:p>1.00876</text:p>
              </table:table-cell>
            </table:table-row>
            <table:table-row>
              <table:table-cell office:value-type="string">
                <text:p>1500</text:p>
              </table:table-cell>
              <table:table-cell office:value-type="float" office:value="3.9269">
                <text:p>3.9269</text:p>
              </table:table-cell>
              <table:table-cell office:value-type="float" office:value="3.11906">
                <text:p>3.11906</text:p>
              </table:table-cell>
              <table:table-cell office:value-type="float" office:value="2.63769">
                <text:p>2.63769</text:p>
              </table:table-cell>
              <table:table-cell office:value-type="float" office:value="2.55075">
                <text:p>2.55075</text:p>
              </table:table-cell>
            </table:table-row>
            <table:table-row>
              <table:table-cell office:value-type="string">
                <text:p>2000</text:p>
              </table:table-cell>
              <table:table-cell office:value-type="float" office:value="9.11078">
                <text:p>9.11078</text:p>
              </table:table-cell>
              <table:table-cell office:value-type="float" office:value="6.7051">
                <text:p>6.7051</text:p>
              </table:table-cell>
              <table:table-cell office:value-type="float" office:value="5.49927">
                <text:p>5.49927</text:p>
              </table:table-cell>
              <table:table-cell office:value-type="float" office:value="5.12232">
                <text:p>5.12232</text:p>
              </table:table-cell>
            </table:table-row>
            <table:table-row>
              <table:table-cell office:value-type="string">
                <text:p>2500</text:p>
              </table:table-cell>
              <table:table-cell office:value-type="float" office:value="17.9521">
                <text:p>17.9521</text:p>
              </table:table-cell>
              <table:table-cell office:value-type="float" office:value="12.9624">
                <text:p>12.9624</text:p>
              </table:table-cell>
              <table:table-cell office:value-type="float" office:value="10.0117">
                <text:p>10.0117</text:p>
              </table:table-cell>
              <table:table-cell office:value-type="float" office:value="9.40546">
                <text:p>9.40546</text:p>
              </table:table-cell>
            </table:table-row>
            <table:table-row>
              <table:table-cell office:value-type="string">
                <text:p>3000</text:p>
              </table:table-cell>
              <table:table-cell office:value-type="float" office:value="30.0101">
                <text:p>30.0101</text:p>
              </table:table-cell>
              <table:table-cell office:value-type="float" office:value="21.6059">
                <text:p>21.6059</text:p>
              </table:table-cell>
              <table:table-cell office:value-type="float" office:value="16.9055">
                <text:p>16.9055</text:p>
              </table:table-cell>
              <table:table-cell office:value-type="float" office:value="15.6294">
                <text:p>15.6294</text:p>
              </table:table-cell>
            </table:table-row>
            <table:table-row>
              <table:table-cell office:value-type="string">
                <text:p>3500</text:p>
              </table:table-cell>
              <table:table-cell office:value-type="float" office:value="48.9718">
                <text:p>48.9718</text:p>
              </table:table-cell>
              <table:table-cell office:value-type="float" office:value="33.667">
                <text:p>33.667</text:p>
              </table:table-cell>
              <table:table-cell office:value-type="float" office:value="25.9924">
                <text:p>25.9924</text:p>
              </table:table-cell>
              <table:table-cell office:value-type="float" office:value="24.0062">
                <text:p>24.0062</text:p>
              </table:table-cell>
            </table:table-row>
            <table:table-row>
              <table:table-cell office:value-type="string">
                <text:p>4000</text:p>
              </table:table-cell>
              <table:table-cell office:value-type="float" office:value="73.9241">
                <text:p>73.9241</text:p>
              </table:table-cell>
              <table:table-cell office:value-type="float" office:value="50.2122">
                <text:p>50.2122</text:p>
              </table:table-cell>
              <table:table-cell office:value-type="float" office:value="38.1582">
                <text:p>38.1582</text:p>
              </table:table-cell>
              <table:table-cell office:value-type="float" office:value="35.1546">
                <text:p>35.1546</text:p>
              </table:table-cell>
            </table:table-row>
          </table:table-rows>
        </table:table>
      </chart:chart>
    </office:chart>
  </office:body>
</office:document-content>
</file>

<file path=Object 16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6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content.xml><?xml version="1.0" encoding="utf-8"?>
<math xmlns="http://www.w3.org/1998/Math/MathML" display="block">
  <semantics>
    <mrow>
      <mrow>
        <mi>v</mi>
        <mo stretchy="false">=</mo>
        <mi>x</mi>
      </mrow>
      <mi>−</mi>
      <mi>α</mi>
      <msub>
        <mi>e</mi>
        <mn>1</mn>
      </msub>
      <mi>.</mi>
    </mrow>
    <annotation encoding="StarMath 5.0">v = x − α {e} rsub {1} .</annotation>
  </semantics>
</math>
</file>

<file path=Object 17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5.91cm" svg:height="20.72cm" xlink:href="." xlink:type="simple" chart:class="chart:line" chart:style-name="ch1">
        <chart:subtitle svg:x="0cm" svg:y="0cm" chart:style-name="ch2"/>
        <chart:legend chart:legend-position="end" svg:x="13.028cm" svg:y="9.314cm" style:legend-expansion="high" chart:style-name="ch3"/>
        <chart:plot-area chart:style-name="ch4" svg:x="0.087cm" svg:y="0.22cm" svg:width="12.535cm" svg:height="19.915cm">
          <chart:coordinate-region svg:x="1.39cm" svg:y="0.419cm" svg:width="10.848cm" svg:height="19.069cm"/>
          <chart:axis chart:dimension="x" chart:name="primary-x" chart:style-name="ch5" chartooo:axis-type="auto">
            <chartooo:date-scale/>
            <chart:title svg:x="4.753cm" svg:y="20.16cm" chart:style-name="ch2">
              <text:p><text:span text:style-name="T1">Размер данных, NxN</text:span></text:p>
            </chart:title>
            <chart:categories table:cell-range-address="local-table.$A$2:.$A$13"/>
          </chart:axis>
          <chart:axis chart:dimension="y" chart:name="primary-y" chart:style-name="ch6">
            <chart:title svg:x="0cm" svg:y="11.466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series chart:style-name="ch12" chart:values-cell-range-address="local-table.$E$2:.$E$13" chart:label-cell-address="local-table.$E$1" chart:class="chart:line">
            <chart:data-point chart:repeated="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04123">
                <text:p>0.0004123</text:p>
              </table:table-cell>
              <table:table-cell office:value-type="float" office:value="0.0003627">
                <text:p>0.0003627</text:p>
              </table:table-cell>
              <table:table-cell office:value-type="float" office:value="0.0003778">
                <text:p>0.0003778</text:p>
              </table:table-cell>
              <table:table-cell office:value-type="float" office:value="0.0003797">
                <text:p>0.0003797</text:p>
              </table:table-cell>
            </table:table-row>
            <table:table-row>
              <table:table-cell office:value-type="string">
                <text:p>200</text:p>
              </table:table-cell>
              <table:table-cell office:value-type="float" office:value="0.00258">
                <text:p>0.00258</text:p>
              </table:table-cell>
              <table:table-cell office:value-type="float" office:value="0.0030976">
                <text:p>0.0030976</text:p>
              </table:table-cell>
              <table:table-cell office:value-type="float" office:value="0.0024723">
                <text:p>0.0024723</text:p>
              </table:table-cell>
              <table:table-cell office:value-type="float" office:value="0.0024847">
                <text:p>0.0024847</text:p>
              </table:table-cell>
            </table:table-row>
            <table:table-row>
              <table:table-cell office:value-type="string">
                <text:p>300</text:p>
              </table:table-cell>
              <table:table-cell office:value-type="float" office:value="0.0058212">
                <text:p>0.0058212</text:p>
              </table:table-cell>
              <table:table-cell office:value-type="float" office:value="0.0084253">
                <text:p>0.0084253</text:p>
              </table:table-cell>
              <table:table-cell office:value-type="float" office:value="0.0087256">
                <text:p>0.0087256</text:p>
              </table:table-cell>
              <table:table-cell office:value-type="float" office:value="0.007201">
                <text:p>0.007201</text:p>
              </table:table-cell>
            </table:table-row>
            <table:table-row>
              <table:table-cell office:value-type="string">
                <text:p>400</text:p>
              </table:table-cell>
              <table:table-cell office:value-type="float" office:value="0.0133668">
                <text:p>0.0133668</text:p>
              </table:table-cell>
              <table:table-cell office:value-type="float" office:value="0.0179569">
                <text:p>0.0179569</text:p>
              </table:table-cell>
              <table:table-cell office:value-type="float" office:value="0.0141667">
                <text:p>0.0141667</text:p>
              </table:table-cell>
              <table:table-cell office:value-type="float" office:value="0.0146559">
                <text:p>0.0146559</text:p>
              </table:table-cell>
            </table:table-row>
            <table:table-row>
              <table:table-cell office:value-type="string">
                <text:p>500</text:p>
              </table:table-cell>
              <table:table-cell office:value-type="float" office:value="0.0326057">
                <text:p>0.0326057</text:p>
              </table:table-cell>
              <table:table-cell office:value-type="float" office:value="0.0347993">
                <text:p>0.0347993</text:p>
              </table:table-cell>
              <table:table-cell office:value-type="float" office:value="0.0298509">
                <text:p>0.0298509</text:p>
              </table:table-cell>
              <table:table-cell office:value-type="float" office:value="0.0288285">
                <text:p>0.0288285</text:p>
              </table:table-cell>
            </table:table-row>
            <table:table-row>
              <table:table-cell office:value-type="string">
                <text:p>1000</text:p>
              </table:table-cell>
              <table:table-cell office:value-type="float" office:value="0.496281">
                <text:p>0.496281</text:p>
              </table:table-cell>
              <table:table-cell office:value-type="float" office:value="0.468384">
                <text:p>0.468384</text:p>
              </table:table-cell>
              <table:table-cell office:value-type="float" office:value="0.376237">
                <text:p>0.376237</text:p>
              </table:table-cell>
              <table:table-cell office:value-type="float" office:value="0.412436">
                <text:p>0.412436</text:p>
              </table:table-cell>
            </table:table-row>
            <table:table-row>
              <table:table-cell office:value-type="string">
                <text:p>1500</text:p>
              </table:table-cell>
              <table:table-cell office:value-type="float" office:value="1.60407">
                <text:p>1.60407</text:p>
              </table:table-cell>
              <table:table-cell office:value-type="float" office:value="1.52236">
                <text:p>1.52236</text:p>
              </table:table-cell>
              <table:table-cell office:value-type="float" office:value="1.63821">
                <text:p>1.63821</text:p>
              </table:table-cell>
              <table:table-cell office:value-type="float" office:value="1.6963">
                <text:p>1.6963</text:p>
              </table:table-cell>
            </table:table-row>
            <table:table-row>
              <table:table-cell office:value-type="string">
                <text:p>2000</text:p>
              </table:table-cell>
              <table:table-cell office:value-type="float" office:value="3.55704">
                <text:p>3.55704</text:p>
              </table:table-cell>
              <table:table-cell office:value-type="float" office:value="4.2105">
                <text:p>4.2105</text:p>
              </table:table-cell>
              <table:table-cell office:value-type="float" office:value="3.70391">
                <text:p>3.70391</text:p>
              </table:table-cell>
              <table:table-cell office:value-type="float" office:value="3.66677">
                <text:p>3.66677</text:p>
              </table:table-cell>
            </table:table-row>
            <table:table-row>
              <table:table-cell office:value-type="string">
                <text:p>2500</text:p>
              </table:table-cell>
              <table:table-cell office:value-type="float" office:value="7.23234">
                <text:p>7.23234</text:p>
              </table:table-cell>
              <table:table-cell office:value-type="float" office:value="8.03388">
                <text:p>8.03388</text:p>
              </table:table-cell>
              <table:table-cell office:value-type="float" office:value="7.28957">
                <text:p>7.28957</text:p>
              </table:table-cell>
              <table:table-cell office:value-type="float" office:value="7.32413">
                <text:p>7.32413</text:p>
              </table:table-cell>
            </table:table-row>
            <table:table-row>
              <table:table-cell office:value-type="string">
                <text:p>3000</text:p>
              </table:table-cell>
              <table:table-cell office:value-type="float" office:value="12.8809">
                <text:p>12.8809</text:p>
              </table:table-cell>
              <table:table-cell office:value-type="float" office:value="13.5418">
                <text:p>13.5418</text:p>
              </table:table-cell>
              <table:table-cell office:value-type="float" office:value="12.4292">
                <text:p>12.4292</text:p>
              </table:table-cell>
              <table:table-cell office:value-type="float" office:value="12.6413">
                <text:p>12.6413</text:p>
              </table:table-cell>
            </table:table-row>
            <table:table-row>
              <table:table-cell office:value-type="string">
                <text:p>3500</text:p>
              </table:table-cell>
              <table:table-cell office:value-type="float" office:value="20.2517">
                <text:p>20.2517</text:p>
              </table:table-cell>
              <table:table-cell office:value-type="float" office:value="21.897">
                <text:p>21.897</text:p>
              </table:table-cell>
              <table:table-cell office:value-type="float" office:value="20.1862">
                <text:p>20.1862</text:p>
              </table:table-cell>
              <table:table-cell office:value-type="float" office:value="20.7444">
                <text:p>20.7444</text:p>
              </table:table-cell>
            </table:table-row>
            <table:table-row>
              <table:table-cell office:value-type="string">
                <text:p>4000</text:p>
              </table:table-cell>
              <table:table-cell office:value-type="float" office:value="30.9537">
                <text:p>30.9537</text:p>
              </table:table-cell>
              <table:table-cell office:value-type="float" office:value="32.1914">
                <text:p>32.1914</text:p>
              </table:table-cell>
              <table:table-cell office:value-type="float" office:value="30.3631">
                <text:p>30.3631</text:p>
              </table:table-cell>
              <table:table-cell office:value-type="float" office:value="31.001">
                <text:p>31.001</text:p>
              </table:table-cell>
            </table:table-row>
          </table:table-rows>
        </table:table>
      </chart:chart>
    </office:chart>
  </office:body>
</office:document-content>
</file>

<file path=Object 17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2/content.xml><?xml version="1.0" encoding="utf-8"?>
<math xmlns="http://www.w3.org/1998/Math/MathML" display="block">
  <semantics>
    <mrow>
      <mrow>
        <msub>
          <mi>a</mi>
          <mi mathvariant="italic">ij</mi>
        </msub>
        <mo stretchy="false">=</mo>
        <mn>0</mn>
      </mrow>
      <mi>,</mi>
      <mi mathvariant="italic">если</mi>
      <mrow>
        <mi>i</mi>
        <mo stretchy="false">&gt;</mo>
        <mrow>
          <mi>j</mi>
          <mo stretchy="false">+</mo>
          <mn>1</mn>
        </mrow>
      </mrow>
    </mrow>
    <annotation encoding="StarMath 5.0">{a} rsub {ij} = 0 , если i &gt; j + 1</annotation>
  </semantics>
</math>
</file>

<file path=Object 173/content.xml><?xml version="1.0" encoding="utf-8"?>
<math xmlns="http://www.w3.org/1998/Math/MathML" display="block">
  <semantics>
    <mrow>
      <mrow>
        <msub>
          <mi>a</mi>
          <mi mathvariant="italic">ij</mi>
        </msub>
        <mo stretchy="false">=</mo>
        <mn>0</mn>
      </mrow>
      <mi>,</mi>
      <mi mathvariant="italic">если</mi>
      <mrow>
        <mi>j</mi>
        <mo stretchy="false">&gt;</mo>
        <mrow>
          <mi>i</mi>
          <mo stretchy="false">+</mo>
          <mn>1</mn>
        </mrow>
      </mrow>
    </mrow>
    <annotation encoding="StarMath 5.0">{a} rsub {ij} = 0 , если j &gt; i + 1</annotation>
  </semantics>
</math>
</file>

<file path=Object 17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graphic-properties draw:stroke="solid" svg:stroke-color="#b3b3b3" draw:fill="none" draw:fill-color="#d9d9d9"/>
    </style:style>
    <style:style style:name="ch13"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7.418cm" svg:height="11.747cm" xlink:href="." xlink:type="simple" chart:class="chart:line" chart:style-name="ch1">
        <chart:subtitle svg:x="0cm" svg:y="0cm" chart:style-name="ch2"/>
        <chart:legend chart:legend-position="end" svg:x="13.787cm" svg:y="4.35cm" style:legend-expansion="custom" svg:width="3.415cm" svg:height="3.981cm" style:legend-expansion-aspect-ratio="0.857824667169053" chart:style-name="ch3"/>
        <chart:plot-area chart:style-name="ch4" svg:x="0.216cm" svg:y="0.037cm" svg:width="13.559cm" svg:height="10.844cm">
          <chart:coordinate-region svg:x="1.519cm" svg:y="0.236cm" svg:width="11.872cm" svg:height="9.998cm"/>
          <chart:axis chart:dimension="x" chart:name="primary-x" chart:style-name="ch5" chartooo:axis-type="auto">
            <chartooo:date-scale/>
            <chart:title svg:x="5.394cm" svg:y="11.115cm" chart:style-name="ch2">
              <text:p><text:span text:style-name="T1">Размер данных, NxN</text:span></text:p>
            </chart:title>
            <chart:categories table:cell-range-address="local-table.$A$2:.$A$13"/>
          </chart:axis>
          <chart:axis chart:dimension="y" chart:name="primary-y" chart:style-name="ch6">
            <chart:title svg:x="0cm" svg:y="6.748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Реализация с вращениями Гивенса</text:p>
              </table:table-cell>
              <table:table-cell office:value-type="string">
                <text:p>Реализация с отражениями Хаусхолдера</text:p>
              </table:table-cell>
              <table:table-cell office:value-type="string">
                <text:p>Разложение из Scilab</text:p>
              </table:table-cell>
            </table:table-row>
          </table:table-header-rows>
          <table:table-rows>
            <table:table-row>
              <table:table-cell office:value-type="string">
                <text:p>100</text:p>
              </table:table-cell>
              <table:table-cell office:value-type="float" office:value="0.0001294">
                <text:p>0.0001294</text:p>
              </table:table-cell>
              <table:table-cell office:value-type="float" office:value="0.0009429">
                <text:p>0.0009429</text:p>
              </table:table-cell>
              <table:table-cell office:value-type="float" office:value="0.030026">
                <text:p>0.030026</text:p>
              </table:table-cell>
            </table:table-row>
            <table:table-row>
              <table:table-cell office:value-type="string">
                <text:p>200</text:p>
              </table:table-cell>
              <table:table-cell office:value-type="float" office:value="0.0004733">
                <text:p>0.0004733</text:p>
              </table:table-cell>
              <table:table-cell office:value-type="float" office:value="0.0076185">
                <text:p>0.0076185</text:p>
              </table:table-cell>
              <table:table-cell office:value-type="float" office:value="0.003412">
                <text:p>0.003412</text:p>
              </table:table-cell>
            </table:table-row>
            <table:table-row>
              <table:table-cell office:value-type="string">
                <text:p>300</text:p>
              </table:table-cell>
              <table:table-cell office:value-type="float" office:value="0.0012873">
                <text:p>0.0012873</text:p>
              </table:table-cell>
              <table:table-cell office:value-type="float" office:value="0.0222422">
                <text:p>0.0222422</text:p>
              </table:table-cell>
              <table:table-cell office:value-type="float" office:value="0.0045437">
                <text:p>0.0045437</text:p>
              </table:table-cell>
            </table:table-row>
            <table:table-row>
              <table:table-cell office:value-type="string">
                <text:p>400</text:p>
              </table:table-cell>
              <table:table-cell office:value-type="float" office:value="0.0014392">
                <text:p>0.0014392</text:p>
              </table:table-cell>
              <table:table-cell office:value-type="float" office:value="0.0370319">
                <text:p>0.0370319</text:p>
              </table:table-cell>
              <table:table-cell office:value-type="float" office:value="0.0069478">
                <text:p>0.0069478</text:p>
              </table:table-cell>
            </table:table-row>
            <table:table-row>
              <table:table-cell office:value-type="string">
                <text:p>500</text:p>
              </table:table-cell>
              <table:table-cell office:value-type="float" office:value="0.0022636">
                <text:p>0.0022636</text:p>
              </table:table-cell>
              <table:table-cell office:value-type="float" office:value="0.0707061">
                <text:p>0.0707061</text:p>
              </table:table-cell>
              <table:table-cell office:value-type="float" office:value="0.0069478">
                <text:p>0.0069478</text:p>
              </table:table-cell>
            </table:table-row>
            <table:table-row>
              <table:table-cell office:value-type="string">
                <text:p>1000</text:p>
              </table:table-cell>
              <table:table-cell office:value-type="float" office:value="0.0099787">
                <text:p>0.0099787</text:p>
              </table:table-cell>
              <table:table-cell office:value-type="float" office:value="0.193794">
                <text:p>0.193794</text:p>
              </table:table-cell>
              <table:table-cell office:value-type="float" office:value="0.0422846">
                <text:p>0.0422846</text:p>
              </table:table-cell>
            </table:table-row>
            <table:table-row>
              <table:table-cell office:value-type="string">
                <text:p>1500</text:p>
              </table:table-cell>
              <table:table-cell office:value-type="float" office:value="0.0244809">
                <text:p>0.0244809</text:p>
              </table:table-cell>
              <table:table-cell office:value-type="float" office:value="1.14657">
                <text:p>1.14657</text:p>
              </table:table-cell>
              <table:table-cell office:value-type="float" office:value="0.07312">
                <text:p>0.07312</text:p>
              </table:table-cell>
            </table:table-row>
            <table:table-row>
              <table:table-cell office:value-type="string">
                <text:p>2000</text:p>
              </table:table-cell>
              <table:table-cell office:value-type="float" office:value="0.049296">
                <text:p>0.049296</text:p>
              </table:table-cell>
              <table:table-cell office:value-type="float" office:value="6.44008">
                <text:p>6.44008</text:p>
              </table:table-cell>
              <table:table-cell office:value-type="float" office:value="0.1638567">
                <text:p>0.1638567</text:p>
              </table:table-cell>
            </table:table-row>
            <table:table-row>
              <table:table-cell office:value-type="string">
                <text:p>2500</text:p>
              </table:table-cell>
              <table:table-cell office:value-type="float" office:value="0.070357">
                <text:p>0.070357</text:p>
              </table:table-cell>
              <table:table-cell office:value-type="float" office:value="16.1027">
                <text:p>16.1027</text:p>
              </table:table-cell>
              <table:table-cell office:value-type="float" office:value="0.3190695">
                <text:p>0.3190695</text:p>
              </table:table-cell>
            </table:table-row>
            <table:table-row>
              <table:table-cell office:value-type="string">
                <text:p>3000</text:p>
              </table:table-cell>
              <table:table-cell office:value-type="float" office:value="0.111763">
                <text:p>0.111763</text:p>
              </table:table-cell>
              <table:table-cell office:value-type="float" office:value="28.8915">
                <text:p>28.8915</text:p>
              </table:table-cell>
              <table:table-cell office:value-type="float" office:value="0.533518">
                <text:p>0.533518</text:p>
              </table:table-cell>
            </table:table-row>
            <table:table-row>
              <table:table-cell office:value-type="string">
                <text:p>3500</text:p>
              </table:table-cell>
              <table:table-cell office:value-type="float" office:value="0.165066">
                <text:p>0.165066</text:p>
              </table:table-cell>
              <table:table-cell office:value-type="float" office:value="42.731">
                <text:p>42.731</text:p>
              </table:table-cell>
              <table:table-cell office:value-type="float" office:value="0.7996886">
                <text:p>0.7996886</text:p>
              </table:table-cell>
            </table:table-row>
            <table:table-row>
              <table:table-cell office:value-type="string">
                <text:p>4000</text:p>
              </table:table-cell>
              <table:table-cell office:value-type="float" office:value="0.226181">
                <text:p>0.226181</text:p>
              </table:table-cell>
              <table:table-cell office:value-type="float" office:value="67.3722">
                <text:p>67.3722</text:p>
              </table:table-cell>
              <table:table-cell office:value-type="float" office:value="1.7190395">
                <text:p>1.7190395</text:p>
              </table:table-cell>
            </table:table-row>
          </table:table-rows>
        </table:table>
      </chart:chart>
    </office:chart>
  </office:body>
</office:document-content>
</file>

<file path=Object 17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graphic-properties draw:stroke="solid" svg:stroke-color="#b3b3b3" draw:fill="none" draw:fill-color="#d9d9d9"/>
    </style:style>
    <style:style style:name="ch13"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5.984cm" svg:height="20.882cm" xlink:href="." xlink:type="simple" chart:class="chart:line" chart:style-name="ch1">
        <chart:subtitle svg:x="0cm" svg:y="0cm" chart:style-name="ch2"/>
        <chart:legend chart:legend-position="end" svg:x="12.652cm" svg:y="7.733cm" style:legend-expansion="custom" svg:width="3.134cm" svg:height="7.076cm" style:legend-expansion-aspect-ratio="0.442905596382137" chart:style-name="ch3"/>
        <chart:plot-area chart:style-name="ch4" svg:x="0.091cm" svg:y="0.218cm" svg:width="12.583cm" svg:height="19.69cm">
          <chart:coordinate-region svg:x="1.394cm" svg:y="0.417cm" svg:width="10.896cm" svg:height="18.844cm"/>
          <chart:axis chart:dimension="x" chart:name="primary-x" chart:style-name="ch5" chartooo:axis-type="auto">
            <chartooo:date-scale/>
            <chart:title svg:x="4.781cm" svg:y="20.322cm" chart:style-name="ch2">
              <text:p><text:span text:style-name="T1">Размер данных, NxN</text:span></text:p>
            </chart:title>
            <chart:categories table:cell-range-address="local-table.$A$2:.$A$13"/>
          </chart:axis>
          <chart:axis chart:dimension="y" chart:name="primary-y" chart:style-name="ch6">
            <chart:title svg:x="0cm" svg:y="11.352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Реализация с вращениями Гивенса</text:p>
              </table:table-cell>
              <table:table-cell office:value-type="string">
                <text:p>Реализация с отражениями Хаусхолдера</text:p>
              </table:table-cell>
              <table:table-cell office:value-type="string">
                <text:p>Разложение из Scilab</text:p>
              </table:table-cell>
            </table:table-row>
          </table:table-header-rows>
          <table:table-rows>
            <table:table-row>
              <table:table-cell office:value-type="string">
                <text:p>100</text:p>
              </table:table-cell>
              <table:table-cell office:value-type="float" office:value="0.0003957">
                <text:p>0.0003957</text:p>
              </table:table-cell>
              <table:table-cell office:value-type="float" office:value="0.0013103">
                <text:p>0.0013103</text:p>
              </table:table-cell>
              <table:table-cell office:value-type="float" office:value="0.0179448">
                <text:p>0.0179448</text:p>
              </table:table-cell>
            </table:table-row>
            <table:table-row>
              <table:table-cell office:value-type="string">
                <text:p>200</text:p>
              </table:table-cell>
              <table:table-cell office:value-type="float" office:value="0.0023856">
                <text:p>0.0023856</text:p>
              </table:table-cell>
              <table:table-cell office:value-type="float" office:value="0.0069098">
                <text:p>0.0069098</text:p>
              </table:table-cell>
              <table:table-cell office:value-type="float" office:value="0.0065019">
                <text:p>0.0065019</text:p>
              </table:table-cell>
            </table:table-row>
            <table:table-row>
              <table:table-cell office:value-type="string">
                <text:p>300</text:p>
              </table:table-cell>
              <table:table-cell office:value-type="float" office:value="0.0092742">
                <text:p>0.0092742</text:p>
              </table:table-cell>
              <table:table-cell office:value-type="float" office:value="0.018879">
                <text:p>0.018879</text:p>
              </table:table-cell>
              <table:table-cell office:value-type="float" office:value="0.0073951">
                <text:p>0.0073951</text:p>
              </table:table-cell>
            </table:table-row>
            <table:table-row>
              <table:table-cell office:value-type="string">
                <text:p>400</text:p>
              </table:table-cell>
              <table:table-cell office:value-type="float" office:value="0.0168637">
                <text:p>0.0168637</text:p>
              </table:table-cell>
              <table:table-cell office:value-type="float" office:value="0.0363722">
                <text:p>0.0363722</text:p>
              </table:table-cell>
              <table:table-cell office:value-type="float" office:value="0.0080666">
                <text:p>0.0080666</text:p>
              </table:table-cell>
            </table:table-row>
            <table:table-row>
              <table:table-cell office:value-type="string">
                <text:p>500</text:p>
              </table:table-cell>
              <table:table-cell office:value-type="float" office:value="0.0427091">
                <text:p>0.0427091</text:p>
              </table:table-cell>
              <table:table-cell office:value-type="float" office:value="0.0720739">
                <text:p>0.0720739</text:p>
              </table:table-cell>
              <table:table-cell office:value-type="float" office:value="0.0111006">
                <text:p>0.0111006</text:p>
              </table:table-cell>
            </table:table-row>
            <table:table-row>
              <table:table-cell office:value-type="string">
                <text:p>1000</text:p>
              </table:table-cell>
              <table:table-cell office:value-type="float" office:value="0.510321">
                <text:p>0.510321</text:p>
              </table:table-cell>
              <table:table-cell office:value-type="float" office:value="0.173632">
                <text:p>0.173632</text:p>
              </table:table-cell>
              <table:table-cell office:value-type="float" office:value="0.0324745">
                <text:p>0.0324745</text:p>
              </table:table-cell>
            </table:table-row>
            <table:table-row>
              <table:table-cell office:value-type="string">
                <text:p>1500</text:p>
              </table:table-cell>
              <table:table-cell office:value-type="float" office:value="1.63854">
                <text:p>1.63854</text:p>
              </table:table-cell>
              <table:table-cell office:value-type="float" office:value="0.643838">
                <text:p>0.643838</text:p>
              </table:table-cell>
              <table:table-cell office:value-type="float" office:value="0.0849378">
                <text:p>0.0849378</text:p>
              </table:table-cell>
            </table:table-row>
            <table:table-row>
              <table:table-cell office:value-type="string">
                <text:p>2000</text:p>
              </table:table-cell>
              <table:table-cell office:value-type="float" office:value="3.54986">
                <text:p>3.54986</text:p>
              </table:table-cell>
              <table:table-cell office:value-type="float" office:value="2.10122">
                <text:p>2.10122</text:p>
              </table:table-cell>
              <table:table-cell office:value-type="float" office:value="0.1808189">
                <text:p>0.1808189</text:p>
              </table:table-cell>
            </table:table-row>
            <table:table-row>
              <table:table-cell office:value-type="string">
                <text:p>2500</text:p>
              </table:table-cell>
              <table:table-cell office:value-type="float" office:value="7.19002">
                <text:p>7.19002</text:p>
              </table:table-cell>
              <table:table-cell office:value-type="float" office:value="5.00486">
                <text:p>5.00486</text:p>
              </table:table-cell>
              <table:table-cell office:value-type="float" office:value="0.3221421">
                <text:p>0.3221421</text:p>
              </table:table-cell>
            </table:table-row>
            <table:table-row>
              <table:table-cell office:value-type="string">
                <text:p>3000</text:p>
              </table:table-cell>
              <table:table-cell office:value-type="float" office:value="12.8882">
                <text:p>12.8882</text:p>
              </table:table-cell>
              <table:table-cell office:value-type="float" office:value="9.74322">
                <text:p>9.74322</text:p>
              </table:table-cell>
              <table:table-cell office:value-type="float" office:value="0.4588081">
                <text:p>0.4588081</text:p>
              </table:table-cell>
            </table:table-row>
            <table:table-row>
              <table:table-cell office:value-type="string">
                <text:p>3500</text:p>
              </table:table-cell>
              <table:table-cell office:value-type="float" office:value="20.7162">
                <text:p>20.7162</text:p>
              </table:table-cell>
              <table:table-cell office:value-type="float" office:value="16.1714">
                <text:p>16.1714</text:p>
              </table:table-cell>
              <table:table-cell office:value-type="float" office:value="0.7511698">
                <text:p>0.7511698</text:p>
              </table:table-cell>
            </table:table-row>
            <table:table-row>
              <table:table-cell office:value-type="string">
                <text:p>4000</text:p>
              </table:table-cell>
              <table:table-cell office:value-type="float" office:value="31.2464">
                <text:p>31.2464</text:p>
              </table:table-cell>
              <table:table-cell office:value-type="float" office:value="24.6837">
                <text:p>24.6837</text:p>
              </table:table-cell>
              <table:table-cell office:value-type="float" office:value="1.093605">
                <text:p>1.093605</text:p>
              </table:table-cell>
            </table:table-row>
          </table:table-rows>
        </table:table>
      </chart:chart>
    </office:chart>
  </office:body>
</office:document-content>
</file>

<file path=Object 17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8/content.xml><?xml version="1.0" encoding="utf-8"?>
<math xmlns="http://www.w3.org/1998/Math/MathML" display="block">
  <semantics>
    <mrow>
      <mi>k</mi>
      <mi>∈</mi>
      <mrow>
        <mo fence="true" form="prefix" stretchy="true">[</mo>
        <mrow>
          <mrow>
            <mn>0</mn>
            <mi>,</mi>
            <mi>N</mi>
            <mi>−</mi>
            <mn>1</mn>
          </mrow>
        </mrow>
        <mo fence="true" form="postfix" stretchy="true">]</mo>
      </mrow>
    </mrow>
    <annotation encoding="StarMath 5.0">k ∈ left [0 , N − 1 right ]</annotation>
  </semantics>
</math>
</file>

<file path=Object 17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symbol-type="automatic" chart:include-hidden-cells="fals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origin="1"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true" chart:interval-minor-divisor="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5cm" chart:symbol-height="0.25cm" chart:link-data-style-to-source="false" chart:data-label-number="value" chart:data-label-text="false" chart:data-label-symbol="false" chart:data-label-series="false" chart:label-position="bottom"/>
      <style:graphic-properties svg:stroke-width="0.08cm" svg:stroke-color="#ff0000" draw:fill-color="#ff0000"/>
      <style:text-properties fo:font-size="5pt" style:font-size-asian="10pt" style:font-size-complex="10pt"/>
    </style:style>
    <style:style style:name="ch12" style:family="chart">
      <style:chart-properties chart:solid-type="cuboid" chart:symbol-type="named-symbol" chart:symbol-name="arrow-up" chart:symbol-width="0.25cm" chart:symbol-height="0.25cm"/>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8.986cm" svg:height="10.401cm" xlink:href="." xlink:type="simple" chart:class="chart:line" chart:style-name="ch1">
        <chart:subtitle svg:x="0cm" svg:y="0cm" chart:style-name="ch2"/>
        <chart:legend chart:legend-position="end" svg:x="14.186cm" svg:y="5.18cm" style:legend-expansion="custom" svg:width="4.504cm" svg:height="4.403cm" style:legend-expansion-aspect-ratio="1.02293890529185" chart:style-name="ch3"/>
        <chart:plot-area chart:style-name="ch4" svg:x="0.348cm" svg:y="0.005cm" svg:width="14.074cm" svg:height="9.667cm">
          <chart:coordinate-region svg:x="1.651cm" svg:y="0.204cm" svg:width="12.388cm" svg:height="8.821cm"/>
          <chart:axis chart:dimension="x" chart:name="primary-x" chart:style-name="ch5" chartooo:axis-type="auto">
            <chartooo:date-scale/>
            <chart:title svg:x="5.784cm" svg:y="9.841cm" chart:style-name="ch2">
              <text:p><text:span text:style-name="T1">Размер данных, NxN</text:span></text:p>
            </chart:title>
            <chart:categories table:cell-range-address="local-table.$A$2:.$A$17"/>
          </chart:axis>
          <chart:axis chart:dimension="y" chart:name="primary-y" chart:style-name="ch6">
            <chart:title svg:x="0cm" svg:y="6.127cm" chart:style-name="ch7">
              <text:p><text:span text:style-name="T1">Время работы, с</text:span></text:p>
            </chart:title>
            <chart:grid chart:style-name="ch8" chart:class="major"/>
          </chart:axis>
          <chart:series chart:style-name="ch9" chart:values-cell-range-address="local-table.$B$2:.$B$17" chart:label-cell-address="local-table.$B$1" chart:class="chart:line">
            <chart:data-point chart:repeated="16"/>
          </chart:series>
          <chart:series chart:style-name="ch10" chart:values-cell-range-address="local-table.$C$2:.$C$17" chart:label-cell-address="local-table.$C$1" chart:class="chart:line">
            <chart:data-point chart:repeated="16"/>
          </chart:series>
          <chart:series chart:style-name="ch11" chart:values-cell-range-address="local-table.$D$2:.$D$17" chart:label-cell-address="local-table.$D$1" chart:class="chart:line">
            <chart:data-point chart:repeated="8"/>
            <chart:data-point chart:style-name="ch12"/>
            <chart:data-point chart:repeated="7"/>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Объединённое хранение Q и R</text:p>
              </table:table-cell>
              <table:table-cell office:value-type="string">
                <text:p>Векторизованные вычисления</text:p>
              </table:table-cell>
              <table:table-cell office:value-type="string">
                <text:p>Реализация scilab</text:p>
              </table:table-cell>
            </table:table-row>
          </table:table-header-rows>
          <table:table-rows>
            <table:table-row>
              <table:table-cell office:value-type="string">
                <text:p>100</text:p>
              </table:table-cell>
              <table:table-cell office:value-type="float" office:value="0.0013181">
                <text:p>0.0013181</text:p>
              </table:table-cell>
              <table:table-cell office:value-type="float" office:value="0.0003797">
                <text:p>0.0003797</text:p>
              </table:table-cell>
              <table:table-cell office:value-type="float" office:value="0.0335941">
                <text:p>0.0335941</text:p>
              </table:table-cell>
            </table:table-row>
            <table:table-row>
              <table:table-cell office:value-type="string">
                <text:p>200</text:p>
              </table:table-cell>
              <table:table-cell office:value-type="float" office:value="0.0099296">
                <text:p>0.0099296</text:p>
              </table:table-cell>
              <table:table-cell office:value-type="float" office:value="0.0024847">
                <text:p>0.0024847</text:p>
              </table:table-cell>
              <table:table-cell office:value-type="float" office:value="0.0039998">
                <text:p>0.0039998</text:p>
              </table:table-cell>
            </table:table-row>
            <table:table-row>
              <table:table-cell office:value-type="string">
                <text:p>300</text:p>
              </table:table-cell>
              <table:table-cell office:value-type="float" office:value="0.0318885">
                <text:p>0.0318885</text:p>
              </table:table-cell>
              <table:table-cell office:value-type="float" office:value="0.007201">
                <text:p>0.007201</text:p>
              </table:table-cell>
              <table:table-cell office:value-type="float" office:value="0.0084994">
                <text:p>0.0084994</text:p>
              </table:table-cell>
            </table:table-row>
            <table:table-row>
              <table:table-cell office:value-type="string">
                <text:p>400</text:p>
              </table:table-cell>
              <table:table-cell office:value-type="float" office:value="0.0764529">
                <text:p>0.0764529</text:p>
              </table:table-cell>
              <table:table-cell office:value-type="float" office:value="0.0146559">
                <text:p>0.0146559</text:p>
              </table:table-cell>
              <table:table-cell office:value-type="float" office:value="0.0054738">
                <text:p>0.0054738</text:p>
              </table:table-cell>
            </table:table-row>
            <table:table-row>
              <table:table-cell office:value-type="string">
                <text:p>500</text:p>
              </table:table-cell>
              <table:table-cell office:value-type="float" office:value="0.140105">
                <text:p>0.140105</text:p>
              </table:table-cell>
              <table:table-cell office:value-type="float" office:value="0.0288285">
                <text:p>0.0288285</text:p>
              </table:table-cell>
              <table:table-cell office:value-type="float" office:value="0.0088187">
                <text:p>0.0088187</text:p>
              </table:table-cell>
            </table:table-row>
            <table:table-row>
              <table:table-cell office:value-type="string">
                <text:p>600</text:p>
              </table:table-cell>
              <table:table-cell office:value-type="float" office:value="0.254556">
                <text:p>0.254556</text:p>
              </table:table-cell>
              <table:table-cell office:value-type="float" office:value="0.0649643">
                <text:p>0.0649643</text:p>
              </table:table-cell>
              <table:table-cell office:value-type="float" office:value="0.052328">
                <text:p>0.052328</text:p>
              </table:table-cell>
            </table:table-row>
            <table:table-row>
              <table:table-cell office:value-type="string">
                <text:p>700</text:p>
              </table:table-cell>
              <table:table-cell office:value-type="float" office:value="0.392292">
                <text:p>0.392292</text:p>
              </table:table-cell>
              <table:table-cell office:value-type="float" office:value="0.0896495">
                <text:p>0.0896495</text:p>
              </table:table-cell>
              <table:table-cell office:value-type="float" office:value="0.0211349">
                <text:p>0.0211349</text:p>
              </table:table-cell>
            </table:table-row>
            <table:table-row>
              <table:table-cell office:value-type="string">
                <text:p>800</text:p>
              </table:table-cell>
              <table:table-cell office:value-type="float" office:value="0.782092">
                <text:p>0.782092</text:p>
              </table:table-cell>
              <table:table-cell office:value-type="float" office:value="0.164743">
                <text:p>0.164743</text:p>
              </table:table-cell>
              <table:table-cell office:value-type="float" office:value="0.0211328">
                <text:p>0.0211328</text:p>
              </table:table-cell>
            </table:table-row>
            <table:table-row>
              <table:table-cell office:value-type="string">
                <text:p>900</text:p>
              </table:table-cell>
              <table:table-cell office:value-type="float" office:value="0.889774">
                <text:p>0.889774</text:p>
              </table:table-cell>
              <table:table-cell office:value-type="float" office:value="0.291743">
                <text:p>0.291743</text:p>
              </table:table-cell>
              <table:table-cell office:value-type="float" office:value="0.0266102">
                <text:p>0.0266102</text:p>
              </table:table-cell>
            </table:table-row>
            <table:table-row>
              <table:table-cell office:value-type="string">
                <text:p>1000</text:p>
              </table:table-cell>
              <table:table-cell office:value-type="float" office:value="1.00876">
                <text:p>1.00876</text:p>
              </table:table-cell>
              <table:table-cell office:value-type="float" office:value="0.412436">
                <text:p>0.412436</text:p>
              </table:table-cell>
              <table:table-cell office:value-type="float" office:value="0.0412016">
                <text:p>0.0412016</text:p>
              </table:table-cell>
            </table:table-row>
            <table:table-row>
              <table:table-cell office:value-type="string">
                <text:p>1500</text:p>
              </table:table-cell>
              <table:table-cell office:value-type="float" office:value="2.55075">
                <text:p>2.55075</text:p>
              </table:table-cell>
              <table:table-cell office:value-type="float" office:value="1.6963">
                <text:p>1.6963</text:p>
              </table:table-cell>
              <table:table-cell office:value-type="float" office:value="0.0998157">
                <text:p>0.0998157</text:p>
              </table:table-cell>
            </table:table-row>
            <table:table-row>
              <table:table-cell office:value-type="string">
                <text:p>2000</text:p>
              </table:table-cell>
              <table:table-cell office:value-type="float" office:value="5.12232">
                <text:p>5.12232</text:p>
              </table:table-cell>
              <table:table-cell office:value-type="float" office:value="3.66677">
                <text:p>3.66677</text:p>
              </table:table-cell>
              <table:table-cell office:value-type="float" office:value="0.1859652">
                <text:p>0.1859652</text:p>
              </table:table-cell>
            </table:table-row>
            <table:table-row>
              <table:table-cell office:value-type="string">
                <text:p>2500</text:p>
              </table:table-cell>
              <table:table-cell office:value-type="float" office:value="9.40546">
                <text:p>9.40546</text:p>
              </table:table-cell>
              <table:table-cell office:value-type="float" office:value="7.32413">
                <text:p>7.32413</text:p>
              </table:table-cell>
              <table:table-cell office:value-type="float" office:value="0.3497936">
                <text:p>0.3497936</text:p>
              </table:table-cell>
            </table:table-row>
            <table:table-row>
              <table:table-cell office:value-type="string">
                <text:p>3000</text:p>
              </table:table-cell>
              <table:table-cell office:value-type="float" office:value="15.6294">
                <text:p>15.6294</text:p>
              </table:table-cell>
              <table:table-cell office:value-type="float" office:value="12.6413">
                <text:p>12.6413</text:p>
              </table:table-cell>
              <table:table-cell office:value-type="float" office:value="0.6075179">
                <text:p>0.6075179</text:p>
              </table:table-cell>
            </table:table-row>
            <table:table-row>
              <table:table-cell office:value-type="string">
                <text:p>3500</text:p>
              </table:table-cell>
              <table:table-cell office:value-type="float" office:value="24.0062">
                <text:p>24.0062</text:p>
              </table:table-cell>
              <table:table-cell office:value-type="float" office:value="20.7444">
                <text:p>20.7444</text:p>
              </table:table-cell>
              <table:table-cell office:value-type="float" office:value="0.9034108">
                <text:p>0.9034108</text:p>
              </table:table-cell>
            </table:table-row>
            <table:table-row>
              <table:table-cell office:value-type="string">
                <text:p>4000</text:p>
              </table:table-cell>
              <table:table-cell office:value-type="float" office:value="35.1546">
                <text:p>35.1546</text:p>
              </table:table-cell>
              <table:table-cell office:value-type="float" office:value="31.001">
                <text:p>31.001</text:p>
              </table:table-cell>
              <table:table-cell office:value-type="float" office:value="1.4172756">
                <text:p>1.4172756</text:p>
              </table:table-cell>
            </table:table-row>
          </table:table-rows>
        </table:table>
      </chart:chart>
    </office:chart>
  </office:body>
</office:document-content>
</file>

<file path=Object 17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8/content.xml><?xml version="1.0" encoding="utf-8"?>
<math xmlns="http://www.w3.org/1998/Math/MathML" display="block">
  <semantics>
    <mrow>
      <msub>
        <mrow>
          <mo fence="true" form="prefix" stretchy="true">|</mo>
          <mrow>
            <mrow>
              <mo fence="true" form="prefix" stretchy="true">|</mo>
              <mrow>
                <mi mathvariant="italic">Hx</mi>
              </mrow>
              <mo fence="true" form="postfix" stretchy="true">|</mo>
            </mrow>
          </mrow>
          <mo fence="true" form="postfix" stretchy="true">|</mo>
        </mrow>
        <mn>2</mn>
      </msub>
      <mo stretchy="false">=</mo>
      <msub>
        <mrow>
          <mo fence="true" form="prefix" stretchy="true">|</mo>
          <mrow>
            <mrow>
              <mo fence="true" form="prefix" stretchy="true">|</mo>
              <mrow>
                <mi>x</mi>
              </mrow>
              <mo fence="true" form="postfix" stretchy="true">|</mo>
            </mrow>
          </mrow>
          <mo fence="true" form="postfix" stretchy="true">|</mo>
        </mrow>
        <mn>2</mn>
      </msub>
    </mrow>
    <annotation encoding="StarMath 5.0">{left lline left lline Hx right rline right rline} rsub {2} = {left lline left lline x right rline right rline} rsub {2}</annotation>
  </semantics>
</math>
</file>

<file path=Object 19/content.xml><?xml version="1.0" encoding="utf-8"?>
<math xmlns="http://www.w3.org/1998/Math/MathML" display="block">
  <semantics>
    <mrow>
      <mrow>
        <mi>α</mi>
        <mo stretchy="false">=</mo>
        <mi>±</mi>
      </mrow>
      <msub>
        <mrow>
          <mo fence="true" form="prefix" stretchy="true">|</mo>
          <mrow>
            <mrow>
              <mo fence="true" form="prefix" stretchy="true">|</mo>
              <mrow>
                <mi>x</mi>
              </mrow>
              <mo fence="true" form="postfix" stretchy="true">|</mo>
            </mrow>
          </mrow>
          <mo fence="true" form="postfix" stretchy="true">|</mo>
        </mrow>
        <mn>2</mn>
      </msub>
    </mrow>
    <annotation encoding="StarMath 5.0">α = ± {left lline left lline x right rline right rline} rsub {2}</annotation>
  </semantics>
</math>
</file>

<file path=Object 2/content.xml><?xml version="1.0" encoding="utf-8"?>
<math xmlns="http://www.w3.org/1998/Math/MathML" display="block">
  <semantics>
    <mrow>
      <mrow>
        <mi mathvariant="italic">Rx</mi>
        <mo stretchy="false">=</mo>
        <msup>
          <mi>Q</mi>
          <mi>T</mi>
        </msup>
      </mrow>
      <mi>b</mi>
    </mrow>
    <annotation encoding="StarMath 5.0">Rx = {Q} ^ {T} b</annotation>
  </semantics>
</math>
</file>

<file path=Object 20/content.xml><?xml version="1.0" encoding="utf-8"?>
<math xmlns="http://www.w3.org/1998/Math/MathML" display="block">
  <semantics>
    <mrow>
      <mrow>
        <mi>v</mi>
        <mo stretchy="false">=</mo>
        <mi>x</mi>
      </mrow>
      <mi>±</mi>
      <msub>
        <mrow>
          <mo fence="true" form="prefix" stretchy="true">|</mo>
          <mrow>
            <mrow>
              <mo fence="true" form="prefix" stretchy="true">|</mo>
              <mrow>
                <mi>x</mi>
              </mrow>
              <mo fence="true" form="postfix" stretchy="true">|</mo>
            </mrow>
          </mrow>
          <mo fence="true" form="postfix" stretchy="true">|</mo>
        </mrow>
        <mn>2</mn>
      </msub>
      <msub>
        <mi>e</mi>
        <mn>1</mn>
      </msub>
      <mi>.</mi>
    </mrow>
    <annotation encoding="StarMath 5.0">v = x ± {left lline left lline x right rline right rline} rsub {2} {e} rsub {1} .</annotation>
  </semantics>
</math>
</file>

<file path=Object 21/content.xml><?xml version="1.0" encoding="utf-8"?>
<math xmlns="http://www.w3.org/1998/Math/MathML" display="block">
  <semantics>
    <mi>v</mi>
    <annotation encoding="StarMath 5.0">v</annotation>
  </semantics>
</math>
</file>

<file path=Object 22/content.xml><?xml version="1.0" encoding="utf-8"?>
<math xmlns="http://www.w3.org/1998/Math/MathML" display="block">
  <semantics>
    <mrow>
      <mrow>
        <mi>v</mi>
        <mo stretchy="false">=</mo>
        <mi>x</mi>
      </mrow>
      <mi>±</mi>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left lline left lline x right rline right rline} rsub {2} {e} rsub {1}</annotation>
  </semantics>
</math>
</file>

<file path=Object 23/content.xml><?xml version="1.0" encoding="utf-8"?>
<math xmlns="http://www.w3.org/1998/Math/MathML" display="block">
  <semantics>
    <mrow>
      <mrow>
        <mi>v</mi>
        <mo stretchy="false">=</mo>
        <mi>x</mi>
      </mrow>
      <mi>±</mi>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left lline left lline x right rline right rline} rsub {2} {e} rsub {1}</annotation>
  </semantics>
</math>
</file>

<file path=Object 24/content.xml><?xml version="1.0" encoding="utf-8"?>
<math xmlns="http://www.w3.org/1998/Math/MathML" display="block">
  <semantics>
    <msub>
      <mi>e</mi>
      <mn>1</mn>
    </msub>
    <annotation encoding="StarMath 5.0">{e} rsub {1}</annotation>
  </semantics>
</math>
</file>

<file path=Object 25/content.xml><?xml version="1.0" encoding="utf-8"?>
<math xmlns="http://www.w3.org/1998/Math/MathML" display="block">
  <semantics>
    <mrow>
      <mrow>
        <mi>v</mi>
        <mo stretchy="false">=</mo>
        <mi>x</mi>
      </mrow>
      <mi>−</mi>
      <mi mathvariant="italic">sign</mi>
      <mo stretchy="false">(</mo>
      <msub>
        <mi>x</mi>
        <mn>1</mn>
      </msub>
      <mo stretchy="false">)</mo>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sign \( {x} rsub {1} \) {left lline left lline x right rline right rline} rsub {2} {e} rsub {1}</annotation>
  </semantics>
</math>
</file>

<file path=Object 26/content.xml><?xml version="1.0" encoding="utf-8"?>
<math xmlns="http://www.w3.org/1998/Math/MathML" display="block">
  <semantics>
    <mrow>
      <msup>
        <mi>v</mi>
        <mi>T</mi>
      </msup>
      <mi>v</mi>
    </mrow>
    <annotation encoding="StarMath 5.0">{v} ^ {T} v</annotation>
  </semantics>
</math>
</file>

<file path=Object 27/content.xml><?xml version="1.0" encoding="utf-8"?>
<math xmlns="http://www.w3.org/1998/Math/MathML" display="block">
  <semantics>
    <mi>α</mi>
    <annotation encoding="StarMath 5.0">α</annotation>
  </semantics>
</math>
</file>

<file path=Object 28/content.xml><?xml version="1.0" encoding="utf-8"?>
<math xmlns="http://www.w3.org/1998/Math/MathML" display="block">
  <semantics>
    <mrow>
      <mrow>
        <mi>v</mi>
        <mo stretchy="false">=</mo>
        <mi>x</mi>
      </mrow>
      <mi>−</mi>
      <mi mathvariant="italic">sign</mi>
      <mo stretchy="false">(</mo>
      <msub>
        <mi>x</mi>
        <mn>1</mn>
      </msub>
      <mo stretchy="false">)</mo>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sign \( {x} rsub {1} \) {left lline left lline x right rline right rline} rsub {2} {e} rsub {1}</annotation>
  </semantics>
</math>
</file>

<file path=Object 29/content.xml><?xml version="1.0" encoding="utf-8"?>
<math xmlns="http://www.w3.org/1998/Math/MathML" display="block">
  <semantics>
    <mrow>
      <msub>
        <mrow>
          <mo fence="true" form="prefix" stretchy="true">|</mo>
          <mrow>
            <mrow>
              <mo fence="true" form="prefix" stretchy="true">|</mo>
              <mrow>
                <mi>v</mi>
              </mrow>
              <mo fence="true" form="postfix" stretchy="true">|</mo>
            </mrow>
          </mrow>
          <mo fence="true" form="postfix" stretchy="true">|</mo>
        </mrow>
        <mn>2</mn>
      </msub>
      <mi>≥</mi>
      <msub>
        <mrow>
          <mo fence="true" form="prefix" stretchy="true">|</mo>
          <mrow>
            <mrow>
              <mo fence="true" form="prefix" stretchy="true">|</mo>
              <mrow>
                <mi>x</mi>
              </mrow>
              <mo fence="true" form="postfix" stretchy="true">|</mo>
            </mrow>
          </mrow>
          <mo fence="true" form="postfix" stretchy="true">|</mo>
        </mrow>
        <mn>2</mn>
      </msub>
    </mrow>
    <annotation encoding="StarMath 5.0">{left lline left lline v right rline right rline} rsub {2} ≥ {left lline left lline x right rline right rline} rsub {2}</annotation>
  </semantics>
</math>
</file>

<file path=Object 3/content.xml><?xml version="1.0" encoding="utf-8"?>
<math xmlns="http://www.w3.org/1998/Math/MathML" display="block">
  <semantics>
    <mrow>
      <msub>
        <mrow>
          <mo fence="true" form="prefix" stretchy="true">‖</mo>
          <mrow>
            <mi>A</mi>
          </mrow>
          <mo fence="true" form="postfix" stretchy="true">‖</mo>
        </mrow>
        <mi>F</mi>
      </msub>
      <mo stretchy="false">=</mo>
      <msqrt>
        <mrow>
          <munderover>
            <mo stretchy="false">∑</mo>
            <mrow>
              <mi>i</mi>
              <mo stretchy="false">=</mo>
              <mn>0</mn>
            </mrow>
            <mi>n</mi>
          </munderover>
          <mrow>
            <munderover>
              <mo stretchy="false">∑</mo>
              <mrow>
                <mi>j</mi>
                <mo stretchy="false">=</mo>
                <mn>0</mn>
              </mrow>
              <mi>m</mi>
            </munderover>
            <msubsup>
              <mi>a</mi>
              <mi mathvariant="italic">ij</mi>
              <mn>2</mn>
            </msubsup>
          </mrow>
        </mrow>
      </msqrt>
    </mrow>
    <annotation encoding="StarMath 5.0">{left ldline A right rdline} rsub {F} = sqrt {sum from {i = 0} to {n} {sum from {j = 0} to {m} {{a} rsub {ij} rsup {2}}}}</annotation>
  </semantics>
</math>
</file>

<file path=Object 30/content.xml><?xml version="1.0" encoding="utf-8"?>
<math xmlns="http://www.w3.org/1998/Math/MathML" display="block">
  <semantics>
    <mrow>
      <mrow>
        <mi>v</mi>
        <mo stretchy="false">=</mo>
        <mi>x</mi>
      </mrow>
      <mi>−</mi>
      <mi mathvariant="italic">sign</mi>
      <mo stretchy="false">(</mo>
      <msub>
        <mi>x</mi>
        <mn>1</mn>
      </msub>
      <mo stretchy="false">)</mo>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sign \( {x} rsub {1} \) {left lline left lline x right rline right rline} rsub {2} {e} rsub {1}</annotation>
  </semantics>
</math>
</file>

<file path=Object 31/content.xml><?xml version="1.0" encoding="utf-8"?>
<math xmlns="http://www.w3.org/1998/Math/MathML" display="block">
  <semantics>
    <mrow>
      <msub>
        <mi>v</mi>
        <mn>1</mn>
      </msub>
      <mo stretchy="false">=</mo>
      <mn>1</mn>
    </mrow>
    <annotation encoding="StarMath 5.0">{v} rsub {1} = 1</annotation>
  </semantics>
</math>
</file>

<file path=Object 32/content.xml><?xml version="1.0" encoding="utf-8"?>
<math xmlns="http://www.w3.org/1998/Math/MathML" display="block">
  <semantics>
    <mrow>
      <mrow>
        <mover accent="true">
          <msub>
            <mi>A</mi>
            <mi>k</mi>
          </msub>
          <mo stretchy="true">~</mo>
        </mover>
        <mo stretchy="false">=</mo>
        <msub>
          <mi>H</mi>
          <mi>k</mi>
        </msub>
      </mrow>
      <msub>
        <mi>H</mi>
        <mrow>
          <mi>k</mi>
          <mi>−</mi>
          <mn>1</mn>
        </mrow>
      </msub>
      <mi>…</mi>
      <msub>
        <mi>H</mi>
        <mn>1</mn>
      </msub>
      <mi>A</mi>
    </mrow>
    <annotation encoding="StarMath 5.0">widetilde {{A} rsub {k}} = {H} rsub {k} {H} rsub {k − 1} … {H} rsub {1} A</annotation>
  </semantics>
</math>
</file>

<file path=Object 33/content.xml><?xml version="1.0" encoding="utf-8"?>
<math xmlns="http://www.w3.org/1998/Math/MathML" display="block">
  <semantics>
    <mrow>
      <msub>
        <mi>H</mi>
        <mn>1</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H} rsub {1} A = left (stack { {f} rsub {11} # 0 # 0 # 0 } stack { {f} rsub {12} # {f} rsub {22} # {f} rsub {32} # {f} rsub {42} } stack { {f} rsub {13} # {f} rsub {23} # {f} rsub {33} # {f} rsub {43} } stack { {f} rsub {14} # {f} rsub {24} # {f} rsub {34} # {f} rsub {44} } right )</annotation>
  </semantics>
</math>
</file>

<file path=Object 34/content.xml><?xml version="1.0" encoding="utf-8"?>
<math xmlns="http://www.w3.org/1998/Math/MathML" display="block">
  <semantics>
    <mrow>
      <msub>
        <mi>H</mi>
        <mn>2</mn>
      </msub>
      <msub>
        <mi>H</mi>
        <mn>1</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n>0</mn>
                  </mtd>
                </mtr>
                <mtr>
                  <mtd>
                    <mn>0</mn>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H} rsub {2} {H} rsub {1} A = left (stack { {f} rsub {11} # 0 # 0 # 0 } stack { {f} rsub {12} # {f} rsub {22} # 0 # 0 } stack { {f} rsub {13} # {f} rsub {23} # {f} rsub {33} # {f} rsub {43} } stack { {f} rsub {14} # {f} rsub {24} # {f} rsub {34} # {f} rsub {44} } right )</annotation>
  </semantics>
</math>
</file>

<file path=Object 35/content.xml><?xml version="1.0" encoding="utf-8"?>
<math xmlns="http://www.w3.org/1998/Math/MathML" display="block">
  <semantics>
    <mrow>
      <msub>
        <mi>H</mi>
        <mn>3</mn>
      </msub>
      <msub>
        <mi>H</mi>
        <mn>2</mn>
      </msub>
      <msub>
        <mi>H</mi>
        <mn>1</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n>0</mn>
                  </mtd>
                </mtr>
                <mtr>
                  <mtd>
                    <mn>0</mn>
                  </mtd>
                </mtr>
              </mtable>
              <mtable>
                <mtr>
                  <mtd>
                    <msub>
                      <mi>f</mi>
                      <mn>13</mn>
                    </msub>
                  </mtd>
                </mtr>
                <mtr>
                  <mtd>
                    <msub>
                      <mi>f</mi>
                      <mn>23</mn>
                    </msub>
                  </mtd>
                </mtr>
                <mtr>
                  <mtd>
                    <msub>
                      <mi>f</mi>
                      <mn>33</mn>
                    </msub>
                  </mtd>
                </mtr>
                <mtr>
                  <mtd>
                    <mn>0</mn>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H} rsub {3} {H} rsub {2} {H} rsub {1} A = left (stack { {f} rsub {11} # 0 # 0 # 0 } stack { {f} rsub {12} # {f} rsub {22} # 0 # 0 } stack { {f} rsub {13} # {f} rsub {23} # {f} rsub {33} # 0 } stack { {f} rsub {14} # {f} rsub {24} # {f} rsub {34} # {f} rsub {44} } right )</annotation>
  </semantics>
</math>
</file>

<file path=Object 36/content.xml><?xml version="1.0" encoding="utf-8"?>
<math xmlns="http://www.w3.org/1998/Math/MathML" display="block">
  <semantics>
    <mrow>
      <mrow>
        <mi>H</mi>
        <mo stretchy="false">=</mo>
        <mi>E</mi>
      </mrow>
      <mi>−</mi>
      <mfrac>
        <msup>
          <mrow>
            <mi>v</mi>
            <mi>⋅</mi>
            <mi>v</mi>
          </mrow>
          <mi>T</mi>
        </msup>
        <mrow>
          <msup>
            <mi>v</mi>
            <mi>T</mi>
          </msup>
          <mi>⋅</mi>
          <mi>v</mi>
        </mrow>
      </mfrac>
    </mrow>
    <annotation encoding="StarMath 5.0">H = E − {{v ⋅ v} ^ {T}} over {{v} ^ {T} ⋅ v}</annotation>
  </semantics>
</math>
</file>

<file path=Object 37/content.xml><?xml version="1.0" encoding="utf-8"?>
<math xmlns="http://www.w3.org/1998/Math/MathML" display="block">
  <semantics>
    <mrow>
      <mrow>
        <msub>
          <mi>A</mi>
          <mi>k</mi>
        </msub>
        <mo stretchy="false">=</mo>
        <msub>
          <mi>H</mi>
          <mrow>
            <mi>k</mi>
            <mi>−</mi>
            <mn>1</mn>
          </mrow>
        </msub>
      </mrow>
      <mn>...</mn>
      <msub>
        <mi>H</mi>
        <mn>1</mn>
      </msub>
      <mi>A</mi>
    </mrow>
    <annotation encoding="StarMath 5.0">{A} rsub {k} = {H} rsub {k − 1} ... {H} rsub {1} A</annotation>
  </semantics>
</math>
</file>

<file path=Object 38/content.xml><?xml version="1.0" encoding="utf-8"?>
<math xmlns="http://www.w3.org/1998/Math/MathML" display="block">
  <semantics>
    <mrow>
      <mrow>
        <mi>R</mi>
        <mo stretchy="false">=</mo>
        <msub>
          <mi>H</mi>
          <mrow>
            <mi>n</mi>
            <mi>−</mi>
            <mn>1</mn>
          </mrow>
        </msub>
      </mrow>
      <mn>...</mn>
      <msub>
        <mi>H</mi>
        <mn>1</mn>
      </msub>
      <mi>A</mi>
    </mrow>
    <annotation encoding="StarMath 5.0">R = {H} rsub {n − 1} ... {H} rsub {1} A</annotation>
  </semantics>
</math>
</file>

<file path=Object 39/content.xml><?xml version="1.0" encoding="utf-8"?>
<math xmlns="http://www.w3.org/1998/Math/MathML" display="block">
  <semantics>
    <mrow>
      <mrow>
        <mi>Q</mi>
        <mo stretchy="false">=</mo>
        <msub>
          <mi>H</mi>
          <mn>1</mn>
        </msub>
      </mrow>
      <mn>...</mn>
      <msub>
        <mi>H</mi>
        <mrow>
          <mi>n</mi>
          <mi>−</mi>
          <mn>1</mn>
        </mrow>
      </msub>
    </mrow>
    <annotation encoding="StarMath 5.0">Q = {H} rsub {1} ... {H} rsub {n − 1}</annotation>
  </semantics>
</math>
</file>

<file path=Object 4/content.xml><?xml version="1.0" encoding="utf-8"?>
<math xmlns="http://www.w3.org/1998/Math/MathML" display="block">
  <semantics>
    <msub>
      <mrow>
        <mo fence="true" form="prefix" stretchy="true">‖</mo>
        <mrow>
          <mrow>
            <mi mathvariant="italic">QR</mi>
            <mi>−</mi>
            <mi>A</mi>
          </mrow>
        </mrow>
        <mo fence="true" form="postfix" stretchy="true">‖</mo>
      </mrow>
      <mi>F</mi>
    </msub>
    <annotation encoding="StarMath 5.0">{left ldline QR − A right rdline} rsub {F}</annotation>
  </semantics>
</math>
</file>

<file path=Object 40/content.xml><?xml version="1.0" encoding="utf-8"?>
<math xmlns="http://www.w3.org/1998/Math/MathML" display="block">
  <semantics>
    <mrow>
      <mrow>
        <mi>R</mi>
        <mo stretchy="false">=</mo>
        <msub>
          <mi>H</mi>
          <mi>n</mi>
        </msub>
      </mrow>
      <msub>
        <mi>H</mi>
        <mrow>
          <mi>n</mi>
          <mi>−</mi>
          <mn>1</mn>
        </mrow>
      </msub>
      <mi>…</mi>
      <msub>
        <mi>H</mi>
        <mn>1</mn>
      </msub>
      <mi>A</mi>
    </mrow>
    <annotation encoding="StarMath 5.0">R = {H} rsub {n} {H} rsub {n − 1} … {H} rsub {1} A</annotation>
  </semantics>
</math>
</file>

<file path=Object 41/content.xml><?xml version="1.0" encoding="utf-8"?>
<math xmlns="http://www.w3.org/1998/Math/MathML" display="block">
  <semantics>
    <mrow>
      <mi>A</mi>
      <mo stretchy="false">=</mo>
      <mi mathvariant="italic">QR</mi>
    </mrow>
    <annotation encoding="StarMath 5.0">A = QR</annotation>
  </semantics>
</math>
</file>

<file path=Object 42/content.xml><?xml version="1.0" encoding="utf-8"?>
<math xmlns="http://www.w3.org/1998/Math/MathML" display="block">
  <semantics>
    <mrow>
      <mrow>
        <mi>Q</mi>
        <mo stretchy="false">=</mo>
        <msub>
          <mi>H</mi>
          <mn>1</mn>
        </msub>
      </mrow>
      <msub>
        <mi>H</mi>
        <mn>2</mn>
      </msub>
      <mi>…</mi>
      <msub>
        <mi>H</mi>
        <mi>n</mi>
      </msub>
    </mrow>
    <annotation encoding="StarMath 5.0">Q = {H} rsub {1} {H} rsub {2} … {H} rsub {n}</annotation>
  </semantics>
</math>
</file>

<file path=Object 43/content.xml><?xml version="1.0" encoding="utf-8"?>
<math xmlns="http://www.w3.org/1998/Math/MathML" display="block">
  <semantics>
    <mrow>
      <msub>
        <mi>H</mi>
        <mi>k</mi>
      </msub>
      <msub>
        <mi>A</mi>
        <mi>k</mi>
      </msub>
    </mrow>
    <annotation encoding="StarMath 5.0">{H} rsub {k} {A} rsub {k}</annotation>
  </semantics>
</math>
</file>

<file path=Object 44/content.xml><?xml version="1.0" encoding="utf-8"?>
<math xmlns="http://www.w3.org/1998/Math/MathML" display="block">
  <semantics>
    <mrow>
      <msub>
        <mi>H</mi>
        <mi>k</mi>
      </msub>
      <mrow>
        <msub>
          <mi>A</mi>
          <mi>k</mi>
        </msub>
        <mo stretchy="false">=</mo>
        <mrow>
          <mo fence="true" form="prefix" stretchy="true">(</mo>
          <mrow>
            <mrow>
              <mi>I</mi>
              <mi>−</mi>
              <mn>2</mn>
              <msup>
                <mrow>
                  <mi>v</mi>
                  <mi>⋅</mi>
                  <mi>v</mi>
                </mrow>
                <mi>T</mi>
              </msup>
            </mrow>
          </mrow>
          <mo fence="true" form="postfix" stretchy="true">)</mo>
        </mrow>
      </mrow>
      <mrow>
        <msub>
          <mi>A</mi>
          <mi>k</mi>
        </msub>
        <mo stretchy="false">=</mo>
        <msub>
          <mi>A</mi>
          <mi>k</mi>
        </msub>
      </mrow>
      <mi>−</mi>
      <mn>2</mn>
      <mi>v</mi>
      <mrow>
        <mo fence="true" form="prefix" stretchy="true">(</mo>
        <mrow>
          <mrow>
            <msup>
              <mi>v</mi>
              <mi>T</mi>
            </msup>
            <mi>⋅</mi>
            <msub>
              <mi>A</mi>
              <mi>k</mi>
            </msub>
          </mrow>
        </mrow>
        <mo fence="true" form="postfix" stretchy="true">)</mo>
      </mrow>
    </mrow>
    <annotation encoding="StarMath 5.0">{H} rsub {k} {A} rsub {k} = left (I − 2 {v ⋅ v} ^ {T} right ) {A} rsub {k} = {A} rsub {k} − 2 v left ({v} ^ {T} ⋅ {A} rsub {k} right )</annotation>
  </semantics>
</math>
</file>

<file path=Object 45/content.xml><?xml version="1.0" encoding="utf-8"?>
<math xmlns="http://www.w3.org/1998/Math/MathML" display="block">
  <semantics>
    <mrow>
      <msub>
        <mi>Q</mi>
        <mrow>
          <mi>n</mi>
          <mi>−</mi>
          <mn>1</mn>
        </mrow>
      </msub>
      <mo stretchy="false">=</mo>
      <mi>I</mi>
    </mrow>
    <annotation encoding="StarMath 5.0">{Q} rsub {n − 1} = I</annotation>
  </semantics>
</math>
</file>

<file path=Object 46/content.xml><?xml version="1.0" encoding="utf-8"?>
<math xmlns="http://www.w3.org/1998/Math/MathML" display="block">
  <semantics>
    <mrow>
      <mrow>
        <msub>
          <mi>Q</mi>
          <mi>k</mi>
        </msub>
        <mo stretchy="false">=</mo>
        <msub>
          <mi>H</mi>
          <mi>k</mi>
        </msub>
      </mrow>
      <mrow>
        <msub>
          <mi>Q</mi>
          <mrow>
            <mi>k</mi>
            <mi>−</mi>
            <mn>1</mn>
          </mrow>
        </msub>
        <mo stretchy="false">=</mo>
        <msub>
          <mi>Q</mi>
          <mrow>
            <mi>k</mi>
            <mi>−</mi>
            <mn>1</mn>
          </mrow>
        </msub>
      </mrow>
      <mi>−</mi>
      <mn>2</mn>
      <msub>
        <mi>v</mi>
        <mi>k</mi>
      </msub>
      <mrow>
        <mo fence="true" form="prefix" stretchy="true">(</mo>
        <mrow>
          <mrow>
            <msubsup>
              <mi>v</mi>
              <mi>k</mi>
              <mi>T</mi>
            </msubsup>
            <msub>
              <mi>Q</mi>
              <mrow>
                <mi>k</mi>
                <mi>−</mi>
                <mn>1</mn>
              </mrow>
            </msub>
          </mrow>
        </mrow>
        <mo fence="true" form="postfix" stretchy="true">)</mo>
      </mrow>
      <mi>,</mi>
      <mrow>
        <mi>k</mi>
        <mo stretchy="false">=</mo>
        <mi>n</mi>
      </mrow>
      <mi>−</mi>
      <mn>2</mn>
      <mi>,</mi>
      <mn>...</mn>
      <mn>,0</mn>
    </mrow>
    <annotation encoding="StarMath 5.0">{Q} rsub {k} = {H} rsub {k} {Q} rsub {k − 1} = {Q} rsub {k − 1} − 2 {v} rsub {k} left ({v} rsub {k} rsup {T} {Q} rsub {k − 1} right ) , k = n − 2 , ... ,0</annotation>
  </semantics>
</math>
</file>

<file path=Object 47/content.xml><?xml version="1.0" encoding="utf-8"?>
<math xmlns="http://www.w3.org/1998/Math/MathML" display="block">
  <semantics>
    <mrow>
      <mi>Q</mi>
      <mo stretchy="false">=</mo>
      <msub>
        <mi>Q</mi>
        <mn>0</mn>
      </msub>
    </mrow>
    <annotation encoding="StarMath 5.0">Q = {Q} rsub {0}</annotation>
  </semantics>
</math>
</file>

<file path=Object 48/content.xml><?xml version="1.0" encoding="utf-8"?>
<math xmlns="http://www.w3.org/1998/Math/MathML" display="block">
  <semantics>
    <mrow>
      <mrow>
        <mi>σ</mi>
        <mo stretchy="false">=</mo>
        <mi>−</mi>
      </mrow>
      <mi mathvariant="italic">sign</mi>
      <mrow>
        <mo fence="true" form="prefix" stretchy="true">(</mo>
        <mrow>
          <mrow>
            <msub>
              <mi>a</mi>
              <mi>k</mi>
            </msub>
            <mrow>
              <mo fence="true" form="prefix" stretchy="true">[</mo>
              <mrow>
                <mn>0</mn>
              </mrow>
              <mo fence="true" form="postfix" stretchy="true">]</mo>
            </mrow>
          </mrow>
        </mrow>
        <mo fence="true" form="postfix" stretchy="true">)</mo>
      </mrow>
      <mrow>
        <mo fence="true" form="prefix" stretchy="true">‖</mo>
        <mrow>
          <msub>
            <mi>a</mi>
            <mi>k</mi>
          </msub>
        </mrow>
        <mo fence="true" form="postfix" stretchy="true">‖</mo>
      </mrow>
    </mrow>
    <annotation encoding="StarMath 5.0">σ = − sign left ({a} rsub {k} left [0 right ] right ) left ldline {a} rsub {k} right rdline</annotation>
  </semantics>
</math>
</file>

<file path=Object 49/content.xml><?xml version="1.0" encoding="utf-8"?>
<math xmlns="http://www.w3.org/1998/Math/MathML" display="block">
  <semantics>
    <mrow>
      <mrow>
        <msub>
          <mi>v</mi>
          <mi>k</mi>
        </msub>
        <mo stretchy="false">=</mo>
        <msub>
          <mi>a</mi>
          <mi>k</mi>
        </msub>
      </mrow>
      <mi>−</mi>
      <mi>σ</mi>
      <mrow>
        <msub>
          <mi>e</mi>
          <mi>k</mi>
        </msub>
        <mo stretchy="false">=</mo>
        <mrow>
          <mo fence="true" form="prefix" stretchy="true">[</mo>
          <mrow>
            <mrow>
              <munder>
                <munder>
                  <mrow>
                    <mn>0</mn>
                    <mi>;</mi>
                    <mn>...</mn>
                    <mi>;</mi>
                    <mn>0</mn>
                    <mi>;</mi>
                  </mrow>
                  <mo stretchy="true">⏟</mo>
                </munder>
                <mrow>
                  <mi>k</mi>
                  <mi>−</mi>
                  <mn>1</mn>
                </mrow>
              </munder>
              <msub>
                <mi>a</mi>
                <mi mathvariant="italic">kk</mi>
              </msub>
              <mi>−</mi>
              <mi>σ</mi>
              <mi>;</mi>
              <msub>
                <mi>a</mi>
                <mrow>
                  <mi>k</mi>
                  <mi>,</mi>
                  <mrow>
                    <mi>k</mi>
                    <mo stretchy="false">+</mo>
                    <mn>1</mn>
                  </mrow>
                </mrow>
              </msub>
              <mi>;</mi>
              <mn>...</mn>
              <mi>;</mi>
              <msub>
                <mi>a</mi>
                <mrow>
                  <mi>k</mi>
                  <mi>,</mi>
                  <mi>n</mi>
                </mrow>
              </msub>
            </mrow>
          </mrow>
          <mo fence="true" form="postfix" stretchy="true">]</mo>
        </mrow>
      </mrow>
    </mrow>
    <annotation encoding="StarMath 5.0">{v} rsub {k} = {a} rsub {k} − σ {e} rsub {k} = left [{0 ; ... ; 0 ;} underbrace {k − 1} {a} rsub {kk} − σ ; {a} rsub {k , k + 1} ; ... ; {a} rsub {k , n} right ]</annotation>
  </semantics>
</math>
</file>

<file path=Object 5/content.xml><?xml version="1.0" encoding="utf-8"?>
<math xmlns="http://www.w3.org/1998/Math/MathML" display="block">
  <semantics>
    <mfrac>
      <msub>
        <mrow>
          <mo fence="true" form="prefix" stretchy="true">‖</mo>
          <mrow>
            <mrow>
              <mi mathvariant="italic">QR</mi>
              <mi>−</mi>
              <mi>A</mi>
            </mrow>
          </mrow>
          <mo fence="true" form="postfix" stretchy="true">‖</mo>
        </mrow>
        <mi>F</mi>
      </msub>
      <msub>
        <mrow>
          <mo fence="true" form="prefix" stretchy="true">‖</mo>
          <mrow>
            <mi>A</mi>
          </mrow>
          <mo fence="true" form="postfix" stretchy="true">‖</mo>
        </mrow>
        <mi>F</mi>
      </msub>
    </mfrac>
    <annotation encoding="StarMath 5.0">{{left ldline QR − A right rdline} rsub {F}} over {{left ldline A right rdline} rsub {F}}</annotation>
  </semantics>
</math>
</file>

<file path=Object 50/content.xml><?xml version="1.0" encoding="utf-8"?>
<math xmlns="http://www.w3.org/1998/Math/MathML" display="block">
  <semantics>
    <mrow>
      <mrow>
        <mi>H</mi>
        <mo stretchy="false">=</mo>
        <mi>I</mi>
      </mrow>
      <mi>−</mi>
      <mi>τ</mi>
      <mi>∗</mi>
      <mrow>
        <mo fence="true" form="prefix" stretchy="true">(</mo>
        <mrow>
          <mrow>
            <mi>v</mi>
            <mi>⋅</mi>
            <msup>
              <mi>v</mi>
              <mi>T</mi>
            </msup>
          </mrow>
        </mrow>
        <mo fence="true" form="postfix" stretchy="true">)</mo>
      </mrow>
      <mi>,</mi>
      <mi mathvariant="italic">где</mi>
      <mrow>
        <mi>τ</mi>
        <mo stretchy="false">=</mo>
        <mfrac>
          <mn>2</mn>
          <mrow>
            <msup>
              <mi>v</mi>
              <mi>T</mi>
            </msup>
            <mi>⋅</mi>
            <mi>v</mi>
          </mrow>
        </mfrac>
      </mrow>
    </mrow>
    <annotation encoding="StarMath 5.0">H = I − τ ∗ left (v ⋅ {v} ^ {T} right ) , где τ = {2} over {{v} ^ {T} ⋅ v}</annotation>
  </semantics>
</math>
</file>

<file path=Object 51/content.xml><?xml version="1.0" encoding="utf-8"?>
<math xmlns="http://www.w3.org/1998/Math/MathML" display="block">
  <semantics>
    <mrow>
      <msub>
        <mi>H</mi>
        <mi>k</mi>
      </msub>
      <mrow>
        <msub>
          <mi>A</mi>
          <mi>k</mi>
        </msub>
        <mo stretchy="false">=</mo>
        <mrow>
          <mo fence="true" form="prefix" stretchy="true">(</mo>
          <mrow>
            <mrow>
              <mi>I</mi>
              <mi>−</mi>
              <mi>τ</mi>
              <mi>v</mi>
              <mi>⋅</mi>
              <msup>
                <mi>v</mi>
                <mi>T</mi>
              </msup>
            </mrow>
          </mrow>
          <mo fence="true" form="postfix" stretchy="true">)</mo>
        </mrow>
      </mrow>
      <mrow>
        <msub>
          <mi>A</mi>
          <mi>k</mi>
        </msub>
        <mo stretchy="false">=</mo>
        <msub>
          <mi>A</mi>
          <mi>k</mi>
        </msub>
      </mrow>
      <mi>−</mi>
      <mi>τ</mi>
      <mi>v</mi>
      <mrow>
        <mo fence="true" form="prefix" stretchy="true">(</mo>
        <mrow>
          <mrow>
            <msup>
              <mi>v</mi>
              <mi>T</mi>
            </msup>
            <msub>
              <mi>A</mi>
              <mi>k</mi>
            </msub>
          </mrow>
        </mrow>
        <mo fence="true" form="postfix" stretchy="true">)</mo>
      </mrow>
    </mrow>
    <annotation encoding="StarMath 5.0">{H} rsub {k} {A} rsub {k} = left (I − τ v ⋅ {v} ^ {T} right ) {A} rsub {k} = {A} rsub {k} − τ v left ({v} ^ {T} {A} rsub {k} right )</annotation>
  </semantics>
</math>
</file>

<file path=Object 52/content.xml><?xml version="1.0" encoding="utf-8"?>
<math xmlns="http://www.w3.org/1998/Math/MathML" display="block">
  <semantics>
    <mrow>
      <msub>
        <mi>H</mi>
        <mn>1</mn>
      </msub>
      <mrow>
        <mi>A</mi>
        <mo stretchy="false">=</mo>
        <msub>
          <mi>A</mi>
          <mn>1</mn>
        </msub>
        <mo stretchy="false">=</mo>
        <mrow>
          <mo fence="true" form="prefix" stretchy="true">[</mo>
          <mrow>
            <mtable>
              <mtr>
                <mtd>
                  <msub>
                    <mi>σ</mi>
                    <mn>1</mn>
                  </msub>
                </mtd>
                <mtd>
                  <mover accent="true">
                    <msub>
                      <mi>A</mi>
                      <mn>12</mn>
                    </msub>
                    <mo stretchy="true">~</mo>
                  </mover>
                </mtd>
                <mtd>
                  <mi>⋯</mi>
                </mtd>
                <mtd>
                  <mover accent="true">
                    <msub>
                      <mi>A</mi>
                      <mrow>
                        <mn>1</mn>
                        <mi>n</mi>
                      </mrow>
                    </msub>
                    <mo stretchy="true">~</mo>
                  </mover>
                </mtd>
              </mtr>
              <mtr>
                <mtd>
                  <mrow>
                    <msub>
                      <mi>v</mi>
                      <mn>11</mn>
                    </msub>
                    <mo stretchy="false">/</mo>
                    <msub>
                      <mi>v</mi>
                      <mn>10</mn>
                    </msub>
                  </mrow>
                </mtd>
                <mtd>
                  <mover accent="true">
                    <msub>
                      <mi>A</mi>
                      <mn>22</mn>
                    </msub>
                    <mo stretchy="true">~</mo>
                  </mover>
                </mtd>
                <mtd>
                  <mi>⋯</mi>
                </mtd>
                <mtd>
                  <msub>
                    <mi>A</mi>
                    <mrow>
                      <mn>2</mn>
                      <mi>n</mi>
                    </mrow>
                  </msub>
                </mtd>
              </mtr>
              <mtr>
                <mtd>
                  <mi>⋯</mi>
                </mtd>
                <mtd>
                  <mi>⋯</mi>
                </mtd>
                <mtd>
                  <mi>⋯</mi>
                </mtd>
                <mtd>
                  <mi>⋯</mi>
                </mtd>
              </mtr>
              <mtr>
                <mtd>
                  <mrow>
                    <msub>
                      <mi>v</mi>
                      <mrow>
                        <mn>1</mn>
                        <mi>k</mi>
                      </mrow>
                    </msub>
                    <mo stretchy="false">/</mo>
                    <msub>
                      <mi>v</mi>
                      <mn>10</mn>
                    </msub>
                  </mrow>
                </mtd>
                <mtd>
                  <mover accent="true">
                    <msub>
                      <mi>A</mi>
                      <mrow>
                        <mi>k</mi>
                        <mn>2</mn>
                      </mrow>
                    </msub>
                    <mo stretchy="true">~</mo>
                  </mover>
                </mtd>
                <mtd>
                  <mi>⋯</mi>
                </mtd>
                <mtd>
                  <mover accent="true">
                    <msub>
                      <mi>A</mi>
                      <mi mathvariant="italic">kn</mi>
                    </msub>
                    <mo stretchy="true">~</mo>
                  </mover>
                </mtd>
              </mtr>
              <mtr>
                <mtd>
                  <mrow>
                    <msub>
                      <mi>v</mi>
                      <mrow>
                        <mn>1</mn>
                        <mi>,</mi>
                        <mrow>
                          <mi>k</mi>
                          <mo stretchy="false">+</mo>
                          <mn>1</mn>
                        </mrow>
                      </mrow>
                    </msub>
                    <mo stretchy="false">/</mo>
                    <msub>
                      <mi>v</mi>
                      <mn>10</mn>
                    </msub>
                  </mrow>
                </mtd>
                <mtd>
                  <mover accent="true">
                    <msub>
                      <mi>A</mi>
                      <mrow>
                        <mi>k</mi>
                        <mo stretchy="false">+</mo>
                        <mn>1,2</mn>
                      </mrow>
                    </msub>
                    <mo stretchy="true">~</mo>
                  </mover>
                </mtd>
                <mtd>
                  <mi>⋯</mi>
                </mtd>
                <mtd>
                  <mover accent="true">
                    <msub>
                      <mi>A</mi>
                      <mrow>
                        <mrow>
                          <mi>k</mi>
                          <mo stretchy="false">+</mo>
                          <mn>1</mn>
                        </mrow>
                        <mi>,</mi>
                        <mi>n</mi>
                      </mrow>
                    </msub>
                    <mo stretchy="true">~</mo>
                  </mover>
                </mtd>
              </mtr>
              <mtr>
                <mtd>
                  <mi>⋯</mi>
                </mtd>
                <mtd>
                  <mi>⋯</mi>
                </mtd>
                <mtd>
                  <mi>⋯</mi>
                </mtd>
                <mtd>
                  <mi>⋯</mi>
                </mtd>
              </mtr>
              <mtr>
                <mtd>
                  <mrow>
                    <msub>
                      <mi>v</mi>
                      <mrow>
                        <mn>1</mn>
                        <mi>n</mi>
                      </mrow>
                    </msub>
                    <mo stretchy="false">/</mo>
                    <msub>
                      <mi>v</mi>
                      <mn>10</mn>
                    </msub>
                  </mrow>
                </mtd>
                <mtd>
                  <mover accent="true">
                    <msub>
                      <mi>A</mi>
                      <mrow>
                        <mi>n</mi>
                        <mn>2</mn>
                      </mrow>
                    </msub>
                    <mo stretchy="true">~</mo>
                  </mover>
                </mtd>
                <mtd>
                  <mi>⋯</mi>
                </mtd>
                <mtd>
                  <mover accent="true">
                    <msub>
                      <mi>A</mi>
                      <mrow>
                        <mi>n</mi>
                        <mi>,</mi>
                        <mi>n</mi>
                      </mrow>
                    </msub>
                    <mo stretchy="true">~</mo>
                  </mover>
                </mtd>
              </mtr>
            </mtable>
          </mrow>
          <mo fence="true" form="postfix" stretchy="true">]</mo>
        </mrow>
      </mrow>
    </mrow>
    <annotation encoding="StarMath 5.0">{H} rsub {1} A = {A} rsub {1} = left [matrix {{σ} rsub {1} # widetilde {{A} rsub {12}} # ⋯ # widetilde {{A} rsub {1 n}} ## {{v} rsub {11}} / {{v} rsub {10}} # widetilde {{A} rsub {22}} # ⋯ # {A} rsub {2 n} ## ⋯ # ⋯ # ⋯ # ⋯ ## {{v} rsub {1 k}} / {{v} rsub {10}} # widetilde {{A} rsub {k 2}} # ⋯ # widetilde {{A} rsub {kn}} ## {{v} rsub {1 , k + 1}} / {{v} rsub {10}} # widetilde {{A} rsub {k + 1,2}} # ⋯ # widetilde {{A} rsub {k + 1 , n}} ## ⋯ # ⋯ # ⋯ # ⋯ ## {{v} rsub {1 n}} / {{v} rsub {10}} # widetilde {{A} rsub {n 2}} # ⋯ # widetilde {{A} rsub {n , n}}} right ]</annotation>
  </semantics>
</math>
</file>

<file path=Object 53/content.xml><?xml version="1.0" encoding="utf-8"?>
<math xmlns="http://www.w3.org/1998/Math/MathML" display="block">
  <semantics>
    <mrow>
      <msub>
        <mi>H</mi>
        <mn>2</mn>
      </msub>
      <mrow>
        <msub>
          <mi>A</mi>
          <mn>1</mn>
        </msub>
        <mo stretchy="false">=</mo>
        <msub>
          <mi>A</mi>
          <mn>2</mn>
        </msub>
        <mo stretchy="false">=</mo>
        <mrow>
          <mo fence="true" form="prefix" stretchy="true">[</mo>
          <mrow>
            <mtable>
              <mtr>
                <mtd>
                  <msub>
                    <mi>σ</mi>
                    <mn>1</mn>
                  </msub>
                </mtd>
                <mtd>
                  <mover accent="true">
                    <mover accent="true">
                      <msub>
                        <mi>A</mi>
                        <mn>12</mn>
                      </msub>
                      <mo stretchy="true">~</mo>
                    </mover>
                    <mo stretchy="true">~</mo>
                  </mover>
                </mtd>
                <mtd>
                  <mi>⋯</mi>
                </mtd>
                <mtd>
                  <mover accent="true">
                    <mover accent="true">
                      <msub>
                        <mi>A</mi>
                        <mrow>
                          <mn>1</mn>
                          <mi>n</mi>
                        </mrow>
                      </msub>
                      <mo stretchy="true">~</mo>
                    </mover>
                    <mo stretchy="true">~</mo>
                  </mover>
                </mtd>
              </mtr>
              <mtr>
                <mtd>
                  <mrow>
                    <msub>
                      <mi>v</mi>
                      <mn>11</mn>
                    </msub>
                    <mo stretchy="false">/</mo>
                    <msub>
                      <mi>v</mi>
                      <mn>10</mn>
                    </msub>
                  </mrow>
                </mtd>
                <mtd>
                  <msub>
                    <mi>σ</mi>
                    <mn>2</mn>
                  </msub>
                </mtd>
                <mtd>
                  <mi>⋯</mi>
                </mtd>
                <mtd>
                  <msub>
                    <mi>A</mi>
                    <mrow>
                      <mn>2</mn>
                      <mi>n</mi>
                    </mrow>
                  </msub>
                </mtd>
              </mtr>
              <mtr>
                <mtd>
                  <mrow>
                    <msub>
                      <mi>v</mi>
                      <mn>12</mn>
                    </msub>
                    <mo stretchy="false">/</mo>
                    <msub>
                      <mi>v</mi>
                      <mn>10</mn>
                    </msub>
                  </mrow>
                </mtd>
                <mtd>
                  <mrow>
                    <msub>
                      <mi>v</mi>
                      <mn>21</mn>
                    </msub>
                    <mo stretchy="false">/</mo>
                    <msub>
                      <mi>v</mi>
                      <mn>20</mn>
                    </msub>
                  </mrow>
                </mtd>
                <mtd>
                  <mi>⋯</mi>
                </mtd>
                <mtd>
                  <msub>
                    <mi>A</mi>
                    <mrow>
                      <mn>2</mn>
                      <mi>n</mi>
                    </mrow>
                  </msub>
                </mtd>
              </mtr>
              <mtr>
                <mtd>
                  <mi>⋯</mi>
                </mtd>
                <mtd>
                  <mi>⋯</mi>
                </mtd>
                <mtd>
                  <mi>⋯</mi>
                </mtd>
                <mtd>
                  <mi>⋯</mi>
                </mtd>
              </mtr>
              <mtr>
                <mtd>
                  <mrow>
                    <msub>
                      <mi>v</mi>
                      <mrow>
                        <mn>1</mn>
                        <mi>k</mi>
                      </mrow>
                    </msub>
                    <mo stretchy="false">/</mo>
                    <msub>
                      <mi>v</mi>
                      <mn>10</mn>
                    </msub>
                  </mrow>
                </mtd>
                <mtd>
                  <mrow>
                    <msub>
                      <mi>v</mi>
                      <mrow>
                        <mn>2</mn>
                        <mi>k</mi>
                      </mrow>
                    </msub>
                    <mo stretchy="false">/</mo>
                    <msub>
                      <mi>v</mi>
                      <mn>20</mn>
                    </msub>
                  </mrow>
                </mtd>
                <mtd>
                  <mi>⋯</mi>
                </mtd>
                <mtd>
                  <mover accent="true">
                    <mover accent="true">
                      <msub>
                        <mi>A</mi>
                        <mi mathvariant="italic">kn</mi>
                      </msub>
                      <mo stretchy="true">~</mo>
                    </mover>
                    <mo stretchy="true">~</mo>
                  </mover>
                </mtd>
              </mtr>
              <mtr>
                <mtd>
                  <mrow>
                    <msub>
                      <mi>v</mi>
                      <mrow>
                        <mn>1</mn>
                        <mi>,</mi>
                        <mrow>
                          <mi>k</mi>
                          <mo stretchy="false">+</mo>
                          <mn>1</mn>
                        </mrow>
                      </mrow>
                    </msub>
                    <mo stretchy="false">/</mo>
                    <msub>
                      <mi>v</mi>
                      <mn>10</mn>
                    </msub>
                  </mrow>
                </mtd>
                <mtd>
                  <mrow>
                    <msub>
                      <mi>v</mi>
                      <mrow>
                        <mn>2</mn>
                        <mi>,</mi>
                        <mrow>
                          <mi>k</mi>
                          <mo stretchy="false">+</mo>
                          <mn>1</mn>
                        </mrow>
                      </mrow>
                    </msub>
                    <mo stretchy="false">/</mo>
                    <msub>
                      <mi>v</mi>
                      <mn>20</mn>
                    </msub>
                  </mrow>
                </mtd>
                <mtd>
                  <mi>⋯</mi>
                </mtd>
                <mtd>
                  <mover accent="true">
                    <mover accent="true">
                      <msub>
                        <mi>A</mi>
                        <mrow>
                          <mrow>
                            <mi>k</mi>
                            <mo stretchy="false">+</mo>
                            <mn>1</mn>
                          </mrow>
                          <mi>,</mi>
                          <mi>n</mi>
                        </mrow>
                      </msub>
                      <mo stretchy="true">~</mo>
                    </mover>
                    <mo stretchy="true">~</mo>
                  </mover>
                </mtd>
              </mtr>
              <mtr>
                <mtd>
                  <mi>⋯</mi>
                </mtd>
                <mtd>
                  <mi>⋯</mi>
                </mtd>
                <mtd>
                  <mi>⋯</mi>
                </mtd>
                <mtd>
                  <mi>⋯</mi>
                </mtd>
              </mtr>
              <mtr>
                <mtd>
                  <mrow>
                    <msub>
                      <mi>v</mi>
                      <mrow>
                        <mn>1</mn>
                        <mi>n</mi>
                      </mrow>
                    </msub>
                    <mo stretchy="false">/</mo>
                    <msub>
                      <mi>v</mi>
                      <mn>10</mn>
                    </msub>
                  </mrow>
                </mtd>
                <mtd>
                  <mrow>
                    <msub>
                      <mi>v</mi>
                      <mrow>
                        <mn>2</mn>
                        <mi>,</mi>
                        <mi>n</mi>
                      </mrow>
                    </msub>
                    <mo stretchy="false">/</mo>
                    <msub>
                      <mi>v</mi>
                      <mn>20</mn>
                    </msub>
                  </mrow>
                </mtd>
                <mtd>
                  <mi>⋯</mi>
                </mtd>
                <mtd>
                  <mover accent="true">
                    <mover accent="true">
                      <msub>
                        <mi>A</mi>
                        <mrow>
                          <mi>n</mi>
                          <mi>,</mi>
                          <mi>n</mi>
                        </mrow>
                      </msub>
                      <mo stretchy="true">~</mo>
                    </mover>
                    <mo stretchy="true">~</mo>
                  </mover>
                </mtd>
              </mtr>
            </mtable>
          </mrow>
          <mo fence="true" form="postfix" stretchy="true">]</mo>
        </mrow>
      </mrow>
    </mrow>
    <annotation encoding="StarMath 5.0">{H} rsub {2} {A} rsub {1} = {A} rsub {2} = left [matrix {{σ} rsub {1} # widetilde {widetilde {{A} rsub {12}}} # ⋯ # widetilde {widetilde {{A} rsub {1 n}}} ## {{v} rsub {11}} / {{v} rsub {10}} # {σ} rsub {2} # ⋯ # {A} rsub {2 n} ## {{v} rsub {12}} / {{v} rsub {10}} # {{v} rsub {21}} / {{v} rsub {20}} # ⋯ # {A} rsub {2 n} ## ⋯ # ⋯ # ⋯ # ⋯ ## {{v} rsub {1 k}} / {{v} rsub {10}} # {{v} rsub {2 k}} / {{v} rsub {20}} # ⋯ # widetilde {widetilde {{A} rsub {kn}}} ## {{v} rsub {1 , k + 1}} / {{v} rsub {10}} # {{v} rsub {2 , k + 1}} / {{v} rsub {20}} # ⋯ # widetilde {widetilde {{A} rsub {k + 1 , n}}} ## ⋯ # ⋯ # ⋯ # ⋯ ## {{v} rsub {1 n}} / {{v} rsub {10}} # {{v} rsub {2 , n}} / {{v} rsub {20}} # ⋯ # widetilde {widetilde {{A} rsub {n , n}}}} right ]</annotation>
  </semantics>
</math>
</file>

<file path=Object 54/content.xml><?xml version="1.0" encoding="utf-8"?>
<math xmlns="http://www.w3.org/1998/Math/MathML" display="block">
  <semantics>
    <mrow>
      <msub>
        <mi>H</mi>
        <mi>k</mi>
      </msub>
      <mrow>
        <msub>
          <mi>A</mi>
          <mrow>
            <mi>k</mi>
            <mi>−</mi>
            <mn>1</mn>
          </mrow>
        </msub>
        <mo stretchy="false">=</mo>
        <mrow>
          <mo fence="true" form="prefix" stretchy="true">[</mo>
          <mrow>
            <mtable>
              <mtr>
                <mtd>
                  <msub>
                    <mi>σ</mi>
                    <mn>1</mn>
                  </msub>
                </mtd>
                <mtd>
                  <mover accent="true">
                    <msub>
                      <mi>A</mi>
                      <mn>12</mn>
                    </msub>
                    <mo stretchy="true">~</mo>
                  </mover>
                </mtd>
                <mtd>
                  <mi>⋯</mi>
                </mtd>
                <mtd>
                  <mover accent="true">
                    <msub>
                      <mi>A</mi>
                      <mrow>
                        <mn>1</mn>
                        <mi>k</mi>
                      </mrow>
                    </msub>
                    <mo stretchy="true">~</mo>
                  </mover>
                </mtd>
                <mtd>
                  <mi>⋯</mi>
                </mtd>
                <mtd>
                  <mi>⋯</mi>
                </mtd>
                <mtd>
                  <mover accent="true">
                    <msub>
                      <mi>A</mi>
                      <mrow>
                        <mn>1</mn>
                        <mi>n</mi>
                      </mrow>
                    </msub>
                    <mo stretchy="true">~</mo>
                  </mover>
                </mtd>
              </mtr>
              <mtr>
                <mtd>
                  <mrow>
                    <msub>
                      <mi>v</mi>
                      <mn>11</mn>
                    </msub>
                    <mo stretchy="false">/</mo>
                    <msub>
                      <mi>v</mi>
                      <mn>10</mn>
                    </msub>
                  </mrow>
                </mtd>
                <mtd>
                  <msub>
                    <mi>σ</mi>
                    <mn>2</mn>
                  </msub>
                </mtd>
                <mtd>
                  <mi>⋯</mi>
                </mtd>
                <mtd>
                  <mover accent="true">
                    <msub>
                      <mi>A</mi>
                      <mrow>
                        <mn>2</mn>
                        <mi>k</mi>
                      </mrow>
                    </msub>
                    <mo stretchy="true">~</mo>
                  </mover>
                </mtd>
                <mtd>
                  <mi>⋯</mi>
                </mtd>
                <mtd>
                  <mi>⋯</mi>
                </mtd>
                <mtd>
                  <msub>
                    <mi>A</mi>
                    <mrow>
                      <mn>2</mn>
                      <mi>n</mi>
                    </mrow>
                  </msub>
                </mtd>
              </mtr>
              <mtr>
                <mtd>
                  <mi>⋯</mi>
                </mtd>
                <mtd>
                  <mi>⋯</mi>
                </mtd>
                <mtd>
                  <mi>⋱</mi>
                </mtd>
                <mtd>
                  <mi>⋯</mi>
                </mtd>
                <mtd>
                  <mi>⋯</mi>
                </mtd>
                <mtd>
                  <mi>⋯</mi>
                </mtd>
                <mtd>
                  <mi>⋯</mi>
                </mtd>
              </mtr>
              <mtr>
                <mtd>
                  <mrow>
                    <msub>
                      <mi>v</mi>
                      <mrow>
                        <mn>1</mn>
                        <mi>k</mi>
                      </mrow>
                    </msub>
                    <mo stretchy="false">/</mo>
                    <msub>
                      <mi>v</mi>
                      <mn>10</mn>
                    </msub>
                  </mrow>
                </mtd>
                <mtd>
                  <mi>⋯</mi>
                </mtd>
                <mtd>
                  <mi>⋯</mi>
                </mtd>
                <mtd>
                  <msub>
                    <mi>σ</mi>
                    <mi>k</mi>
                  </msub>
                </mtd>
                <mtd>
                  <mi>⋯</mi>
                </mtd>
                <mtd>
                  <mi>⋯</mi>
                </mtd>
                <mtd>
                  <mover accent="true">
                    <msub>
                      <mi>A</mi>
                      <mi mathvariant="italic">kn</mi>
                    </msub>
                    <mo stretchy="true">~</mo>
                  </mover>
                </mtd>
              </mtr>
              <mtr>
                <mtd>
                  <mrow>
                    <msub>
                      <mi>v</mi>
                      <mrow>
                        <mn>1</mn>
                        <mi>,</mi>
                        <mrow>
                          <mi>k</mi>
                          <mo stretchy="false">+</mo>
                          <mn>1</mn>
                        </mrow>
                      </mrow>
                    </msub>
                    <mo stretchy="false">/</mo>
                    <msub>
                      <mi>v</mi>
                      <mn>10</mn>
                    </msub>
                  </mrow>
                </mtd>
                <mtd>
                  <mi>⋯</mi>
                </mtd>
                <mtd>
                  <mi>⋯</mi>
                </mtd>
                <mtd>
                  <mrow>
                    <msub>
                      <mi>v</mi>
                      <mrow>
                        <mi>k</mi>
                        <mn>1</mn>
                      </mrow>
                    </msub>
                    <mo stretchy="false">/</mo>
                    <msub>
                      <mi>v</mi>
                      <mrow>
                        <mi>k</mi>
                        <mn>0</mn>
                      </mrow>
                    </msub>
                  </mrow>
                </mtd>
                <mtd>
                  <mover accent="true">
                    <msub>
                      <mi>A</mi>
                      <mrow>
                        <mrow>
                          <mi>k</mi>
                          <mo stretchy="false">+</mo>
                          <mn>1</mn>
                        </mrow>
                        <mi>,</mi>
                        <mrow>
                          <mi>k</mi>
                          <mo stretchy="false">+</mo>
                          <mn>1</mn>
                        </mrow>
                      </mrow>
                    </msub>
                    <mo stretchy="true">~</mo>
                  </mover>
                </mtd>
                <mtd>
                  <mi>⋯</mi>
                </mtd>
                <mtd>
                  <mover accent="true">
                    <msub>
                      <mi>A</mi>
                      <mrow>
                        <mrow>
                          <mi>k</mi>
                          <mo stretchy="false">+</mo>
                          <mn>1</mn>
                        </mrow>
                        <mi>,</mi>
                        <mi>n</mi>
                      </mrow>
                    </msub>
                    <mo stretchy="true">~</mo>
                  </mover>
                </mtd>
              </mtr>
              <mtr>
                <mtd>
                  <mi>⋯</mi>
                </mtd>
                <mtd>
                  <mi>⋯</mi>
                </mtd>
                <mtd>
                  <mi>⋯</mi>
                </mtd>
                <mtd>
                  <mi>⋮</mi>
                </mtd>
                <mtd>
                  <mi>⋮</mi>
                </mtd>
                <mtd>
                  <mi>⋱</mi>
                </mtd>
                <mtd>
                  <mi>⋯</mi>
                </mtd>
              </mtr>
              <mtr>
                <mtd>
                  <mrow>
                    <msub>
                      <mi>v</mi>
                      <mrow>
                        <mn>1</mn>
                        <mi>n</mi>
                      </mrow>
                    </msub>
                    <mo stretchy="false">/</mo>
                    <msub>
                      <mi>v</mi>
                      <mn>10</mn>
                    </msub>
                  </mrow>
                </mtd>
                <mtd>
                  <mi>⋯</mi>
                </mtd>
                <mtd>
                  <mi>⋯</mi>
                </mtd>
                <mtd>
                  <mrow>
                    <msub>
                      <mi>v</mi>
                      <mi mathvariant="italic">kn</mi>
                    </msub>
                    <mo stretchy="false">/</mo>
                    <msub>
                      <mi>v</mi>
                      <mrow>
                        <mi>k</mi>
                        <mn>0</mn>
                      </mrow>
                    </msub>
                  </mrow>
                </mtd>
                <mtd>
                  <mover accent="true">
                    <msub>
                      <mi>A</mi>
                      <mrow>
                        <mi>n</mi>
                        <mi>,</mi>
                        <mrow>
                          <mi>k</mi>
                          <mo stretchy="false">+</mo>
                          <mn>1</mn>
                        </mrow>
                      </mrow>
                    </msub>
                    <mo stretchy="true">~</mo>
                  </mover>
                </mtd>
                <mtd>
                  <mi>⋯</mi>
                </mtd>
                <mtd>
                  <mover accent="true">
                    <msub>
                      <mi>A</mi>
                      <mrow>
                        <mi>n</mi>
                        <mi>,</mi>
                        <mi>n</mi>
                      </mrow>
                    </msub>
                    <mo stretchy="true">~</mo>
                  </mover>
                </mtd>
              </mtr>
            </mtable>
          </mrow>
          <mo fence="true" form="postfix" stretchy="true">]</mo>
        </mrow>
      </mrow>
    </mrow>
    <annotation encoding="StarMath 5.0">{H} rsub {k} {A} rsub {k − 1} = left [matrix {{σ} rsub {1} # widetilde {{A} rsub {12}} # ⋯ # widetilde {{A} rsub {1 k}} # ⋯ # ⋯ # widetilde {{A} rsub {1 n}} ## {{v} rsub {11}} / {{v} rsub {10}} # {σ} rsub {2} # ⋯ # widetilde {{A} rsub {2 k}} # ⋯ # ⋯ # {A} rsub {2 n} ## ⋯ # ⋯ # ⋱ # ⋯ # ⋯ # ⋯ # ⋯ ## {{v} rsub {1 k}} / {{v} rsub {10}} # ⋯ # ⋯ # {σ} rsub {k} # ⋯ # ⋯ # widetilde {{A} rsub {kn}} ## {{v} rsub {1 , k + 1}} / {{v} rsub {10}} # ⋯ # ⋯ # {{v} rsub {k 1}} / {{v} rsub {k 0}} # widetilde {{A} rsub {k + 1 , k + 1}} # ⋯ # widetilde {{A} rsub {k + 1 , n}} ## ⋯ # ⋯ # ⋯ # ⋮ # ⋮ # ⋱ # ⋯ ## {{v} rsub {1 n}} / {{v} rsub {10}} # ⋯ # ⋯ # {{v} rsub {kn}} / {{v} rsub {k 0}} # widetilde {{A} rsub {n , k + 1}} # ⋯ # widetilde {{A} rsub {n , n}}} right ]</annotation>
  </semantics>
</math>
</file>

<file path=Object 55/content.xml><?xml version="1.0" encoding="utf-8"?>
<math xmlns="http://www.w3.org/1998/Math/MathML" display="block">
  <semantics>
    <mrow>
      <mi>R</mi>
      <mi>−</mi>
      <mi mathvariant="italic">τv</mi>
      <mrow>
        <mo fence="true" form="prefix" stretchy="true">(</mo>
        <mrow>
          <mrow>
            <msup>
              <mi>v</mi>
              <mi>T</mi>
            </msup>
            <mi>R</mi>
          </mrow>
        </mrow>
        <mo fence="true" form="postfix" stretchy="true">)</mo>
      </mrow>
      <mi>,</mi>
    </mrow>
    <annotation encoding="StarMath 5.0">R − τv left ({v} ^ {T} R right ) ,</annotation>
  </semantics>
</math>
</file>

<file path=Object 56/content.xml><?xml version="1.0" encoding="utf-8"?>
<math xmlns="http://www.w3.org/1998/Math/MathML" display="block">
  <semantics>
    <mrow>
      <mo fence="true" form="prefix" stretchy="true">(</mo>
      <mrow>
        <mrow>
          <msup>
            <mi>v</mi>
            <mi>T</mi>
          </msup>
          <mi>R</mi>
        </mrow>
      </mrow>
      <mo fence="true" form="postfix" stretchy="true">)</mo>
    </mrow>
    <annotation encoding="StarMath 5.0">left ({v} ^ {T} R right )</annotation>
  </semantics>
</math>
</file>

<file path=Object 57/content.xml><?xml version="1.0" encoding="utf-8"?>
<math xmlns="http://www.w3.org/1998/Math/MathML" display="block">
  <semantics>
    <mrow>
      <mi>τ</mi>
      <mo stretchy="false">=</mo>
      <mfrac>
        <mn>2</mn>
        <mrow>
          <msup>
            <mi>v</mi>
            <mi>T</mi>
          </msup>
          <mi>v</mi>
        </mrow>
      </mfrac>
    </mrow>
    <annotation encoding="StarMath 5.0">τ = {2} over {{v} ^ {T} v}</annotation>
  </semantics>
</math>
</file>

<file path=Object 58/content.xml><?xml version="1.0" encoding="utf-8"?>
<math xmlns="http://www.w3.org/1998/Math/MathML" display="block">
  <semantics>
    <mrow>
      <msub>
        <mi>G</mi>
        <mi mathvariant="italic">ij</mi>
      </msub>
      <mo stretchy="false">=</mo>
      <mrow>
        <mo fence="true" form="prefix" stretchy="true">[</mo>
        <mrow>
          <mtable>
            <mtr>
              <mtd>
                <mn>1</mn>
              </mtd>
              <mtd>
                <mi>⋯</mi>
              </mtd>
              <mtd>
                <mn>0</mn>
              </mtd>
              <mtd>
                <mn>0</mn>
              </mtd>
              <mtd>
                <mn>0</mn>
              </mtd>
              <mtd>
                <mi>⋯</mi>
              </mtd>
              <mtd>
                <mn>0</mn>
              </mtd>
              <mtd>
                <mn>0</mn>
              </mtd>
              <mtd>
                <mn>0</mn>
              </mtd>
              <mtd>
                <mi>⋯</mi>
              </mtd>
              <mtd>
                <mn>0</mn>
              </mtd>
            </mtr>
            <mtr>
              <mtd>
                <mi>⋯</mi>
              </mtd>
              <mtd>
                <mi>⋱</mi>
              </mtd>
              <mtd>
                <mi>⋮</mi>
              </mtd>
              <mtd>
                <mi>⋮</mi>
              </mtd>
              <mtd>
                <mi>⋮</mi>
              </mtd>
              <mtd>
                <mi>⋮</mi>
              </mtd>
              <mtd>
                <mi>⋮</mi>
              </mtd>
              <mtd>
                <mi>⋮</mi>
              </mtd>
              <mtd>
                <mi>⋮</mi>
              </mtd>
              <mtd>
                <mi>⋮</mi>
              </mtd>
              <mtd>
                <mn>0</mn>
              </mtd>
            </mtr>
            <mtr>
              <mtd>
                <mn>0</mn>
              </mtd>
              <mtd>
                <mi>⋯</mi>
              </mtd>
              <mtd>
                <mn>1</mn>
              </mtd>
              <mtd>
                <mn>0</mn>
              </mtd>
              <mtd>
                <mn>0</mn>
              </mtd>
              <mtd>
                <mi>⋯</mi>
              </mtd>
              <mtd>
                <mn>0</mn>
              </mtd>
              <mtd>
                <mn>0</mn>
              </mtd>
              <mtd>
                <mn>0</mn>
              </mtd>
              <mtd>
                <mi>⋯</mi>
              </mtd>
              <mtd>
                <mn>0</mn>
              </mtd>
            </mtr>
            <mtr>
              <mtd>
                <mn>0</mn>
              </mtd>
              <mtd>
                <mi>⋯</mi>
              </mtd>
              <mtd>
                <mn>0</mn>
              </mtd>
              <mtd>
                <mi>c</mi>
              </mtd>
              <mtd>
                <mn>0</mn>
              </mtd>
              <mtd>
                <mi>⋯</mi>
              </mtd>
              <mtd>
                <mn>0</mn>
              </mtd>
              <mtd>
                <mrow>
                  <mi>−</mi>
                  <mi>s</mi>
                </mrow>
              </mtd>
              <mtd>
                <mn>0</mn>
              </mtd>
              <mtd>
                <mi>⋯</mi>
              </mtd>
              <mtd>
                <mn>0</mn>
              </mtd>
            </mtr>
            <mtr>
              <mtd>
                <mn>0</mn>
              </mtd>
              <mtd>
                <mi>⋯</mi>
              </mtd>
              <mtd>
                <mn>0</mn>
              </mtd>
              <mtd>
                <mn>0</mn>
              </mtd>
              <mtd>
                <mn>1</mn>
              </mtd>
              <mtd>
                <mi>⋯</mi>
              </mtd>
              <mtd>
                <mn>0</mn>
              </mtd>
              <mtd>
                <mn>0</mn>
              </mtd>
              <mtd>
                <mn>0</mn>
              </mtd>
              <mtd>
                <mi>⋯</mi>
              </mtd>
              <mtd>
                <mn>0</mn>
              </mtd>
            </mtr>
            <mtr>
              <mtd>
                <mi>⋮</mi>
              </mtd>
              <mtd>
                <mi>⋮</mi>
              </mtd>
              <mtd>
                <mi>⋮</mi>
              </mtd>
              <mtd>
                <mi>⋮</mi>
              </mtd>
              <mtd>
                <mi>⋮</mi>
              </mtd>
              <mtd>
                <mi>⋱</mi>
              </mtd>
              <mtd>
                <mi>⋮</mi>
              </mtd>
              <mtd>
                <mi>⋮</mi>
              </mtd>
              <mtd>
                <mi>⋮</mi>
              </mtd>
              <mtd>
                <mi>⋮</mi>
              </mtd>
              <mtd>
                <mi>⋮</mi>
              </mtd>
            </mtr>
            <mtr>
              <mtd>
                <mn>0</mn>
              </mtd>
              <mtd>
                <mi>⋯</mi>
              </mtd>
              <mtd>
                <mn>0</mn>
              </mtd>
              <mtd>
                <mn>0</mn>
              </mtd>
              <mtd>
                <mn>0</mn>
              </mtd>
              <mtd>
                <mi>⋯</mi>
              </mtd>
              <mtd>
                <mn>1</mn>
              </mtd>
              <mtd>
                <mn>0</mn>
              </mtd>
              <mtd>
                <mn>0</mn>
              </mtd>
              <mtd>
                <mi>⋯</mi>
              </mtd>
              <mtd>
                <mn>0</mn>
              </mtd>
            </mtr>
            <mtr>
              <mtd>
                <mn>0</mn>
              </mtd>
              <mtd>
                <mi>⋯</mi>
              </mtd>
              <mtd>
                <mn>0</mn>
              </mtd>
              <mtd>
                <mi>s</mi>
              </mtd>
              <mtd>
                <mn>0</mn>
              </mtd>
              <mtd>
                <mi>⋯</mi>
              </mtd>
              <mtd>
                <mn>0</mn>
              </mtd>
              <mtd>
                <mi>c</mi>
              </mtd>
              <mtd>
                <mn>0</mn>
              </mtd>
              <mtd>
                <mi>⋯</mi>
              </mtd>
              <mtd>
                <mn>0</mn>
              </mtd>
            </mtr>
            <mtr>
              <mtd>
                <mn>0</mn>
              </mtd>
              <mtd>
                <mi>⋯</mi>
              </mtd>
              <mtd>
                <mn>0</mn>
              </mtd>
              <mtd>
                <mn>0</mn>
              </mtd>
              <mtd>
                <mn>0</mn>
              </mtd>
              <mtd>
                <mi>⋯</mi>
              </mtd>
              <mtd>
                <mn>0</mn>
              </mtd>
              <mtd>
                <mn>0</mn>
              </mtd>
              <mtd>
                <mn>1</mn>
              </mtd>
              <mtd>
                <mi>⋯</mi>
              </mtd>
              <mtd>
                <mn>0</mn>
              </mtd>
            </mtr>
            <mtr>
              <mtd>
                <mi>⋮</mi>
              </mtd>
              <mtd>
                <mi>⋮</mi>
              </mtd>
              <mtd>
                <mi>⋮</mi>
              </mtd>
              <mtd>
                <mi>⋮</mi>
              </mtd>
              <mtd>
                <mi>⋮</mi>
              </mtd>
              <mtd>
                <mi>⋮</mi>
              </mtd>
              <mtd>
                <mi>⋮</mi>
              </mtd>
              <mtd>
                <mi>⋮</mi>
              </mtd>
              <mtd>
                <mi>⋮</mi>
              </mtd>
              <mtd>
                <mi>⋱</mi>
              </mtd>
              <mtd>
                <mi>⋮</mi>
              </mtd>
            </mtr>
            <mtr>
              <mtd>
                <mn>0</mn>
              </mtd>
              <mtd>
                <mi>⋯</mi>
              </mtd>
              <mtd>
                <mn>0</mn>
              </mtd>
              <mtd>
                <mn>0</mn>
              </mtd>
              <mtd>
                <mn>0</mn>
              </mtd>
              <mtd>
                <mi>⋯</mi>
              </mtd>
              <mtd>
                <mn>0</mn>
              </mtd>
              <mtd>
                <mn>0</mn>
              </mtd>
              <mtd>
                <mn>0</mn>
              </mtd>
              <mtd>
                <mi>⋯</mi>
              </mtd>
              <mtd>
                <mn>1</mn>
              </mtd>
            </mtr>
          </mtable>
        </mrow>
        <mo fence="true" form="postfix" stretchy="true">]</mo>
      </mrow>
    </mrow>
    <annotation encoding="StarMath 5.0">{G} rsub {ij} = left [matrix {1 # ⋯ # 0 # 0 # 0 # ⋯ # 0 # 0 # 0 # ⋯ # 0 ## ⋯ # ⋱ # ⋮ # ⋮ # ⋮ # ⋮ # ⋮ # ⋮ # ⋮ # ⋮ # 0 ## 0 # ⋯ # 1 # 0 # 0 # ⋯ # 0 # 0 # 0 # ⋯ # 0 ## 0 # ⋯ # 0 # c # 0 # ⋯ # 0 # − s # 0 # ⋯ # 0 ## 0 # ⋯ # 0 # 0 # 1 # ⋯ # 0 # 0 # 0 # ⋯ # 0 ## ⋮ # ⋮ # ⋮ # ⋮ # ⋮ # ⋱ # ⋮ # ⋮ # ⋮ # ⋮ # ⋮ ## 0 # ⋯ # 0 # 0 # 0 # ⋯ # 1 # 0 # 0 # ⋯ # 0 ## 0 # ⋯ # 0 # s # 0 # ⋯ # 0 # c # 0 # ⋯ # 0 ## 0 # ⋯ # 0 # 0 # 0 # ⋯ # 0 # 0 # 1 # ⋯ # 0 ## ⋮ # ⋮ # ⋮ # ⋮ # ⋮ # ⋮ # ⋮ # ⋮ # ⋮ # ⋱ # ⋮ ## 0 # ⋯ # 0 # 0 # 0 # ⋯ # 0 # 0 # 0 # ⋯ # 1} right ]</annotation>
  </semantics>
</math>
</file>

<file path=Object 59/content.xml><?xml version="1.0" encoding="utf-8"?>
<math xmlns="http://www.w3.org/1998/Math/MathML" display="block">
  <semantics>
    <mrow>
      <mrow>
        <mover accent="true">
          <msub>
            <mi>A</mi>
            <mi>k</mi>
          </msub>
          <mo stretchy="true">~</mo>
        </mover>
        <mo stretchy="false">=</mo>
        <msub>
          <mi>G</mi>
          <mi mathvariant="italic">ji</mi>
        </msub>
      </mrow>
      <msub>
        <mi>G</mi>
        <mrow>
          <mi>j</mi>
          <mi>,</mi>
          <mrow>
            <mo fence="true" form="prefix" stretchy="true">(</mo>
            <mrow>
              <mrow>
                <mi>i</mi>
                <mi>−</mi>
                <mn>1</mn>
              </mrow>
            </mrow>
            <mo fence="true" form="postfix" stretchy="true">)</mo>
          </mrow>
        </mrow>
      </msub>
      <mi>…</mi>
      <msub>
        <mi>G</mi>
        <mn>12</mn>
      </msub>
      <mi>A</mi>
    </mrow>
    <annotation encoding="StarMath 5.0">widetilde {{A} rsub {k}} = {G} rsub {ji} {G} rsub {j , left (i − 1 right )} … {G} rsub {12} A</annotation>
  </semantics>
</math>
</file>

<file path=Object 6/content.xml><?xml version="1.0" encoding="utf-8"?>
<math xmlns="http://www.w3.org/1998/Math/MathML" display="block">
  <semantics>
    <mi>v</mi>
    <annotation encoding="StarMath 5.0">v</annotation>
  </semantics>
</math>
</file>

<file path=Object 60/content.xml><?xml version="1.0" encoding="utf-8"?>
<math xmlns="http://www.w3.org/1998/Math/MathML" display="block">
  <semantics>
    <mrow>
      <msub>
        <mi>G</mi>
        <mn>12</mn>
      </msub>
      <mrow>
        <mi>A</mi>
        <mo stretchy="false">=</mo>
        <mrow>
          <mo fence="true" form="prefix" stretchy="true">(</mo>
          <mrow>
            <mrow>
              <mtable>
                <mtr>
                  <mtd>
                    <msub>
                      <mi>f</mi>
                      <mn>11</mn>
                    </msub>
                  </mtd>
                </mtr>
                <mtr>
                  <mtd>
                    <mn>0</mn>
                  </mtd>
                </mtr>
                <mtr>
                  <mtd>
                    <msub>
                      <mi>f</mi>
                      <mn>13</mn>
                    </msub>
                  </mtd>
                </mtr>
                <mtr>
                  <mtd>
                    <msub>
                      <mi>f</mi>
                      <mn>14</mn>
                    </msub>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G} rsub {12} A = left (stack { {f} rsub {11} # 0 # {f} rsub {13} # {f} rsub {14} } stack { {f} rsub {12} # {f} rsub {22} # {f} rsub {32} # {f} rsub {42} } stack { {f} rsub {13} # {f} rsub {23} # {f} rsub {33} # {f} rsub {43} } stack { {f} rsub {14} # {f} rsub {24} # {f} rsub {34} # {f} rsub {44} } right )</annotation>
  </semantics>
</math>
</file>

<file path=Object 61/content.xml><?xml version="1.0" encoding="utf-8"?>
<math xmlns="http://www.w3.org/1998/Math/MathML" display="block">
  <semantics>
    <mrow>
      <msub>
        <mi>G</mi>
        <mn>13</mn>
      </msub>
      <msub>
        <mi>G</mi>
        <mn>12</mn>
      </msub>
      <mrow>
        <mi>A</mi>
        <mo stretchy="false">=</mo>
        <mrow>
          <mo fence="true" form="prefix" stretchy="true">(</mo>
          <mrow>
            <mrow>
              <mtable>
                <mtr>
                  <mtd>
                    <msub>
                      <mi>f</mi>
                      <mn>11</mn>
                    </msub>
                  </mtd>
                </mtr>
                <mtr>
                  <mtd>
                    <mn>0</mn>
                  </mtd>
                </mtr>
                <mtr>
                  <mtd>
                    <mn>0</mn>
                  </mtd>
                </mtr>
                <mtr>
                  <mtd>
                    <msub>
                      <mi>f</mi>
                      <mn>14</mn>
                    </msub>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G} rsub {13} {G} rsub {12} A = left (stack { {f} rsub {11} # 0 # 0 # {f} rsub {14} } stack { {f} rsub {12} # {f} rsub {22} # {f} rsub {32} # {f} rsub {42} } stack { {f} rsub {13} # {f} rsub {23} # {f} rsub {33} # {f} rsub {43} } stack { {f} rsub {14} # {f} rsub {24} # {f} rsub {34} # {f} rsub {44} } right )</annotation>
  </semantics>
</math>
</file>

<file path=Object 62/content.xml><?xml version="1.0" encoding="utf-8"?>
<math xmlns="http://www.w3.org/1998/Math/MathML" display="block">
  <semantics>
    <mrow>
      <msub>
        <mi>G</mi>
        <mn>14</mn>
      </msub>
      <msub>
        <mi>G</mi>
        <mn>13</mn>
      </msub>
      <msub>
        <mi>G</mi>
        <mn>12</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G} rsub {14} {G} rsub {13} {G} rsub {12} A = left (stack { {f} rsub {11} # 0 # 0 # 0 } stack { {f} rsub {12} # {f} rsub {22} # {f} rsub {32} # {f} rsub {42} } stack { {f} rsub {13} # {f} rsub {23} # {f} rsub {33} # {f} rsub {43} } stack { {f} rsub {14} # {f} rsub {24} # {f} rsub {34} # {f} rsub {44} } right )</annotation>
  </semantics>
</math>
</file>

<file path=Object 63/content.xml><?xml version="1.0" encoding="utf-8"?>
<math xmlns="http://www.w3.org/1998/Math/MathML" display="block">
  <semantics>
    <mrow>
      <mrow>
        <mi>R</mi>
        <mo stretchy="false">=</mo>
        <msub>
          <mi>G</mi>
          <mrow>
            <mi>n</mi>
            <mi>−</mi>
            <mn>1</mn>
            <mi>,</mi>
            <mi>n</mi>
          </mrow>
        </msub>
      </mrow>
      <msub>
        <mi>G</mi>
        <mrow>
          <mi>n</mi>
          <mi>−</mi>
          <mn>2</mn>
          <mi>,</mi>
          <mi>n</mi>
        </mrow>
      </msub>
      <mn>...</mn>
      <msub>
        <mi>G</mi>
        <mrow>
          <mn>2</mn>
          <mi>n</mi>
        </mrow>
      </msub>
      <msub>
        <mi>G</mi>
        <mrow>
          <mn>1</mn>
          <mi>n</mi>
        </mrow>
      </msub>
      <mn>...</mn>
      <msub>
        <mi>G</mi>
        <mn>24</mn>
      </msub>
      <msub>
        <mi>G</mi>
        <mn>23</mn>
      </msub>
      <mn>...</mn>
      <msub>
        <mi>G</mi>
        <mn>13</mn>
      </msub>
      <msub>
        <mi>G</mi>
        <mn>12</mn>
      </msub>
      <mi>A</mi>
    </mrow>
    <annotation encoding="StarMath 5.0">R = {G} rsub {n − 1 , n} {G} rsub {n − 2 , n} ... {G} rsub {2 n} {G} rsub {1 n} ... {G} rsub {24} {G} rsub {23} ... {G} rsub {13} {G} rsub {12} A</annotation>
  </semantics>
</math>
</file>

<file path=Object 64/content.xml><?xml version="1.0" encoding="utf-8"?>
<math xmlns="http://www.w3.org/1998/Math/MathML" display="block">
  <semantics>
    <mrow>
      <mrow>
        <mi>Q</mi>
        <mo stretchy="false">=</mo>
        <msup>
          <mrow>
            <mo fence="true" form="prefix" stretchy="true">(</mo>
            <mrow>
              <mrow>
                <msub>
                  <mi>G</mi>
                  <mrow>
                    <mi>n</mi>
                    <mi>−</mi>
                    <mn>1</mn>
                    <mi>,</mi>
                    <mi>n</mi>
                  </mrow>
                </msub>
                <msub>
                  <mi>G</mi>
                  <mrow>
                    <mi>n</mi>
                    <mi>−</mi>
                    <mn>2</mn>
                    <mi>,</mi>
                    <mi>n</mi>
                  </mrow>
                </msub>
                <mn>...</mn>
                <msub>
                  <mi>G</mi>
                  <mrow>
                    <mn>2</mn>
                    <mi>n</mi>
                  </mrow>
                </msub>
                <msub>
                  <mi>G</mi>
                  <mrow>
                    <mn>1</mn>
                    <mi>n</mi>
                  </mrow>
                </msub>
                <mn>...</mn>
                <msub>
                  <mi>G</mi>
                  <mn>24</mn>
                </msub>
                <msub>
                  <mi>G</mi>
                  <mn>23</mn>
                </msub>
                <mn>...</mn>
                <msub>
                  <mi>G</mi>
                  <mn>13</mn>
                </msub>
                <msub>
                  <mi>G</mi>
                  <mn>12</mn>
                </msub>
              </mrow>
            </mrow>
            <mo fence="true" form="postfix" stretchy="true">)</mo>
          </mrow>
          <mi>T</mi>
        </msup>
        <mo stretchy="false">=</mo>
        <msubsup>
          <mi>G</mi>
          <mn>12</mn>
          <mi>T</mi>
        </msubsup>
      </mrow>
      <mi>,</mi>
      <msubsup>
        <mi>G</mi>
        <mn>13</mn>
        <mi>T</mi>
      </msubsup>
      <mn>...</mn>
      <msubsup>
        <mi>G</mi>
        <mrow>
          <mn>1</mn>
          <mi>n</mi>
        </mrow>
        <mi>T</mi>
      </msubsup>
      <msubsup>
        <mi>G</mi>
        <mn>23</mn>
        <mi>T</mi>
      </msubsup>
      <msubsup>
        <mi>G</mi>
        <mn>24</mn>
        <mi>T</mi>
      </msubsup>
      <mi>…</mi>
      <msubsup>
        <mi>G</mi>
        <mrow>
          <mn>2</mn>
          <mi>n</mi>
        </mrow>
        <mi>T</mi>
      </msubsup>
      <mi>…</mi>
      <msubsup>
        <mi>G</mi>
        <mrow>
          <mi>n</mi>
          <mi>−</mi>
          <mn>2</mn>
          <mi>,</mi>
          <mi>n</mi>
        </mrow>
        <mi>T</mi>
      </msubsup>
      <msubsup>
        <mi>G</mi>
        <mrow>
          <mi>n</mi>
          <mi>−</mi>
          <mn>1</mn>
          <mi>,</mi>
          <mi>n</mi>
        </mrow>
        <mi>T</mi>
      </msubsup>
    </mrow>
    <annotation encoding="StarMath 5.0">Q = {left ({G} rsub {n − 1 , n} {G} rsub {n − 2 , n} ... {G} rsub {2 n} {G} rsub {1 n} ... {G} rsub {24} {G} rsub {23} ... {G} rsub {13} {G} rsub {12} right )} ^ {T} = {G} rsub {12} rsup {T} , {G} rsub {13} rsup {T} ... {G} rsub {1 n} rsup {T} {G} rsub {23} rsup {T} {G} rsub {24} rsup {T} … {G} rsub {2 n} rsup {T} … {G} rsub {n − 2 , n} rsup {T} {G} rsub {n − 1 , n} rsup {T}</annotation>
  </semantics>
</math>
</file>

<file path=Object 65/content.xml><?xml version="1.0" encoding="utf-8"?>
<math xmlns="http://www.w3.org/1998/Math/MathML" display="block">
  <semantics>
    <mrow>
      <mo fence="true" form="prefix" stretchy="true">(</mo>
      <mrow>
        <mfrac>
          <mrow>
            <msup>
              <mi>N</mi>
              <mn>2</mn>
            </msup>
            <mi>−</mi>
            <mi>N</mi>
          </mrow>
          <mn>2</mn>
        </mfrac>
      </mrow>
      <mo fence="true" form="postfix" stretchy="true">)</mo>
    </mrow>
    <annotation encoding="StarMath 5.0">left ({{N} ^ {2} − N} over {2} right )</annotation>
  </semantics>
</math>
</file>

<file path=Object 66/content.xml><?xml version="1.0" encoding="utf-8"?>
<math xmlns="http://www.w3.org/1998/Math/MathML" display="block">
  <semantics>
    <mrow>
      <msub>
        <mi>H</mi>
        <mi mathvariant="italic">upper</mi>
      </msub>
      <mo stretchy="false">=</mo>
      <mrow>
        <mo fence="true" form="prefix" stretchy="true">(</mo>
        <mrow>
          <mtable>
            <mtr>
              <mtd>
                <msub>
                  <mi>h</mi>
                  <mn>11</mn>
                </msub>
              </mtd>
              <mtd>
                <msub>
                  <mi>h</mi>
                  <mn>12</mn>
                </msub>
              </mtd>
              <mtd>
                <msub>
                  <mi>h</mi>
                  <mn>13</mn>
                </msub>
              </mtd>
              <mtd>
                <mi>⋯</mi>
              </mtd>
              <mtd>
                <msub>
                  <mi>h</mi>
                  <mrow>
                    <mn>1</mn>
                    <mi>n</mi>
                  </mrow>
                </msub>
              </mtd>
            </mtr>
            <mtr>
              <mtd>
                <msub>
                  <mi>h</mi>
                  <mn>21</mn>
                </msub>
              </mtd>
              <mtd>
                <msub>
                  <mi>h</mi>
                  <mn>22</mn>
                </msub>
              </mtd>
              <mtd>
                <msub>
                  <mi>h</mi>
                  <mn>23</mn>
                </msub>
              </mtd>
              <mtd>
                <mi>⋯</mi>
              </mtd>
              <mtd>
                <msub>
                  <mi>h</mi>
                  <mrow>
                    <mn>2</mn>
                    <mi>n</mi>
                  </mrow>
                </msub>
              </mtd>
            </mtr>
            <mtr>
              <mtd>
                <mn>0</mn>
              </mtd>
              <mtd>
                <msub>
                  <mi>h</mi>
                  <mn>32</mn>
                </msub>
              </mtd>
              <mtd>
                <msub>
                  <mi>h</mi>
                  <mn>33</mn>
                </msub>
              </mtd>
              <mtd>
                <mi>⋯</mi>
              </mtd>
              <mtd>
                <msub>
                  <mi>h</mi>
                  <mrow>
                    <mn>3</mn>
                    <mi>n</mi>
                  </mrow>
                </msub>
              </mtd>
            </mtr>
            <mtr>
              <mtd>
                <mi>⋮</mi>
              </mtd>
              <mtd>
                <mi>⋱</mi>
              </mtd>
              <mtd>
                <mi>⋱</mi>
              </mtd>
              <mtd>
                <mi>⋱</mi>
              </mtd>
              <mtd>
                <mi>⋮</mi>
              </mtd>
            </mtr>
            <mtr>
              <mtd>
                <mn>0</mn>
              </mtd>
              <mtd>
                <mi>⋯</mi>
              </mtd>
              <mtd>
                <mn>0</mn>
              </mtd>
              <mtd>
                <msub>
                  <mi>h</mi>
                  <mrow>
                    <mi mathvariant="italic">nn</mi>
                    <mi>−</mi>
                    <mn>1</mn>
                  </mrow>
                </msub>
              </mtd>
              <mtd>
                <msub>
                  <mi>h</mi>
                  <mi mathvariant="italic">nn</mi>
                </msub>
              </mtd>
            </mtr>
          </mtable>
        </mrow>
        <mo fence="true" form="postfix" stretchy="true">)</mo>
      </mrow>
    </mrow>
    <annotation encoding="StarMath 5.0">{H} rsub {upper} = left (matrix {{h} rsub {11} # {h} rsub {12} # {h} rsub {13} # ⋯ # {h} rsub {1 n} ## {h} rsub {21} # {h} rsub {22} # {h} rsub {23} # ⋯ # {h} rsub {2 n} ## 0 # {h} rsub {32} # {h} rsub {33} # ⋯ # {h} rsub {3 n} ## ⋮ # ⋱ # ⋱ # ⋱ # ⋮ ## 0 # ⋯ # 0 # {h} rsub {nn − 1} # {h} rsub {nn}} right )</annotation>
  </semantics>
</math>
</file>

<file path=Object 67/content.xml><?xml version="1.0" encoding="utf-8"?>
<math xmlns="http://www.w3.org/1998/Math/MathML" display="block">
  <semantics>
    <mrow>
      <msub>
        <mi>H</mi>
        <mi mathvariant="italic">low</mi>
      </msub>
      <mo stretchy="false">=</mo>
      <mrow>
        <mo fence="true" form="prefix" stretchy="true">(</mo>
        <mrow>
          <mtable>
            <mtr>
              <mtd>
                <msub>
                  <mi>h</mi>
                  <mn>11</mn>
                </msub>
              </mtd>
              <mtd>
                <msub>
                  <mi>h</mi>
                  <mn>12</mn>
                </msub>
              </mtd>
              <mtd>
                <mn>0</mn>
              </mtd>
              <mtd>
                <mi>⋯</mi>
              </mtd>
              <mtd>
                <mn>0</mn>
              </mtd>
            </mtr>
            <mtr>
              <mtd>
                <msub>
                  <mi>h</mi>
                  <mn>21</mn>
                </msub>
              </mtd>
              <mtd>
                <msub>
                  <mi>h</mi>
                  <mn>22</mn>
                </msub>
              </mtd>
              <mtd>
                <msub>
                  <mi>h</mi>
                  <mn>23</mn>
                </msub>
              </mtd>
              <mtd>
                <mi>⋯</mi>
              </mtd>
              <mtd>
                <mi>⋮</mi>
              </mtd>
            </mtr>
            <mtr>
              <mtd>
                <msub>
                  <mi>h</mi>
                  <mn>31</mn>
                </msub>
              </mtd>
              <mtd>
                <msub>
                  <mi>h</mi>
                  <mn>32</mn>
                </msub>
              </mtd>
              <mtd>
                <msub>
                  <mi>h</mi>
                  <mn>33</mn>
                </msub>
              </mtd>
              <mtd>
                <mi>⋯</mi>
              </mtd>
              <mtd>
                <mn>0</mn>
              </mtd>
            </mtr>
            <mtr>
              <mtd>
                <mi>⋮</mi>
              </mtd>
              <mtd>
                <mi>⋱</mi>
              </mtd>
              <mtd>
                <mi>⋱</mi>
              </mtd>
              <mtd>
                <mi>⋱</mi>
              </mtd>
              <mtd>
                <msub>
                  <mi>h</mi>
                  <mrow>
                    <mi>n</mi>
                    <mi>−</mi>
                    <mn>1</mn>
                    <mi>n</mi>
                  </mrow>
                </msub>
              </mtd>
            </mtr>
            <mtr>
              <mtd>
                <msub>
                  <mi>h</mi>
                  <mrow>
                    <mi>n</mi>
                    <mn>1</mn>
                  </mrow>
                </msub>
              </mtd>
              <mtd>
                <msub>
                  <mi>h</mi>
                  <mrow>
                    <mi>n</mi>
                    <mn>2</mn>
                  </mrow>
                </msub>
              </mtd>
              <mtd>
                <msub>
                  <mi>h</mi>
                  <mrow>
                    <mi>n</mi>
                    <mn>3</mn>
                  </mrow>
                </msub>
              </mtd>
              <mtd>
                <mi>⋯</mi>
              </mtd>
              <mtd>
                <msub>
                  <mi>h</mi>
                  <mi mathvariant="italic">nn</mi>
                </msub>
              </mtd>
            </mtr>
          </mtable>
        </mrow>
        <mo fence="true" form="postfix" stretchy="true">)</mo>
      </mrow>
    </mrow>
    <annotation encoding="StarMath 5.0">{H} rsub {low} = left (matrix {{h} rsub {11} # {h} rsub {12} # 0 # ⋯ # 0 ## {h} rsub {21} # {h} rsub {22} # {h} rsub {23} # ⋯ # ⋮ ## {h} rsub {31} # {h} rsub {32} # {h} rsub {33} # ⋯ # 0 ## ⋮ # ⋱ # ⋱ # ⋱ # {h} rsub {n − 1 n} ## {h} rsub {n 1} # {h} rsub {n 2} # {h} rsub {n 3} # ⋯ # {h} rsub {nn}} right )</annotation>
  </semantics>
</math>
</file>

<file path=Object 68/content.xml><?xml version="1.0" encoding="utf-8"?>
<math xmlns="http://www.w3.org/1998/Math/MathML" display="block">
  <semantics>
    <mrow>
      <msub>
        <mi>H</mi>
        <mrow>
          <mi mathvariant="italic">low</mi>
          <mtext>and</mtext>
          <mi mathvariant="italic">upper</mi>
        </mrow>
      </msub>
      <mo stretchy="false">=</mo>
      <mrow>
        <mo fence="true" form="prefix" stretchy="true">(</mo>
        <mrow>
          <mtable>
            <mtr>
              <mtd>
                <msub>
                  <mi>a</mi>
                  <mn>11</mn>
                </msub>
              </mtd>
              <mtd>
                <msub>
                  <mi>a</mi>
                  <mn>12</mn>
                </msub>
              </mtd>
              <mtd>
                <mn>0</mn>
              </mtd>
              <mtd>
                <mi>⋯</mi>
              </mtd>
              <mtd>
                <mi>⋯</mi>
              </mtd>
              <mtd>
                <mn>0</mn>
              </mtd>
            </mtr>
            <mtr>
              <mtd>
                <msub>
                  <mi>a</mi>
                  <mn>21</mn>
                </msub>
              </mtd>
              <mtd>
                <msub>
                  <mi>a</mi>
                  <mn>22</mn>
                </msub>
              </mtd>
              <mtd>
                <msub>
                  <mi>a</mi>
                  <mn>23</mn>
                </msub>
              </mtd>
              <mtd>
                <mn>0</mn>
              </mtd>
              <mtd>
                <mi>⋯</mi>
              </mtd>
              <mtd>
                <mi>⋮</mi>
              </mtd>
            </mtr>
            <mtr>
              <mtd>
                <mn>0</mn>
              </mtd>
              <mtd>
                <msub>
                  <mi>a</mi>
                  <mn>32</mn>
                </msub>
              </mtd>
              <mtd>
                <msub>
                  <mi>a</mi>
                  <mn>33</mn>
                </msub>
              </mtd>
              <mtd>
                <msub>
                  <mi>a</mi>
                  <mn>34</mn>
                </msub>
              </mtd>
              <mtd>
                <mi>⋯</mi>
              </mtd>
              <mtd>
                <mn>0</mn>
              </mtd>
            </mtr>
            <mtr>
              <mtd>
                <mi>⋮</mi>
              </mtd>
              <mtd>
                <mi>⋱</mi>
              </mtd>
              <mtd>
                <mi>⋱</mi>
              </mtd>
              <mtd>
                <mi>⋱</mi>
              </mtd>
              <mtd>
                <mi>⋱</mi>
              </mtd>
              <mtd>
                <mi>⋱</mi>
              </mtd>
            </mtr>
            <mtr>
              <mtd>
                <mn>0</mn>
              </mtd>
              <mtd>
                <mi>⋯</mi>
              </mtd>
              <mtd>
                <mi>⋯</mi>
              </mtd>
              <mtd>
                <mn>0</mn>
              </mtd>
              <mtd>
                <msub>
                  <mi>a</mi>
                  <mrow>
                    <mi mathvariant="italic">nn</mi>
                    <mi>−</mi>
                    <mn>1</mn>
                  </mrow>
                </msub>
              </mtd>
              <mtd>
                <msub>
                  <mi>a</mi>
                  <mi mathvariant="italic">nn</mi>
                </msub>
              </mtd>
            </mtr>
          </mtable>
        </mrow>
        <mo fence="true" form="postfix" stretchy="true">)</mo>
      </mrow>
    </mrow>
    <annotation encoding="StarMath 5.0">{H} rsub {low "and" upper} = left (matrix {{a} rsub {11} # {a} rsub {12} # 0 # ⋯ # ⋯ # 0 ## {a} rsub {21} # {a} rsub {22} # {a} rsub {23} # 0 # ⋯ # ⋮ ## 0 # {a} rsub {32} # {a} rsub {33} # {a} rsub {34} # ⋯ # 0 ## ⋮ # ⋱ # ⋱ # ⋱ # ⋱ # ⋱ ## 0 # ⋯ # ⋯ # 0 # {a} rsub {nn − 1} # {a} rsub {nn}} right )</annotation>
  </semantics>
</math>
</file>

<file path=Object 69/content.xml><?xml version="1.0" encoding="utf-8"?>
<math xmlns="http://www.w3.org/1998/Math/MathML" display="block">
  <semantics>
    <mrow>
      <msub>
        <mi>H</mi>
        <mi mathvariant="italic">upper</mi>
      </msub>
      <mo stretchy="false">=</mo>
      <mrow>
        <mo fence="true" form="prefix" stretchy="true">(</mo>
        <mrow>
          <mtable>
            <mtr>
              <mtd>
                <mi>x</mi>
              </mtd>
              <mtd>
                <mi>x</mi>
              </mtd>
              <mtd>
                <mi>x</mi>
              </mtd>
              <mtd>
                <mi>x</mi>
              </mtd>
              <mtd>
                <mi>x</mi>
              </mtd>
              <mtd>
                <mi>x</mi>
              </mtd>
            </mtr>
            <mtr>
              <mtd>
                <mi>x</mi>
              </mtd>
              <mtd>
                <mi>x</mi>
              </mtd>
              <mtd>
                <mi>x</mi>
              </mtd>
              <mtd>
                <mi>x</mi>
              </mtd>
              <mtd>
                <mi>x</mi>
              </mtd>
              <mtd>
                <mi>x</mi>
              </mtd>
            </mtr>
            <mtr>
              <mtd>
                <mn>0</mn>
              </mtd>
              <mtd>
                <mi>x</mi>
              </mtd>
              <mtd>
                <mi>x</mi>
              </mtd>
              <mtd>
                <mi>x</mi>
              </mtd>
              <mtd>
                <mi>x</mi>
              </mtd>
              <mtd>
                <mi>x</mi>
              </mtd>
            </mtr>
            <mtr>
              <mtd>
                <mn>0</mn>
              </mtd>
              <mtd>
                <mn>0</mn>
              </mtd>
              <mtd>
                <mi>x</mi>
              </mtd>
              <mtd>
                <mi>x</mi>
              </mtd>
              <mtd>
                <mi>x</mi>
              </mtd>
              <mtd>
                <mi>x</mi>
              </mtd>
            </mtr>
            <mtr>
              <mtd>
                <mn>0</mn>
              </mtd>
              <mtd>
                <mn>0</mn>
              </mtd>
              <mtd>
                <mn>0</mn>
              </mtd>
              <mtd>
                <mi>x</mi>
              </mtd>
              <mtd>
                <mi>x</mi>
              </mtd>
              <mtd>
                <mi>x</mi>
              </mtd>
            </mtr>
            <mtr>
              <mtd>
                <mn>0</mn>
              </mtd>
              <mtd>
                <mn>0</mn>
              </mtd>
              <mtd>
                <mn>0</mn>
              </mtd>
              <mtd>
                <mn>0</mn>
              </mtd>
              <mtd>
                <mi>x</mi>
              </mtd>
              <mtd>
                <mi>x</mi>
              </mtd>
            </mtr>
          </mtable>
        </mrow>
        <mo fence="true" form="postfix" stretchy="true">)</mo>
      </mrow>
    </mrow>
    <annotation encoding="StarMath 5.0">{H} rsub {upper} = left (matrix {x # x # x # x # x # x ## x # x # x # x # x # x ## 0 # x # x # x # x # x ## 0 # 0 # x # x # x # x ## 0 # 0 # 0 # x # x # x ## 0 # 0 # 0 # 0 # x # x} right )</annotation>
  </semantics>
</math>
</file>

<file path=Object 7/content.xml><?xml version="1.0" encoding="utf-8"?>
<math xmlns="http://www.w3.org/1998/Math/MathML" display="block">
  <semantics>
    <mrow>
      <mrow>
        <mi>H</mi>
        <mo stretchy="false">=</mo>
        <mi>E</mi>
      </mrow>
      <mi>−</mi>
      <mfrac>
        <mrow>
          <mn>2</mn>
          <mi>v</mi>
          <msup>
            <mi>v</mi>
            <mi>T</mi>
          </msup>
        </mrow>
        <mrow>
          <msup>
            <mi>v</mi>
            <mi>T</mi>
          </msup>
          <mi>v</mi>
        </mrow>
      </mfrac>
    </mrow>
    <annotation encoding="StarMath 5.0">H = E − {2 v {v} ^ {T}} over {{v} ^ {T} v}</annotation>
  </semantics>
</math>
</file>

<file path=Object 70/content.xml><?xml version="1.0" encoding="utf-8"?>
<math xmlns="http://www.w3.org/1998/Math/MathML" display="block">
  <semantics>
    <mrow>
      <mrow>
        <mi>R</mi>
        <mo stretchy="false">=</mo>
        <msub>
          <mi>G</mi>
          <mrow>
            <mi>n</mi>
            <mi>−</mi>
            <mn>1</mn>
          </mrow>
        </msub>
      </mrow>
      <mi>⋅</mi>
      <mn>...</mn>
      <mi>⋅</mi>
      <msub>
        <mi>G</mi>
        <mn>1</mn>
      </msub>
      <mi>⋅</mi>
      <mi>A</mi>
      <mi>,</mi>
      <mi mathvariant="italic">где</mi>
      <mrow>
        <msub>
          <mi>G</mi>
          <mi>j</mi>
        </msub>
        <mo stretchy="false">=</mo>
        <msub>
          <mi>G</mi>
          <mrow>
            <mi>j</mi>
            <mi>,</mi>
            <mrow>
              <mi>j</mi>
              <mo stretchy="false">+</mo>
              <mn>1</mn>
            </mrow>
          </mrow>
        </msub>
      </mrow>
      <mi>,</mi>
      <mi>j</mi>
      <mi>∈</mi>
      <mrow>
        <mo fence="true" form="prefix" stretchy="true">[</mo>
        <mrow>
          <mrow>
            <mn>1</mn>
            <mi>;</mi>
            <mi>N</mi>
            <mi>−</mi>
            <mn>1</mn>
          </mrow>
        </mrow>
        <mo fence="true" form="postfix" stretchy="true">]</mo>
      </mrow>
    </mrow>
    <annotation encoding="StarMath 5.0">R = {G} rsub {n − 1} ⋅ ... ⋅ {G} rsub {1} ⋅ A , где {G} rsub {j} = {G} rsub {j , j + 1} , j ∈ left [1 ; N − 1 right ]</annotation>
  </semantics>
</math>
</file>

<file path=Object 71/content.xml><?xml version="1.0" encoding="utf-8"?>
<math xmlns="http://www.w3.org/1998/Math/MathML" display="block">
  <semantics>
    <mrow>
      <msup>
        <mi>Q</mi>
        <mi>T</mi>
      </msup>
      <mi>⋅</mi>
      <mrow>
        <mi>A</mi>
        <mo stretchy="false">=</mo>
        <mi>R</mi>
      </mrow>
      <mi>,</mi>
    </mrow>
    <annotation encoding="StarMath 5.0">{Q} ^ {T} ⋅ A = R ,</annotation>
  </semantics>
</math>
</file>

<file path=Object 72/content.xml><?xml version="1.0" encoding="utf-8"?>
<math xmlns="http://www.w3.org/1998/Math/MathML" display="block">
  <semantics>
    <mrow>
      <mrow>
        <mi>Q</mi>
        <mo stretchy="false">=</mo>
        <msubsup>
          <mi>G</mi>
          <mn>1</mn>
          <mi>T</mi>
        </msubsup>
      </mrow>
      <mi>⋅</mi>
      <mn>...</mn>
      <mi>⋅</mi>
      <msubsup>
        <mi>G</mi>
        <mrow>
          <mi>n</mi>
          <mi>−</mi>
          <mn>1</mn>
        </mrow>
        <mi>T</mi>
      </msubsup>
      <mi>.</mi>
    </mrow>
    <annotation encoding="StarMath 5.0">Q = {G} rsub {1} rsup {T} ⋅ ... ⋅ {G} rsub {n − 1} rsup {T} .</annotation>
  </semantics>
</math>
</file>

<file path=Object 73/content.xml><?xml version="1.0" encoding="utf-8"?>
<math xmlns="http://www.w3.org/1998/Math/MathML" display="block">
  <semantics>
    <mrow>
      <msub>
        <mi>H</mi>
        <mi mathvariant="italic">lower</mi>
      </msub>
      <mo stretchy="false">=</mo>
      <mrow>
        <mo fence="true" form="prefix" stretchy="true">(</mo>
        <mrow>
          <mtable>
            <mtr>
              <mtd>
                <mi>x</mi>
              </mtd>
              <mtd>
                <mi>x</mi>
              </mtd>
              <mtd>
                <mn>0</mn>
              </mtd>
              <mtd>
                <mn>0</mn>
              </mtd>
              <mtd>
                <mn>0</mn>
              </mtd>
              <mtd>
                <mn>0</mn>
              </mtd>
            </mtr>
            <mtr>
              <mtd>
                <mi>x</mi>
              </mtd>
              <mtd>
                <mi>x</mi>
              </mtd>
              <mtd>
                <mi>x</mi>
              </mtd>
              <mtd>
                <mn>0</mn>
              </mtd>
              <mtd>
                <mn>0</mn>
              </mtd>
              <mtd>
                <mn>0</mn>
              </mtd>
            </mtr>
            <mtr>
              <mtd>
                <mi>x</mi>
              </mtd>
              <mtd>
                <mi>x</mi>
              </mtd>
              <mtd>
                <mi>x</mi>
              </mtd>
              <mtd>
                <mi>x</mi>
              </mtd>
              <mtd>
                <mn>0</mn>
              </mtd>
              <mtd>
                <mn>0</mn>
              </mtd>
            </mtr>
            <mtr>
              <mtd>
                <mi>x</mi>
              </mtd>
              <mtd>
                <mi>x</mi>
              </mtd>
              <mtd>
                <mi>x</mi>
              </mtd>
              <mtd>
                <mi>x</mi>
              </mtd>
              <mtd>
                <mi>x</mi>
              </mtd>
              <mtd>
                <mn>0</mn>
              </mtd>
            </mtr>
            <mtr>
              <mtd>
                <mi>x</mi>
              </mtd>
              <mtd>
                <mi>x</mi>
              </mtd>
              <mtd>
                <mi>x</mi>
              </mtd>
              <mtd>
                <mi>x</mi>
              </mtd>
              <mtd>
                <mi>x</mi>
              </mtd>
              <mtd>
                <mi>x</mi>
              </mtd>
            </mtr>
            <mtr>
              <mtd>
                <mi>x</mi>
              </mtd>
              <mtd>
                <mi>x</mi>
              </mtd>
              <mtd>
                <mi>x</mi>
              </mtd>
              <mtd>
                <mi>x</mi>
              </mtd>
              <mtd>
                <mi>x</mi>
              </mtd>
              <mtd>
                <mi>x</mi>
              </mtd>
            </mtr>
          </mtable>
        </mrow>
        <mo fence="true" form="postfix" stretchy="true">)</mo>
      </mrow>
    </mrow>
    <annotation encoding="StarMath 5.0">{H} rsub {lower} = left (matrix {x # x # 0 # 0 # 0 # 0 ## x # x # x # 0 # 0 # 0 ## x # x # x # x # 0 # 0 ## x # x # x # x # x # 0 ## x # x # x # x # x # x ## x # x # x # x # x # x} right )</annotation>
  </semantics>
</math>
</file>

<file path=Object 74/content.xml><?xml version="1.0" encoding="utf-8"?>
<math xmlns="http://www.w3.org/1998/Math/MathML" display="block">
  <semantics>
    <mrow>
      <mo fence="true" form="prefix" stretchy="true">(</mo>
      <mrow>
        <mfrac>
          <mrow>
            <msup>
              <mi>N</mi>
              <mn>2</mn>
            </msup>
            <mi>−</mi>
            <mi>N</mi>
          </mrow>
          <mn>2</mn>
        </mfrac>
      </mrow>
      <mo fence="true" form="postfix" stretchy="true">)</mo>
    </mrow>
    <annotation encoding="StarMath 5.0">left ({{N} ^ {2} − N} over {2} right )</annotation>
  </semantics>
</math>
</file>

<file path=Object 75/content.xml><?xml version="1.0" encoding="utf-8"?>
<math xmlns="http://www.w3.org/1998/Math/MathML" display="block">
  <semantics>
    <mrow>
      <mrow>
        <mi>R</mi>
        <mo stretchy="false">=</mo>
        <msub>
          <mi>H</mi>
          <mrow>
            <mi>n</mi>
            <mi>−</mi>
            <mn>1</mn>
          </mrow>
        </msub>
      </mrow>
      <mi>⋅</mi>
      <mn>...</mn>
      <mi>⋅</mi>
      <msub>
        <mi>H</mi>
        <mn>1</mn>
      </msub>
      <mi>⋅</mi>
      <mi>A</mi>
    </mrow>
    <annotation encoding="StarMath 5.0">R = {H} rsub {n − 1} ⋅ ... ⋅ {H} rsub {1} ⋅ A</annotation>
  </semantics>
</math>
</file>

<file path=Object 76/content.xml><?xml version="1.0" encoding="utf-8"?>
<math xmlns="http://www.w3.org/1998/Math/MathML" display="block">
  <semantics>
    <mrow>
      <msup>
        <mi>Q</mi>
        <mi>T</mi>
      </msup>
      <mi>⋅</mi>
      <mrow>
        <mi>A</mi>
        <mo stretchy="false">=</mo>
        <mi>R</mi>
      </mrow>
      <mi>,</mi>
    </mrow>
    <annotation encoding="StarMath 5.0">{Q} ^ {T} ⋅ A = R ,</annotation>
  </semantics>
</math>
</file>

<file path=Object 77/content.xml><?xml version="1.0" encoding="utf-8"?>
<math xmlns="http://www.w3.org/1998/Math/MathML" display="block">
  <semantics>
    <mrow>
      <mrow>
        <mi>Q</mi>
        <mo stretchy="false">=</mo>
        <msubsup>
          <mi>H</mi>
          <mn>1</mn>
          <mi>T</mi>
        </msubsup>
      </mrow>
      <mi>⋅</mi>
      <mn>...</mn>
      <mi>⋅</mi>
      <msubsup>
        <mi>H</mi>
        <mrow>
          <mi>n</mi>
          <mi>−</mi>
          <mn>1</mn>
        </mrow>
        <mi>T</mi>
      </msubsup>
      <mi>.</mi>
    </mrow>
    <annotation encoding="StarMath 5.0">Q = {H} rsub {1} rsup {T} ⋅ ... ⋅ {H} rsub {n − 1} rsup {T} .</annotation>
  </semantics>
</math>
</file>

<file path=Object 78/content.xml><?xml version="1.0" encoding="utf-8"?>
<math xmlns="http://www.w3.org/1998/Math/MathML" display="block">
  <semantics>
    <msub>
      <mrow>
        <mo fence="true" form="prefix" stretchy="true">‖</mo>
        <mrow>
          <mrow>
            <mi mathvariant="italic">QR</mi>
            <mi>−</mi>
            <mi>A</mi>
          </mrow>
        </mrow>
        <mo fence="true" form="postfix" stretchy="true">‖</mo>
      </mrow>
      <mi>F</mi>
    </msub>
    <annotation encoding="StarMath 5.0">{left ldline QR − A right rdline} rsub {F}</annotation>
  </semantics>
</math>
</file>

<file path=Object 79/content.xml><?xml version="1.0" encoding="utf-8"?>
<math xmlns="http://www.w3.org/1998/Math/MathML" display="block">
  <semantics>
    <mfrac>
      <msub>
        <mrow>
          <mo fence="true" form="prefix" stretchy="true">|</mo>
          <mrow>
            <mrow>
              <mo fence="true" form="prefix" stretchy="true">|</mo>
              <mrow>
                <mrow>
                  <mi mathvariant="italic">QR</mi>
                  <mi>−</mi>
                  <mi>A</mi>
                </mrow>
              </mrow>
              <mo fence="true" form="postfix" stretchy="true">|</mo>
            </mrow>
          </mrow>
          <mo fence="true" form="postfix" stretchy="true">|</mo>
        </mrow>
        <mi>F</mi>
      </msub>
      <msub>
        <mrow>
          <mo fence="true" form="prefix" stretchy="true">‖</mo>
          <mrow>
            <mi>A</mi>
          </mrow>
          <mo fence="true" form="postfix" stretchy="true">‖</mo>
        </mrow>
        <mi>F</mi>
      </msub>
    </mfrac>
    <annotation encoding="StarMath 5.0">{{left lline left lline QR − A right rline right rline} rsub {F}} over {{left ldline A right rdline} rsub {F}}</annotation>
  </semantics>
</math>
</file>

<file path=Object 8/content.xml><?xml version="1.0" encoding="utf-8"?>
<math xmlns="http://www.w3.org/1998/Math/MathML" display="block">
  <semantics>
    <mi>v</mi>
    <annotation encoding="StarMath 5.0">v</annotation>
  </semantics>
</math>
</file>

<file path=Object 80/content.xml><?xml version="1.0" encoding="utf-8"?>
<math xmlns="http://www.w3.org/1998/Math/MathML" display="block">
  <semantics>
    <msub>
      <mrow>
        <mo fence="true" form="prefix" stretchy="true">‖</mo>
        <mrow>
          <mrow>
            <mi mathvariant="italic">scilab</mi>
            <mtext>_</mtext>
            <mi>Q</mi>
            <mi>∗</mi>
            <mi mathvariant="italic">scilab</mi>
            <mtext>_</mtext>
            <mi>R</mi>
            <mi>−</mi>
            <mi>A</mi>
          </mrow>
        </mrow>
        <mo fence="true" form="postfix" stretchy="true">‖</mo>
      </mrow>
      <mi>F</mi>
    </msub>
    <annotation encoding="StarMath 5.0">{left ldline scilab "_" Q ∗ scilab "_" R − A right rdline} rsub {F}</annotation>
  </semantics>
</math>
</file>

<file path=Object 81/content.xml><?xml version="1.0" encoding="utf-8"?>
<math xmlns="http://www.w3.org/1998/Math/MathML" display="block">
  <semantics>
    <mfrac>
      <msub>
        <mrow>
          <mo fence="true" form="prefix" stretchy="true">‖</mo>
          <mrow>
            <mrow>
              <mi mathvariant="italic">scilab</mi>
              <mtext>_</mtext>
              <mi>Q</mi>
              <mi>∗</mi>
              <mi mathvariant="italic">scilab</mi>
              <mtext>_</mtext>
              <mi>R</mi>
              <mi>−</mi>
              <mi>A</mi>
            </mrow>
          </mrow>
          <mo fence="true" form="postfix" stretchy="true">‖</mo>
        </mrow>
        <mi>F</mi>
      </msub>
      <msub>
        <mrow>
          <mo fence="true" form="prefix" stretchy="true">‖</mo>
          <mrow>
            <mi>A</mi>
          </mrow>
          <mo fence="true" form="postfix" stretchy="true">‖</mo>
        </mrow>
        <mi>F</mi>
      </msub>
    </mfrac>
    <annotation encoding="StarMath 5.0">{{left ldline scilab "_" Q ∗ scilab "_" R − A right rdline} rsub {F}} over {{left ldline A right rdline} rsub {F}}</annotation>
  </semantics>
</math>
</file>

<file path=Object 82/content.xml><?xml version="1.0" encoding="utf-8"?>
<math xmlns="http://www.w3.org/1998/Math/MathML" display="block">
  <semantics>
    <msub>
      <mrow>
        <mo fence="true" form="prefix" stretchy="true">‖</mo>
        <mrow>
          <mrow>
            <mi mathvariant="italic">my</mi>
            <mtext>_</mtext>
            <mi>Q</mi>
            <mi>−</mi>
            <mi mathvariant="italic">scilab</mi>
            <mtext>_</mtext>
            <mi>Q</mi>
          </mrow>
        </mrow>
        <mo fence="true" form="postfix" stretchy="true">‖</mo>
      </mrow>
      <mi>F</mi>
    </msub>
    <annotation encoding="StarMath 5.0">{left ldline my "_" Q − scilab "_" Q right rdline} rsub {F}</annotation>
  </semantics>
</math>
</file>

<file path=Object 83/content.xml><?xml version="1.0" encoding="utf-8"?>
<math xmlns="http://www.w3.org/1998/Math/MathML" display="block">
  <semantics>
    <mfrac>
      <msub>
        <mrow>
          <mo fence="true" form="prefix" stretchy="true">‖</mo>
          <mrow>
            <mrow>
              <mi mathvariant="italic">my</mi>
              <mtext>_</mtext>
              <mi>Q</mi>
              <mi>−</mi>
              <mi mathvariant="italic">scilab</mi>
              <mtext>_</mtext>
              <mi>Q</mi>
            </mrow>
          </mrow>
          <mo fence="true" form="postfix" stretchy="true">‖</mo>
        </mrow>
        <mi>F</mi>
      </msub>
      <msub>
        <mrow>
          <mo fence="true" form="prefix" stretchy="true">‖</mo>
          <mrow>
            <mrow>
              <mi mathvariant="italic">scilab</mi>
              <mtext>_</mtext>
              <mi>Q</mi>
            </mrow>
          </mrow>
          <mo fence="true" form="postfix" stretchy="true">‖</mo>
        </mrow>
        <mi>F</mi>
      </msub>
    </mfrac>
    <annotation encoding="StarMath 5.0">{{left ldline my "_" Q − scilab "_" Q right rdline} rsub {F}} over {{left ldline scilab "_" Q right rdline} rsub {F}}</annotation>
  </semantics>
</math>
</file>

<file path=Object 84/content.xml><?xml version="1.0" encoding="utf-8"?>
<math xmlns="http://www.w3.org/1998/Math/MathML" display="block">
  <semantics>
    <msub>
      <mrow>
        <mo fence="true" form="prefix" stretchy="true">‖</mo>
        <mrow>
          <mrow>
            <mi mathvariant="italic">my</mi>
            <mtext>_</mtext>
            <mi>R</mi>
            <mi>−</mi>
            <mi mathvariant="italic">scilab</mi>
            <mtext>_</mtext>
            <mi>R</mi>
          </mrow>
        </mrow>
        <mo fence="true" form="postfix" stretchy="true">‖</mo>
      </mrow>
      <mi>F</mi>
    </msub>
    <annotation encoding="StarMath 5.0">{left ldline my "_" R − scilab "_" R right rdline} rsub {F}</annotation>
  </semantics>
</math>
</file>

<file path=Object 85/content.xml><?xml version="1.0" encoding="utf-8"?>
<math xmlns="http://www.w3.org/1998/Math/MathML" display="block">
  <semantics>
    <mfrac>
      <msub>
        <mrow>
          <mo fence="true" form="prefix" stretchy="true">‖</mo>
          <mrow>
            <mrow>
              <mi mathvariant="italic">my</mi>
              <mtext>_</mtext>
              <mi>R</mi>
              <mi>−</mi>
              <mi mathvariant="italic">scilab</mi>
              <mtext>_</mtext>
              <mi>R</mi>
            </mrow>
          </mrow>
          <mo fence="true" form="postfix" stretchy="true">‖</mo>
        </mrow>
        <mi>F</mi>
      </msub>
      <msub>
        <mrow>
          <mo fence="true" form="prefix" stretchy="true">‖</mo>
          <mrow>
            <mrow>
              <mi mathvariant="italic">scilab</mi>
              <mtext>_</mtext>
              <mi>R</mi>
            </mrow>
          </mrow>
          <mo fence="true" form="postfix" stretchy="true">‖</mo>
        </mrow>
        <mi>F</mi>
      </msub>
    </mfrac>
    <annotation encoding="StarMath 5.0">{{left ldline my "_" R − scilab "_" R right rdline} rsub {F}} over {{left ldline scilab "_" R right rdline} rsub {F}}</annotation>
  </semantics>
</math>
</file>

<file path=Object 86/content.xml><?xml version="1.0" encoding="utf-8"?>
<math xmlns="http://www.w3.org/1998/Math/MathML" display="block">
  <semantics>
    <mrow>
      <msup>
        <mrow>
          <msub>
            <mrow>
              <mo stretchy="false">(</mo>
              <mi>a</mi>
            </mrow>
            <mn>11</mn>
          </msub>
          <msub>
            <mrow>
              <mi>,</mi>
              <mi>a</mi>
            </mrow>
            <mn>21</mn>
          </msub>
          <mi>,</mi>
          <mi>…</mi>
          <msub>
            <mrow>
              <mi>,</mi>
              <mi>a</mi>
            </mrow>
            <mrow>
              <mi>n</mi>
              <mn>1</mn>
            </mrow>
          </msub>
          <mo stretchy="false">)</mo>
        </mrow>
        <mi>T</mi>
      </msup>
      <mi>.</mi>
    </mrow>
    <annotation encoding="StarMath 5.0">{{\( a} rsub {11} {, a} rsub {21} , … {, a} rsub {n 1} \)} ^ {T} .</annotation>
  </semantics>
</math>
</file>

<file path=Object 87/content.xml><?xml version="1.0" encoding="utf-8"?>
<math xmlns="http://www.w3.org/1998/Math/MathML" display="block">
  <semantics>
    <mrow>
      <mrow>
        <msub>
          <mi>H</mi>
          <mi>k</mi>
        </msub>
        <mo stretchy="false">=</mo>
        <mi>E</mi>
      </mrow>
      <mi>−</mi>
      <mn>2</mn>
      <msub>
        <mi>v</mi>
        <mi>k</mi>
      </msub>
      <msubsup>
        <mi>v</mi>
        <mi>k</mi>
        <mi>T</mi>
      </msubsup>
    </mrow>
    <annotation encoding="StarMath 5.0">{H} rsub {k} = E − 2 {v} rsub {k} {v} rsub {k} rsup {T}</annotation>
  </semantics>
</math>
</file>

<file path=Object 88/content.xml><?xml version="1.0" encoding="utf-8"?>
<math xmlns="http://www.w3.org/1998/Math/MathML" display="block">
  <semantics>
    <mrow>
      <mrow>
        <msub>
          <mi>v</mi>
          <mn>1</mn>
        </msub>
        <mo stretchy="false">=</mo>
        <msub>
          <mi>μ</mi>
          <mn>1</mn>
        </msub>
      </mrow>
      <msup>
        <mrow>
          <msub>
            <mrow>
              <mo stretchy="false">(</mo>
              <mi>a</mi>
            </mrow>
            <mn>11</mn>
          </msub>
          <mi>−</mi>
          <msub>
            <mi>β</mi>
            <mn>1</mn>
          </msub>
          <msub>
            <mrow>
              <mi>,</mi>
              <mi>a</mi>
            </mrow>
            <mn>21</mn>
          </msub>
          <mi>,</mi>
          <mi>…</mi>
          <msub>
            <mrow>
              <mi>,</mi>
              <mi>a</mi>
            </mrow>
            <mrow>
              <mi>n</mi>
              <mn>1</mn>
            </mrow>
          </msub>
          <mo stretchy="false">)</mo>
        </mrow>
        <mi>T</mi>
      </msup>
    </mrow>
    <annotation encoding="StarMath 5.0">{v} rsub {1} = {μ} rsub {1} {{\( a} rsub {11} − {β} rsub {1} {, a} rsub {21} , … {, a} rsub {n 1} \)} ^ {T}</annotation>
  </semantics>
</math>
</file>

<file path=Object 89/content.xml><?xml version="1.0" encoding="utf-8"?>
<math xmlns="http://www.w3.org/1998/Math/MathML" display="block">
  <semantics>
    <mrow>
      <mrow>
        <msub>
          <mi>β</mi>
          <mn>1</mn>
        </msub>
        <mo stretchy="false">=</mo>
        <mi mathvariant="italic">sign</mi>
      </mrow>
      <mrow>
        <mo fence="true" form="prefix" stretchy="true">(</mo>
        <mrow>
          <mrow>
            <mi>−</mi>
            <msub>
              <mi>a</mi>
              <mn>11</mn>
            </msub>
          </mrow>
        </mrow>
        <mo fence="true" form="postfix" stretchy="true">)</mo>
      </mrow>
      <msqrt>
        <mrow>
          <munderover>
            <mo stretchy="false">∑</mo>
            <mrow>
              <mi>i</mi>
              <mo stretchy="false">=</mo>
              <mn>1</mn>
            </mrow>
            <mi>n</mi>
          </munderover>
          <msubsup>
            <mi>a</mi>
            <mrow>
              <mi>i</mi>
              <mn>1</mn>
            </mrow>
            <mn>2</mn>
          </msubsup>
        </mrow>
      </msqrt>
    </mrow>
    <annotation encoding="StarMath 5.0">{β} rsub {1} = sign left (− {a} rsub {11} right ) sqrt {sum from {i = 1} to {n} {{a} rsub {i 1} rsup {2}}}</annotation>
  </semantics>
</math>
</file>

<file path=Object 9/content.xml><?xml version="1.0" encoding="utf-8"?>
<math xmlns="http://www.w3.org/1998/Math/MathML" display="block">
  <semantics>
    <mi mathvariant="italic">Hx</mi>
    <annotation encoding="StarMath 5.0">Hx</annotation>
  </semantics>
</math>
</file>

<file path=Object 90/content.xml><?xml version="1.0" encoding="utf-8"?>
<math xmlns="http://www.w3.org/1998/Math/MathML" display="block">
  <semantics>
    <mrow>
      <msub>
        <mi>μ</mi>
        <mn>1</mn>
      </msub>
      <mo stretchy="false">=</mo>
      <mfrac>
        <mn>1</mn>
        <msqrt>
          <mrow>
            <mn>2</mn>
            <msubsup>
              <mi>β</mi>
              <mn>1</mn>
              <mn>2</mn>
            </msubsup>
            <mi>−</mi>
            <mn>2</mn>
            <msub>
              <mi>β</mi>
              <mn>1</mn>
            </msub>
            <msub>
              <mi>a</mi>
              <mn>11</mn>
            </msub>
          </mrow>
        </msqrt>
      </mfrac>
    </mrow>
    <annotation encoding="StarMath 5.0">{μ} rsub {1} = {1} over {sqrt {2 {β} rsub {1} rsup {2} − 2 {β} rsub {1} {a} rsub {11}}}</annotation>
  </semantics>
</math>
</file>

<file path=Object 91/content.xml><?xml version="1.0" encoding="utf-8"?>
<math xmlns="http://www.w3.org/1998/Math/MathML" display="block">
  <semantics>
    <mrow>
      <mrow>
        <msub>
          <mover accent="true">
            <mi>A</mi>
            <mo stretchy="true">~</mo>
          </mover>
          <mn>1</mn>
        </msub>
        <mo stretchy="false">=</mo>
        <msub>
          <mi>H</mi>
          <mn>1</mn>
        </msub>
      </mrow>
      <mi>A</mi>
    </mrow>
    <annotation encoding="StarMath 5.0">{widetilde {A}} rsub {1} = {H} rsub {1} A</annotation>
  </semantics>
</math>
</file>

<file path=Object 92/content.xml><?xml version="1.0" encoding="utf-8"?>
<math xmlns="http://www.w3.org/1998/Math/MathML" display="block">
  <semantics>
    <mrow>
      <msub>
        <mover accent="true">
          <mi>a</mi>
          <mo stretchy="true">~</mo>
        </mover>
        <mn>11</mn>
      </msub>
      <mo stretchy="false">=</mo>
      <msub>
        <mi>β</mi>
        <mn>1</mn>
      </msub>
    </mrow>
    <annotation encoding="StarMath 5.0">{widetilde {a}} rsub {11} = {β} rsub {1}</annotation>
  </semantics>
</math>
</file>

<file path=Object 93/content.xml><?xml version="1.0" encoding="utf-8"?>
<math xmlns="http://www.w3.org/1998/Math/MathML" display="block">
  <semantics>
    <mrow>
      <mrow>
        <msub>
          <mi>H</mi>
          <mn>2</mn>
        </msub>
        <mo stretchy="false">=</mo>
        <mi>E</mi>
      </mrow>
      <mi>−</mi>
      <mn>2</mn>
      <msub>
        <mi>v</mi>
        <mn>2</mn>
      </msub>
      <msubsup>
        <mi>v</mi>
        <mn>2</mn>
        <mi>T</mi>
      </msubsup>
    </mrow>
    <annotation encoding="StarMath 5.0">{H} rsub {2} = E − 2 {v} rsub {2} {v} rsub {2} rsup {T}</annotation>
  </semantics>
</math>
</file>

<file path=Object 94/content.xml><?xml version="1.0" encoding="utf-8"?>
<math xmlns="http://www.w3.org/1998/Math/MathML" display="block">
  <semantics>
    <mrow>
      <mrow>
        <msub>
          <mi>v</mi>
          <mn>2</mn>
        </msub>
        <mo stretchy="false">=</mo>
        <msub>
          <mi>μ</mi>
          <mn>2</mn>
        </msub>
      </mrow>
      <msup>
        <mrow>
          <msub>
            <mrow>
              <mo stretchy="false">(</mo>
              <mn>0</mn>
              <mi>;</mi>
              <mover accent="true">
                <mi>a</mi>
                <mo stretchy="true">~</mo>
              </mover>
            </mrow>
            <mn>22</mn>
          </msub>
          <mi>−</mi>
          <msub>
            <mi>β</mi>
            <mn>2</mn>
          </msub>
          <msub>
            <mrow>
              <mi>,</mi>
              <mover accent="true">
                <mi>a</mi>
                <mo stretchy="true">~</mo>
              </mover>
            </mrow>
            <mn>32</mn>
          </msub>
          <mi>,</mi>
          <mi>…</mi>
          <msub>
            <mrow>
              <mi>,</mi>
              <mover accent="true">
                <mi>a</mi>
                <mo stretchy="true">~</mo>
              </mover>
            </mrow>
            <mrow>
              <mi>n</mi>
              <mn>2</mn>
            </mrow>
          </msub>
          <mo stretchy="false">)</mo>
        </mrow>
        <mi>T</mi>
      </msup>
    </mrow>
    <annotation encoding="StarMath 5.0">{v} rsub {2} = {μ} rsub {2} {{\( 0 ; widetilde {a}} rsub {22} − {β} rsub {2} {, widetilde {a}} rsub {32} , … {, widetilde {a}} rsub {n 2} \)} ^ {T}</annotation>
  </semantics>
</math>
</file>

<file path=Object 95/content.xml><?xml version="1.0" encoding="utf-8"?>
<math xmlns="http://www.w3.org/1998/Math/MathML" display="block">
  <semantics>
    <mrow>
      <mrow>
        <msub>
          <mi>β</mi>
          <mn>2</mn>
        </msub>
        <mo stretchy="false">=</mo>
        <mi mathvariant="italic">sign</mi>
      </mrow>
      <mrow>
        <mo fence="true" form="prefix" stretchy="true">(</mo>
        <mrow>
          <mrow>
            <mi>−</mi>
            <msub>
              <mover accent="true">
                <mi>a</mi>
                <mo stretchy="true">~</mo>
              </mover>
              <mn>22</mn>
            </msub>
          </mrow>
        </mrow>
        <mo fence="true" form="postfix" stretchy="true">)</mo>
      </mrow>
      <msqrt>
        <mrow>
          <munderover>
            <mo stretchy="false">∑</mo>
            <mrow>
              <mi>i</mi>
              <mo stretchy="false">=</mo>
              <mn>2</mn>
            </mrow>
            <mi>n</mi>
          </munderover>
          <msubsup>
            <mover accent="true">
              <mi>a</mi>
              <mo stretchy="true">~</mo>
            </mover>
            <mrow>
              <mi>i</mi>
              <mn>2</mn>
            </mrow>
            <mn>2</mn>
          </msubsup>
        </mrow>
      </msqrt>
    </mrow>
    <annotation encoding="StarMath 5.0">{β} rsub {2} = sign left (− {widetilde {a}} rsub {22} right ) sqrt {sum from {i = 2} to {n} {{widetilde {a}} rsub {i 2} rsup {2}}}</annotation>
  </semantics>
</math>
</file>

<file path=Object 96/content.xml><?xml version="1.0" encoding="utf-8"?>
<math xmlns="http://www.w3.org/1998/Math/MathML" display="block">
  <semantics>
    <mrow>
      <msub>
        <mi>μ</mi>
        <mn>2</mn>
      </msub>
      <mo stretchy="false">=</mo>
      <mfrac>
        <mn>1</mn>
        <msqrt>
          <mrow>
            <mn>2</mn>
            <msubsup>
              <mi>β</mi>
              <mn>2</mn>
              <mn>2</mn>
            </msubsup>
            <mi>−</mi>
            <mn>2</mn>
            <msub>
              <mi>β</mi>
              <mn>2</mn>
            </msub>
            <msub>
              <mover accent="true">
                <mi>a</mi>
                <mo stretchy="true">~</mo>
              </mover>
              <mn>22</mn>
            </msub>
          </mrow>
        </msqrt>
      </mfrac>
    </mrow>
    <annotation encoding="StarMath 5.0">{μ} rsub {2} = {1} over {sqrt {2 {β} rsub {2} rsup {2} − 2 {β} rsub {2} {widetilde {a}} rsub {22}}}</annotation>
  </semantics>
</math>
</file>

<file path=Object 97/content.xml><?xml version="1.0" encoding="utf-8"?>
<math xmlns="http://www.w3.org/1998/Math/MathML" display="block">
  <semantics>
    <mrow>
      <mrow>
        <msub>
          <mi>β</mi>
          <mi>k</mi>
        </msub>
        <mo stretchy="false">=</mo>
        <mi mathvariant="italic">sign</mi>
      </mrow>
      <mrow>
        <mo fence="true" form="prefix" stretchy="true">(</mo>
        <mrow>
          <mrow>
            <mi>−</mi>
            <msub>
              <mover accent="true">
                <mi>a</mi>
                <mo stretchy="true">~</mo>
              </mover>
              <mi mathvariant="italic">kk</mi>
            </msub>
          </mrow>
        </mrow>
        <mo fence="true" form="postfix" stretchy="true">)</mo>
      </mrow>
      <msqrt>
        <mrow>
          <munderover>
            <mo stretchy="false">∑</mo>
            <mrow>
              <mi>i</mi>
              <mo stretchy="false">=</mo>
              <mi>k</mi>
            </mrow>
            <mi>n</mi>
          </munderover>
          <msubsup>
            <mover accent="true">
              <mi>a</mi>
              <mo stretchy="true">~</mo>
            </mover>
            <mi mathvariant="italic">ik</mi>
            <mn>2</mn>
          </msubsup>
        </mrow>
      </msqrt>
    </mrow>
    <annotation encoding="StarMath 5.0">{β} rsub {k} = sign left (− {widetilde {a}} rsub {kk} right ) sqrt {sum from {i = k} to {n} {{widetilde {a}} rsub {ik} rsup {2}}}</annotation>
  </semantics>
</math>
</file>

<file path=Object 98/content.xml><?xml version="1.0" encoding="utf-8"?>
<math xmlns="http://www.w3.org/1998/Math/MathML" display="block">
  <semantics>
    <mrow>
      <msub>
        <mi>μ</mi>
        <mi>k</mi>
      </msub>
      <mo stretchy="false">=</mo>
      <mfrac>
        <mn>1</mn>
        <msqrt>
          <mrow>
            <mn>2</mn>
            <msubsup>
              <mi>β</mi>
              <mi>k</mi>
              <mn>2</mn>
            </msubsup>
            <mi>−</mi>
            <mn>2</mn>
            <msub>
              <mi>β</mi>
              <mi>k</mi>
            </msub>
            <msub>
              <mover accent="true">
                <mi>a</mi>
                <mo stretchy="true">~</mo>
              </mover>
              <mi mathvariant="italic">kk</mi>
            </msub>
          </mrow>
        </msqrt>
      </mfrac>
    </mrow>
    <annotation encoding="StarMath 5.0">{μ} rsub {k} = {1} over {sqrt {2 {β} rsub {k} rsup {2} − 2 {β} rsub {k} {widetilde {a}} rsub {kk}}}</annotation>
  </semantics>
</math>
</file>

<file path=Object 99/content.xml><?xml version="1.0" encoding="utf-8"?>
<math xmlns="http://www.w3.org/1998/Math/MathML" display="block">
  <semantics>
    <mrow>
      <mrow>
        <msub>
          <mi>v</mi>
          <mi>k</mi>
        </msub>
        <mo stretchy="false">=</mo>
        <msub>
          <mi>μ</mi>
          <mi>k</mi>
        </msub>
      </mrow>
      <mrow>
        <mo fence="true" form="prefix" stretchy="true">(</mo>
        <mrow>
          <mrow>
            <mn>0</mn>
            <mi>;</mi>
            <mi>…</mi>
            <mi>;</mi>
            <mn>0</mn>
            <mi>;</mi>
            <msub>
              <mover accent="true">
                <mi>a</mi>
                <mo stretchy="true">~</mo>
              </mover>
              <mi mathvariant="italic">kk</mi>
            </msub>
            <mi>−</mi>
            <msub>
              <mi>β</mi>
              <mi>k</mi>
            </msub>
            <mi>;</mi>
            <msub>
              <mover accent="true">
                <mi>a</mi>
                <mo stretchy="true">~</mo>
              </mover>
              <mrow>
                <mrow>
                  <mo fence="true" form="prefix" stretchy="true">(</mo>
                  <mrow>
                    <mrow>
                      <mi>k</mi>
                      <mo stretchy="false">+</mo>
                      <mn>1</mn>
                    </mrow>
                  </mrow>
                  <mo fence="true" form="postfix" stretchy="true">)</mo>
                </mrow>
                <mi>k</mi>
              </mrow>
            </msub>
            <mi>;</mi>
            <msub>
              <mrow>
                <mi>…</mi>
                <mi>;</mi>
                <mover accent="true">
                  <mi>a</mi>
                  <mo stretchy="true">~</mo>
                </mover>
              </mrow>
              <mi mathvariant="italic">nk</mi>
            </msub>
          </mrow>
        </mrow>
        <mo fence="true" form="postfix" stretchy="true">)</mo>
      </mrow>
      <mi>,</mi>
    </mrow>
    <annotation encoding="StarMath 5.0">{v} rsub {k} = {μ} rsub {k} left (0 ; … ; 0 ; {widetilde {a}} rsub {kk} − {β} rsub {k} ; {widetilde {a}} rsub {left (k + 1 right ) k} ; {… ; widetilde {a}} rsub {nk} right ) ,</annotation>
  </semantics>
</math>
</file>